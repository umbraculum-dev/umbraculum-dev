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Narrow" svg:font-family="'Arial Narrow'"/>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1.679cm"/>
    </style:style>
    <style:style style:name="co3" style:family="table-column">
      <style:table-column-properties fo:break-before="auto" style:column-width="1.707cm"/>
    </style:style>
    <style:style style:name="co4" style:family="table-column">
      <style:table-column-properties fo:break-before="auto" style:column-width="7.364cm"/>
    </style:style>
    <style:style style:name="co5" style:family="table-column">
      <style:table-column-properties fo:break-before="auto" style:column-width="4.424cm"/>
    </style:style>
    <style:style style:name="co6" style:family="table-column">
      <style:table-column-properties fo:break-before="auto" style:column-width="3.697cm"/>
    </style:style>
    <style:style style:name="co7" style:family="table-column">
      <style:table-column-properties fo:break-before="auto" style:column-width="1.96cm"/>
    </style:style>
    <style:style style:name="co8" style:family="table-column">
      <style:table-column-properties fo:break-before="auto" style:column-width="1.737cm"/>
    </style:style>
    <style:style style:name="co9" style:family="table-column">
      <style:table-column-properties fo:break-before="auto" style:column-width="5.376cm"/>
    </style:style>
    <style:style style:name="co10" style:family="table-column">
      <style:table-column-properties fo:break-before="auto" style:column-width="3.554cm"/>
    </style:style>
    <style:style style:name="co11" style:family="table-column">
      <style:table-column-properties fo:break-before="auto" style:column-width="2.66cm"/>
    </style:style>
    <style:style style:name="co12" style:family="table-column">
      <style:table-column-properties fo:break-before="auto" style:column-width="2.912cm"/>
    </style:style>
    <style:style style:name="co13" style:family="table-column">
      <style:table-column-properties fo:break-before="auto" style:column-width="2.044cm"/>
    </style:style>
    <style:style style:name="co14" style:family="table-column">
      <style:table-column-properties fo:break-before="auto" style:column-width="5.683cm"/>
    </style:style>
    <style:style style:name="co15" style:family="table-column">
      <style:table-column-properties fo:break-before="auto" style:column-width="2.716cm"/>
    </style:style>
    <style:style style:name="co16" style:family="table-column">
      <style:table-column-properties fo:break-before="auto" style:column-width="2.856cm"/>
    </style:style>
    <style:style style:name="co17" style:family="table-column">
      <style:table-column-properties fo:break-before="auto" style:column-width="2.771cm"/>
    </style:style>
    <style:style style:name="co18" style:family="table-column">
      <style:table-column-properties fo:break-before="auto" style:column-width="2.94cm"/>
    </style:style>
    <style:style style:name="co19" style:family="table-column">
      <style:table-column-properties fo:break-before="auto" style:column-width="3.023cm"/>
    </style:style>
    <style:style style:name="co20" style:family="table-column">
      <style:table-column-properties fo:break-before="auto" style:column-width="4.985cm"/>
    </style:style>
    <style:style style:name="co21" style:family="table-column">
      <style:table-column-properties fo:break-before="auto" style:column-width="2.436cm"/>
    </style:style>
    <style:style style:name="co22" style:family="table-column">
      <style:table-column-properties fo:break-before="auto" style:column-width="1.849cm"/>
    </style:style>
    <style:style style:name="co23" style:family="table-column">
      <style:table-column-properties fo:break-before="auto" style:column-width="2.073cm"/>
    </style:style>
    <style:style style:name="co24" style:family="table-column">
      <style:table-column-properties fo:break-before="auto" style:column-width="1.877cm"/>
    </style:style>
    <style:style style:name="co25" style:family="table-column">
      <style:table-column-properties fo:break-before="auto" style:column-width="3.221cm"/>
    </style:style>
    <style:style style:name="co26" style:family="table-column">
      <style:table-column-properties fo:break-before="auto" style:column-width="2.351cm"/>
    </style:style>
    <style:style style:name="co27" style:family="table-column">
      <style:table-column-properties fo:break-before="auto" style:column-width="2.632cm"/>
    </style:style>
    <style:style style:name="co28" style:family="table-column">
      <style:table-column-properties fo:break-before="auto" style:column-width="2.268cm"/>
    </style:style>
    <style:style style:name="ro1" style:family="table-row">
      <style:table-row-properties style:row-height="1.349cm" fo:break-before="auto" style:use-optimal-row-height="false"/>
    </style:style>
    <style:style style:name="ro2" style:family="table-row">
      <style:table-row-properties style:row-height="0.926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2.858cm" fo:break-before="auto" style:use-optimal-row-height="false"/>
    </style:style>
    <style:style style:name="ro5" style:family="table-row">
      <style:table-row-properties style:row-height="3.889cm" fo:break-before="auto" style:use-optimal-row-height="false"/>
    </style:style>
    <style:style style:name="ro6" style:family="table-row">
      <style:table-row-properties style:row-height="1.244cm" fo:break-before="auto" style:use-optimal-row-height="false"/>
    </style:style>
    <style:style style:name="ro7" style:family="table-row">
      <style:table-row-properties style:row-height="4.842cm" fo:break-before="auto" style:use-optimal-row-height="false"/>
    </style:style>
    <style:style style:name="ro8" style:family="table-row">
      <style:table-row-properties style:row-height="1.984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2.778cm" fo:break-before="auto" style:use-optimal-row-height="false"/>
    </style:style>
    <style:style style:name="ro11" style:family="table-row">
      <style:table-row-properties style:row-height="4.921cm" fo:break-before="auto" style:use-optimal-row-height="false"/>
    </style:style>
    <style:style style:name="ro12" style:family="table-row">
      <style:table-row-properties style:row-height="2.434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1.429cm" fo:break-before="auto" style:use-optimal-row-height="false"/>
    </style:style>
    <style:style style:name="ro15" style:family="table-row">
      <style:table-row-properties style:row-height="5.477cm" fo:break-before="auto" style:use-optimal-row-height="false"/>
    </style:style>
    <style:style style:name="ro16" style:family="table-row">
      <style:table-row-properties style:row-height="2.593cm" fo:break-before="auto" style:use-optimal-row-height="false"/>
    </style:style>
    <style:style style:name="ro17" style:family="table-row">
      <style:table-row-properties style:row-height="5.001cm" fo:break-before="auto" style:use-optimal-row-height="false"/>
    </style:style>
    <style:style style:name="ro18" style:family="table-row">
      <style:table-row-properties style:row-height="1.799cm" fo:break-before="auto" style:use-optimal-row-height="false"/>
    </style:style>
    <style:style style:name="ro19" style:family="table-row">
      <style:table-row-properties style:row-height="3.307cm" fo:break-before="auto" style:use-optimal-row-height="false"/>
    </style:style>
    <style:style style:name="ro20" style:family="table-row">
      <style:table-row-properties style:row-height="1.905cm" fo:break-before="auto" style:use-optimal-row-height="false"/>
    </style:style>
    <style:style style:name="ro21" style:family="table-row">
      <style:table-row-properties style:row-height="3.016cm" fo:break-before="auto" style:use-optimal-row-height="false"/>
    </style:style>
    <style:style style:name="ro22" style:family="table-row">
      <style:table-row-properties style:row-height="2.117cm" fo:break-before="auto" style:use-optimal-row-height="false"/>
    </style:style>
    <style:style style:name="ro23" style:family="table-row">
      <style:table-row-properties style:row-height="3.942cm" fo:break-before="auto" style:use-optimal-row-height="false"/>
    </style:style>
    <style:style style:name="ro24" style:family="table-row">
      <style:table-row-properties style:row-height="1.826cm" fo:break-before="auto" style:use-optimal-row-height="false"/>
    </style:style>
    <style:style style:name="ro25" style:family="table-row">
      <style:table-row-properties style:row-height="2.566cm" fo:break-before="auto" style:use-optimal-row-height="false"/>
    </style:style>
    <style:style style:name="ro26" style:family="table-row">
      <style:table-row-properties style:row-height="7.938cm" fo:break-before="auto" style:use-optimal-row-height="false"/>
    </style:style>
    <style:style style:name="ro27" style:family="table-row">
      <style:table-row-properties style:row-height="3.836cm" fo:break-before="auto" style:use-optimal-row-height="false"/>
    </style:style>
    <style:style style:name="ro28" style:family="table-row">
      <style:table-row-properties style:row-height="2.223cm" fo:break-before="auto" style:use-optimal-row-height="false"/>
    </style:style>
    <style:style style:name="ro29" style:family="table-row">
      <style:table-row-properties style:row-height="2.487cm" fo:break-before="auto" style:use-optimal-row-height="false"/>
    </style:style>
    <style:style style:name="ro30" style:family="table-row">
      <style:table-row-properties style:row-height="4.524cm" fo:break-before="auto" style:use-optimal-row-height="false"/>
    </style:style>
    <style:style style:name="ro31" style:family="table-row">
      <style:table-row-properties style:row-height="2.752cm" fo:break-before="auto" style:use-optimal-row-height="false"/>
    </style:style>
    <style:style style:name="ro32" style:family="table-row">
      <style:table-row-properties style:row-height="4.604cm" fo:break-before="auto" style:use-optimal-row-height="false"/>
    </style:style>
    <style:style style:name="ro33" style:family="table-row">
      <style:table-row-properties style:row-height="1.005cm" fo:break-before="auto" style:use-optimal-row-height="false"/>
    </style:style>
    <style:style style:name="ro34" style:family="table-row">
      <style:table-row-properties style:row-height="4.128cm" fo:break-before="auto" style:use-optimal-row-height="false"/>
    </style:style>
    <style:style style:name="ro35" style:family="table-row">
      <style:table-row-properties style:row-height="2.037cm" fo:break-before="auto" style:use-optimal-row-height="false"/>
    </style:style>
    <style:style style:name="ro36" style:family="table-row">
      <style:table-row-properties style:row-height="3.519cm" fo:break-before="auto" style:use-optimal-row-height="false"/>
    </style:style>
    <style:style style:name="ro37" style:family="table-row">
      <style:table-row-properties style:row-height="3.175cm" fo:break-before="auto" style:use-optimal-row-height="false"/>
    </style:style>
    <style:style style:name="ro38" style:family="table-row">
      <style:table-row-properties style:row-height="2.196cm" fo:break-before="auto" style:use-optimal-row-height="false"/>
    </style:style>
    <style:style style:name="ro39" style:family="table-row">
      <style:table-row-properties style:row-height="4.445cm" fo:break-before="auto" style:use-optimal-row-height="false"/>
    </style:style>
    <style:style style:name="ro40" style:family="table-row">
      <style:table-row-properties style:row-height="1.72cm" fo:break-before="auto" style:use-optimal-row-height="false"/>
    </style:style>
    <style:style style:name="ro41" style:family="table-row">
      <style:table-row-properties style:row-height="1.191cm" fo:break-before="auto" style:use-optimal-row-height="false"/>
    </style:style>
    <style:style style:name="ro42" style:family="table-row">
      <style:table-row-properties style:row-height="1.561cm" fo:break-before="auto" style:use-optimal-row-height="false"/>
    </style:style>
    <style:style style:name="ro43" style:family="table-row">
      <style:table-row-properties style:row-height="2.646cm" fo:break-before="auto" style:use-optimal-row-height="false"/>
    </style:style>
    <style:style style:name="ro44" style:family="table-row">
      <style:table-row-properties style:row-height="2.355cm" fo:break-before="auto" style:use-optimal-row-height="false"/>
    </style:style>
    <style:style style:name="ro45" style:family="table-row">
      <style:table-row-properties style:row-height="4.577cm" fo:break-before="auto" style:use-optimal-row-height="false"/>
    </style:style>
    <style:style style:name="ro46" style:family="table-row">
      <style:table-row-properties style:row-height="1.64cm" fo:break-before="auto" style:use-optimal-row-height="false"/>
    </style:style>
    <style:style style:name="ro47" style:family="table-row">
      <style:table-row-properties style:row-height="2.09cm" fo:break-before="auto" style:use-optimal-row-height="false"/>
    </style:style>
    <style:style style:name="ro48" style:family="table-row">
      <style:table-row-properties style:row-height="1.482cm" fo:break-before="auto" style:use-optimal-row-height="false"/>
    </style:style>
    <style:style style:name="ro49" style:family="table-row">
      <style:table-row-properties style:row-height="1.111cm" fo:break-before="auto" style:use-optimal-row-height="false"/>
    </style:style>
    <style:style style:name="ro50" style:family="table-row">
      <style:table-row-properties style:row-height="2.461cm" fo:break-before="auto" style:use-optimal-row-height="false"/>
    </style:style>
    <style:style style:name="ro51" style:family="table-row">
      <style:table-row-properties style:row-height="1.958cm" fo:break-before="auto" style:use-optimal-row-height="false"/>
    </style:style>
    <style:style style:name="ro52" style:family="table-row">
      <style:table-row-properties style:row-height="2.302cm" fo:break-before="auto" style:use-optimal-row-height="false"/>
    </style:style>
    <style:style style:name="ro53" style:family="table-row">
      <style:table-row-properties style:row-height="1.588cm" fo:break-before="auto" style:use-optimal-row-height="false"/>
    </style:style>
    <style:style style:name="ro54" style:family="table-row">
      <style:table-row-properties style:row-height="1.614cm" fo:break-before="auto" style:use-optimal-row-height="false"/>
    </style:style>
    <style:style style:name="ro55" style:family="table-row">
      <style:table-row-properties style:row-height="1.508cm" fo:break-before="auto" style:use-optimal-row-height="false"/>
    </style:style>
    <style:style style:name="ro56" style:family="table-row">
      <style:table-row-properties style:row-height="3.651cm" fo:break-before="auto" style:use-optimal-row-height="false"/>
    </style:style>
    <style:style style:name="ro57" style:family="table-row">
      <style:table-row-properties style:row-height="2.884cm" fo:break-before="auto" style:use-optimal-row-height="false"/>
    </style:style>
    <style:style style:name="ro58" style:family="table-row">
      <style:table-row-properties style:row-height="3.44cm" fo:break-before="auto" style:use-optimal-row-height="false"/>
    </style:style>
    <style:style style:name="ro59" style:family="table-row">
      <style:table-row-properties style:row-height="3.81cm" fo:break-before="auto" style:use-optimal-row-height="false"/>
    </style:style>
    <style:style style:name="ro60" style:family="table-row">
      <style:table-row-properties style:row-height="6.165cm" fo:break-before="auto" style:use-optimal-row-height="false"/>
    </style:style>
    <style:style style:name="ro61" style:family="table-row">
      <style:table-row-properties style:row-height="2.937cm" fo:break-before="auto" style:use-optimal-row-height="false"/>
    </style:style>
    <style:style style:name="ro62" style:family="table-row">
      <style:table-row-properties style:row-height="2.17cm" fo:break-before="auto" style:use-optimal-row-height="false"/>
    </style:style>
    <style:style style:name="ro63" style:family="table-row">
      <style:table-row-properties style:row-height="3.916cm" fo:break-before="auto" style:use-optimal-row-height="false"/>
    </style:style>
    <style:style style:name="ro64" style:family="table-row">
      <style:table-row-properties style:row-height="1.164cm" fo:break-before="auto" style:use-optimal-row-height="false"/>
    </style:style>
    <style:style style:name="ro65" style:family="table-row">
      <style:table-row-properties style:row-height="2.672cm" fo:break-before="auto" style:use-optimal-row-height="false"/>
    </style:style>
    <style:style style:name="ro66" style:family="table-row">
      <style:table-row-properties style:row-height="2.011cm" fo:break-before="auto" style:use-optimal-row-height="false"/>
    </style:style>
    <style:style style:name="ro67" style:family="table-row">
      <style:table-row-properties style:row-height="3.069cm" fo:break-before="auto" style:use-optimal-row-height="false"/>
    </style:style>
    <style:style style:name="ro68" style:family="table-row">
      <style:table-row-properties style:row-height="2.963cm" fo:break-before="auto" style:use-optimal-row-height="false"/>
    </style:style>
    <style:style style:name="ro69" style:family="table-row">
      <style:table-row-properties style:row-height="2.249cm" fo:break-before="auto" style:use-optimal-row-height="false"/>
    </style:style>
    <style:style style:name="ro70" style:family="table-row">
      <style:table-row-properties style:row-height="3.969cm" fo:break-before="auto" style:use-optimal-row-height="false"/>
    </style:style>
    <style:style style:name="ro71" style:family="table-row">
      <style:table-row-properties style:row-height="2.54cm" fo:break-before="auto" style:use-optimal-row-height="false"/>
    </style:style>
    <style:style style:name="ro72" style:family="table-row">
      <style:table-row-properties style:row-height="2.699cm" fo:break-before="auto" style:use-optimal-row-height="false"/>
    </style:style>
    <style:style style:name="ro73" style:family="table-row">
      <style:table-row-properties style:row-height="3.545cm" fo:break-before="auto" style:use-optimal-row-height="false"/>
    </style:style>
    <style:style style:name="ro74" style:family="table-row">
      <style:table-row-properties style:row-height="2.91cm" fo:break-before="auto" style:use-optimal-row-height="false"/>
    </style:style>
    <style:style style:name="ro75" style:family="table-row">
      <style:table-row-properties style:row-height="3.281cm" fo:break-before="auto" style:use-optimal-row-height="false"/>
    </style:style>
    <style:style style:name="ro76" style:family="table-row">
      <style:table-row-properties style:row-height="3.096cm" fo:break-before="auto" style:use-optimal-row-height="false"/>
    </style:style>
    <style:style style:name="ro77" style:family="table-row">
      <style:table-row-properties style:row-height="1.455cm" fo:break-before="auto" style:use-optimal-row-height="false"/>
    </style:style>
    <style:style style:name="ro78" style:family="table-row">
      <style:table-row-properties style:row-height="2.143cm" fo:break-before="auto" style:use-optimal-row-height="false"/>
    </style:style>
    <style:style style:name="ro79" style:family="table-row">
      <style:table-row-properties style:row-height="3.043cm" fo:break-before="auto" style:use-optimal-row-height="false"/>
    </style:style>
    <style:style style:name="ro80" style:family="table-row">
      <style:table-row-properties style:row-height="4.657cm" fo:break-before="auto" style:use-optimal-row-height="false"/>
    </style:style>
    <style:style style:name="ro81" style:family="table-row">
      <style:table-row-properties style:row-height="5.292cm" fo:break-before="auto" style:use-optimal-row-height="false"/>
    </style:style>
    <style:style style:name="ro82" style:family="table-row">
      <style:table-row-properties style:row-height="3.493cm" fo:break-before="auto" style:use-optimal-row-height="false"/>
    </style:style>
    <style:style style:name="ro83" style:family="table-row">
      <style:table-row-properties style:row-height="4.075cm" fo:break-before="auto" style:use-optimal-row-height="false"/>
    </style:style>
    <style:style style:name="ro84" style:family="table-row">
      <style:table-row-properties style:row-height="4.498cm" fo:break-before="auto" style:use-optimal-row-height="false"/>
    </style:style>
    <style:style style:name="ro85" style:family="table-row">
      <style:table-row-properties style:row-height="3.598cm" fo:break-before="auto" style:use-optimal-row-height="false"/>
    </style:style>
    <style:style style:name="ro86" style:family="table-row">
      <style:table-row-properties style:row-height="1.667cm" fo:break-before="auto" style:use-optimal-row-height="false"/>
    </style:style>
    <style:style style:name="ro87" style:family="table-row">
      <style:table-row-properties style:row-height="2.514cm" fo:break-before="auto" style:use-optimal-row-height="false"/>
    </style:style>
    <style:style style:name="ro88" style:family="table-row">
      <style:table-row-properties style:row-height="3.122cm" fo:break-before="auto" style:use-optimal-row-height="false"/>
    </style:style>
    <style:style style:name="ro89" style:family="table-row">
      <style:table-row-properties style:row-height="2.619cm" fo:break-before="auto" style:use-optimal-row-height="false"/>
    </style:style>
    <style:style style:name="ro90" style:family="table-row">
      <style:table-row-properties style:row-height="3.201cm" fo:break-before="auto" style:use-optimal-row-height="false"/>
    </style:style>
    <style:style style:name="ro91" style:family="table-row">
      <style:table-row-properties style:row-height="3.572cm" fo:break-before="auto" style:use-optimal-row-height="false"/>
    </style:style>
    <style:style style:name="ro92" style:family="table-row">
      <style:table-row-properties style:row-height="4.339cm" fo:break-before="auto" style:use-optimal-row-height="false"/>
    </style:style>
    <style:style style:name="ro93" style:family="table-row">
      <style:table-row-properties style:row-height="4.022cm" fo:break-before="auto" style:use-optimal-row-height="false"/>
    </style:style>
    <style:style style:name="ro94" style:family="table-row">
      <style:table-row-properties style:row-height="1.217cm" fo:break-before="auto" style:use-optimal-row-height="false"/>
    </style:style>
    <style:style style:name="ro95" style:family="table-row">
      <style:table-row-properties style:row-height="1.376cm" fo:break-before="auto" style:use-optimal-row-height="false"/>
    </style:style>
    <style:style style:name="ro96" style:family="table-row">
      <style:table-row-properties style:row-height="3.334cm" fo:break-before="auto" style:use-optimal-row-height="false"/>
    </style:style>
    <style:style style:name="ro97" style:family="table-row">
      <style:table-row-properties style:row-height="3.863cm" fo:break-before="auto" style:use-optimal-row-height="false"/>
    </style:style>
    <style:style style:name="ro98" style:family="table-row">
      <style:table-row-properties style:row-height="0.635cm" fo:break-before="auto" style:use-optimal-row-height="false"/>
    </style:style>
    <style:style style:name="ro99" style:family="table-row">
      <style:table-row-properties style:row-height="1.27cm" fo:break-before="auto" style:use-optimal-row-height="false"/>
    </style:style>
    <style:style style:name="ro100" style:family="table-row">
      <style:table-row-properties style:row-height="0.979cm" fo:break-before="auto" style:use-optimal-row-height="false"/>
    </style:style>
    <style:style style:name="ro101" style:family="table-row">
      <style:table-row-properties style:row-height="0.503cm" fo:break-before="auto" style:use-optimal-row-height="false"/>
    </style:style>
    <style:style style:name="ro102" style:family="table-row">
      <style:table-row-properties style:row-height="0.45cm" fo:break-before="auto" style:use-optimal-row-height="false"/>
    </style:style>
    <style:style style:name="ro103" style:family="table-row">
      <style:table-row-properties style:row-height="0.529cm" fo:break-before="auto" style:use-optimal-row-height="false"/>
    </style:style>
    <style:style style:name="ro104" style:family="table-row">
      <style:table-row-properties style:row-height="1.032cm" fo:break-before="auto" style:use-optimal-row-height="false"/>
    </style:style>
    <style:style style:name="ro105" style:family="table-row">
      <style:table-row-properties style:row-height="0.556cm" fo:break-before="auto" style:use-optimal-row-height="false"/>
    </style:style>
    <style:style style:name="ro106" style:family="table-row">
      <style:table-row-properties style:row-height="1.323cm" fo:break-before="auto" style:use-optimal-row-height="false"/>
    </style:style>
    <style:style style:name="ro107" style:family="table-row">
      <style:table-row-properties style:row-height="0.767cm" fo:break-before="auto" style:use-optimal-row-height="false"/>
    </style:style>
    <style:style style:name="ro108" style:family="table-row">
      <style:table-row-properties style:row-height="0.82cm" fo:break-before="auto" style:use-optimal-row-height="false"/>
    </style:style>
    <style:style style:name="ro109" style:family="table-row">
      <style:table-row-properties style:row-height="0.847cm" fo:break-before="auto" style:use-optimal-row-height="false"/>
    </style:style>
    <style:style style:name="ro110" style:family="table-row">
      <style:table-row-properties style:row-height="0.582cm" fo:break-before="auto" style:use-optimal-row-height="false"/>
    </style:style>
    <style:style style:name="ro111" style:family="table-row">
      <style:table-row-properties style:row-height="3.704cm" fo:break-before="auto" style:use-optimal-row-height="false"/>
    </style:style>
    <style:style style:name="ro112" style:family="table-row">
      <style:table-row-properties style:row-height="2.381cm" fo:break-before="auto" style:use-optimal-row-height="false"/>
    </style:style>
    <style:style style:name="ro113" style:family="table-row">
      <style:table-row-properties style:row-height="0.423cm" fo:break-before="auto" style:use-optimal-row-height="false"/>
    </style:style>
    <style:style style:name="ro114" style:family="table-row">
      <style:table-row-properties style:row-height="0.873cm" fo:break-before="auto" style:use-optimal-row-height="false"/>
    </style:style>
    <style:style style:name="ro115" style:family="table-row">
      <style:table-row-properties style:row-height="0.953cm" fo:break-before="auto" style:use-optimal-row-height="false"/>
    </style:style>
    <style:style style:name="ro116" style:family="table-row">
      <style:table-row-properties style:row-height="0.397cm" fo:break-before="auto" style:use-optimal-row-height="false"/>
    </style:style>
    <style:style style:name="ro117" style:family="table-row">
      <style:table-row-properties style:row-height="0.609cm" fo:break-before="auto" style:use-optimal-row-height="false"/>
    </style:style>
    <style:style style:name="ta1" style:family="table" style:master-page-name="PageStyle_5f_0._20_Instructions">
      <style:table-properties table:display="true" style:writing-mode="lr-tb" tableooo:tab-color="#00b050"/>
    </style:style>
    <style:style style:name="ta2" style:family="table" style:master-page-name="PageStyle_5f_1._20_Water_20_Report_20_Input">
      <style:table-properties table:display="true" style:writing-mode="lr-tb" tableooo:tab-color="#00ffff"/>
    </style:style>
    <style:style style:name="ta3" style:family="table" style:master-page-name="PageStyle_5f_2._20_Sparge_20_Acidification">
      <style:table-properties table:display="true" style:writing-mode="lr-tb" tableooo:tab-color="#ff9900"/>
    </style:style>
    <style:style style:name="ta4" style:family="table" style:master-page-name="PageStyle_5f_3._20_Grain_20_Bill_20_Input">
      <style:table-properties table:display="true" style:writing-mode="lr-tb" tableooo:tab-color="#ffff66"/>
    </style:style>
    <style:style style:name="ta5" style:family="table" style:master-page-name="PageStyle_5f_4._20_Water_20_Adjustment">
      <style:table-properties table:display="true" style:writing-mode="lr-tb" tableooo:tab-color="#ff3300"/>
    </style:style>
    <style:style style:name="ta6" style:family="table" style:master-page-name="PageStyle_5f_5._20_Adjustment_20_Summary">
      <style:table-properties table:display="true" style:writing-mode="lr-tb" tableooo:tab-color="#ffffff"/>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74pt solid #000000"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fo:background-color="#cc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fo:background-color="#cc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none" fo:background-color="#cc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113">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1.76pt solid #000000" fo:background-color="#ffffcc"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7" style:family="table-cell" style:parent-style-name="Default">
      <style:table-cell-properties fo:background-color="#96969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2.49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74pt solid #000000" fo:background-color="#eaeaea"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eaeaea"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7"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14">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1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56" style:family="table-cell" style:parent-style-name="Default">
      <style:table-cell-properties fo:background-color="#ffcccc"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fo:background-color="#96969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14">
      <style:table-cell-properties fo:border-bottom="0.74pt solid #000000" fo:background-color="#cc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B6]&lt;0)" style:apply-style-name="ConditionalStyle_5f_1" style:base-cell-address="'1. Water Report Input'.B6"/>
    </style:style>
    <style:style style:name="ce59" style:family="table-cell" style:parent-style-name="Default">
      <style:table-cell-properties fo:border-bottom="0.74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4">
      <style:table-cell-properties fo:border-bottom="0.74pt solid #000000" fo:background-color="#cc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B12]&gt;0.3)" style:apply-style-name="ConditionalStyle_5f_1" style:base-cell-address="'1. Water Report Input'.B12"/>
    </style:style>
    <style:style style:name="ce61" style:family="table-cell" style:parent-style-name="Default" style:data-style-name="N1">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fo:background-color="#969696"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14">
      <style:table-cell-properties fo:border-bottom="0.74pt solid #000000" fo:background-color="#cc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14">
      <style:table-cell-properties fo:border-bottom="0.74pt solid #000000" fo:background-color="#ccffff"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114">
      <style:table-cell-properties fo:border-bottom="0.74pt solid #000000" fo:background-color="#cc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B6]&lt;0)" style:apply-style-name="ConditionalStyle_5f_1" style:base-cell-address="'1. Water Report Input'.B6"/>
    </style:style>
    <style:style style:name="ce69" style:family="table-cell" style:parent-style-name="Default" style:data-style-name="N114">
      <style:table-cell-properties fo:border-bottom="2.49pt solid #000000" fo:background-color="#cc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B6]&lt;0)" style:apply-style-name="ConditionalStyle_5f_1" style:base-cell-address="'1. Water Report Input'.B6"/>
    </style:style>
    <style:style style:name="ce70" style:family="table-cell" style:parent-style-name="Default" style:data-style-name="N114">
      <style:table-cell-properties fo:border-bottom="0.74pt solid #000000" fo:background-color="#ccffff"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B12]&lt;0)" style:apply-style-name="ConditionalStyle_5f_1" style:base-cell-address="'1. Water Report Input'.B12"/>
    </style:style>
    <style:style style:name="ce7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0.74pt solid #000000" fo:background-color="#96969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data-style-name="N114">
      <style:table-cell-properties fo:border-bottom="0.74pt solid #000000" fo:background-color="#ffff99"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2">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b0f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0.74pt solid #000000" fo:background-color="#eaeae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8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7"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1">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B11]&lt;25)" style:apply-style-name="ConditionalStyle_5f_4" style:base-cell-address="'2. Sparge Acidification'.B11"/>
    </style:style>
    <style:style style:name="ce99" style:family="table-cell" style:parent-style-name="Default" style:data-style-name="N114">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data-style-name="N114">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B7]=1)" style:apply-style-name="ConditionalStyle_5f_3" style:base-cell-address="'2. Sparge Acidification'.B7"/>
    </style:style>
    <style:style style:name="ce605"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2"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3" style:family="table-cell" style:parent-style-name="Default" style:data-style-name="N1">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B11]&lt;25)" style:apply-style-name="ConditionalStyle_5f_4" style:base-cell-address="'2. Sparge Acidification'.B11"/>
    </style:style>
    <style:style style:name="ce104" style:family="table-cell" style:parent-style-name="Default" style:data-style-name="N114">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5" style:family="table-cell" style:parent-style-name="Default" style:data-style-name="N1">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6" style:family="table-cell" style:parent-style-name="Default" style:data-style-name="N1">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data-style-name="N117">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data-style-name="N2">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B7]=1)" style:apply-style-name="ConditionalStyle_5f_5" style:base-cell-address="'2. Sparge Acidification'.D7"/>
    </style:style>
    <style:style style:name="ce119"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Default" style:data-style-name="N114">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data-style-name="N114">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Default">
      <style:table-cell-properties style:rotation-align="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7"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data-style-name="N2">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3" style:family="table-cell" style:parent-style-name="Default" style:data-style-name="N115">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Default" style:data-style-name="N116">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5"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ackground-color="#96969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0"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J6]=4)" style:apply-style-name="ConditionalStyle_5f_7" style:base-cell-address="'3. Grain Bill Input'.A6"/>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2" style:family="table-cell" style:parent-style-name="Default" style:data-style-name="N114">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data-style-name="N114">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3" style:family="table-cell" style:parent-style-name="Default">
      <style:table-cell-properties fo:background-color="#ffcc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fo:background-color="#ffcc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B21]=&quot;existing water&quot;)" style:apply-style-name="ConditionalStyle_5f_6" style:base-cell-address="'3. Grain Bill Input'.B21"/>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data-style-name="N2">
      <style:table-cell-properties fo:background-color="#96969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0" style:family="table-cell" style:parent-style-name="Default" style:data-style-name="N114">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2" style:family="table-cell" style:parent-style-name="Default" style:data-style-name="N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0" style:family="table-cell" style:parent-style-name="Default">
      <style:table-cell-properties fo:border-bottom="0.74pt solid #000000" fo:background-color="#96969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IF([.$B$20]=2;AND([.J6]=3;[.E6]&lt;478);AND([.J6]=3;[.E6]&lt;180)))" style:apply-style-name="ConditionalStyle_5f_6" style:base-cell-address="'3. Grain Bill Input'.E6"/>
    </style:style>
    <style:style style:name="ce1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6"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data-style-name="N114">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is-between(5.25,5.55)" style:apply-style-name="ConditionalStyle_5f_4" style:base-cell-address="'3. Grain Bill Input'.F24"/>
    </style:style>
    <style:style style:name="ce18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7" style:family="table-cell" style:parent-style-name="Default" style:data-style-name="N114">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1"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2"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is-between(5.25,5.55)" style:apply-style-name="ConditionalStyle_5f_4" style:base-cell-address="'3. Grain Bill Input'.F24"/>
    </style:style>
    <style:style style:name="ce1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9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0" style:family="table-cell" style:parent-style-name="Default" style:data-style-name="N11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2" style:family="table-cell" style:parent-style-name="Default" style:data-style-name="N11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3" style:family="table-cell" style:parent-style-name="Default" style:data-style-name="N114">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7"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data-style-name="N11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09"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4"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5"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8" style:family="table-cell" style:parent-style-name="Default" style:data-style-name="N11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9" style:family="table-cell" style:parent-style-name="Default">
      <style:table-cell-properties style:rotation-align="non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29"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3" style:family="table-cell" style:parent-style-name="Default">
      <style:table-cell-properties fo:border-bottom="0.74pt solid #000000" fo:background-color="#c0c0c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5"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6"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7"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8"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0" style:family="table-cell" style:parent-style-name="Default">
      <style:table-cell-properties fo:border-bottom="none"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1" style:family="table-cell" style:parent-style-name="Default">
      <style:table-cell-properties fo:border-bottom="none" fo:background-color="#969696"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Default" style:data-style-name="N2">
      <style:table-cell-properties fo:border-bottom="none" fo:background-color="#ffcccc"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3" style:family="table-cell" style:parent-style-name="Default">
      <style:table-cell-properties fo:border-bottom="none" fo:background-color="#969696"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data-style-name="N2">
      <style:table-cell-properties fo:border-bottom="2.49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5"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8"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9" style:family="table-cell" style:parent-style-name="Default">
      <style:table-cell-properties fo:border-bottom="none"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1" style:family="table-cell" style:parent-style-name="Default" style:data-style-name="N2">
      <style:table-cell-properties fo:background-color="#65ff6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B16]&lt;5.15)" style:apply-style-name="ConditionalStyle_5f_6" style:base-cell-address="'4. Water Adjustment'.B16"/>
    </style:style>
    <style:style style:name="ce252" style:family="table-cell" style:parent-style-name="Default">
      <style:table-cell-properties fo:border-bottom="none" fo:background-color="#c0c0c0" style:diagonal-bl-tr="none" style:diagonal-tl-br="none" fo:border-left="none" fo:border-right="none" style:rotation-align="none" fo:border-top="0.74pt solid #000000"/>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3" style:family="table-cell" style:parent-style-name="Default" style:data-style-name="N2">
      <style:table-cell-properties fo:border-bottom="2.49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4" style:family="table-cell" style:parent-style-name="Default" style:data-style-name="N2">
      <style:table-cell-properties fo:border-bottom="0.74pt solid #000000"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5" style:family="table-cell" style:parent-style-name="Default" style:data-style-name="N2">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6" style:family="table-cell" style:parent-style-name="Default" style:data-style-name="N2">
      <style:table-cell-properties fo:border-bottom="0.74pt solid #000000"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7" style:family="table-cell" style:parent-style-name="Default" style:data-style-name="N2">
      <style:table-cell-properties fo:border-bottom="2.49pt solid #000000"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8" style:family="table-cell" style:parent-style-name="Default" style:data-style-name="N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9" style:family="table-cell" style:parent-style-name="Default" style:data-style-name="N2">
      <style:table-cell-properties fo:border-bottom="0.74pt solid #000000" fo:background-color="#969696"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0" style:family="table-cell" style:parent-style-name="Default" style:data-style-name="N2">
      <style:table-cell-properties fo:border-bottom="none" fo:background-color="#cc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1" style:family="table-cell" style:parent-style-name="Default">
      <style:table-cell-properties fo:border-bottom="0.74pt solid #000000" fo:background-color="#96969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2" style:family="table-cell" style:parent-style-name="Default" style:data-style-name="N2">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67"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4"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5" style:family="table-cell" style:parent-style-name="Default">
      <style:table-cell-properties fo:border-bottom="0.74pt solid #000000"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6" style:family="table-cell" style:parent-style-name="Default">
      <style:table-cell-properties fo:background-color="#cc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1"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8" style:family="table-cell" style:parent-style-name="Default" style:data-style-name="N1">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9" style:family="table-cell" style:parent-style-name="Default" style:data-style-name="N1">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0" style:family="table-cell" style:parent-style-name="Default" style:data-style-name="N114">
      <style:table-cell-properties fo:border-bottom="0.74pt solid #000000" fo:background-color="#c0c0c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1" style:family="table-cell" style:parent-style-name="Default" style:data-style-name="N1">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2" style:family="table-cell" style:parent-style-name="Default" style:data-style-name="N1">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3" style:family="table-cell" style:parent-style-name="Default" style:data-style-name="N11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6" style:family="table-cell" style:parent-style-name="Default">
      <style:table-cell-properties fo:border-bottom="none" fo:background-color="#c0c0c0" style:diagonal-bl-tr="none" style:diagonal-tl-br="none" fo:border-left="none"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7" style:family="table-cell" style:parent-style-name="Default">
      <style:table-cell-properties fo:border-bottom="none"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9"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0" style:family="table-cell" style:parent-style-name="Default" style:data-style-name="N11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1"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2" style:family="table-cell" style:parent-style-name="Default" style:data-style-name="N114">
      <style:table-cell-properties fo:border-bottom="2.49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3" style:family="table-cell" style:parent-style-name="Default">
      <style:table-cell-properties fo:border-bottom="2.49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4" style:family="table-cell" style:parent-style-name="Default">
      <style:table-cell-properties fo:border-bottom="0.74pt solid #000000" fo:background-color="#969696"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5" style:family="table-cell" style:parent-style-name="Default" style:data-style-name="N114">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6" style:family="table-cell" style:parent-style-name="Default">
      <style:table-cell-properties fo:border-bottom="0.74pt solid #000000" fo:background-color="#969696"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7" style:family="table-cell" style:parent-style-name="Default" style:data-style-name="N114">
      <style:table-cell-properties fo:border-bottom="2.49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8" style:family="table-cell" style:parent-style-name="Default">
      <style:table-cell-properties fo:background-color="#cc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9" style:family="table-cell" style:parent-style-name="Default" style:data-style-name="N2">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0" style:family="table-cell" style:parent-style-name="Default" style:data-style-name="N114">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1" style:family="table-cell" style:parent-style-name="Default" style:data-style-name="N114">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2" style:family="table-cell" style:parent-style-name="Default" style:data-style-name="N11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3" style:family="table-cell" style:parent-style-name="Default" style:data-style-name="N114">
      <style:table-cell-properties fo:border-bottom="2.49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table-cell-properties fo:border-bottom="0.74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data-style-name="N114">
      <style:table-cell-properties fo:border-bottom="none" fo:background-color="#cc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7" style:family="table-cell" style:parent-style-name="Default" style:data-style-name="N114">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8" style:family="table-cell" style:parent-style-name="Default">
      <style:table-cell-properties fo:border-bottom="2.49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Default" style:data-style-name="N114">
      <style:table-cell-properties fo:border-bottom="none" fo:background-color="#ffcc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66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1" style:family="table-cell" style:parent-style-name="Default">
      <style:table-cell-properties fo:border-bottom="none"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2" style:family="table-cell" style:parent-style-name="Default" style:data-style-name="N114">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3" style:family="table-cell" style:parent-style-name="Default" style:data-style-name="N114">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4" style:family="table-cell" style:parent-style-name="Default" style:data-style-name="N114">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5" style:family="table-cell" style:parent-style-name="Default" style:data-style-name="N114">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6"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07"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none"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9" style:family="table-cell" style:parent-style-name="Default" style:data-style-name="N114">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0" style:family="table-cell" style:parent-style-name="Default" style:data-style-name="N114">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1" style:family="table-cell" style:parent-style-name="Default" style:data-style-name="N114">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2"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3"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4" style:family="table-cell" style:parent-style-name="Default" style:data-style-name="N114">
      <style:table-cell-properties fo:border-bottom="2.49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5" style:family="table-cell" style:parent-style-name="Default">
      <style:table-cell-properties fo:border-bottom="none" fo:background-color="#c0c0c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6" style:family="table-cell" style:parent-style-name="Default" style:data-style-name="N2">
      <style:table-cell-properties fo:border-bottom="0.74pt solid #000000" fo:background-color="#969696"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7" style:family="table-cell" style:parent-style-name="Default" style:data-style-name="N114">
      <style:table-cell-properties fo:border-bottom="none"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9" style:family="table-cell" style:parent-style-name="Default">
      <style:table-cell-properties fo:border-bottom="none" fo:background-color="#fff475"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0" style:family="table-cell" style:parent-style-name="Default">
      <style:table-cell-properties fo:border-bottom="none" fo:background-color="#ea79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1" style:family="table-cell" style:parent-style-name="Default">
      <style:table-cell-properties fo:border-bottom="none" fo:background-color="#99663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2" style:family="table-cell" style:parent-style-name="Default">
      <style:table-cell-properties fo:border-bottom="0.74pt solid #000000" fo:background-color="#4824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3"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data-style-name="N114">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6" style:family="table-cell" style:parent-style-name="Default" style:data-style-name="N114">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8" style:family="table-cell" style:parent-style-name="Default">
      <style:table-cell-properties fo:border-bottom="0.74pt solid #000000" fo:background-color="#96969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9" style:family="table-cell" style:parent-style-name="Default" style:data-style-name="N2">
      <style:table-cell-properties fo:border-bottom="0.74pt solid #000000" fo:background-color="#969696"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0" style:family="table-cell" style:parent-style-name="Default">
      <style:table-cell-properties fo:border-bottom="2.49pt solid #000000" fo:background-color="#969696"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1" style:family="table-cell" style:parent-style-name="Default" style:data-style-name="N114">
      <style:table-cell-properties fo:border-bottom="0.74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2" style:family="table-cell" style:parent-style-name="Default" style:data-style-name="N114">
      <style:table-cell-properties fo:border-bottom="0.74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3" style:family="table-cell" style:parent-style-name="Default" style:data-style-name="N114">
      <style:table-cell-properties fo:border-bottom="0.74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4" style:family="table-cell" style:parent-style-name="Default" style:data-style-name="N114">
      <style:table-cell-properties fo:border-bottom="2.49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5" style:family="table-cell" style:parent-style-name="Default" style:data-style-name="N114">
      <style:table-cell-properties fo:border-bottom="2.49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6" style:family="table-cell" style:parent-style-name="Default" style:data-style-name="N114">
      <style:table-cell-properties fo:border-bottom="none"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7" style:family="table-cell" style:parent-style-name="Default" style:data-style-name="N114">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8"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BS([.I38]-[.J38])&lt;0.1)" style:apply-style-name="ConditionalStyle_5f_4" style:base-cell-address="'4. Water Adjustment'.I38"/>
    </style:style>
    <style:style style:name="ce339" style:family="table-cell" style:parent-style-name="Default" style:data-style-name="N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BS([.I38]-[.J38])&lt;0.1)" style:apply-style-name="ConditionalStyle_5f_4" style:base-cell-address="'4. Water Adjustment'.I38"/>
    </style:style>
    <style:style style:name="ce340"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data-style-name="N2">
      <style:table-cell-properties fo:border-bottom="0.74pt solid #000000" fo:background-color="#cc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3" style:family="table-cell" style:parent-style-name="Default">
      <style:table-cell-properties fo:border-bottom="2.49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Default">
      <style:table-cell-properties fo:border-bottom="0.74pt solid #000000" style:diagonal-bl-tr="none" style:diagonal-tl-br="none" fo:border-left="none" fo:border-right="1.76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2.49pt solid #000000" style:diagonal-bl-tr="none" style:diagonal-tl-br="none" fo:border-left="none" fo:border-right="1.76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data-style-name="N2">
      <style:table-cell-properties fo:border-bottom="0.74pt solid #000000" fo:background-color="#969696"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8" style:family="table-cell" style:parent-style-name="Default">
      <style:table-cell-properties fo:border-bottom="2.49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9"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BS([.I38]-[.J38])&lt;0.1)" style:apply-style-name="ConditionalStyle_5f_4" style:base-cell-address="'4. Water Adjustment'.J38"/>
    </style:style>
    <style:style style:name="ce350" style:family="table-cell" style:parent-style-name="Default" style:data-style-name="N2">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BS([.I38]-[.J38])&lt;0.1)" style:apply-style-name="ConditionalStyle_5f_4" style:base-cell-address="'4. Water Adjustment'.J38"/>
    </style:style>
    <style:style style:name="ce3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66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2" style:family="table-cell" style:parent-style-name="Default" style:data-style-name="N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3"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4"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5" style:family="table-cell" style:parent-style-name="Default" style:data-style-name="N114">
      <style:table-cell-properties fo:border-bottom="0.74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6" style:family="table-cell" style:parent-style-name="Default" style:data-style-name="N114">
      <style:table-cell-properties fo:border-bottom="2.49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7" style:family="table-cell" style:parent-style-name="Default" style:data-style-name="N114">
      <style:table-cell-properties fo:border-bottom="2.49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8" style:family="table-cell" style:parent-style-name="Default" style:data-style-name="N114">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9" style:family="table-cell" style:parent-style-name="Default">
      <style:table-cell-properties fo:border-bottom="none"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6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2"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3"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fo:border-bottom="2.49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order-bottom="0.74pt solid #000000" fo:background-color="#969696"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6" style:family="table-cell" style:parent-style-name="Default" style:data-style-name="N1">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66cc"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6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2"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3" style:family="table-cell" style:parent-style-name="Default" style:data-style-name="N114">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4"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7"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378"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9"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0"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1"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3"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384"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6" style:family="table-cell" style:parent-style-name="Default" style:data-style-name="N2">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2" style:family="table-cell" style:parent-style-name="Default" style:data-style-name="N1">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3" style:family="table-cell" style:parent-style-name="Default">
      <style:table-cell-properties fo:background-color="#ffffff" style:diagonal-bl-tr="none" style:diagonal-tl-br="none" fo:border="none" style:rotation-align="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5" style:family="table-cell" style:parent-style-name="Default" style:data-style-name="N1">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6" style:family="table-cell" style:parent-style-name="Default" style:data-style-name="N114">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7" style:family="table-cell" style:parent-style-name="Default" style:data-style-name="N11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401"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0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8"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9" style:family="table-cell" style:parent-style-name="Default" style:data-style-name="N118">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0" style:family="table-cell" style:parent-style-name="Default" style:data-style-name="N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1" style:family="table-cell" style:parent-style-name="Default" style:data-style-name="N1">
      <style:table-cell-properties style:rotation-align="non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2" style:family="table-cell" style:parent-style-name="Default">
      <style:table-cell-properties style:rotation-align="none"/>
      <style:text-properties fo:color="#ffff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13"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5"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41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19"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0" style:family="table-cell" style:parent-style-name="Default">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1"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2"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3" style:family="table-cell" style:parent-style-name="Default" style:data-style-name="N2">
      <style:table-cell-properties fo:border-bottom="0.74pt solid #000000" fo:background-color="#dddddd"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4" style:family="table-cell" style:parent-style-name="Default">
      <style:table-cell-properties fo:border-bottom="1.76pt solid #000000" fo:background-color="#dddddd"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5"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6"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7"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8" style:family="table-cell" style:parent-style-name="Default">
      <style:table-cell-properties fo:border-bottom="1.76pt solid #000000" fo:background-color="#d8d8d8"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3" style:family="table-cell" style:parent-style-name="Default" style:data-style-name="N2">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4" style:family="table-cell" style:parent-style-name="Default" style:data-style-name="N2">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5"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0"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7" style:family="table-cell" style:parent-style-name="Default">
      <style:table-cell-properties fo:border-bottom="0.74pt solid #000000"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8" style:family="table-cell" style:parent-style-name="Default">
      <style:table-cell-properties fo:border-bottom="1.7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0" style:family="table-cell" style:parent-style-name="Default">
      <style:table-cell-properties fo:border-bottom="0.74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1" style:family="table-cell" style:parent-style-name="Default">
      <style:table-cell-properties fo:border-bottom="1.76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4" style:family="table-cell" style:parent-style-name="Default" style:data-style-name="N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5" style:family="table-cell" style:parent-style-name="Default" style:data-style-name="N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7" style:family="table-cell" style:parent-style-name="Default">
      <style:table-cell-properties fo:border-bottom="0.74pt solid #000000" style:diagonal-bl-tr="none" style:diagonal-tl-br="none" fo:border-left="none" fo:border-right="0.74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data-style-name="N114">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9" style:family="table-cell" style:parent-style-name="Default" style:data-style-name="N2">
      <style:table-cell-properties fo:border-bottom="1.76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C11]&lt;5.15)" style:apply-style-name="ConditionalStyle_5f_6" style:base-cell-address="'5. Adjustment Summary'.C11"/>
    </style:style>
    <style:style style:name="ce450"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5"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4"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5" style:family="table-cell" style:parent-style-name="Default" style:data-style-name="N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6"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fo:border-bottom="0.74pt solid #000000" fo:background-color="#dddddd"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9" style:family="table-cell" style:parent-style-name="Default" style:data-style-name="N1">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fo:border-bottom="1.76pt solid #000000" fo:background-color="#c0c0c0"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fo:border-bottom="0.74pt solid #000000" fo:background-color="#dddddd"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4" style:family="table-cell" style:parent-style-name="Default">
      <style:table-cell-properties fo:border-bottom="1.76pt solid #000000" fo:background-color="#ddddd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5" style:family="table-cell" style:parent-style-name="Default" style:data-style-name="N2">
      <style:table-cell-properties fo:border-bottom="0.74pt solid #000000" fo:background-color="#dddddd"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6" style:family="table-cell" style:parent-style-name="Default" style:data-style-name="N1">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7" style:family="table-cell" style:parent-style-name="Default">
      <style:table-cell-properties fo:border-bottom="1.76pt solid #000000"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8" style:family="table-cell" style:parent-style-name="Default">
      <style:table-cell-properties fo:border-bottom="1.76pt solid #000000" fo:background-color="#d8d8d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3"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0" style:family="table-cell" style:parent-style-name="Default" style:data-style-name="N11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1" style:family="table-cell" style:parent-style-name="Default" style:data-style-name="N114">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2" style:family="table-cell" style:parent-style-name="Default" style:data-style-name="N114">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3" style:family="table-cell" style:parent-style-name="Default" style:data-style-name="N2">
      <style:table-cell-properties fo:border-bottom="1.76pt solid #000000" fo:background-color="#d8d8d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table-cell-properties fo:border-bottom="0.74pt solid #000000" fo:background-color="#ffff99" style:diagonal-bl-tr="none" style:diagonal-tl-br="none" fo:border-left="0.74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Default" style:data-style-name="N114">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7" style:family="table-cell" style:parent-style-name="Default" style:data-style-name="N1">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Default" style:data-style-name="N114">
      <style:table-cell-properties fo:border-bottom="0.74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9" style:family="table-cell" style:parent-style-name="Default" style:data-style-name="N114">
      <style:table-cell-properties fo:border-bottom="0.74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0" style:family="table-cell" style:parent-style-name="Default" style:data-style-name="N114">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1" style:family="table-cell" style:parent-style-name="Default" style:data-style-name="N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2" style:family="table-cell" style:parent-style-name="Default" style:data-style-name="N1">
      <style:table-cell-properties fo:border-bottom="1.76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3"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4" style:family="table-cell" style:parent-style-name="Default" style:data-style-name="N114">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data-style-name="N114">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8" style:family="table-cell" style:parent-style-name="Default" style:data-style-name="N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9" style:family="table-cell" style:parent-style-name="Default">
      <style:table-cell-properties fo:border-bottom="1.76pt solid #000000" fo:background-color="#c0c0c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0" style:family="table-cell" style:parent-style-name="Default">
      <style:table-cell-properties fo:border-bottom="1.76pt solid #000000" fo:background-color="#d8d8d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5"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2" style:family="table-cell" style:parent-style-name="Default" style:data-style-name="N114">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3" style:family="table-cell" style:parent-style-name="Default" style:data-style-name="N114">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4" style:family="table-cell" style:parent-style-name="Default" style:data-style-name="N2">
      <style:table-cell-properties fo:border-bottom="1.76pt solid #000000" fo:background-color="#d8d8d8"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Default" style:data-style-name="N11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6" style:family="table-cell" style:parent-style-name="Default">
      <style:table-cell-properties fo:border-bottom="1.76pt solid #000000" fo:background-color="#ffff99"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7" style:family="table-cell" style:parent-style-name="Default" style:data-style-name="N114">
      <style:table-cell-properties fo:border-bottom="1.76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8" style:family="table-cell" style:parent-style-name="Default">
      <style:table-cell-properties fo:border-bottom="0.74pt solid #000000" fo:background-color="#dddddd"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9" style:family="table-cell" style:parent-style-name="Default" style:data-style-name="N1">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Default">
      <style:table-cell-properties fo:border-bottom="1.76pt solid #000000" fo:background-color="#c0c0c0"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2" style:family="table-cell" style:parent-style-name="Default" style:data-style-name="N1">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3" style:family="table-cell" style:parent-style-name="Default" style:data-style-name="N114">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4"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5"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data-style-name="N114">
      <style:table-cell-properties fo:border-bottom="0.74pt solid #000000" fo:background-color="#ffff99"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Default" style:data-style-name="N114">
      <style:table-cell-properties fo:border-bottom="1.76pt solid #000000" fo:background-color="#ffff99"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0" style:family="table-cell" style:parent-style-name="Default" style:data-style-name="N11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2" style:family="table-cell" style:parent-style-name="Default" style:data-style-name="N114">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Default" style:data-style-name="N1">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398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51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895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cm" fo:min-width="2.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1cm" fo:min-width="2.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901cm" fo:min-width="2.9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876cm" fo:min-width="2.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99cm" fo:min-width="2.9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741cm" fo:min-width="2.9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0cm" fo:min-width="2.9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531cm" fo:min-width="2.9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691cm" fo:min-width="2.9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303cm" fo:min-width="2.9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05cm" fo:min-width="2.9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399cm" fo:min-width="2.9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049cm" fo:min-width="2.9cm" fo:padding-top="0.1cm" fo:padding-bottom="0.1cm" fo:padding-left="0.1cm" fo:padding-right="0.1cm" draw:shadow="hidden" draw:shadow-offset-x="0.1cm" draw:shadow-offset-y="0.1cm" draw:caption-escape-direction="auto"/>
      <style:paragraph-properties style:writing-mode="lr-tb"/>
    </style:style>
    <style:style style:name="gr1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859cm" fo:min-width="2.9cm" fo:padding-top="0.1cm" fo:padding-bottom="0.1cm" fo:padding-left="0.1cm" fo:padding-right="0.1cm" draw:shadow="hidden" draw:shadow-offset-x="0.1cm" draw:shadow-offset-y="0.1cm" draw:caption-escape-direction="auto"/>
      <style:paragraph-properties style:writing-mode="lr-tb"/>
    </style:style>
    <style:style style:name="gr1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293cm" fo:min-width="2.9cm" fo:padding-top="0.1cm" fo:padding-bottom="0.1cm" fo:padding-left="0.1cm" fo:padding-right="0.1cm" draw:shadow="hidden" draw:shadow-offset-x="0.1cm" draw:shadow-offset-y="0.1cm" draw:caption-escape-direction="auto"/>
      <style:paragraph-properties style:writing-mode="lr-tb"/>
    </style:style>
    <style:style style:name="gr2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991cm" fo:min-width="2.9cm" fo:padding-top="0.1cm" fo:padding-bottom="0.1cm" fo:padding-left="0.1cm" fo:padding-right="0.1cm" draw:shadow="hidden" draw:shadow-offset-x="0.1cm" draw:shadow-offset-y="0.1cm" draw:caption-escape-direction="auto"/>
      <style:paragraph-properties style:writing-mode="lr-tb"/>
    </style:style>
    <style:style style:name="gr2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657cm" fo:min-width="2.9cm" fo:padding-top="0.1cm" fo:padding-bottom="0.1cm" fo:padding-left="0.1cm" fo:padding-right="0.1cm" draw:shadow="hidden" draw:shadow-offset-x="0.1cm" draw:shadow-offset-y="0.1cm" draw:caption-escape-direction="auto"/>
      <style:paragraph-properties style:writing-mode="lr-tb"/>
    </style:style>
    <style:style style:name="gr2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92cm" fo:min-width="2.9cm" fo:padding-top="0.1cm" fo:padding-bottom="0.1cm" fo:padding-left="0.1cm" fo:padding-right="0.1cm" draw:shadow="hidden" draw:shadow-offset-x="0.1cm" draw:shadow-offset-y="0.1cm" draw:caption-escape-direction="auto"/>
      <style:paragraph-properties style:writing-mode="lr-tb"/>
    </style:style>
    <style:style style:name="gr2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245cm" fo:min-width="2.9cm" fo:padding-top="0.1cm" fo:padding-bottom="0.1cm" fo:padding-left="0.1cm" fo:padding-right="0.1cm" draw:shadow="hidden" draw:shadow-offset-x="0.1cm" draw:shadow-offset-y="0.1cm" draw:caption-escape-direction="auto"/>
      <style:paragraph-properties style:writing-mode="lr-tb"/>
    </style:style>
    <style:style style:name="gr2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51cm" fo:min-width="2.9cm" fo:padding-top="0.1cm" fo:padding-bottom="0.1cm" fo:padding-left="0.1cm" fo:padding-right="0.1cm" draw:shadow="hidden" draw:shadow-offset-x="0.1cm" draw:shadow-offset-y="0.1cm" draw:caption-escape-direction="auto"/>
      <style:paragraph-properties style:writing-mode="lr-tb"/>
    </style:style>
    <style:style style:name="gr2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111cm" fo:min-width="2.9cm" fo:padding-top="0.1cm" fo:padding-bottom="0.1cm" fo:padding-left="0.1cm" fo:padding-right="0.1cm" draw:shadow="hidden" draw:shadow-offset-x="0.1cm" draw:shadow-offset-y="0.1cm" draw:caption-escape-direction="auto"/>
      <style:paragraph-properties style:writing-mode="lr-tb"/>
    </style:style>
    <style:style style:name="gr2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161cm" fo:min-width="2.9cm" fo:padding-top="0.1cm" fo:padding-bottom="0.1cm" fo:padding-left="0.1cm" fo:padding-right="0.1cm" draw:shadow="hidden" draw:shadow-offset-x="0.1cm" draw:shadow-offset-y="0.1cm" draw:caption-escape-direction="auto"/>
      <style:paragraph-properties style:writing-mode="lr-tb"/>
    </style:style>
    <style:style style:name="gr2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716cm" fo:min-width="2.9cm" fo:padding-top="0.1cm" fo:padding-bottom="0.1cm" fo:padding-left="0.1cm" fo:padding-right="0.1cm" draw:shadow="hidden" draw:shadow-offset-x="0.1cm" draw:shadow-offset-y="0.1cm" draw:caption-escape-direction="auto"/>
      <style:paragraph-properties style:writing-mode="lr-tb"/>
    </style:style>
    <style:style style:name="gr2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426cm" fo:min-width="2.9cm" fo:padding-top="0.1cm" fo:padding-bottom="0.1cm" fo:padding-left="0.1cm" fo:padding-right="0.1cm" draw:shadow="hidden" draw:shadow-offset-x="0.1cm" draw:shadow-offset-y="0.1cm" draw:caption-escape-direction="auto"/>
      <style:paragraph-properties style:writing-mode="lr-tb"/>
    </style:style>
    <style:style style:name="gr2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188cm" fo:min-width="2.9cm" fo:padding-top="0.1cm" fo:padding-bottom="0.1cm" fo:padding-left="0.1cm" fo:padding-right="0.1cm" draw:shadow="hidden" draw:shadow-offset-x="0.1cm" draw:shadow-offset-y="0.1cm" draw:caption-escape-direction="auto"/>
      <style:paragraph-properties style:writing-mode="lr-tb"/>
    </style:style>
    <style:style style:name="gr3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52cm" fo:min-width="2.9cm" fo:padding-top="0.1cm" fo:padding-bottom="0.1cm" fo:padding-left="0.1cm" fo:padding-right="0.1cm" draw:shadow="hidden" draw:shadow-offset-x="0.1cm" draw:shadow-offset-y="0.1cm" draw:caption-escape-direction="auto"/>
      <style:paragraph-properties style:writing-mode="lr-tb"/>
    </style:style>
    <style:style style:name="gr3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0.437cm" fo:min-width="2.9cm" fo:padding-top="0.1cm" fo:padding-bottom="0.1cm" fo:padding-left="0.1cm" fo:padding-right="0.1cm" draw:shadow="hidden" draw:shadow-offset-x="0.1cm" draw:shadow-offset-y="0.1cm" draw:caption-escape-direction="auto"/>
      <style:paragraph-properties style:writing-mode="lr-tb"/>
    </style:style>
    <style:style style:name="gr3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023cm" fo:min-width="2.9cm" fo:padding-top="0.1cm" fo:padding-bottom="0.1cm" fo:padding-left="0.1cm" fo:padding-right="0.1cm" draw:shadow="hidden" draw:shadow-offset-x="0.1cm" draw:shadow-offset-y="0.1cm" draw:caption-escape-direction="auto"/>
      <style:paragraph-properties style:writing-mode="lr-tb"/>
    </style:style>
    <style:style style:name="gr3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859cm" fo:min-width="2.9cm" fo:padding-top="0.1cm" fo:padding-bottom="0.1cm" fo:padding-left="0.1cm" fo:padding-right="0.1cm" draw:shadow="hidden" draw:shadow-offset-x="0.1cm" draw:shadow-offset-y="0.1cm" draw:caption-escape-direction="auto"/>
      <style:paragraph-properties style:writing-mode="lr-tb"/>
    </style:style>
    <style:style style:name="gr3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086cm" fo:min-width="2.9cm" fo:padding-top="0.1cm" fo:padding-bottom="0.1cm" fo:padding-left="0.1cm" fo:padding-right="0.1cm" draw:shadow="hidden" draw:shadow-offset-x="0.1cm" draw:shadow-offset-y="0.1cm" draw:caption-escape-direction="auto"/>
      <style:paragraph-properties style:writing-mode="lr-tb"/>
    </style:style>
    <style:style style:name="gr3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981cm" fo:min-width="2.9cm" fo:padding-top="0.1cm" fo:padding-bottom="0.1cm" fo:padding-left="0.1cm" fo:padding-right="0.1cm" draw:shadow="hidden" draw:shadow-offset-x="0.1cm" draw:shadow-offset-y="0.1cm" draw:caption-escape-direction="auto"/>
      <style:paragraph-properties style:writing-mode="lr-tb"/>
    </style:style>
    <style:style style:name="gr3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403cm" fo:min-width="2.9cm" fo:padding-top="0.1cm" fo:padding-bottom="0.1cm" fo:padding-left="0.1cm" fo:padding-right="0.1cm" draw:shadow="hidden" draw:shadow-offset-x="0.1cm" draw:shadow-offset-y="0.1cm" draw:caption-escape-direction="auto"/>
      <style:paragraph-properties style:writing-mode="lr-tb"/>
    </style:style>
    <style:style style:name="gr3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666cm" fo:min-width="2.9cm" fo:padding-top="0.1cm" fo:padding-bottom="0.1cm" fo:padding-left="0.1cm" fo:padding-right="0.1cm" draw:shadow="hidden" draw:shadow-offset-x="0.1cm" draw:shadow-offset-y="0.1cm" draw:caption-escape-direction="auto"/>
      <style:paragraph-properties style:writing-mode="lr-tb"/>
    </style:style>
    <style:style style:name="gr3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hidden" draw:shadow-offset-x="0.1cm" draw:shadow-offset-y="0.1cm" draw:caption-escape-direction="auto"/>
      <style:paragraph-properties style:writing-mode="lr-tb"/>
    </style:style>
    <style:style style:name="gr3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296cm" fo:min-width="2.9cm" fo:padding-top="0.1cm" fo:padding-bottom="0.1cm" fo:padding-left="0.1cm" fo:padding-right="0.1cm" draw:shadow="hidden" draw:shadow-offset-x="0.1cm" draw:shadow-offset-y="0.1cm" draw:caption-escape-direction="auto"/>
      <style:paragraph-properties style:writing-mode="lr-tb"/>
    </style:style>
    <style:style style:name="gr4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481cm" fo:min-width="2.9cm" fo:padding-top="0.1cm" fo:padding-bottom="0.1cm" fo:padding-left="0.1cm" fo:padding-right="0.1cm" draw:shadow="hidden" draw:shadow-offset-x="0.1cm" draw:shadow-offset-y="0.1cm" draw:caption-escape-direction="auto"/>
      <style:paragraph-properties style:writing-mode="lr-tb"/>
    </style:style>
    <style:style style:name="gr4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716cm" fo:min-width="2.9cm" fo:padding-top="0.1cm" fo:padding-bottom="0.1cm" fo:padding-left="0.1cm" fo:padding-right="0.1cm" draw:shadow="hidden" draw:shadow-offset-x="0.1cm" draw:shadow-offset-y="0.1cm" draw:caption-escape-direction="auto"/>
      <style:paragraph-properties style:writing-mode="lr-tb"/>
    </style:style>
    <style:style style:name="gr4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658cm" fo:min-width="2.9cm" fo:padding-top="0.1cm" fo:padding-bottom="0.1cm" fo:padding-left="0.1cm" fo:padding-right="0.1cm" draw:shadow="hidden" draw:shadow-offset-x="0.1cm" draw:shadow-offset-y="0.1cm" draw:caption-escape-direction="auto"/>
      <style:paragraph-properties style:writing-mode="lr-tb"/>
    </style:style>
    <style:style style:name="gr4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221cm" fo:min-width="2.9cm" fo:padding-top="0.1cm" fo:padding-bottom="0.1cm" fo:padding-left="0.1cm" fo:padding-right="0.1cm" draw:shadow="hidden" draw:shadow-offset-x="0.1cm" draw:shadow-offset-y="0.1cm" draw:caption-escape-direction="auto"/>
      <style:paragraph-properties style:writing-mode="lr-tb"/>
    </style:style>
    <style:style style:name="gr4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37cm" fo:min-width="2.9cm" fo:padding-top="0.1cm" fo:padding-bottom="0.1cm" fo:padding-left="0.1cm" fo:padding-right="0.1cm" draw:shadow="hidden" draw:shadow-offset-x="0.1cm" draw:shadow-offset-y="0.1cm" draw:caption-escape-direction="auto"/>
      <style:paragraph-properties style:writing-mode="lr-tb"/>
    </style:style>
    <style:style style:name="gr4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21cm" fo:min-width="2.9cm" fo:padding-top="0.1cm" fo:padding-bottom="0.1cm" fo:padding-left="0.1cm" fo:padding-right="0.1cm" draw:shadow="hidden" draw:shadow-offset-x="0.1cm" draw:shadow-offset-y="0.1cm" draw:caption-escape-direction="auto"/>
      <style:paragraph-properties style:writing-mode="lr-tb"/>
    </style:style>
    <style:style style:name="gr4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56cm" fo:min-width="2.9cm" fo:padding-top="0.1cm" fo:padding-bottom="0.1cm" fo:padding-left="0.1cm" fo:padding-right="0.1cm" draw:shadow="hidden" draw:shadow-offset-x="0.1cm" draw:shadow-offset-y="0.1cm" draw:caption-escape-direction="auto"/>
      <style:paragraph-properties style:writing-mode="lr-tb"/>
    </style:style>
    <style:style style:name="gr4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88cm" fo:min-width="2.9cm" fo:padding-top="0.1cm" fo:padding-bottom="0.1cm" fo:padding-left="0.1cm" fo:padding-right="0.1cm" draw:shadow="hidden" draw:shadow-offset-x="0.1cm" draw:shadow-offset-y="0.1cm" draw:caption-escape-direction="auto"/>
      <style:paragraph-properties style:writing-mode="lr-tb"/>
    </style:style>
    <style:style style:name="gr4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89cm" fo:min-width="2.9cm" fo:padding-top="0.1cm" fo:padding-bottom="0.1cm" fo:padding-left="0.1cm" fo:padding-right="0.1cm" draw:shadow="hidden" draw:shadow-offset-x="0.1cm" draw:shadow-offset-y="0.1cm" draw:caption-escape-direction="auto"/>
      <style:paragraph-properties style:writing-mode="lr-tb"/>
    </style:style>
    <style:style style:name="gr4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951cm" fo:min-width="2.9cm" fo:padding-top="0.1cm" fo:padding-bottom="0.1cm" fo:padding-left="0.1cm" fo:padding-right="0.1cm" draw:shadow="hidden" draw:shadow-offset-x="0.1cm" draw:shadow-offset-y="0.1cm" draw:caption-escape-direction="auto"/>
      <style:paragraph-properties style:writing-mode="lr-tb"/>
    </style:style>
    <style:style style:name="gr5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06cm" fo:min-width="2.9cm" fo:padding-top="0.1cm" fo:padding-bottom="0.1cm" fo:padding-left="0.1cm" fo:padding-right="0.1cm" draw:shadow="hidden" draw:shadow-offset-x="0.1cm" draw:shadow-offset-y="0.1cm" draw:caption-escape-direction="auto"/>
      <style:paragraph-properties style:writing-mode="lr-tb"/>
    </style:style>
    <style:style style:name="gr5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506cm" fo:min-width="2.9cm" fo:padding-top="0.1cm" fo:padding-bottom="0.1cm" fo:padding-left="0.1cm" fo:padding-right="0.1cm" draw:shadow="hidden" draw:shadow-offset-x="0.1cm" draw:shadow-offset-y="0.1cm" draw:caption-escape-direction="auto"/>
      <style:paragraph-properties style:writing-mode="lr-tb"/>
    </style:style>
    <style:style style:name="gr5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874cm" fo:min-width="2.9cm" fo:padding-top="0.1cm" fo:padding-bottom="0.1cm" fo:padding-left="0.1cm" fo:padding-right="0.1cm" draw:shadow="hidden" draw:shadow-offset-x="0.1cm" draw:shadow-offset-y="0.1cm" draw:caption-escape-direction="auto"/>
      <style:paragraph-properties style:writing-mode="lr-tb"/>
    </style:style>
    <style:style style:name="gr5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926cm" fo:min-width="2.9cm" fo:padding-top="0.1cm" fo:padding-bottom="0.1cm" fo:padding-left="0.1cm" fo:padding-right="0.1cm" draw:shadow="hidden" draw:shadow-offset-x="0.1cm" draw:shadow-offset-y="0.1cm" draw:caption-escape-direction="auto"/>
      <style:paragraph-properties style:writing-mode="lr-tb"/>
    </style:style>
    <style:style style:name="gr5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853cm" fo:min-width="2.9cm" fo:padding-top="0.1cm" fo:padding-bottom="0.1cm" fo:padding-left="0.1cm" fo:padding-right="0.1cm" draw:shadow="hidden" draw:shadow-offset-x="0.1cm" draw:shadow-offset-y="0.1cm" draw:caption-escape-direction="auto"/>
      <style:paragraph-properties style:writing-mode="lr-tb"/>
    </style:style>
    <style:style style:name="gr5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346cm" fo:min-width="2.9cm" fo:padding-top="0.1cm" fo:padding-bottom="0.1cm" fo:padding-left="0.1cm" fo:padding-right="0.1cm" draw:shadow="hidden" draw:shadow-offset-x="0.1cm" draw:shadow-offset-y="0.1cm" draw:caption-escape-direction="auto"/>
      <style:paragraph-properties style:writing-mode="lr-tb"/>
    </style:style>
    <style:style style:name="gr5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98cm" fo:min-width="2.9cm" fo:padding-top="0.1cm" fo:padding-bottom="0.1cm" fo:padding-left="0.1cm" fo:padding-right="0.1cm" draw:shadow="hidden" draw:shadow-offset-x="0.1cm" draw:shadow-offset-y="0.1cm" draw:caption-escape-direction="auto"/>
      <style:paragraph-properties style:writing-mode="lr-tb"/>
    </style:style>
    <style:style style:name="gr5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816cm" fo:min-width="2.9cm" fo:padding-top="0.1cm" fo:padding-bottom="0.1cm" fo:padding-left="0.1cm" fo:padding-right="0.1cm" draw:shadow="hidden" draw:shadow-offset-x="0.1cm" draw:shadow-offset-y="0.1cm" draw:caption-escape-direction="auto"/>
      <style:paragraph-properties style:writing-mode="lr-tb"/>
    </style:style>
    <style:style style:name="gr5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849cm" fo:min-width="2.9cm" fo:padding-top="0.1cm" fo:padding-bottom="0.1cm" fo:padding-left="0.1cm" fo:padding-right="0.1cm" draw:shadow="hidden" draw:shadow-offset-x="0.1cm" draw:shadow-offset-y="0.1cm" draw:caption-escape-direction="auto"/>
      <style:paragraph-properties style:writing-mode="lr-tb"/>
    </style:style>
    <style:style style:name="gr5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098cm" fo:min-width="2.9cm" fo:padding-top="0.1cm" fo:padding-bottom="0.1cm" fo:padding-left="0.1cm" fo:padding-right="0.1cm" draw:shadow="hidden" draw:shadow-offset-x="0.1cm" draw:shadow-offset-y="0.1cm" draw:caption-escape-direction="auto"/>
      <style:paragraph-properties style:writing-mode="lr-tb"/>
    </style:style>
    <style:style style:name="gr6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886cm" fo:min-width="2.9cm" fo:padding-top="0.1cm" fo:padding-bottom="0.1cm" fo:padding-left="0.1cm" fo:padding-right="0.1cm" draw:shadow="hidden" draw:shadow-offset-x="0.1cm" draw:shadow-offset-y="0.1cm" draw:caption-escape-direction="auto"/>
      <style:paragraph-properties style:writing-mode="lr-tb"/>
    </style:style>
    <style:style style:name="gr6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817cm" fo:min-width="2.9cm" fo:padding-top="0.1cm" fo:padding-bottom="0.1cm" fo:padding-left="0.1cm" fo:padding-right="0.1cm" draw:shadow="hidden" draw:shadow-offset-x="0.1cm" draw:shadow-offset-y="0.1cm" draw:caption-escape-direction="auto"/>
      <style:paragraph-properties style:writing-mode="lr-tb"/>
    </style:style>
    <style:style style:name="gr6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256cm" fo:min-width="2.9cm" fo:padding-top="0.1cm" fo:padding-bottom="0.1cm" fo:padding-left="0.1cm" fo:padding-right="0.1cm" draw:shadow="hidden" draw:shadow-offset-x="0.1cm" draw:shadow-offset-y="0.1cm" draw:caption-escape-direction="auto"/>
      <style:paragraph-properties style:writing-mode="lr-tb"/>
    </style:style>
    <style:style style:name="gr6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743cm" fo:min-width="2.9cm" fo:padding-top="0.1cm" fo:padding-bottom="0.1cm" fo:padding-left="0.1cm" fo:padding-right="0.1cm" draw:shadow="hidden" draw:shadow-offset-x="0.1cm" draw:shadow-offset-y="0.1cm" draw:caption-escape-direction="auto"/>
      <style:paragraph-properties style:writing-mode="lr-tb"/>
    </style:style>
    <style:style style:name="gr6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653cm" fo:min-width="2.9cm" fo:padding-top="0.1cm" fo:padding-bottom="0.1cm" fo:padding-left="0.1cm" fo:padding-right="0.1cm" draw:shadow="hidden" draw:shadow-offset-x="0.1cm" draw:shadow-offset-y="0.1cm" draw:caption-escape-direction="auto"/>
      <style:paragraph-properties style:writing-mode="lr-tb"/>
    </style:style>
    <style:style style:name="gr6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239cm" fo:min-width="2.9cm" fo:padding-top="0.1cm" fo:padding-bottom="0.1cm" fo:padding-left="0.1cm" fo:padding-right="0.1cm" draw:shadow="hidden" draw:shadow-offset-x="0.1cm" draw:shadow-offset-y="0.1cm" draw:caption-escape-direction="auto"/>
      <style:paragraph-properties style:writing-mode="lr-tb"/>
    </style:style>
    <style:style style:name="gr6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77cm" fo:min-width="2.9cm" fo:padding-top="0.1cm" fo:padding-bottom="0.1cm" fo:padding-left="0.1cm" fo:padding-right="0.1cm" draw:shadow="hidden" draw:shadow-offset-x="0.1cm" draw:shadow-offset-y="0.1cm" draw:caption-escape-direction="auto"/>
      <style:paragraph-properties style:writing-mode="lr-tb"/>
    </style:style>
    <style:style style:name="gr6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25cm" fo:min-width="2.9cm" fo:padding-top="0.1cm" fo:padding-bottom="0.1cm" fo:padding-left="0.1cm" fo:padding-right="0.1cm" draw:shadow="hidden" draw:shadow-offset-x="0.1cm" draw:shadow-offset-y="0.1cm" draw:caption-escape-direction="auto"/>
      <style:paragraph-properties style:writing-mode="lr-tb"/>
    </style:style>
    <style:style style:name="gr6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72cm" fo:min-width="2.9cm" fo:padding-top="0.1cm" fo:padding-bottom="0.1cm" fo:padding-left="0.1cm" fo:padding-right="0.1cm" draw:shadow="hidden" draw:shadow-offset-x="0.1cm" draw:shadow-offset-y="0.1cm" draw:caption-escape-direction="auto"/>
      <style:paragraph-properties style:writing-mode="lr-tb"/>
    </style:style>
    <style:style style:name="gr6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027cm" fo:min-width="2.9cm" fo:padding-top="0.1cm" fo:padding-bottom="0.1cm" fo:padding-left="0.1cm" fo:padding-right="0.1cm" draw:shadow="hidden" draw:shadow-offset-x="0.1cm" draw:shadow-offset-y="0.1cm" draw:caption-escape-direction="auto"/>
      <style:paragraph-properties style:writing-mode="lr-tb"/>
    </style:style>
    <style:style style:name="gr7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45cm" fo:min-width="2.9cm" fo:padding-top="0.1cm" fo:padding-bottom="0.1cm" fo:padding-left="0.1cm" fo:padding-right="0.1cm" draw:shadow="hidden" draw:shadow-offset-x="0.1cm" draw:shadow-offset-y="0.1cm" draw:caption-escape-direction="auto"/>
      <style:paragraph-properties style:writing-mode="lr-tb"/>
    </style:style>
    <style:style style:name="gr7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3"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4"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5" style:family="text">
      <style:text-properties style:font-style-complex="norm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6"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7"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8" style:family="text">
      <style:text-properties style:text-outline="false" fo:font-weight="normal" style:font-weight-asian="normal" style:font-size-complex="10pt" style:font-size-asian="10pt" style:font-name-complex="Arial" fo:text-shadow="none" fo:font-style="normal" style:font-style-asian="normal" style:text-underline-style="none" style:text-underline-color="font-color" style:text-line-through-type="none" style:font-weight-complex="normal" style:font-name="Arial" fo:font-size="10pt" fo:color="#000000" style:font-style-complex="normal" style:text-position="0% 100%"/>
    </style:style>
    <style:style style:name="T9"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asian="bold" fo:font-weight="bold" style:font-weight-complex="bold"/>
    </style:style>
    <style:style style:name="T10"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normal" style:font-weight-asian="normal" style:font-weight-complex="normal"/>
    </style:style>
    <style:style style:name="T11"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bold" style:font-weight-complex="bold" style:font-weight-asian="bold"/>
    </style:style>
    <style:style style:name="T12"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normal" style:font-weight-complex="normal" style:font-weight-asian="normal"/>
    </style:style>
    <style:style style:name="T13"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complex="bold" style:font-weight-asian="bold" fo:font-weight="bold"/>
    </style:style>
    <style:style style:name="T14"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complex="normal" style:font-weight-asian="normal" fo:font-weight="normal"/>
    </style:style>
    <style:style style:name="T15"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bold" style:font-weight-asian="bold" style:font-weight-complex="bold"/>
    </style:style>
    <style:style style:name="T16" style:family="text">
      <style:text-properties style:text-underline-style="none" style:text-underline-color="font-color" style:font-name-complex="Arial" style:text-outline="false" fo:font-style="normal" style:font-size-complex="10pt" style:font-size-asian="10pt" fo:font-weight="normal" style:text-line-through-type="none" style:font-style-asian="normal" fo:color="#000000" style:font-style-complex="normal" style:font-weight-complex="normal" style:font-weight-asian="normal" style:font-name="Arial" fo:font-size="10pt" style:text-position="0% 100%" fo:text-shadow="none"/>
    </style:style>
    <style:style style:name="T17"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fo:font-weight="bold" style:font-weight-asian="bold" style:font-weight-complex="bold"/>
    </style:style>
    <style:style style:name="T18"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style:font-weight-asian="normal" fo:font-weight="normal" style:font-weight-complex="normal"/>
    </style:style>
    <style:style style:name="T19"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style:font-weight-asian="bold" fo:font-weight="bold" style:font-weight-complex="bold"/>
    </style:style>
    <style:style style:name="T20"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fo:font-weight="normal" style:font-weight-complex="normal" style:font-weight-asian="normal"/>
    </style:style>
    <style:style style:name="T21"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style:font-weight-complex="normal" style:font-weight-asian="normal" fo:font-weight="normal"/>
    </style:style>
    <style:style style:name="T22"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style:font-weight-complex="bold" style:font-weight-asian="bold" fo:font-weight="bold"/>
    </style:style>
    <style:style style:name="T23"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fo:font-weight="normal" style:font-weight-asian="normal" style:font-weight-complex="normal"/>
    </style:style>
    <style:style style:name="T24" style:family="text">
      <style:text-properties style:text-underline-style="none" style:text-underline-color="font-color" style:font-name-complex="Arial" style:text-outline="false" fo:font-style="normal" style:font-size-complex="10pt" style:font-size-asian="10pt" style:text-line-through-type="none" style:font-style-asian="normal" fo:color="#000000" style:font-style-complex="normal" style:font-name="Arial" fo:font-size="10pt" style:text-position="0% 100%" fo:text-shadow="none" style:font-weight-asian="bold" style:font-weight-complex="bold" fo:font-weight="bold"/>
    </style:style>
    <style:style style:name="T25" style:family="text">
      <style:text-properties style:text-underline-style="none" style:text-underline-color="font-color" style:font-style-asian="normal" style:font-weight-complex="bold" style:font-weight-asian="bold" style:font-size-complex="10pt" style:font-size-asian="10pt" style:font-name-complex="Arial" fo:text-shadow="none" fo:font-weight="bold" style:font-name="Arial" fo:font-size="10pt" fo:color="#000000" style:font-style-complex="normal" style:text-position="0% 100%" style:text-outline="false" fo:font-style="normal" style:text-line-through-type="none"/>
    </style:style>
    <style:style style:name="T26"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normal" style:font-weight-asian="normal" fo:font-weight="normal"/>
    </style:style>
    <style:style style:name="T27"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bold" style:font-weight-asian="bold" fo:font-weight="bold"/>
    </style:style>
    <style:style style:name="T28"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normal" style:font-weight-asian="normal" style:font-weight-complex="normal"/>
    </style:style>
    <style:style style:name="T29"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bold" style:font-weight-complex="bold" style:font-weight-asian="bold"/>
    </style:style>
    <style:style style:name="T30"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bold" style:font-weight-asian="bold" style:font-weight-complex="bold"/>
    </style:style>
    <style:style style:name="T31" style:family="text">
      <style:text-properties fo:font-style="normal" style:font-weight-complex="normal" style:font-weight-asian="normal" style:font-size-complex="10pt" style:font-size-asian="10pt" style:font-name-complex="Arial" fo:text-shadow="none" fo:font-weight="normal" style:text-underline-style="none" style:text-underline-color="font-color" style:text-line-through-type="none" style:font-style-asian="normal" style:font-name="Arial" fo:font-size="10pt" fo:color="#000000" style:font-style-complex="normal" style:text-position="0% 100%" style:text-outline="false"/>
    </style:style>
    <style:style style:name="T32"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asian="bold" fo:font-weight="bold" style:font-weight-complex="bold"/>
    </style:style>
    <style:style style:name="T33"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normal" fo:font-weight="normal" style:font-weight-asian="normal"/>
    </style:style>
    <style:style style:name="T34"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bold" style:font-weight-asian="bold" style:font-weight-complex="bold"/>
    </style:style>
    <style:style style:name="T35"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complex="normal" style:font-weight-asian="normal"/>
    </style:style>
    <style:style style:name="T36"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bold" style:font-weight-asian="bold" fo:font-weight="bold"/>
    </style:style>
    <style:style style:name="T37"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asian="normal" style:font-weight-complex="normal"/>
    </style:style>
    <style:style style:name="T38" style:family="text">
      <style:text-properties fo:text-shadow="none" fo:font-size="10pt" fo:font-weight="normal" style:font-style-complex="normal" style:font-weight-asian="normal" style:font-size-complex="10pt" style:text-position="0% 100%" style:font-weight-complex="normal" style:text-outline="false" style:text-line-through-type="none" style:font-name="Arial" style:text-underline-style="none" style:text-underline-color="font-color" style:font-name-complex="Arial" fo:color="#000000" style:font-style-asian="normal" fo:font-style="normal" style:font-size-asian="10pt"/>
    </style:style>
    <style:style style:name="T39"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font-weight="bold" style:font-weight-complex="bold" fo:color="#0000ff" style:font-weight-asian="bold"/>
    </style:style>
    <style:style style:name="T40"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complex="normal" fo:color="#000000" style:font-weight-asian="normal" fo:font-weight="normal"/>
    </style:style>
    <style:style style:name="T41"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complex="normal" style:font-weight-asian="normal" fo:font-weight="normal" fo:color="#ffff00"/>
    </style:style>
    <style:style style:name="T42"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complex="bold" fo:color="#ffcc00" style:font-weight-asian="bold" fo:font-weight="bold"/>
    </style:style>
    <style:style style:name="T43"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asian="normal" fo:font-weight="normal" style:font-weight-complex="normal" fo:color="#000000"/>
    </style:style>
    <style:style style:name="T44"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font-weight="bold" style:font-weight-asian="bold" style:font-weight-complex="bold" fo:color="#ff8080"/>
    </style:style>
    <style:style style:name="T45"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color="#000000" fo:font-weight="normal" style:font-weight-asian="normal" style:font-weight-complex="normal"/>
    </style:style>
    <style:style style:name="T46"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complex="bold" style:font-weight-asian="bold" fo:font-weight="bold" fo:color="#ff0000"/>
    </style:style>
    <style:style style:name="T47"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complex="normal" fo:font-weight="normal" fo:color="#000000" style:font-weight-asian="normal"/>
    </style:style>
    <style:style style:name="T48"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font-weight="bold" style:font-weight-complex="bold" fo:color="#ff0000" style:font-weight-asian="bold"/>
    </style:style>
    <style:style style:name="T49"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font-weight="normal" fo:color="#000000" style:font-weight-asian="normal" style:font-weight-complex="normal"/>
    </style:style>
    <style:style style:name="T50"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color="#008000" fo:font-weight="bold" style:font-weight-asian="bold" style:font-weight-complex="bold"/>
    </style:style>
    <style:style style:name="T51"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asian="normal" style:font-weight-complex="normal" fo:font-weight="normal" fo:color="#000000"/>
    </style:style>
    <style:style style:name="T52"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style:font-weight-asian="bold" style:font-weight-complex="bold" fo:color="#ff0000" fo:font-weight="bold"/>
    </style:style>
    <style:style style:name="T53" style:family="text">
      <style:text-properties fo:text-shadow="none" fo:font-size="10pt" style:font-style-complex="normal" style:font-size-complex="10pt" style:text-position="0% 100%" style:text-outline="false" style:text-line-through-type="none" style:font-name="Arial" style:text-underline-style="none" style:text-underline-color="font-color" style:font-name-complex="Arial" style:font-style-asian="normal" fo:font-style="normal" style:font-size-asian="10pt" fo:color="#000000" fo:font-weight="bold" style:font-weight-asian="bold" style:font-weight-complex="bold"/>
    </style:style>
    <style:style style:name="T54"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5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6" style:family="text">
      <style:text-properties style:text-position="0% 100%" style:font-name="Ari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style-complex="normal"/>
    </style:style>
    <style:style style:name="T57" style:family="text">
      <style:text-properties style:text-position="0% 100%" style:font-name="Ari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style-complex="normal" style:font-weight-complex="bold" style:font-weight-asian="bold" fo:font-weight="bold"/>
    </style:style>
    <style:style style:name="T58" style:family="text">
      <style:text-properties style:text-position="0% 100%" style:font-name="Ari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style-complex="normal" style:font-weight-asian="normal" style:font-weight-complex="normal" fo:font-weight="normal"/>
    </style:style>
    <style:style style:name="T59" style:family="text">
      <style:text-properties style:text-position="0% 100%" style:font-name="Arial" fo:color="#000000" fo:text-shadow="none" style:font-size-complex="10pt" style:font-size-asian="10pt" style:font-name-complex="Arial" style:text-outline="false" style:text-line-through-type="none" style:text-underline-style="none" style:text-underline-color="font-color" fo:font-size="10pt" fo:font-weight="bold" fo:font-style="italic" style:font-weight-asian="bold" style:font-weight-complex="bold" style:font-style-asian="italic" style:font-style-complex="italic"/>
    </style:style>
    <style:style style:name="T60" style:family="text">
      <style:text-properties style:text-position="0% 100%" style:font-name="Arial" fo:color="#000000" fo:text-shadow="none" style:font-size-complex="10pt" style:font-size-asian="10pt" style:font-name-complex="Arial" style:text-outline="false" style:text-line-through-type="none" style:text-underline-style="none" style:text-underline-color="font-color" fo:font-size="10pt" fo:font-weight="normal" fo:font-style="normal" style:font-weight-asian="normal" style:font-weight-complex="normal" style:font-style-asian="normal" style:font-style-complex="normal"/>
    </style:style>
    <style:style style:name="T61"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6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63" style:family="text">
      <style:text-properties style:font-style-complex="normal" fo:color="#000000" fo:text-shadow="none" style:font-style-asian="normal" style:font-weight-complex="bold" style:font-weight-asian="bold" style:font-size-complex="10pt" style:font-size-asian="10pt" style:font-name-complex="Arial" style:text-outline="false" fo:font-style="normal" style:text-line-through-type="none" style:text-underline-style="none" style:text-underline-color="font-color" fo:font-weight="bold" fo:font-size="10pt" style:font-name="Arial" style:text-position="0% 100%"/>
    </style:style>
    <style:style style:name="T64" style:family="text">
      <style:text-properties fo:text-shadow="none" fo:font-size="10pt" style:font-name="Arial" style:font-style-asian="normal" style:font-weight-complex="normal" style:font-weight-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style>
    <style:style style:name="T65"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66"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67"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68"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69" style:family="text">
      <style:text-properties fo:text-shadow="none" style:font-name="Arial" fo:font-size="10pt" fo:font-weight="normal" style:text-underline-style="none" style:text-underline-color="font-color" style:text-line-through-type="none" fo:font-style="normal" style:text-outline="false" fo:color="#000000" style:font-name-complex="Arial" style:font-size-asian="10pt" style:font-size-complex="10pt" style:font-weight-asian="normal" style:font-weight-complex="normal" style:font-style-asian="normal" style:font-style-complex="normal" style:text-position="-33% 58%"/>
    </style:style>
    <style:style style:name="T70" style:family="text">
      <style:text-properties fo:text-shadow="none" style:font-name="Arial" fo:font-size="10pt" fo:font-weight="normal" style:text-underline-style="none" style:text-underline-color="font-color" style:text-line-through-type="none" fo:font-style="normal" style:text-outline="false" fo:color="#000000" style:font-name-complex="Arial" style:font-size-asian="10pt" style:font-size-complex="10pt" style:font-weight-asian="normal" style:font-weight-complex="normal" style:font-style-asian="normal" style:font-style-complex="normal" style:text-position="0% 100%"/>
    </style:style>
    <style:style style:name="T71" style:family="text">
      <style:text-properties style:font-name="Arial" style:font-style-complex="norm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fo:text-shadow="none"/>
    </style:style>
    <style:style style:name="T72" style:family="text">
      <style:text-properties style:font-name="Arial" style:font-style-complex="normal" fo:font-size="10pt" fo:font-weight="normal" style:text-underline-style="none" style:text-underline-color="font-color" style:text-line-through-type="none" fo:font-style="normal" style:text-outline="false" fo:color="#000000" style:font-name-complex="Arial" style:font-size-asian="10pt" style:font-size-complex="10pt" style:font-weight-asian="normal" style:font-weight-complex="normal" style:font-style-asian="normal" fo:text-shadow="none" style:text-position="-33% 58%"/>
    </style:style>
    <style:style style:name="T73" style:family="text">
      <style:text-properties style:font-name="Arial" style:font-style-complex="normal" fo:font-size="10pt" fo:font-weight="normal" style:text-underline-style="none" style:text-underline-color="font-color" style:text-line-through-type="none" fo:font-style="normal" style:text-outline="false" fo:color="#000000" style:font-name-complex="Arial" style:font-size-asian="10pt" style:font-size-complex="10pt" style:font-weight-asian="normal" style:font-weight-complex="normal" style:font-style-asian="normal" fo:text-shadow="none" style:text-position="0% 100%"/>
    </style:style>
    <style:style style:name="T74" style:family="text">
      <style:text-properties style:font-style-complex="normal" fo:text-shadow="none"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style:font-name="Arial"/>
    </style:style>
    <style:style style:name="T75" style:family="text">
      <style:text-properties style:font-style-complex="normal" fo:text-shadow="none"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style:font-name="Arial" style:text-position="-33% 58%"/>
    </style:style>
    <style:style style:name="T76" style:family="text">
      <style:text-properties style:font-style-complex="normal" fo:text-shadow="none"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style:font-name="Arial" style:text-position="0% 100%"/>
    </style:style>
    <style:style style:name="T77"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78" style:family="text">
      <style:text-properties style:text-underline-style="none" style:text-underline-color="font-color" style:font-size-asian="10pt" style:font-size-complex="10pt" fo:text-shadow="none" fo:font-size="10pt" fo:font-weight="normal" style:font-weight-asian="normal" fo:color="#000000" style:font-name-complex="Arial" fo:font-style="normal" style:text-position="0% 100%" style:text-line-through-type="none" style:font-weight-complex="normal" style:font-style-asian="normal" style:font-name="Arial" style:font-style-complex="normal" style:text-outline="false"/>
    </style:style>
    <style:style style:name="T79" style:family="text">
      <style:text-properties style:text-underline-style="none" style:text-underline-color="font-color" style:font-size-asian="10pt" style:font-size-complex="10pt" fo:text-shadow="none" fo:font-size="10pt" fo:color="#000000" style:font-name-complex="Arial" fo:font-style="normal" style:text-position="0% 100%" style:text-line-through-type="none" style:font-style-asian="normal" style:font-name="Arial" style:font-style-complex="normal" style:text-outline="false" style:font-weight-asian="bold" style:font-weight-complex="bold" fo:font-weight="bold"/>
    </style:style>
    <style:style style:name="T80" style:family="text">
      <style:text-properties style:text-underline-style="none" style:text-underline-color="font-color" style:font-size-asian="10pt" style:font-size-complex="10pt" fo:text-shadow="none" fo:font-size="10pt" fo:color="#000000" style:font-name-complex="Arial" fo:font-style="normal" style:text-position="0% 100%" style:text-line-through-type="none" style:font-style-asian="normal" style:font-name="Arial" style:font-style-complex="normal" style:text-outline="false" style:font-weight-asian="normal" fo:font-weight="normal" style:font-weight-complex="normal"/>
    </style:style>
    <style:style style:name="T81"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font-weight="bold" fo:color="#0000ff" style:font-weight-asian="bold" style:font-weight-complex="bold"/>
    </style:style>
    <style:style style:name="T82"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font-weight="normal" fo:color="#000000" style:font-weight-asian="normal" style:font-weight-complex="normal"/>
    </style:style>
    <style:style style:name="T83"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font-weight="bold" style:font-weight-complex="bold" fo:color="#ffcc00" style:font-weight-asian="bold"/>
    </style:style>
    <style:style style:name="T84"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color="#000000" style:font-weight-asian="normal" style:font-weight-complex="normal" fo:font-weight="normal"/>
    </style:style>
    <style:style style:name="T85"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color="#ff0000" fo:font-weight="bold" style:font-weight-asian="bold" style:font-weight-complex="bold"/>
    </style:style>
    <style:style style:name="T86"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color="#000000" fo:font-weight="normal" style:font-weight-asian="normal" style:font-weight-complex="normal"/>
    </style:style>
    <style:style style:name="T87" style:family="text">
      <style:text-properties style:text-underline-style="none" style:text-underline-color="font-color" style:font-size-asian="10pt" style:font-size-complex="10pt" fo:text-shadow="none" fo:font-size="10pt" style:font-name-complex="Arial" fo:font-style="normal" style:text-position="0% 100%" style:text-line-through-type="none" style:font-style-asian="normal" style:font-name="Arial" style:font-style-complex="normal" style:text-outline="false" fo:color="#000000" fo:font-weight="bold" style:font-weight-asian="bold" style:font-weight-complex="bold"/>
    </style:style>
    <style:style style:name="T88" style:family="text">
      <style:text-properties fo:font-style="normal" fo:color="#000000" fo:text-shadow="none" style:text-position="0% 100%" style:font-style-complex="normal" fo:font-size="10pt" fo:font-weight="normal" style:text-underline-style="none" style:text-underline-color="font-color" style:text-line-through-type="none" style:font-name-complex="Arial" style:font-size-asian="10pt" style:font-size-complex="10pt" style:font-weight-asian="normal" style:font-weight-complex="normal" style:font-style-asian="normal" style:font-name="Arial" style:text-outline="false"/>
    </style:style>
    <style:style style:name="T89" style:family="text">
      <style:text-properties fo:font-style="normal" fo:color="#000000"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style:font-weight-asian="bold" style:font-weight-complex="bold" fo:font-weight="bold"/>
    </style:style>
    <style:style style:name="T90" style:family="text">
      <style:text-properties fo:font-style="normal" fo:color="#000000"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style:font-weight-asian="normal" style:font-weight-complex="normal" fo:font-weight="normal"/>
    </style:style>
    <style:style style:name="T91" style:family="text">
      <style:text-properties fo:font-style="normal"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fo:color="#ff99cc" fo:font-weight="bold" style:font-weight-asian="bold" style:font-weight-complex="bold"/>
    </style:style>
    <style:style style:name="T92" style:family="text">
      <style:text-properties fo:font-style="normal"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fo:font-weight="normal" fo:color="#000000" style:font-weight-asian="normal" style:font-weight-complex="normal"/>
    </style:style>
    <style:style style:name="T93" style:family="text">
      <style:text-properties fo:font-style="normal"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fo:color="#000000" fo:font-weight="bold" style:font-weight-asian="bold" style:font-weight-complex="bold"/>
    </style:style>
    <style:style style:name="T94" style:family="text">
      <style:text-properties fo:font-style="normal" fo:text-shadow="none" style:text-position="0% 100%" style:font-style-complex="normal" fo:font-size="10pt" style:text-underline-style="none" style:text-underline-color="font-color" style:text-line-through-type="none" style:font-name-complex="Arial" style:font-size-asian="10pt" style:font-size-complex="10pt" style:font-style-asian="normal" style:font-name="Arial" style:text-outline="false" fo:color="#000000" fo:font-weight="normal" style:font-weight-asian="normal" style:font-weight-complex="normal"/>
    </style:style>
    <style:style style:name="T95" style:family="text">
      <style:text-properties style:font-style-asian="normal" fo:font-size="10pt" style:text-line-through-type="none" style:font-size-asian="10pt" style:text-position="0% 100%" style:font-style-complex="normal" fo:text-shadow="none" style:font-weight-asian="normal" style:font-size-complex="10pt" style:text-underline-style="none" style:text-underline-color="font-color" fo:font-weight="normal" style:font-name="Arial" fo:color="#000000" style:font-name-complex="Arial" fo:font-style="normal" style:text-outline="false" style:font-weight-complex="normal"/>
    </style:style>
    <style:style style:name="T96" style:family="text">
      <style:text-properties style:font-style-asian="normal" fo:font-size="10pt" style:text-line-through-type="none" style:font-size-asian="10pt" style:text-position="0% 100%" style:font-style-complex="normal" fo:text-shadow="none" style:font-size-complex="10pt" style:text-underline-style="none" style:text-underline-color="font-color" style:font-name="Arial" fo:color="#000000" style:font-name-complex="Arial" fo:font-style="normal" style:text-outline="false" style:font-weight-asian="bold" style:font-weight-complex="bold" fo:font-weight="bold"/>
    </style:style>
    <style:style style:name="T97" style:family="text">
      <style:text-properties style:font-style-asian="normal" fo:font-size="10pt" style:text-line-through-type="none" style:font-size-asian="10pt" style:text-position="0% 100%" style:font-style-complex="normal" fo:text-shadow="none" style:font-size-complex="10pt" style:text-underline-style="none" style:text-underline-color="font-color" style:font-name="Arial" fo:color="#000000" style:font-name-complex="Arial" fo:font-style="normal" style:text-outline="false" style:font-weight-asian="normal" fo:font-weight="normal" style:font-weight-complex="normal"/>
    </style:style>
    <style:style style:name="T98" style:family="text">
      <style:text-properties style:font-style-asian="normal" fo:font-size="10pt" style:text-line-through-type="none" style:font-size-asian="10pt" style:text-position="0% 100%" style:font-style-complex="normal" fo:text-shadow="none" style:font-size-complex="10pt" style:text-underline-style="none" style:text-underline-color="font-color" style:font-name="Arial" fo:color="#000000" style:font-name-complex="Arial" fo:font-style="normal" style:text-outline="false" fo:font-weight="bold" style:font-weight-asian="bold" style:font-weight-complex="bold"/>
    </style:style>
    <style:style style:name="T99" style:family="text">
      <style:text-properties style:font-style-asian="normal" fo:font-size="10pt" style:text-line-through-type="none" style:font-size-asian="10pt" style:text-position="0% 100%" style:font-style-complex="normal" fo:text-shadow="none" style:font-size-complex="10pt" style:text-underline-style="none" style:text-underline-color="font-color" style:font-name="Arial" fo:color="#000000" style:font-name-complex="Arial" fo:font-style="normal" style:text-outline="false" fo:font-weight="normal" style:font-weight-complex="normal" style:font-weight-asian="normal"/>
    </style:style>
    <style:style style:name="T100" style:family="text">
      <style:text-properties style:font-style-asian="normal" fo:font-size="10pt" style:text-line-through-type="none" style:font-size-asian="10pt" style:font-style-complex="normal" fo:text-shadow="none" style:font-size-complex="10pt" style:text-underline-style="none" style:text-underline-color="font-color" style:font-name="Arial" fo:color="#000000" style:font-name-complex="Arial" fo:font-style="normal" style:text-outline="false" fo:font-weight="bold" style:font-weight-asian="bold" style:font-weight-complex="bold" style:text-position="-33% 58%"/>
    </style:style>
    <style:style style:name="T101" style:family="text">
      <style:text-properties style:font-style-asian="normal" fo:font-size="10pt" style:text-line-through-type="none" style:font-size-asian="10pt" style:font-style-complex="normal" fo:text-shadow="none" style:font-size-complex="10pt" style:text-underline-style="none" style:text-underline-color="font-color" style:font-name="Arial" fo:color="#000000" style:font-name-complex="Arial" fo:font-style="normal" style:text-outline="false" fo:font-weight="normal" style:text-position="0% 100%" style:font-weight-asian="normal" style:font-weight-complex="normal"/>
    </style:style>
    <style:style style:name="T102" style:family="text">
      <style:text-properties style:font-style-asian="normal" fo:font-size="10pt" style:text-line-through-type="none" style:font-size-asian="10pt" style:font-style-complex="normal" fo:text-shadow="none" style:font-size-complex="10pt" style:text-underline-style="none" style:text-underline-color="font-color" style:font-name="Arial" fo:color="#000000" style:font-name-complex="Arial" fo:font-style="normal" style:text-outline="false" style:text-position="0% 100%" fo:font-weight="bold" style:font-weight-asian="bold" style:font-weight-complex="bold"/>
    </style:style>
    <style:style style:name="T103" style:family="text">
      <style:text-properties style:font-style-asian="normal" fo:font-size="10pt" style:text-line-through-type="none" style:font-size-asian="10pt" style:font-style-complex="normal" fo:text-shadow="none" style:font-size-complex="10pt" style:text-underline-style="none" style:text-underline-color="font-color" style:font-name="Arial" fo:color="#000000" style:font-name-complex="Arial" fo:font-style="normal" style:text-outline="false" style:text-position="0% 100%" fo:font-weight="normal" style:font-weight-asian="normal" style:font-weight-complex="normal"/>
    </style:style>
    <style:style style:name="T104" style:family="text">
      <style:text-properties style:font-size-asian="10pt" fo:color="#000000" style:text-underline-style="none" style:text-underline-color="font-color" fo:font-size="10pt" style:font-name="Arial" fo:font-weight="normal" style:font-weight-asian="normal" style:font-size-complex="10pt" fo:text-shadow="none" style:text-line-through-type="none" style:font-weight-complex="normal" style:font-style-complex="normal" style:text-position="0% 100%" style:text-outline="false" style:font-name-complex="Arial" style:font-style-asian="normal" fo:font-style="normal"/>
    </style:style>
    <style:style style:name="T105" style:family="text">
      <style:text-properties style:font-size-asian="10pt" fo:color="#000000" style:text-underline-style="none" style:text-underline-color="font-color" fo:font-size="10pt" style:font-name="Arial" style:font-size-complex="10pt" fo:text-shadow="none" style:text-line-through-type="none" style:font-style-complex="normal" style:text-position="0% 100%" style:text-outline="false" style:font-name-complex="Arial" style:font-style-asian="normal" fo:font-style="normal" style:font-weight-asian="bold" fo:font-weight="bold" style:font-weight-complex="bold"/>
    </style:style>
    <style:style style:name="T106" style:family="text">
      <style:text-properties style:font-size-asian="10pt" fo:color="#000000" style:text-underline-style="none" style:text-underline-color="font-color" fo:font-size="10pt" style:font-name="Arial" style:font-size-complex="10pt" fo:text-shadow="none" style:text-line-through-type="none" style:font-style-complex="normal" style:text-position="0% 100%" style:text-outline="false" style:font-name-complex="Arial" style:font-style-asian="normal" fo:font-style="normal" fo:font-weight="normal" style:font-weight-asian="normal" style:font-weight-complex="normal"/>
    </style:style>
    <style:style style:name="T107" style:family="text">
      <style:text-properties style:font-size-asian="10pt" fo:color="#000000" style:text-underline-style="none" style:text-underline-color="font-color" fo:font-size="10pt" style:font-name="Arial" style:font-size-complex="10pt" fo:text-shadow="none" style:text-line-through-type="none" style:font-style-complex="normal" style:text-position="0% 100%" style:text-outline="false" style:font-name-complex="Arial" style:font-style-asian="normal" fo:font-style="normal" style:font-weight-complex="bold" style:font-weight-asian="bold" fo:font-weight="bold"/>
    </style:style>
    <style:style style:name="T108" style:family="text">
      <style:text-properties style:font-size-asian="10pt" fo:color="#000000" style:text-underline-style="none" style:text-underline-color="font-color" fo:font-size="10pt" style:font-name="Arial" style:font-size-complex="10pt" fo:text-shadow="none" style:text-line-through-type="none" style:font-style-complex="normal" style:text-position="0% 100%" style:text-outline="false" style:font-name-complex="Arial" style:font-style-asian="normal" fo:font-style="normal" style:font-weight-complex="normal" style:font-weight-asian="normal" fo:font-weight="normal"/>
    </style:style>
    <style:style style:name="T109" style:family="text">
      <style:text-properties style:font-size-asian="10pt" fo:color="#000000" style:text-underline-style="none" style:text-underline-color="font-color" fo:font-size="10pt" style:font-name="Arial" style:font-size-complex="10pt" fo:text-shadow="none" style:text-line-through-type="none" style:font-style-complex="normal" style:text-position="0% 100%" style:text-outline="false" style:font-name-complex="Arial" style:font-style-asian="normal" fo:font-style="normal" fo:font-weight="bold" style:font-weight-asian="bold" style:font-weight-complex="bold"/>
    </style:style>
    <style:style style:name="T110"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111"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12" style:family="text">
      <style:text-properties style:text-line-through-type="none" style:font-weight-asian="normal" style:font-size-asian="10pt" fo:color="#000000" fo:font-weight="normal" style:font-size-complex="10pt" fo:font-style="normal" style:font-name-complex="Arial" style:font-style-asian="normal" style:text-underline-style="none" style:text-underline-color="font-color" style:text-outline="false" fo:font-size="10pt" style:font-style-complex="normal" style:text-position="0% 100%" style:font-weight-complex="normal" style:font-name="Arial" fo:text-shadow="none"/>
    </style:style>
    <style:style style:name="T113"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fo:font-weight="bold" style:font-weight-asian="bold" style:font-weight-complex="bold"/>
    </style:style>
    <style:style style:name="T114"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asian="normal" fo:font-weight="normal" style:font-weight-complex="normal"/>
    </style:style>
    <style:style style:name="T115"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fo:font-weight="bold" style:font-weight-complex="bold" style:font-weight-asian="bold"/>
    </style:style>
    <style:style style:name="T116"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asian="normal" style:font-weight-complex="normal" fo:font-weight="normal"/>
    </style:style>
    <style:style style:name="T117"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fo:font-weight="normal" style:font-weight-complex="normal" style:font-weight-asian="normal"/>
    </style:style>
    <style:style style:name="T118"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complex="normal" style:font-weight-asian="normal" fo:font-weight="normal"/>
    </style:style>
    <style:style style:name="T119"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complex="bold" fo:font-weight="bold" style:font-weight-asian="bold"/>
    </style:style>
    <style:style style:name="T120"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complex="normal" fo:font-weight="normal" style:font-weight-asian="normal"/>
    </style:style>
    <style:style style:name="T121"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complex="bold" style:font-weight-asian="bold" fo:font-weight="bold"/>
    </style:style>
    <style:style style:name="T122"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asian="bold" style:font-weight-complex="bold" fo:font-weight="bold"/>
    </style:style>
    <style:style style:name="T123"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fo:font-weight="normal" style:font-weight-asian="normal" style:font-weight-complex="normal"/>
    </style:style>
    <style:style style:name="T124" style:family="text">
      <style:text-properties style:font-name="Arial" fo:color="#000000"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fo:text-shadow="none" style:text-position="0% 100%"/>
    </style:style>
    <style:style style:name="T125" style:family="text">
      <style:text-properties style:font-name="Arial" fo:color="#000000"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fo:text-shadow="none" style:text-position="-33% 58%"/>
    </style:style>
    <style:style style:name="T126" style:family="text">
      <style:text-properties style:font-name="Arial" fo:color="#000000" style:font-style-complex="normal" style:font-style-asian="normal" style:font-size-complex="10pt" style:font-size-asian="10pt" style:font-name-complex="Arial" style:text-outline="false" fo:font-style="normal" style:text-line-through-type="none" style:text-underline-style="none" style:text-underline-color="font-color" fo:font-size="10pt" fo:text-shadow="none" style:text-position="0% 100%" fo:font-weight="bold" style:font-weight-asian="bold" style:font-weight-complex="bold"/>
    </style:style>
    <style:style style:name="T127" style:family="text">
      <style:text-properties fo:font-weight="normal" style:font-weight-complex="normal" style:text-underline-style="none" style:text-underline-color="font-color" style:text-line-through-type="none" fo:font-style="normal" style:text-outline="false" style:text-position="0% 100%" style:font-style-complex="normal" style:font-style-asian="normal" style:font-name="Arial" fo:text-shadow="none" fo:color="#000000" style:font-name-complex="Arial" style:font-size-asian="10pt" style:font-size-complex="10pt" style:font-weight-asian="normal" fo:font-size="10pt"/>
    </style:style>
    <style:style style:name="T128" style:family="text">
      <style:text-properties style:text-line-through-type="none" fo:font-style="normal" style:text-outline="false" style:text-position="0% 100%" style:font-style-complex="normal" style:font-style-asian="normal" style:font-name="Arial" fo:text-shadow="none" fo:color="#000000" style:font-name-complex="Arial" style:font-size-asian="10pt" style:font-size-complex="10pt" fo:font-size="10pt" style:text-underline-style="solid" style:text-underline-width="auto" style:text-underline-color="font-color" style:font-weight-complex="bold" fo:font-weight="bold" style:font-weight-asian="bold"/>
    </style:style>
    <style:style style:name="T129" style:family="text">
      <style:text-properties style:text-line-through-type="none" fo:font-style="normal" style:text-outline="false" style:text-position="0% 100%" style:font-style-complex="normal" style:font-style-asian="normal" style:font-name="Arial" fo:text-shadow="none" fo:color="#000000" style:font-name-complex="Arial" style:font-size-asian="10pt" style:font-size-complex="10pt" fo:font-size="10pt" fo:font-weight="normal" style:text-underline-style="none" style:text-underline-color="font-color" style:font-weight-asian="normal" style:font-weight-complex="normal"/>
    </style:style>
    <style:style style:name="T130" style:family="text">
      <style:text-properties style:text-line-through-type="none" fo:font-style="normal" style:text-outline="false" style:text-position="0% 100%" style:font-style-complex="normal" style:font-style-asian="normal" style:font-name="Arial" fo:text-shadow="none" fo:color="#000000" style:font-name-complex="Arial" style:font-size-asian="10pt" style:font-size-complex="10pt" fo:font-size="10pt" fo:font-weight="bold" style:text-underline-style="solid" style:text-underline-width="auto" style:text-underline-color="font-color" style:font-weight-asian="bold" style:font-weight-complex="bold"/>
    </style:style>
    <style:style style:name="T131"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asian="bold" fo:font-weight="bold" style:font-weight-complex="bold"/>
    </style:style>
    <style:style style:name="T132"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complex="normal" style:font-weight-asian="normal"/>
    </style:style>
    <style:style style:name="T133"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fo:font-weight="normal" style:font-weight-asian="normal" style:font-weight-complex="normal" style:text-position="-33% 58%"/>
    </style:style>
    <style:style style:name="T134"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fo:font-weight="normal" style:font-weight-asian="normal" style:font-weight-complex="normal" style:text-position="0% 100%"/>
    </style:style>
    <style:style style:name="T135" style:family="text">
      <style:text-properties style:font-name-complex="Arial" style:font-name="Arial" fo:font-weight="normal" style:font-weight-asian="normal" style:font-size-complex="10pt" style:font-size-asian="10pt" style:font-weight-complex="normal" style:text-line-through-type="none" style:text-underline-style="none" style:text-underline-color="font-color" style:font-style-asian="normal" fo:font-style="normal" fo:text-shadow="none" fo:font-size="10pt" fo:color="#000000" style:font-style-complex="normal" style:text-position="0% 100%" style:text-outline="false"/>
    </style:style>
    <style:style style:name="T136"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asian="bold" fo:font-weight="bold" style:font-weight-complex="bold"/>
    </style:style>
    <style:style style:name="T137"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normal" style:font-weight-asian="normal" style:font-weight-complex="normal"/>
    </style:style>
    <style:style style:name="T138"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bold" style:font-weight-complex="bold" style:font-weight-asian="bold"/>
    </style:style>
    <style:style style:name="T139"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normal" style:font-weight-complex="normal" style:font-weight-asian="normal"/>
    </style:style>
    <style:style style:name="T140"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complex="bold" style:font-weight-asian="bold" fo:font-weight="bold"/>
    </style:style>
    <style:style style:name="T141"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complex="normal" style:font-weight-asian="normal" fo:font-weight="normal"/>
    </style:style>
    <style:style style:name="T142"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bold" style:font-weight-asian="bold" style:font-weight-complex="bold"/>
    </style:style>
    <style:style style:name="T143" style:family="text">
      <style:text-properties style:font-size-complex="10pt" style:font-weight-asian="normal" fo:text-shadow="none" style:text-line-through-type="none" style:font-size-asian="10pt" style:font-style-asian="normal" style:font-style-complex="normal" style:text-position="0% 100%" fo:font-size="10pt" style:text-outline="false" fo:font-style="normal" fo:font-weight="normal" style:text-underline-style="none" style:text-underline-color="font-color" fo:color="#000000" style:font-name-complex="Arial" style:font-name="Arial" style:font-weight-complex="normal"/>
    </style:style>
    <style:style style:name="T144"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fo:font-weight="bold" style:font-weight-complex="bold" style:font-weight-asian="bold"/>
    </style:style>
    <style:style style:name="T145"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fo:font-weight="normal" style:font-weight-complex="normal" style:font-weight-asian="normal"/>
    </style:style>
    <style:style style:name="T146"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style:font-weight-complex="bold" style:font-weight-asian="bold" fo:font-weight="bold"/>
    </style:style>
    <style:style style:name="T147"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style:font-weight-asian="normal" style:font-weight-complex="normal" fo:font-weight="normal"/>
    </style:style>
    <style:style style:name="T148"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style:font-weight-complex="bold" fo:font-weight="bold" style:font-weight-asian="bold"/>
    </style:style>
    <style:style style:name="T149"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style:font-weight-complex="normal" style:font-weight-asian="normal" fo:font-weight="normal"/>
    </style:style>
    <style:style style:name="T150"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fo:font-weight="bold" style:font-weight-asian="bold" style:font-weight-complex="bold"/>
    </style:style>
    <style:style style:name="T151"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style:font-weight-asian="normal" fo:font-weight="normal" style:font-weight-complex="normal"/>
    </style:style>
    <style:style style:name="T152" style:family="text">
      <style:text-properties style:font-size-complex="10pt" fo:text-shadow="none" style:text-line-through-type="none" style:font-size-asian="10pt" style:font-style-asian="normal" style:font-style-complex="normal" style:text-position="0% 100%" fo:font-size="10pt" style:text-outline="false" fo:font-style="normal" style:text-underline-style="none" style:text-underline-color="font-color" fo:color="#000000" style:font-name-complex="Arial" style:font-name="Arial" fo:font-weight="normal" style:font-weight-asian="normal" style:font-weight-complex="normal"/>
    </style:style>
    <style:style style:name="T153" style:family="text">
      <style:text-properties style:text-underline-style="none" style:text-underline-color="font-color" style:font-name-complex="Arial" fo:font-style="normal" style:font-size-complex="10pt" style:font-size-asian="10pt" fo:font-weight="normal" style:text-line-through-type="none" style:font-style-asian="normal" fo:text-shadow="none" style:text-position="0% 100%" style:text-outline="false" fo:color="#000000" style:font-style-complex="normal" style:font-weight-complex="normal" style:font-weight-asian="normal" style:font-name="Arial" fo:font-size="10pt"/>
    </style:style>
    <style:style style:name="T154"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asian="bold" style:font-weight-complex="bold" fo:font-weight="bold"/>
    </style:style>
    <style:style style:name="T155"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asian="normal" style:font-weight-complex="normal" fo:font-weight="normal"/>
    </style:style>
    <style:style style:name="T156"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fo:font-weight="normal" style:font-weight-complex="normal" style:font-weight-asian="normal"/>
    </style:style>
    <style:style style:name="T157"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complex="bold" style:font-weight-asian="bold" fo:font-weight="bold"/>
    </style:style>
    <style:style style:name="T158"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complex="normal" style:font-weight-asian="normal" fo:font-weight="normal"/>
    </style:style>
    <style:style style:name="T159"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fo:font-weight="bold" style:font-weight-complex="bold" style:font-weight-asian="bold"/>
    </style:style>
    <style:style style:name="T160"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asian="normal" fo:font-weight="normal" style:font-weight-complex="normal"/>
    </style:style>
    <style:style style:name="T161"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fo:font-weight="normal" style:font-weight-asian="normal" style:font-weight-complex="normal"/>
    </style:style>
    <style:style style:name="T162"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style:font-weight-complex="normal" fo:font-weight="normal" style:font-weight-asian="normal"/>
    </style:style>
    <style:style style:name="T163" style:family="text">
      <style:text-properties style:text-underline-style="none" style:text-underline-color="font-color" style:font-name-complex="Arial" fo:font-style="normal" style:font-size-complex="10pt" style:font-size-asian="10pt" style:text-line-through-type="none" style:font-style-asian="normal" fo:text-shadow="none" style:text-position="0% 100%" style:text-outline="false" fo:color="#000000" style:font-style-complex="normal" style:font-name="Arial" fo:font-size="10pt" fo:font-weight="bold" style:font-weight-asian="bold" style:font-weight-complex="bold"/>
    </style:style>
    <style:style style:name="T164" style:family="text">
      <style:text-properties style:font-style-asian="normal" fo:font-weight="bold" style:font-weight-asian="bold" style:font-size-complex="10pt" style:font-size-asian="10pt" style:font-name-complex="Arial" fo:text-shadow="none" fo:font-style="normal" style:text-line-through-type="none" style:text-underline-style="none" style:text-underline-color="font-color" style:font-weight-complex="bold" style:font-name="Arial" fo:font-size="10pt" fo:color="#000000" style:font-style-complex="normal" style:text-position="0% 100%" style:text-outline="false"/>
    </style:style>
    <style:style style:name="T165"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asian="normal" fo:font-weight="normal" style:font-weight-complex="normal"/>
    </style:style>
    <style:style style:name="T166"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complex="bold" fo:font-weight="bold" style:font-weight-asian="bold"/>
    </style:style>
    <style:style style:name="T167"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fo:font-weight="normal" style:font-weight-asian="normal" style:font-weight-complex="normal"/>
    </style:style>
    <style:style style:name="T168"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fo:font-weight="bold" style:font-weight-complex="bold" style:font-weight-asian="bold"/>
    </style:style>
    <style:style style:name="T169"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complex="normal" style:font-weight-asian="normal" fo:font-weight="normal"/>
    </style:style>
    <style:style style:name="T170"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fo:font-weight="bold" style:font-weight-asian="bold" style:font-weight-complex="bold"/>
    </style:style>
    <style:style style:name="T171" style:family="text">
      <style:text-properties fo:font-size="10pt" style:text-underline-style="none" style:text-underline-color="font-color" fo:font-weight="bold" style:font-size-complex="10pt" style:font-size-asian="10pt" style:font-name-complex="Arial" fo:color="#000000" fo:text-shadow="none" style:font-name="Arial" style:font-weight-complex="bold" style:font-style-asian="normal" style:font-style-complex="normal" style:text-position="0% 100%" style:text-outline="false" fo:font-style="normal" style:text-line-through-type="none" style:font-weight-asian="bold"/>
    </style:style>
    <style:style style:name="T172" style:family="text">
      <style:text-properties fo:font-size="10pt" style:text-underline-style="none" style:text-underline-color="font-color" style:font-size-complex="10pt" style:font-size-asian="10pt" style:font-name-complex="Arial" fo:color="#000000" fo:text-shadow="none" style:font-name="Arial" style:font-style-asian="normal" style:font-style-complex="normal" style:text-position="0% 100%" style:text-outline="false" fo:font-style="normal" style:text-line-through-type="none" style:font-weight-asian="normal" fo:font-weight="normal" style:font-weight-complex="normal"/>
    </style:style>
    <style:style style:name="T173" style:family="text">
      <style:text-properties fo:font-size="10pt" style:text-underline-style="none" style:text-underline-color="font-color" style:font-size-complex="10pt" style:font-size-asian="10pt" style:font-name-complex="Arial" fo:text-shadow="none" style:font-name="Arial" style:font-style-asian="normal" style:font-style-complex="normal" style:text-position="0% 100%" style:text-outline="false" fo:font-style="normal" style:text-line-through-type="none" fo:font-weight="bold" style:font-weight-asian="bold" fo:color="#ff99cc" style:font-weight-complex="bold"/>
    </style:style>
    <style:style style:name="T174" style:family="text">
      <style:text-properties fo:font-size="10pt" style:text-underline-style="none" style:text-underline-color="font-color" style:font-size-complex="10pt" style:font-size-asian="10pt" style:font-name-complex="Arial" fo:text-shadow="none" style:font-name="Arial" style:font-style-asian="normal" style:font-style-complex="normal" style:text-position="0% 100%" style:text-outline="false" fo:font-style="normal" style:text-line-through-type="none" style:font-weight-complex="normal" style:font-weight-asian="normal" fo:font-weight="normal" fo:color="#000000"/>
    </style:style>
    <style:style style:name="T175" style:family="text">
      <style:text-properties fo:font-size="10pt" style:text-underline-style="none" style:text-underline-color="font-color" style:font-size-complex="10pt" style:font-size-asian="10pt" style:font-name-complex="Arial" fo:text-shadow="none" style:font-name="Arial" style:font-style-asian="normal" style:font-style-complex="normal" style:text-position="0% 100%" style:text-outline="false" fo:font-style="normal" style:text-line-through-type="none" fo:color="#000000" fo:font-weight="bold" style:font-weight-complex="bold" style:font-weight-asian="bold"/>
    </style:style>
    <style:style style:name="T176" style:family="text">
      <style:text-properties fo:font-size="10pt" style:text-underline-style="none" style:text-underline-color="font-color" style:font-size-complex="10pt" style:font-size-asian="10pt" style:font-name-complex="Arial" fo:text-shadow="none" style:font-name="Arial" style:font-style-asian="normal" style:font-style-complex="normal" style:text-position="0% 100%" style:text-outline="false" fo:font-style="normal" style:text-line-through-type="none" fo:color="#000000" fo:font-weight="normal" style:font-weight-asian="normal" style:font-weight-complex="normal"/>
    </style:style>
    <style:style style:name="T177" style:family="text">
      <style:text-properties fo:font-size="10pt" style:text-underline-style="none" style:text-underline-color="font-color" style:font-size-complex="10pt" style:font-size-asian="10pt" style:font-name-complex="Arial" fo:text-shadow="none" style:font-name="Arial" style:font-style-asian="normal" style:font-style-complex="normal" style:text-position="0% 100%" style:text-outline="false" fo:font-style="normal" style:text-line-through-type="none" fo:color="#000000" fo:font-weight="bold" style:font-weight-asian="bold" style:font-weight-complex="bold"/>
    </style:style>
    <style:style style:name="T178" style:family="text">
      <style:text-properties style:text-underline-style="none" style:text-underline-color="font-color" style:font-size-asian="10pt" fo:font-style="normal" style:font-name-complex="Arial" style:font-style-complex="normal" fo:text-shadow="none" fo:font-size="10pt" fo:font-weight="normal" style:text-position="0% 100%" style:font-size-complex="10pt" style:font-weight-asian="normal" style:font-weight-complex="normal" style:font-style-asian="normal" style:font-name="Arial" style:text-line-through-type="none" style:text-outline="false" fo:color="#000000"/>
    </style:style>
    <style:style style:name="T179"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asian="bold" fo:color="#00ccff" fo:font-weight="bold" style:font-weight-complex="bold"/>
    </style:style>
    <style:style style:name="T180"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complex="normal" fo:color="#000000" fo:font-weight="normal" style:font-weight-asian="normal"/>
    </style:style>
    <style:style style:name="T181"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asian="bold" style:font-weight-complex="bold" fo:font-weight="bold" fo:color="#ffcc99"/>
    </style:style>
    <style:style style:name="T182"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fo:color="#ffcc99" fo:font-weight="normal" style:font-weight-complex="normal" style:font-weight-asian="normal"/>
    </style:style>
    <style:style style:name="T183"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fo:font-weight="normal" style:font-weight-complex="normal" style:font-weight-asian="normal" fo:color="#000000"/>
    </style:style>
    <style:style style:name="T184"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fo:color="#ff9900" style:font-weight-complex="bold" fo:font-weight="bold" style:font-weight-asian="bold"/>
    </style:style>
    <style:style style:name="T185"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complex="normal" fo:font-weight="normal" fo:color="#000000" style:font-weight-asian="normal"/>
    </style:style>
    <style:style style:name="T186"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complex="normal" fo:font-weight="normal" style:font-weight-asian="normal" fo:color="#008000"/>
    </style:style>
    <style:style style:name="T187"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style:font-weight-complex="normal" fo:font-weight="normal" style:font-weight-asian="normal" fo:color="#000000"/>
    </style:style>
    <style:style style:name="T188"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fo:color="#ff0000" fo:font-weight="bold" style:font-weight-asian="bold" style:font-weight-complex="bold"/>
    </style:style>
    <style:style style:name="T189" style:family="text">
      <style:text-properties style:text-underline-style="none" style:text-underline-color="font-color" style:font-size-asian="10pt" fo:font-style="normal" style:font-name-complex="Arial" style:font-style-complex="normal" fo:text-shadow="none" fo:font-size="10pt" style:text-position="0% 100%" style:font-size-complex="10pt" style:font-style-asian="normal" style:font-name="Arial" style:text-line-through-type="none" style:text-outline="false" fo:color="#000000" fo:font-weight="normal" style:font-weight-asian="normal" style:font-weight-complex="normal"/>
    </style:style>
    <style:style style:name="T190"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normal" fo:font-weight="normal" style:font-weight-asian="normal"/>
    </style:style>
    <style:style style:name="T191"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complex="bold" style:font-weight-asian="bold"/>
    </style:style>
    <style:style style:name="T192" style:family="text">
      <style:text-properties fo:text-shadow="none" style:font-name="Arial" fo:font-size="10pt" fo:font-weight="bold" style:text-underline-style="none" style:text-underline-color="font-color" style:text-line-through-type="none" fo:font-style="normal" style:text-outline="false" style:text-position="0% 100%" fo:color="#000000" style:font-name-complex="Arial" style:font-size-asian="10pt" style:font-size-complex="10pt" style:font-weight-asian="bold" style:font-weight-complex="bold" style:font-style-asian="normal" style:font-style-complex="normal"/>
    </style:style>
    <style:style style:name="T193" style:family="text">
      <style:text-properties style:text-line-through-type="none" style:font-weight-asian="bold" style:font-size-asian="10pt" fo:color="#000000" fo:font-weight="bold" style:font-size-complex="10pt" fo:font-style="normal" style:font-name-complex="Arial" style:font-style-asian="normal" style:text-underline-style="none" style:text-underline-color="font-color" style:text-outline="false" fo:font-size="10pt" style:font-style-complex="normal" style:text-position="0% 100%" style:font-weight-complex="bold" style:font-name="Arial" fo:text-shadow="none"/>
    </style:style>
    <style:style style:name="T194" style:family="text">
      <style:text-properties style:text-line-through-type="none" style:font-size-asian="10pt" fo:color="#000000" style:font-size-complex="10pt" fo:font-style="normal" style:font-name-complex="Arial" style:font-style-asian="normal" style:text-underline-style="none" style:text-underline-color="font-color" style:text-outline="false" fo:font-size="10pt" style:font-style-complex="normal" style:text-position="0% 100%" style:font-name="Arial" fo:text-shadow="none" style:font-weight-asian="bold" fo:font-weight="bold" style:font-weight-complex="bold"/>
    </style:style>
    <style:style style:name="T195" style:family="text">
      <style:text-properties style:font-name="Arial" style:text-underline-style="none" style:text-underline-color="font-color" style:font-style-asian="normal" style:font-weight-complex="normal" style:font-size-complex="10pt" style:font-size-asian="10pt" fo:text-shadow="none" fo:font-weight="normal" style:font-weight-asian="normal" style:font-name-complex="Arial" style:text-outline="false" style:text-position="0% 100%" style:font-style-complex="normal" fo:font-size="10pt" fo:font-style="normal" style:text-line-through-type="none" fo:color="#000000"/>
    </style:style>
    <style:style style:name="T196"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fo:font-weight="bold" style:font-weight-asian="bold" style:font-weight-complex="bold"/>
    </style:style>
    <style:style style:name="T197"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style:font-weight-complex="normal" style:font-weight-asian="normal" fo:font-weight="normal"/>
    </style:style>
    <style:style style:name="T198"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fo:font-weight="normal" style:font-weight-complex="normal" style:font-weight-asian="normal"/>
    </style:style>
    <style:style style:name="T199"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style:font-weight-complex="bold" fo:font-weight="bold" style:font-weight-asian="bold"/>
    </style:style>
    <style:style style:name="T200"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style:font-weight-complex="bold" fo:color="#ff0000" fo:font-weight="bold" style:font-weight-asian="bold"/>
    </style:style>
    <style:style style:name="T201"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style:font-weight-asian="normal" fo:font-weight="normal" style:font-weight-complex="normal"/>
    </style:style>
    <style:style style:name="T202"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style:font-weight-complex="bold" fo:font-weight="bold" fo:color="#ffcc00" style:font-weight-asian="bold"/>
    </style:style>
    <style:style style:name="T203"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0000" fo:font-weight="normal" style:font-weight-asian="normal" style:font-weight-complex="normal"/>
    </style:style>
    <style:style style:name="T204" style:family="text">
      <style:text-properties style:font-name="Arial" style:text-underline-style="none" style:text-underline-color="font-color" style:font-style-asian="normal" style:font-size-complex="10pt" style:font-size-asian="10pt" fo:text-shadow="none" style:font-name-complex="Arial" style:text-outline="false" style:text-position="0% 100%" style:font-style-complex="normal" fo:font-size="10pt" fo:font-style="normal" style:text-line-through-type="none" fo:color="#008000" fo:font-weight="bold" style:font-weight-asian="bold" style:font-weight-complex="bold"/>
    </style:style>
    <style:style style:name="T205"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06"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ff99cc" fo:font-weight="bold" style:font-weight-asian="bold" style:font-weight-complex="bold"/>
    </style:style>
    <style:style style:name="T207"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000000" fo:font-weight="normal" style:font-weight-asian="normal" style:font-weight-complex="normal"/>
    </style:style>
    <style:style style:name="T208"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bold" style:text-underline-style="solid" style:text-underline-width="auto" style:text-underline-color="font-color" style:font-weight-asian="bold" style:font-weight-complex="bold"/>
    </style:style>
    <style:style style:name="T209" style:family="text">
      <style:text-properties style:font-name="Arial" style:font-weight-asian="normal" style:text-underline-style="none" style:text-underline-color="font-color" style:font-size-complex="10pt" style:font-name-complex="Arial" style:font-style-asian="normal" style:font-weight-complex="normal" style:text-position="0% 100%" style:font-style-complex="normal" style:font-size-asian="10pt" fo:font-size="10pt" fo:text-shadow="none" style:text-outline="false" fo:color="#000000" fo:font-style="normal" style:text-line-through-type="none" fo:font-weight="normal"/>
    </style:style>
    <style:style style:name="T210"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color="#000000" fo:font-style="normal" style:text-line-through-type="none" style:font-weight-complex="bold" style:font-weight-asian="bold" fo:font-weight="bold"/>
    </style:style>
    <style:style style:name="T211"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color="#000000" fo:font-style="normal" style:text-line-through-type="none" style:font-weight-asian="normal" fo:font-weight="normal" style:font-weight-complex="normal"/>
    </style:style>
    <style:style style:name="T212"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color="#000000" fo:font-style="normal" style:text-line-through-type="none" fo:font-weight="bold" style:font-weight-asian="bold" style:font-weight-complex="bold"/>
    </style:style>
    <style:style style:name="T213"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color="#000000" fo:font-style="normal" style:text-line-through-type="none" style:font-weight-complex="normal" style:font-weight-asian="normal" fo:font-weight="normal"/>
    </style:style>
    <style:style style:name="T214"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style:font-weight-complex="bold" style:font-weight-asian="bold" fo:font-weight="bold" fo:color="#ffcc00"/>
    </style:style>
    <style:style style:name="T215"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style:font-weight-asian="normal" fo:font-weight="normal" fo:color="#000000" style:font-weight-complex="normal"/>
    </style:style>
    <style:style style:name="T216"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fo:color="#000000" fo:font-weight="bold" style:font-weight-asian="bold" style:font-weight-complex="bold"/>
    </style:style>
    <style:style style:name="T217"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fo:color="#000000" style:font-weight-complex="normal" fo:font-weight="normal" style:font-weight-asian="normal"/>
    </style:style>
    <style:style style:name="T218"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fo:color="#000000" fo:font-weight="normal" style:font-weight-asian="normal" style:font-weight-complex="normal"/>
    </style:style>
    <style:style style:name="T219" style:family="text">
      <style:text-properties style:font-name="Arial" style:text-underline-style="none" style:text-underline-color="font-color" style:font-size-complex="10pt" style:font-name-complex="Arial" style:font-style-asian="normal" style:text-position="0% 100%" style:font-style-complex="normal" style:font-size-asian="10pt" fo:font-size="10pt" fo:text-shadow="none" style:text-outline="false" fo:font-style="normal" style:text-line-through-type="none" fo:color="#ff0000" fo:font-weight="bold" style:font-weight-asian="bold" style:font-weight-complex="bold"/>
    </style:style>
    <style:style style:name="T220" style:family="text">
      <style:text-properties style:text-line-through-type="none" style:font-size-asian="10pt" style:font-name-complex="Arial" fo:font-style="normal" fo:font-size="10pt" fo:color="#000000" style:text-position="0% 100%" style:font-weight-complex="normal" style:font-style-complex="normal" style:text-outline="false" fo:font-weight="normal" style:font-style-asian="normal" style:font-weight-asian="normal" style:font-size-complex="10pt" style:font-name="Arial" fo:text-shadow="none" style:text-underline-style="none" style:text-underline-color="font-color"/>
    </style:style>
    <style:style style:name="T221"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style:font-weight-complex="bold" style:font-weight-asian="bold" fo:font-weight="bold"/>
    </style:style>
    <style:style style:name="T222"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style:font-weight-asian="normal" style:font-weight-complex="normal" fo:font-weight="normal"/>
    </style:style>
    <style:style style:name="T223"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style:font-weight-complex="normal" fo:font-weight="normal" style:font-weight-asian="normal"/>
    </style:style>
    <style:style style:name="T224"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fo:font-weight="bold" style:font-weight-complex="bold" style:font-weight-asian="bold"/>
    </style:style>
    <style:style style:name="T225"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style:font-weight-asian="bold" style:font-weight-complex="bold" fo:font-weight="bold"/>
    </style:style>
    <style:style style:name="T226"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style:font-weight-complex="normal" style:font-weight-asian="normal" fo:font-weight="normal"/>
    </style:style>
    <style:style style:name="T227"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fo:font-weight="bold" style:font-weight-asian="bold" style:font-weight-complex="bold"/>
    </style:style>
    <style:style style:name="T228" style:family="text">
      <style:text-properties style:text-line-through-type="none" style:font-size-asian="10pt" style:font-name-complex="Arial" fo:font-style="normal" fo:font-size="10pt" fo:color="#000000" style:text-position="0% 100%" style:font-style-complex="normal" style:text-outline="false" style:font-style-asian="normal" style:font-size-complex="10pt" style:font-name="Arial" fo:text-shadow="none" style:text-underline-style="none" style:text-underline-color="font-color" fo:font-weight="normal" style:font-weight-asian="normal" style:font-weight-complex="normal"/>
    </style:style>
    <style:style style:name="T229"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style:font-weight-complex="bold" style:font-weight-asian="bold" fo:color="#ff0000" fo:font-weight="bold"/>
    </style:style>
    <style:style style:name="T230"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fo:color="#000000" style:font-weight-complex="normal" fo:font-weight="normal" style:font-weight-asian="normal"/>
    </style:style>
    <style:style style:name="T231"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fo:color="#000000" style:font-weight-complex="bold" style:font-weight-asian="bold" fo:font-weight="bold"/>
    </style:style>
    <style:style style:name="T232"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fo:color="#000000" fo:font-weight="normal" style:font-weight-asian="normal" style:font-weight-complex="normal"/>
    </style:style>
    <style:style style:name="T233"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fo:color="#000000" style:font-weight-complex="bold" fo:font-weight="bold" style:font-weight-asian="bold"/>
    </style:style>
    <style:style style:name="T234" style:family="text">
      <style:text-properties style:text-line-through-type="none" style:font-size-asian="10pt" style:font-name-complex="Arial" fo:font-style="normal" fo:font-size="10pt" style:text-position="0% 100%" style:font-style-complex="normal" style:text-outline="false" style:font-style-asian="normal" style:font-size-complex="10pt" style:font-name="Arial" fo:text-shadow="none" style:text-underline-style="none" style:text-underline-color="font-color" fo:color="#000000" fo:font-weight="bold" style:font-weight-asian="bold" style:font-weight-complex="bold"/>
    </style:style>
    <style:style style:name="T235" style:family="text">
      <style:text-properties style:text-position="0% 100%" style:font-weight-asian="bold" style:font-weight-complex="bold" style:text-line-through-type="none" fo:font-style="normal" style:text-outline="false" style:text-underline-style="none" style:text-underline-color="font-color" style:font-size-complex="10pt" style:font-style-complex="normal" fo:text-shadow="none" style:font-style-asian="normal" fo:font-weight="bold" fo:font-size="10pt" style:font-name="Arial" fo:color="#000000" style:font-name-complex="Arial" style:font-size-asian="10pt"/>
    </style:style>
    <style:style style:name="T236"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fo:color="#000000" style:font-name-complex="Arial" style:font-size-asian="10pt" style:font-weight-asian="normal" fo:font-weight="normal" style:font-weight-complex="normal"/>
    </style:style>
    <style:style style:name="T237"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font-weight="bold" style:font-weight-asian="bold" style:font-weight-complex="bold" fo:color="#ff0000"/>
    </style:style>
    <style:style style:name="T238"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font-weight="bold" style:font-weight-asian="bold" style:font-weight-complex="bold" fo:color="#000000"/>
    </style:style>
    <style:style style:name="T239"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color="#000000" style:font-weight-complex="normal" fo:font-weight="normal" style:font-weight-asian="normal"/>
    </style:style>
    <style:style style:name="T240"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color="#000000" fo:font-weight="bold" style:font-weight-complex="bold" style:font-weight-asian="bold"/>
    </style:style>
    <style:style style:name="T241"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color="#000000" fo:font-weight="normal" style:font-weight-asian="normal" style:font-weight-complex="normal"/>
    </style:style>
    <style:style style:name="T242"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style:font-weight-complex="bold" fo:color="#ffcc00" fo:font-weight="bold" style:font-weight-asian="bold"/>
    </style:style>
    <style:style style:name="T243" style:family="text">
      <style:text-properties style:text-position="0% 100%" style:text-line-through-type="none" fo:font-style="normal" style:text-outline="false" style:text-underline-style="none" style:text-underline-color="font-color" style:font-size-complex="10pt" style:font-style-complex="normal" fo:text-shadow="none" style:font-style-asian="normal" fo:font-size="10pt" style:font-name="Arial" style:font-name-complex="Arial" style:font-size-asian="10pt" fo:color="#000000" fo:font-weight="bold" style:font-weight-asian="bold" style:font-weight-complex="bold"/>
    </style:style>
    <style:style style:name="T244" style:family="text">
      <style:text-properties fo:color="#000000" style:text-underline-style="none" style:text-underline-color="font-color" fo:font-weight="normal" style:font-weight-asian="normal" style:font-name-complex="Arial" style:text-outline="false" fo:font-style="normal" style:font-weight-complex="normal" style:font-size-asian="10pt" style:text-position="0% 100%" style:text-line-through-type="none" style:font-name="Arial" style:font-size-complex="10pt" style:font-style-complex="normal" style:font-style-asian="normal" fo:font-size="10pt" fo:text-shadow="none"/>
    </style:style>
    <style:style style:name="T245" style:family="text">
      <style:text-properties fo:color="#000000" style:text-underline-style="none" style:text-underline-color="font-color" fo:font-weight="normal" style:font-weight-asian="normal" style:font-name-complex="Arial" style:text-outline="false" fo:font-style="normal" style:font-weight-complex="normal" style:font-size-asian="10pt" style:text-line-through-type="none" style:font-name="Arial" style:font-size-complex="10pt" style:font-style-complex="normal" style:font-style-asian="normal" fo:font-size="10pt" fo:text-shadow="none" style:text-position="-33% 58%"/>
    </style:style>
    <style:style style:name="T246" style:family="text">
      <style:text-properties fo:color="#000000" style:text-underline-style="none" style:text-underline-color="font-color" fo:font-weight="normal" style:font-weight-asian="normal" style:font-name-complex="Arial" style:text-outline="false" fo:font-style="normal" style:font-weight-complex="normal" style:font-size-asian="10pt" style:text-line-through-type="none" style:font-name="Arial" style:font-size-complex="10pt" style:font-style-complex="normal" style:font-style-asian="normal" fo:font-size="10pt" fo:text-shadow="none" style:text-position="0% 100%"/>
    </style:style>
    <style:style style:name="T247"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asian="bold" style:font-weight-complex="bold" fo:font-weight="bold"/>
    </style:style>
    <style:style style:name="T248"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complex="normal" fo:font-weight="normal" style:font-weight-asian="normal"/>
    </style:style>
    <style:style style:name="T249"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complex="bold" style:font-weight-asian="bold" fo:font-weight="bold"/>
    </style:style>
    <style:style style:name="T250"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fo:font-weight="normal" style:font-weight-asian="normal" style:font-weight-complex="normal"/>
    </style:style>
    <style:style style:name="T251"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fo:font-weight="bold" style:font-weight-asian="bold" style:font-weight-complex="bold"/>
    </style:style>
    <style:style style:name="T252"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asian="normal" style:font-weight-complex="normal" fo:font-weight="normal"/>
    </style:style>
    <style:style style:name="T253"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fo:font-weight="bold" style:font-weight-complex="bold" style:font-weight-asian="bold"/>
    </style:style>
    <style:style style:name="T254"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complex="bold" fo:font-weight="bold" style:font-weight-asian="bold"/>
    </style:style>
    <style:style style:name="T255"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style:font-weight-complex="normal" style:font-weight-asian="normal" fo:font-weight="normal"/>
    </style:style>
    <style:style style:name="T256"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style:text-position="0% 100%" fo:font-weight="normal" style:font-weight-complex="normal" style:font-weight-asian="normal"/>
    </style:style>
    <style:style style:name="T257"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fo:font-weight="normal" style:font-weight-asian="normal" style:font-weight-complex="normal" style:text-position="-33% 58%"/>
    </style:style>
    <style:style style:name="T258" style:family="text">
      <style:text-properties fo:color="#000000" style:text-underline-style="none" style:text-underline-color="font-color" style:font-name-complex="Arial" style:text-outline="false" fo:font-style="normal" style:font-size-asian="10pt" style:text-line-through-type="none" style:font-name="Arial" style:font-size-complex="10pt" style:font-style-complex="normal" style:font-style-asian="normal" fo:font-size="10pt" fo:text-shadow="none" fo:font-weight="normal" style:font-weight-asian="normal" style:font-weight-complex="normal" style:text-position="0% 100%"/>
    </style:style>
    <style:style style:name="T259" style:family="text">
      <style:text-properties style:font-style-complex="normal" style:font-weight-asian="bold" style:text-outline="false" style:font-weight-complex="bold" style:font-style-asian="normal" fo:text-shadow="none" style:font-name="Arial" fo:font-size="10pt" fo:font-style="normal" style:text-underline-style="none" style:text-underline-color="font-color" style:text-line-through-type="none" fo:font-weight="bold" style:text-position="0% 100%" style:font-size-asian="10pt" style:font-size-complex="10pt" fo:color="#000000" style:font-name-complex="Arial"/>
    </style:style>
    <style:style style:name="T260"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fo:color="#000000" style:font-name-complex="Arial" style:font-weight-asian="normal" style:font-weight-complex="normal" fo:font-weight="normal"/>
    </style:style>
    <style:style style:name="T261"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style:font-weight-complex="bold" fo:color="#333399" fo:font-weight="bold" style:font-weight-asian="bold"/>
    </style:style>
    <style:style style:name="T262"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style:font-weight-asian="normal" style:font-weight-complex="normal" fo:color="#000000" fo:font-weight="normal"/>
    </style:style>
    <style:style style:name="T263"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fo:font-weight="bold" style:font-weight-asian="bold" style:font-weight-complex="bold"/>
    </style:style>
    <style:style style:name="T264"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style:font-weight-complex="normal" fo:font-weight="normal" style:font-weight-asian="normal"/>
    </style:style>
    <style:style style:name="T265"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fo:font-weight="bold" style:font-weight-complex="bold" style:font-weight-asian="bold"/>
    </style:style>
    <style:style style:name="T266"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style:font-weight-asian="normal" fo:font-weight="normal" style:font-weight-complex="normal"/>
    </style:style>
    <style:style style:name="T267"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style:font-weight-complex="bold" style:font-weight-asian="bold" fo:font-weight="bold"/>
    </style:style>
    <style:style style:name="T268"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fo:font-weight="normal" style:font-weight-complex="normal" style:font-weight-asian="normal"/>
    </style:style>
    <style:style style:name="T269" style:family="text">
      <style:text-properties style:font-style-complex="normal" style:text-outline="false" style:font-style-asian="normal" fo:text-shadow="none" style:font-name="Arial" fo:font-size="10pt" fo:font-style="normal" style:text-underline-style="none" style:text-underline-color="font-color" style:text-line-through-type="none" style:text-position="0% 100%" style:font-size-asian="10pt" style:font-size-complex="10pt" style:font-name-complex="Arial" fo:color="#000000" fo:font-weight="normal" style:font-weight-asian="normal" style:font-weight-complex="normal"/>
    </style:style>
    <style:style style:name="T270" style:family="text">
      <style:text-properties fo:font-size="10pt" fo:text-shadow="none" style:font-style-asian="normal" style:font-name-complex="Arial" style:font-style-complex="normal" fo:color="#000000" style:font-name="Arial" style:font-weight-complex="bold" style:font-size-asian="10pt" style:text-line-through-type="none" style:text-position="0% 100%" fo:font-weight="bold" style:font-weight-asian="bold" fo:font-style="normal" style:text-outline="false" style:font-size-complex="10pt" style:text-underline-style="none" style:text-underline-color="font-color"/>
    </style:style>
    <style:style style:name="T271"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style:font-weight-asian="normal" fo:font-weight="normal" style:font-weight-complex="normal"/>
    </style:style>
    <style:style style:name="T272"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fo:font-weight="bold" style:font-weight-asian="bold" style:font-weight-complex="bold"/>
    </style:style>
    <style:style style:name="T273"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style:font-weight-complex="normal" fo:font-weight="normal" style:font-weight-asian="normal"/>
    </style:style>
    <style:style style:name="T274"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style:font-weight-asian="bold" style:font-weight-complex="bold" fo:font-weight="bold"/>
    </style:style>
    <style:style style:name="T275"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style:font-weight-complex="normal" style:font-weight-asian="normal" fo:font-weight="normal"/>
    </style:style>
    <style:style style:name="T276" style:family="text">
      <style:text-properties fo:font-size="10pt" fo:text-shadow="none" style:font-style-asian="normal" style:font-name-complex="Arial" style:font-style-complex="normal" fo:color="#000000" style:font-name="Arial" style:font-size-asian="10pt" style:text-line-through-type="none" style:text-position="0% 100%" fo:font-style="normal" style:text-outline="false" style:font-size-complex="10pt" style:text-underline-style="none" style:text-underline-color="font-color" fo:font-weight="normal" style:font-weight-complex="normal" style:font-weight-asian="normal"/>
    </style:style>
    <style:style style:name="T277" style:family="text">
      <style:text-properties fo:font-size="10pt" fo:text-shadow="none" style:font-style-asian="normal" style:font-name-complex="Arial" style:font-style-complex="normal" style:font-name="Arial" style:font-size-asian="10pt" style:text-line-through-type="none" style:text-position="0% 100%" fo:font-style="normal" style:text-outline="false" style:font-size-complex="10pt" style:text-underline-style="none" style:text-underline-color="font-color" style:font-weight-complex="bold" style:font-weight-asian="bold" fo:color="#ff0000" fo:font-weight="bold"/>
    </style:style>
    <style:style style:name="T278" style:family="text">
      <style:text-properties fo:font-size="10pt" fo:text-shadow="none" style:font-style-asian="normal" style:font-name-complex="Arial" style:font-style-complex="normal" style:font-name="Arial" style:font-size-asian="10pt" style:text-line-through-type="none" style:text-position="0% 100%" fo:font-style="normal" style:text-outline="false" style:font-size-complex="10pt" style:text-underline-style="none" style:text-underline-color="font-color" style:font-weight-complex="normal" fo:color="#000000" style:font-weight-asian="normal" fo:font-weight="normal"/>
    </style:style>
    <style:style style:name="T279" style:family="text">
      <style:text-properties fo:font-size="10pt" fo:text-shadow="none" style:font-style-asian="normal" style:font-name-complex="Arial" style:font-style-complex="normal" style:font-name="Arial" style:font-size-asian="10pt" style:text-line-through-type="none" style:text-position="0% 100%" fo:font-style="normal" style:text-outline="false" style:font-size-complex="10pt" style:text-underline-style="none" style:text-underline-color="font-color" fo:color="#ffcc00" style:font-weight-complex="bold" style:font-weight-asian="bold" fo:font-weight="bold"/>
    </style:style>
    <style:style style:name="T280" style:family="text">
      <style:text-properties fo:font-size="10pt" fo:text-shadow="none" style:font-style-asian="normal" style:font-name-complex="Arial" style:font-style-complex="normal" style:font-name="Arial" style:font-size-asian="10pt" style:text-line-through-type="none" style:text-position="0% 100%" fo:font-style="normal" style:text-outline="false" style:font-size-complex="10pt" style:text-underline-style="none" style:text-underline-color="font-color" fo:color="#000000" fo:font-weight="normal" style:font-weight-asian="normal" style:font-weight-complex="normal"/>
    </style:style>
    <style:style style:name="T281" style:family="text">
      <style:text-properties fo:font-size="10pt" fo:text-shadow="none" style:font-style-asian="normal" style:font-name-complex="Arial" style:font-style-complex="normal" style:font-name="Arial" style:font-size-asian="10pt" style:text-line-through-type="none" style:text-position="0% 100%" fo:font-style="normal" style:text-outline="false" style:font-size-complex="10pt" style:text-underline-style="none" style:text-underline-color="font-color" fo:color="#008000" fo:font-weight="bold" style:font-weight-asian="bold" style:font-weight-complex="bold"/>
    </style:style>
    <style:style style:name="T282" style:family="text">
      <style:text-properties style:text-underline-style="none" style:text-underline-color="font-color" fo:font-size="10pt" style:font-weight-asian="normal" style:text-line-through-type="none" fo:font-style="normal" style:text-outline="false" fo:color="#000000" style:font-name="Arial" style:font-style-asian="normal" style:font-weight-complex="normal" style:font-style-complex="normal" fo:text-shadow="none" style:text-position="0% 100%" style:font-name-complex="Arial" style:font-size-asian="10pt" style:font-size-complex="10pt" fo:font-weight="normal"/>
    </style:style>
    <style:style style:name="T283"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style:font-weight-complex="bold" style:font-weight-asian="bold" fo:font-weight="bold" fo:color="#333399"/>
    </style:style>
    <style:style style:name="T284"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style:font-weight-complex="normal" style:font-weight-asian="normal" fo:font-weight="normal"/>
    </style:style>
    <style:style style:name="T285"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style:font-weight-complex="bold" style:font-weight-asian="bold" fo:font-weight="bold"/>
    </style:style>
    <style:style style:name="T286"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style:font-weight-asian="normal" style:font-weight-complex="normal" fo:font-weight="normal"/>
    </style:style>
    <style:style style:name="T287"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style:font-weight-asian="bold" style:font-weight-complex="bold" fo:font-weight="bold"/>
    </style:style>
    <style:style style:name="T288"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fo:font-weight="normal" style:font-weight-asian="normal" style:font-weight-complex="normal"/>
    </style:style>
    <style:style style:name="T289" style:family="text">
      <style:text-properties style:text-underline-style="none" style:text-underline-color="font-color" fo:font-size="10pt" style:text-line-through-type="none" fo:font-style="normal" style:text-outline="false" style:font-name="Arial" style:font-style-asian="normal" style:font-style-complex="normal" fo:text-shadow="none" style:text-position="0% 100%" style:font-name-complex="Arial" style:font-size-asian="10pt" style:font-size-complex="10pt" fo:color="#000000" fo:font-weight="bold" style:font-weight-asian="bold" style:font-weight-complex="bold"/>
    </style:style>
    <style:style style:name="T290" style:family="text">
      <style:text-properties fo:text-shadow="none" style:font-name="Ari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style:font-style-complex="normal"/>
    </style:style>
    <style:style style:name="T291" style:family="text">
      <style:text-properties fo:text-shadow="none" style:font-name="Arial"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style:font-style-complex="normal" style:text-position="-33% 58%"/>
    </style:style>
    <style:style style:name="T292" style:family="text">
      <style:text-properties fo:text-shadow="none" style:font-name="Arial"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style:font-style-complex="normal" style:text-position="33% 58%"/>
    </style:style>
    <style:style style:name="T293" style:family="text">
      <style:text-properties fo:text-shadow="none" style:font-name="Arial"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style:font-style-complex="normal" style:text-position="0% 100%"/>
    </style:style>
    <style:style style:name="T294" style:family="text">
      <style:text-properties style:text-outline="false" style:font-size-asian="10pt" fo:text-shadow="none" fo:font-weight="bold" style:text-underline-style="none" style:text-underline-color="font-color" style:text-position="0% 100%" style:text-line-through-type="none" fo:font-style="normal" fo:color="#000000" style:font-style-complex="normal" style:font-size-complex="10pt" style:font-weight-asian="bold" style:font-name-complex="Arial" style:font-weight-complex="bold" style:font-style-asian="normal" style:font-name="Arial" fo:font-size="10pt"/>
    </style:style>
    <style:style style:name="T295"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fo:font-weight="normal" style:font-weight-complex="normal" style:font-weight-asian="normal"/>
    </style:style>
    <style:style style:name="T296"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fo:font-weight="bold" style:font-weight-asian="bold" style:font-weight-complex="bold"/>
    </style:style>
    <style:style style:name="T297"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fo:font-weight="normal" style:font-weight-asian="normal" style:font-weight-complex="normal"/>
    </style:style>
    <style:style style:name="T298"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fo:font-weight="bold" style:font-weight-complex="bold" style:font-weight-asian="bold"/>
    </style:style>
    <style:style style:name="T299"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style:font-weight-complex="normal" style:font-weight-asian="normal" fo:font-weight="normal"/>
    </style:style>
    <style:style style:name="T300" style:family="text">
      <style:text-properties style:text-outline="false" style:font-size-asian="10pt" fo:text-shadow="none" style:text-underline-style="none" style:text-underline-color="font-color" style:text-position="0% 100%" style:text-line-through-type="none" fo:font-style="normal" fo:color="#000000" style:font-style-complex="normal" style:font-size-complex="10pt" style:font-name-complex="Arial" style:font-style-asian="normal" style:font-name="Arial" fo:font-size="10pt" style:font-weight-asian="bold" style:font-weight-complex="bold" fo:font-weight="bold"/>
    </style:style>
    <style:style style:name="T301" style:family="text">
      <style:text-properties style:text-outline="false" style:font-size-asian="10pt" fo:text-shadow="none" style:text-underline-style="none" style:text-underline-color="font-color" style:text-position="0% 100%" style:text-line-through-type="none" fo:font-style="normal" style:font-style-complex="normal" style:font-size-complex="10pt" style:font-name-complex="Arial" style:font-style-asian="normal" style:font-name="Arial" fo:font-size="10pt" fo:color="#008000" fo:font-weight="bold" style:font-weight-asian="bold" style:font-weight-complex="bold"/>
    </style:style>
    <style:style style:name="T302" style:family="text">
      <style:text-properties style:text-outline="false" style:font-size-asian="10pt" fo:text-shadow="none" style:text-underline-style="none" style:text-underline-color="font-color" style:text-position="0% 100%" style:text-line-through-type="none" fo:font-style="normal" style:font-style-complex="normal" style:font-size-complex="10pt" style:font-name-complex="Arial" style:font-style-asian="normal" style:font-name="Arial" fo:font-size="10pt" fo:color="#000000" fo:font-weight="normal" style:font-weight-asian="normal" style:font-weight-complex="normal"/>
    </style:style>
    <style:style style:name="T303" style:family="text">
      <style:text-properties style:text-outline="false" style:font-size-complex="10pt" style:text-position="0% 100%" style:font-name="Arial" fo:font-size="10pt" fo:font-weight="normal" style:text-underline-style="none" style:text-underline-color="font-color" style:text-line-through-type="none" fo:font-style="normal" style:font-weight-asian="normal" style:font-weight-complex="normal" style:font-style-asian="normal" fo:text-shadow="none" style:font-style-complex="normal" style:font-name-complex="Arial" fo:color="#000000" style:font-size-asian="10pt"/>
    </style:style>
    <style:style style:name="T304"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fo:color="#000000" style:font-size-asian="10pt" style:font-weight-complex="bold" style:font-weight-asian="bold" fo:font-weight="bold"/>
    </style:style>
    <style:style style:name="T305"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fo:color="#000000" style:font-size-asian="10pt" fo:font-weight="normal" style:font-weight-complex="normal" style:font-weight-asian="normal"/>
    </style:style>
    <style:style style:name="T306"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fo:color="#000000" style:font-size-asian="10pt" fo:font-weight="bold" style:font-weight-asian="bold" style:font-weight-complex="bold"/>
    </style:style>
    <style:style style:name="T307"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fo:color="#000000" style:font-size-asian="10pt" style:font-weight-asian="normal" style:font-weight-complex="normal" fo:font-weight="normal"/>
    </style:style>
    <style:style style:name="T308"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style:font-size-asian="10pt" fo:color="#ff0000" fo:font-weight="bold" style:font-weight-asian="bold" style:font-weight-complex="bold"/>
    </style:style>
    <style:style style:name="T309" style:family="text">
      <style:text-properties style:text-outline="false" style:font-size-complex="10pt" style:text-position="0% 100%" style:font-name="Arial" fo:font-size="10pt" style:text-underline-style="none" style:text-underline-color="font-color" style:text-line-through-type="none" fo:font-style="normal" style:font-style-asian="normal" fo:text-shadow="none" style:font-style-complex="normal" style:font-name-complex="Arial" style:font-size-asian="10pt" fo:color="#000000" fo:font-weight="normal" style:font-weight-asian="normal" style:font-weight-complex="normal"/>
    </style:style>
    <style:style style:name="T310" style:family="text">
      <style:text-properties fo:font-weight="normal" style:font-weight-complex="normal" style:text-underline-style="none" style:text-underline-color="font-color" style:text-line-through-type="none" fo:font-style="normal" style:text-outline="false" style:text-position="0% 100%" fo:text-shadow="none" style:font-style-asian="normal" style:font-style-complex="normal" style:font-name="Arial" fo:color="#000000" style:font-name-complex="Arial" style:font-size-asian="10pt" style:font-size-complex="10pt" style:font-weight-asian="normal" fo:font-size="10pt"/>
    </style:style>
    <style:style style:name="T311" style:family="text">
      <style:text-properties style:text-underline-style="none" style:text-underline-color="font-color" style:text-line-through-type="none" fo:font-style="normal" style:text-outline="false" style:text-position="0% 100%" fo:text-shadow="none" style:font-style-asian="normal" style:font-style-complex="normal" style:font-name="Arial" fo:color="#000000" style:font-name-complex="Arial" style:font-size-asian="10pt" style:font-size-complex="10pt" fo:font-size="10pt" fo:font-weight="bold" style:font-weight-complex="bold" style:font-weight-asian="bold"/>
    </style:style>
    <style:style style:name="T312" style:family="text">
      <style:text-properties style:text-underline-style="none" style:text-underline-color="font-color" style:text-line-through-type="none" fo:font-style="normal" style:text-outline="false" style:text-position="0% 100%" fo:text-shadow="none" style:font-style-asian="normal" style:font-style-complex="normal" style:font-name="Arial" fo:color="#000000" style:font-name-complex="Arial" style:font-size-asian="10pt" style:font-size-complex="10pt" fo:font-size="10pt" fo:font-weight="normal" style:font-weight-asian="normal" style:font-weight-complex="normal"/>
    </style:style>
    <style:style style:name="T313" style:family="text">
      <style:text-properties style:text-underline-style="none" style:text-underline-color="font-color" style:text-line-through-type="none" fo:font-style="normal" style:text-outline="false" fo:text-shadow="none" style:font-style-asian="normal" style:font-style-complex="normal" style:font-name="Arial" fo:color="#000000" style:font-name-complex="Arial" style:font-size-asian="10pt" style:font-size-complex="10pt" fo:font-size="10pt" fo:font-weight="normal" style:font-weight-asian="normal" style:font-weight-complex="normal" style:text-position="-33% 58%"/>
    </style:style>
    <style:style style:name="T314" style:family="text">
      <style:text-properties style:text-underline-style="none" style:text-underline-color="font-color" style:text-line-through-type="none" fo:font-style="normal" style:text-outline="false" fo:text-shadow="none" style:font-style-asian="normal" style:font-style-complex="normal" style:font-name="Arial" fo:color="#000000" style:font-name-complex="Arial" style:font-size-asian="10pt" style:font-size-complex="10pt" fo:font-size="10pt" fo:font-weight="normal" style:font-weight-asian="normal" style:font-weight-complex="normal" style:text-position="0% 100%"/>
    </style:style>
    <style:style style:name="T315" style:family="text">
      <style:text-properties style:text-underline-style="none" style:text-underline-color="font-color" style:text-line-through-type="none" fo:font-style="normal" style:text-outline="false" fo:text-shadow="none" style:font-style-asian="normal" style:font-style-complex="normal" style:font-name="Arial" fo:color="#000000" style:font-name-complex="Arial" style:font-size-asian="10pt" style:font-size-complex="10pt" fo:font-size="10pt" style:text-position="0% 100%" fo:font-weight="bold" style:font-weight-asian="bold" style:font-weight-complex="bold"/>
    </style:style>
    <style:style style:name="T316" style:family="text">
      <style:text-properties style:text-underline-style="none" style:text-underline-color="font-color" style:text-line-through-type="none" fo:font-style="normal" style:text-outline="false" fo:text-shadow="none" style:font-style-asian="normal" style:font-style-complex="normal" style:font-name="Arial" fo:color="#000000" style:font-name-complex="Arial" style:font-size-asian="10pt" style:font-size-complex="10pt" fo:font-size="10pt" style:text-position="0% 100%" fo:font-weight="normal" style:font-weight-asian="normal" style:font-weight-complex="normal"/>
    </style:style>
    <style:style style:name="T317" style:family="text">
      <style:text-properties style:font-style-complex="normal" fo:font-style="normal" style:text-position="0% 100%" fo:color="#000000" style:font-size-complex="10pt" fo:font-weight="normal" style:text-underline-style="none" style:text-underline-color="font-color" fo:text-shadow="none" style:font-name-complex="Arial" style:font-weight-complex="normal" style:font-size-asian="10pt" style:font-name="Arial" style:font-weight-asian="normal" style:font-style-asian="normal" style:text-line-through-type="none" fo:font-size="10pt" style:text-outline="false"/>
    </style:style>
    <style:style style:name="T318"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asian="bold" style:font-weight-complex="bold" fo:font-weight="bold"/>
    </style:style>
    <style:style style:name="T319"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asian="normal" style:font-weight-complex="normal" fo:font-weight="normal"/>
    </style:style>
    <style:style style:name="T320"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fo:font-weight="bold" style:font-weight-asian="bold" style:font-weight-complex="bold"/>
    </style:style>
    <style:style style:name="T321"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complex="bold" style:font-weight-asian="bold" fo:font-weight="bold"/>
    </style:style>
    <style:style style:name="T322"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fo:font-weight="normal" style:font-weight-complex="normal" style:font-weight-asian="normal"/>
    </style:style>
    <style:style style:name="T323"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fo:font-weight="bold" style:font-weight-complex="bold" style:font-weight-asian="bold"/>
    </style:style>
    <style:style style:name="T324"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complex="normal" fo:font-weight="normal" style:font-weight-asian="normal"/>
    </style:style>
    <style:style style:name="T325"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asian="normal" fo:font-weight="normal" style:font-weight-complex="normal"/>
    </style:style>
    <style:style style:name="T326"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style:font-weight-complex="bold" fo:font-weight="bold" style:font-weight-asian="bold"/>
    </style:style>
    <style:style style:name="T327" style:family="text">
      <style:text-properties style:font-style-complex="normal" fo:font-style="normal" style:text-position="0% 100%" fo:color="#000000" style:font-size-complex="10pt" style:text-underline-style="none" style:text-underline-color="font-color" fo:text-shadow="none" style:font-name-complex="Arial" style:font-size-asian="10pt" style:font-name="Arial" style:font-style-asian="normal" style:text-line-through-type="none" fo:font-size="10pt" style:text-outline="false" fo:font-weight="normal" style:font-weight-asian="normal" style:font-weight-complex="normal"/>
    </style:style>
    <style:style style:name="T328" style:family="text">
      <style:text-properties style:font-style-complex="normal" fo:font-style="normal" style:text-position="0% 100%" style:font-size-complex="10pt" style:text-underline-style="none" style:text-underline-color="font-color" fo:text-shadow="none" style:font-name-complex="Arial" style:font-size-asian="10pt" style:font-name="Arial" style:font-style-asian="normal" style:text-line-through-type="none" fo:font-size="10pt" style:text-outline="false" fo:font-weight="bold" style:font-weight-complex="bold" style:font-weight-asian="bold" fo:color="#008000"/>
    </style:style>
    <style:style style:name="T329" style:family="text">
      <style:text-properties style:font-style-complex="normal" fo:font-style="normal" style:text-position="0% 100%" style:font-size-complex="10pt" style:text-underline-style="none" style:text-underline-color="font-color" fo:text-shadow="none" style:font-name-complex="Arial" style:font-size-asian="10pt" style:font-name="Arial" style:font-style-asian="normal" style:text-line-through-type="none" fo:font-size="10pt" style:text-outline="false" fo:color="#000000" style:font-weight-complex="normal" style:font-weight-asian="normal" fo:font-weight="normal"/>
    </style:style>
    <style:style style:name="T330" style:family="text">
      <style:text-properties style:font-style-complex="normal" fo:font-style="normal" style:text-position="0% 100%" style:font-size-complex="10pt" style:text-underline-style="none" style:text-underline-color="font-color" fo:text-shadow="none" style:font-name-complex="Arial" style:font-size-asian="10pt" style:font-name="Arial" style:font-style-asian="normal" style:text-line-through-type="none" fo:font-size="10pt" style:text-outline="false" fo:color="#000000" fo:font-weight="bold" style:font-weight-asian="bold" style:font-weight-complex="bold"/>
    </style:style>
    <style:style style:name="T331" style:family="text">
      <style:text-properties style:font-style-complex="normal" fo:font-style="normal" style:text-position="0% 100%" style:font-size-complex="10pt" style:text-underline-style="none" style:text-underline-color="font-color" fo:text-shadow="none" style:font-name-complex="Arial" style:font-size-asian="10pt" style:font-name="Arial" style:font-style-asian="normal" style:text-line-through-type="none" fo:font-size="10pt" style:text-outline="false" fo:color="#000000" fo:font-weight="normal" style:font-weight-asian="normal" style:font-weight-complex="normal"/>
    </style:style>
    <style:style style:name="T332" style:family="text">
      <style:text-properties style:text-underline-style="none" style:text-underline-color="font-color" style:font-style-asian="normal" style:font-weight-complex="normal" style:font-size-complex="10pt" fo:text-shadow="none" fo:font-weight="normal" style:font-size-asian="10pt" style:font-weight-asian="normal" fo:color="#000000" style:font-name-complex="Arial" style:text-outline="false" style:font-style-complex="normal" style:font-name="Arial" fo:font-size="10pt" style:text-position="0% 100%" fo:font-style="normal" style:text-line-through-type="none"/>
    </style:style>
    <style:style style:name="T333"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style:font-weight-complex="bold" fo:font-weight="bold" style:font-weight-asian="bold"/>
    </style:style>
    <style:style style:name="T334"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style:font-weight-complex="normal" fo:font-weight="normal" style:font-weight-asian="normal"/>
    </style:style>
    <style:style style:name="T335"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style:font-weight-asian="bold" style:font-weight-complex="bold" fo:font-weight="bold"/>
    </style:style>
    <style:style style:name="T336"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fo:font-weight="normal" style:font-weight-asian="normal" style:font-weight-complex="normal"/>
    </style:style>
    <style:style style:name="T337"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style:font-weight-complex="bold" style:font-weight-asian="bold" fo:font-weight="bold"/>
    </style:style>
    <style:style style:name="T338" style:family="text">
      <style:text-properties style:text-underline-style="none" style:text-underline-color="font-color" style:font-style-asian="normal" style:font-size-complex="10pt" fo:text-shadow="none" style:font-size-asian="10pt" fo:color="#000000" style:font-name-complex="Arial" style:text-outline="false" style:font-style-complex="normal" style:font-name="Arial" fo:font-size="10pt" style:text-position="0% 100%" fo:font-style="normal" style:text-line-through-type="none" style:font-weight-complex="normal" style:font-weight-asian="normal" fo:font-weight="normal"/>
    </style:style>
    <style:style style:name="T339" style:family="text">
      <style:text-properties style:text-underline-style="none" style:text-underline-color="font-color" style:font-style-asian="normal" style:font-size-complex="10pt" fo:text-shadow="none" style:font-size-asian="10pt" style:font-name-complex="Arial" style:text-outline="false" style:font-style-complex="normal" style:font-name="Arial" fo:font-size="10pt" style:text-position="0% 100%" fo:font-style="normal" style:text-line-through-type="none" style:font-weight-asian="bold" fo:font-weight="bold" style:font-weight-complex="bold" fo:color="#ff0000"/>
    </style:style>
    <style:style style:name="T340" style:family="text">
      <style:text-properties style:text-underline-style="none" style:text-underline-color="font-color" style:font-style-asian="normal" style:font-size-complex="10pt" fo:text-shadow="none" style:font-size-asian="10pt" style:font-name-complex="Arial" style:text-outline="false" style:font-style-complex="normal" style:font-name="Arial" fo:font-size="10pt" style:text-position="0% 100%" fo:font-style="normal" style:text-line-through-type="none" fo:color="#000000" fo:font-weight="normal" style:font-weight-asian="normal" style:font-weight-complex="normal"/>
    </style:style>
    <style:style style:name="T341" style:family="text">
      <style:text-properties style:text-underline-style="none" style:text-underline-color="font-color" style:font-style-asian="normal" style:font-size-complex="10pt" fo:text-shadow="none" style:font-size-asian="10pt" style:font-name-complex="Arial" style:text-outline="false" style:font-style-complex="normal" style:font-name="Arial" fo:font-size="10pt" style:text-position="0% 100%" fo:font-style="normal" style:text-line-through-type="none" fo:color="#ff0000" fo:font-weight="bold" style:font-weight-asian="bold" style:font-weight-complex="bold"/>
    </style:style>
    <style:style style:name="T342"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343"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style:font-weight-asian="bold" fo:color="#008000" style:font-weight-complex="bold" fo:font-weight="bold"/>
    </style:style>
    <style:style style:name="T344"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000000" style:font-weight-complex="normal" style:font-weight-asian="normal" fo:font-weight="normal"/>
    </style:style>
    <style:style style:name="T345"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style:font-weight-asian="bold" style:font-weight-complex="bold" fo:font-weight="bold" fo:color="#ffcc00"/>
    </style:style>
    <style:style style:name="T346"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font-weight="normal" fo:color="#000000" style:font-weight-asian="normal" style:font-weight-complex="normal"/>
    </style:style>
    <style:style style:name="T347"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ff0000" fo:font-weight="bold" style:font-weight-asian="bold" style:font-weight-complex="bold"/>
    </style:style>
    <style:style style:name="T348"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000000" fo:font-weight="normal" style:font-weight-asian="normal" style:font-weight-complex="normal"/>
    </style:style>
    <style:style style:name="T349" style:family="text">
      <style:text-properties style:text-outline="false" fo:text-shadow="none" style:text-position="0% 100%" style:font-name-complex="Arial" style:text-underline-style="none" style:text-underline-color="font-color" style:text-line-through-type="none" style:font-weight-complex="normal" style:font-style-complex="normal" fo:font-style="normal" fo:font-size="10pt" fo:color="#000000" style:font-style-asian="normal" fo:font-weight="normal" style:font-size-asian="10pt" style:font-name="Arial" style:font-weight-asian="normal" style:font-size-complex="10pt"/>
    </style:style>
    <style:style style:name="T350"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fo:font-weight="bold" style:font-weight-asian="bold" style:font-weight-complex="bold"/>
    </style:style>
    <style:style style:name="T351"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style:font-weight-asian="normal" style:font-weight-complex="normal" fo:font-weight="normal"/>
    </style:style>
    <style:style style:name="T352"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style:font-weight-complex="bold" fo:font-weight="bold" style:font-weight-asian="bold"/>
    </style:style>
    <style:style style:name="T353"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style:font-weight-complex="normal" fo:font-weight="normal" style:font-weight-asian="normal"/>
    </style:style>
    <style:style style:name="T354"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style:font-weight-complex="bold" style:font-weight-asian="bold" fo:font-weight="bold"/>
    </style:style>
    <style:style style:name="T355" style:family="text">
      <style:text-properties style:text-outline="false" fo:text-shadow="none" style:text-position="0% 100%" style:font-name-complex="Arial" style:text-underline-style="none" style:text-underline-color="font-color" style:text-line-through-type="none" style:font-style-complex="normal" fo:font-style="normal" fo:font-size="10pt" fo:color="#000000" style:font-style-asian="normal" style:font-size-asian="10pt" style:font-name="Arial" style:font-size-complex="10pt" style:font-weight-complex="normal" style:font-weight-asian="normal" fo:font-weight="normal"/>
    </style:style>
    <style:style style:name="T356" style:family="text">
      <style:text-properties style:text-outline="false" fo:text-shadow="none" style:text-position="0% 100%" style:font-name-complex="Arial" style:text-underline-style="none" style:text-underline-color="font-color" style:text-line-through-type="none" style:font-style-complex="normal" fo:font-style="normal" fo:font-size="10pt" style:font-style-asian="normal" style:font-size-asian="10pt" style:font-name="Arial" style:font-size-complex="10pt" style:font-weight-asian="bold" fo:font-weight="bold" fo:color="#333333" style:font-weight-complex="bold"/>
    </style:style>
    <style:style style:name="T357" style:family="text">
      <style:text-properties style:text-outline="false" fo:text-shadow="none" style:text-position="0% 100%" style:font-name-complex="Arial" style:text-underline-style="none" style:text-underline-color="font-color" style:text-line-through-type="none" style:font-style-complex="normal" fo:font-style="normal" fo:font-size="10pt" style:font-style-asian="normal" style:font-size-asian="10pt" style:font-name="Arial" style:font-size-complex="10pt" fo:font-weight="normal" style:font-weight-complex="normal" fo:color="#000000" style:font-weight-asian="normal"/>
    </style:style>
    <style:style style:name="T358" style:family="text">
      <style:text-properties style:text-outline="false" fo:text-shadow="none" style:text-position="0% 100%" style:font-name-complex="Arial" style:text-underline-style="none" style:text-underline-color="font-color" style:text-line-through-type="none" style:font-style-complex="normal" fo:font-style="normal" fo:font-size="10pt" style:font-style-asian="normal" style:font-size-asian="10pt" style:font-name="Arial" style:font-size-complex="10pt" fo:color="#000000" style:font-weight-complex="bold" style:font-weight-asian="bold" fo:font-weight="bold"/>
    </style:style>
    <style:style style:name="T359" style:family="text">
      <style:text-properties style:text-outline="false" fo:text-shadow="none" style:text-position="0% 100%" style:font-name-complex="Arial" style:text-underline-style="none" style:text-underline-color="font-color" style:text-line-through-type="none" style:font-style-complex="normal" fo:font-style="normal" fo:font-size="10pt" style:font-style-asian="normal" style:font-size-asian="10pt" style:font-name="Arial" style:font-size-complex="10pt" fo:color="#000000" fo:font-weight="normal" style:font-weight-asian="normal" style:font-weight-complex="normal"/>
    </style:style>
    <style:style style:name="T360" style:family="text">
      <style:text-properties style:text-outline="false" fo:text-shadow="none" style:text-position="0% 100%" style:font-name-complex="Arial" style:text-underline-style="none" style:text-underline-color="font-color" style:text-line-through-type="none" style:font-style-complex="normal" fo:font-style="normal" fo:font-size="10pt" style:font-style-asian="normal" style:font-size-asian="10pt" style:font-name="Arial" style:font-size-complex="10pt" fo:color="#000000" fo:font-weight="bold" style:font-weight-asian="bold" style:font-weight-complex="bold"/>
    </style:style>
    <style:style style:name="T361" style:family="text">
      <style:text-properties style:font-style-asian="normal" fo:font-weight="normal" style:font-weight-asian="normal" style:font-size-complex="10pt" style:font-size-asian="10pt" style:font-name-complex="Arial" fo:text-shadow="none" fo:font-style="normal" style:text-line-through-type="none" style:text-underline-style="none" style:text-underline-color="font-color" style:font-weight-complex="normal" style:font-name="Arial" fo:font-size="10pt" fo:color="#000000" style:font-style-complex="normal" style:text-position="0% 100%" style:text-outline="false"/>
    </style:style>
    <style:style style:name="T362"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asian="bold" fo:font-weight="bold" style:font-weight-complex="bold"/>
    </style:style>
    <style:style style:name="T363"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complex="normal" fo:font-weight="normal" style:font-weight-asian="normal"/>
    </style:style>
    <style:style style:name="T364"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fo:font-weight="normal" style:font-weight-complex="normal" style:font-weight-asian="normal"/>
    </style:style>
    <style:style style:name="T365" style:family="text">
      <style:text-properties style:font-style-asian="normal" style:font-size-complex="10pt" style:font-size-asian="10pt" style:font-name-complex="Arial" fo:text-shadow="none" fo:font-style="normal" style:text-line-through-type="none" style:text-underline-style="none" style:text-underline-color="font-color" style:font-name="Arial" fo:font-size="10pt" fo:color="#000000" style:font-style-complex="normal" style:text-position="0% 100%" style:text-outline="false" style:font-weight-complex="bold" style:font-weight-asian="bold" fo:font-weight="bold"/>
    </style:style>
    <style:style style:name="T366" style:family="text">
      <style:text-properties style:text-underline-style="none" style:text-underline-color="font-color" style:text-line-through-type="none" style:text-outline="false" fo:font-style="normal" style:font-name-complex="Arial" fo:color="#000000" style:font-name="Arial" fo:font-size="10pt" fo:font-weight="normal" style:font-size-complex="10pt" style:font-weight-asian="normal" style:font-weight-complex="normal" style:font-style-asian="normal" fo:text-shadow="none" style:font-style-complex="normal" style:text-position="0% 100%" style:font-size-asian="10pt"/>
    </style:style>
    <style:style style:name="T367" style:family="text">
      <style:text-properties style:text-underline-style="none" style:text-underline-color="font-color" style:text-line-through-type="none" style:text-outline="false" fo:font-style="normal" style:font-name-complex="Arial" fo:color="#000000" style:font-name="Arial" fo:font-size="10pt" style:font-size-complex="10pt" style:font-style-asian="normal" fo:text-shadow="none" style:font-style-complex="normal" style:text-position="0% 100%" style:font-size-asian="10pt" style:font-weight-asian="bold" fo:font-weight="bold" style:font-weight-complex="bold"/>
    </style:style>
    <style:style style:name="T368" style:family="text">
      <style:text-properties style:text-underline-style="none" style:text-underline-color="font-color" style:text-line-through-type="none" style:text-outline="false" fo:font-style="normal" style:font-name-complex="Arial" fo:color="#000000" style:font-name="Arial" fo:font-size="10pt" style:font-size-complex="10pt" style:font-style-asian="normal" fo:text-shadow="none" style:font-style-complex="normal" style:text-position="0% 100%" style:font-size-asian="10pt" fo:font-weight="normal" style:font-weight-complex="normal" style:font-weight-asian="normal"/>
    </style:style>
    <style:style style:name="T369" style:family="text">
      <style:text-properties style:text-underline-style="none" style:text-underline-color="font-color" style:text-line-through-type="none" style:text-outline="false" fo:font-style="normal" style:font-name-complex="Arial" fo:color="#000000" style:font-name="Arial" fo:font-size="10pt" style:font-size-complex="10pt" style:font-style-asian="normal" fo:text-shadow="none" style:font-style-complex="normal" style:text-position="0% 100%" style:font-size-asian="10pt" fo:font-weight="bold" style:font-weight-asian="bold" style:font-weight-complex="bold"/>
    </style:style>
    <style:style style:name="T370" style:family="text">
      <style:text-properties style:text-underline-style="none" style:text-underline-color="font-color" style:text-line-through-type="none" style:text-outline="false" fo:font-style="normal" style:font-name-complex="Arial" fo:color="#000000" style:font-name="Arial" fo:font-size="10pt" style:font-size-complex="10pt" style:font-style-asian="normal" fo:text-shadow="none" style:font-style-complex="normal" style:text-position="0% 100%" style:font-size-asian="10pt" fo:font-weight="normal" style:font-weight-asian="normal" style:font-weight-complex="normal"/>
    </style:style>
    <style:style style:name="T371" style:family="text">
      <style:text-properties style:text-underline-style="none" style:text-underline-color="font-color" style:text-line-through-type="none" style:text-outline="false" fo:font-style="normal" style:font-name-complex="Arial" style:font-name="Arial" fo:font-size="10pt" style:font-size-complex="10pt" style:font-style-asian="normal" fo:text-shadow="none" style:font-style-complex="normal" style:text-position="0% 100%" style:font-size-asian="10pt" fo:color="#ff0000" fo:font-weight="bold" style:font-weight-asian="bold" style:font-weight-complex="bold"/>
    </style:style>
    <style:style style:name="T372" style:family="text">
      <style:text-properties style:text-underline-style="none" style:text-underline-color="font-color" style:text-line-through-type="none" style:text-outline="false" fo:font-style="normal" style:font-name-complex="Arial" style:font-name="Arial" fo:font-size="10pt" style:font-size-complex="10pt" style:font-style-asian="normal" fo:text-shadow="none" style:font-style-complex="normal" style:text-position="0% 100%" style:font-size-asian="10pt" fo:color="#ff0000" fo:font-weight="normal" style:font-weight-asian="normal" style:font-weight-complex="normal"/>
    </style:style>
    <style:style style:name="T373" style:family="text">
      <style:text-properties style:text-underline-style="none" style:text-underline-color="font-color" style:text-line-through-type="none" style:text-outline="false" fo:font-style="normal" style:font-name-complex="Arial" style:font-name="Arial" fo:font-size="10pt" style:font-size-complex="10pt" style:font-style-asian="normal" fo:text-shadow="none" style:font-style-complex="normal" style:text-position="0% 100%" style:font-size-asian="10pt" fo:font-weight="normal" style:font-weight-asian="normal" style:font-weight-complex="normal" fo:color="#000000"/>
    </style:style>
    <style:style style:name="T374" style:family="text">
      <style:text-properties style:font-name="Arial Narrow" style:font-style-complex="normal" style:font-style-asian="normal" style:font-weight-complex="normal" style:font-weight-asian="normal" style:font-size-complex="8pt" style:font-size-asian="8pt" style:text-position="0% 100%" fo:text-shadow="none" style:text-outline="false" fo:font-style="normal" style:text-line-through-type="none" style:text-underline-style="none" style:text-underline-color="font-color" fo:font-weight="normal" fo:font-size="8pt" fo:color="#000000"/>
    </style:style>
    <style:style style:name="T375" style:family="text">
      <style:text-properties style:font-name="Arial Narrow"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fo:color="#000000" fo:font-style="italic" style:font-style-asian="italic" style:font-style-complex="italic"/>
    </style:style>
    <style:style style:name="T376" style:family="text">
      <style:text-properties style:font-name="Arial Narrow"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fo:color="#000000" fo:font-style="normal" style:font-style-asian="normal" style:font-style-complex="normal"/>
    </style:style>
    <style:style style:name="T377" style:family="text">
      <style:text-properties style:font-name="Arial" fo:text-shadow="none" fo:font-size="10pt" fo:font-weight="bold" style:text-underline-style="none" style:text-underline-color="font-color" style:text-line-through-type="none" fo:font-style="normal" style:text-outline="false" fo:color="#000000" style:text-position="0% 100%" style:font-name-complex="Arial" style:font-size-asian="10pt" style:font-size-complex="10pt" style:font-weight-asian="bold" style:font-weight-complex="bold" style:font-style-asian="normal" style:font-style-complex="normal"/>
    </style:style>
    <style:style style:name="T378"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00ffff"/>
    </style:style>
    <style:style style:name="T379"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000000"/>
    </style:style>
    <style:style style:name="T380"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ffff00"/>
    </style:style>
    <style:style style:name="T381"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ff8080"/>
    </style:style>
    <style:style style:name="T382" style:family="text">
      <style:text-properties style:font-style-complex="normal" fo:color="#000000" fo:text-shadow="none" style:font-style-asian="normal" style:font-weight-complex="bold" style:font-weight-asian="bold" style:font-size-complex="8pt" style:font-size-asian="8pt" style:font-name-complex="Arial" style:text-outline="false" fo:font-style="normal" style:text-line-through-type="none" style:text-underline-style="none" style:text-underline-color="font-color" fo:font-weight="bold" fo:font-size="8pt" style:font-name="Arial" style:text-position="0% 100%"/>
    </style:style>
    <style:style style:name="T383" style:family="text">
      <style:text-properties style:font-style-complex="normal" fo:color="#000000" fo:text-shadow="none" style:font-style-asian="normal" style:font-size-complex="8pt" style:font-size-asian="8pt" style:font-name-complex="Arial" style:text-outline="false" fo:font-style="normal" style:text-line-through-type="none" style:text-underline-style="none" style:text-underline-color="font-color" fo:font-size="8pt" style:font-name="Arial" style:text-position="0% 100%" fo:font-weight="normal" style:font-weight-asian="normal" style:font-weight-complex="normal"/>
    </style:style>
    <style:style style:name="T384" style:family="text">
      <style:text-properties style:font-style-complex="normal" fo:color="#000000" fo:text-shadow="none" style:font-style-asian="normal" style:font-size-complex="8pt" style:font-size-asian="8pt" style:font-name-complex="Arial" style:text-outline="false" fo:font-style="normal" style:text-line-through-type="none" style:text-underline-style="none" style:text-underline-color="font-color" fo:font-size="8pt" style:font-name="Arial" style:text-position="0% 100%" fo:font-weight="bold" style:font-weight-asian="bold" style:font-weight-complex="bold"/>
    </style:style>
    <style:style style:name="T385" style:family="text">
      <style:text-properties style:font-name="Arial" style:font-style-complex="normal" style:font-style-asian="normal" style:font-weight-complex="normal" style:font-weight-asian="normal" style:font-size-complex="8pt" style:font-size-asian="8pt" style:font-name-complex="Arial" fo:color="#000000" style:text-position="0% 100%" style:text-outline="false" fo:font-style="normal" style:text-line-through-type="none" style:text-underline-style="none" style:text-underline-color="font-color" fo:font-weight="normal" fo:font-size="8pt" fo:text-shadow="none"/>
    </style:style>
    <style:style style:name="T386" style:family="text">
      <style:text-properties style:font-name="Arial" style:font-style-complex="normal" style:font-style-asian="normal" style:font-weight-complex="normal" style:font-weight-asian="normal" style:font-size-complex="8pt" style:font-size-asian="8pt" style:font-name-complex="Arial" fo:color="#000000" style:text-outline="false" fo:font-style="normal" style:text-line-through-type="none" style:text-underline-style="none" style:text-underline-color="font-color" fo:font-weight="normal" fo:font-size="8pt" fo:text-shadow="none" style:text-position="-33% 58%"/>
    </style:style>
    <style:style style:name="T387" style:family="text">
      <style:text-properties fo:text-shadow="none" style:font-name="Arial" fo:font-size="8pt" fo:font-weight="normal" style:text-underline-style="none" style:text-underline-color="font-color" style:text-line-through-type="none" fo:font-style="normal" style:text-outline="false" style:text-position="0% 100%" fo:color="#000000" style:font-name-complex="Arial" style:font-size-asian="8pt" style:font-size-complex="8pt" style:font-weight-asian="normal" style:font-weight-complex="normal" style:font-style-asian="normal" style:font-style-complex="normal"/>
    </style:style>
    <style:style style:name="T388" style:family="text">
      <style:text-properties fo:text-shadow="none" style:font-name="Arial" fo:font-size="8pt" style:text-underline-style="none" style:text-underline-color="font-color" style:text-line-through-type="none" fo:font-style="normal" style:text-outline="false" style:text-position="0% 100%" fo:color="#000000" style:font-name-complex="Arial" style:font-size-asian="8pt" style:font-size-complex="8pt" style:font-style-asian="normal" style:font-style-complex="normal" fo:font-weight="bold" style:font-weight-asian="bold" style:font-weight-complex="bold"/>
    </style:style>
    <style:style style:name="T389" style:family="text">
      <style:text-properties fo:text-shadow="none" style:font-name="Arial" fo:font-size="8pt" style:text-underline-style="none" style:text-underline-color="font-color" style:text-line-through-type="none" fo:font-style="normal" style:text-outline="false" style:text-position="0% 100%" fo:color="#000000" style:font-name-complex="Arial" style:font-size-asian="8pt" style:font-size-complex="8pt" style:font-style-asian="normal" style:font-style-complex="normal" fo:font-weight="normal" style:font-weight-asian="normal" style:font-weight-complex="normal"/>
    </style:style>
    <style:style style:name="T390" style:family="text">
      <style:text-properties style:font-style-complex="normal" style:font-name="Arial" fo:font-size="18pt" fo:font-weight="bold" style:text-underline-style="none" style:text-underline-color="font-color" style:text-line-through-type="none" fo:font-style="normal" style:text-outline="false" style:text-position="0% 100%" fo:text-shadow="none" style:font-name-complex="Arial" style:font-size-asian="18pt" style:font-size-complex="18pt" style:font-weight-asian="bold" style:font-weight-complex="bold" style:font-style-asian="normal" fo:color="#000000"/>
    </style:style>
    <style:style style:name="T391" style:family="text">
      <style:text-properties style:font-style-complex="normal" style:font-name="Arial" fo:font-weight="bold" style:text-underline-style="none" style:text-underline-color="font-color" style:text-line-through-type="none" fo:font-style="normal" style:text-outline="false" style:text-position="0% 100%" fo:text-shadow="none" style:font-name-complex="Arial" style:font-weight-asian="bold" style:font-weight-complex="bold" style:font-style-asian="normal" fo:color="#000000" fo:font-size="10pt" style:font-size-asian="10pt" style:font-size-complex="10pt"/>
    </style:style>
    <style:style style:name="T392" style:family="text">
      <style:text-properties style:font-style-complex="normal" style:font-name="Arial" fo:font-weight="bold" style:text-underline-style="none" style:text-underline-color="font-color" style:text-line-through-type="none" fo:font-style="normal" style:text-outline="false" style:text-position="0% 100%" fo:text-shadow="none" style:font-name-complex="Arial" style:font-weight-asian="bold" style:font-weight-complex="bold" style:font-style-asian="normal" fo:font-size="10pt" style:font-size-asian="10pt" style:font-size-complex="10pt" fo:color="#0000ff"/>
    </style:style>
    <style:style style:name="T393" style:family="text">
      <style:text-properties style:font-name="Arial" style:font-style-complex="normal" fo:font-size="8pt" fo:font-weight="normal" style:text-underline-style="none" style:text-underline-color="font-color" style:text-line-through-type="none" fo:font-style="normal" style:text-outline="false" style:text-position="0% 100%" fo:color="#000000" style:font-name-complex="Arial" style:font-size-asian="8pt" style:font-size-complex="8pt" style:font-weight-asian="normal" style:font-weight-complex="normal" style:font-style-asian="normal" fo:text-shadow="none"/>
    </style:style>
    <style:style style:name="T394" style:family="text">
      <style:text-properties style:font-name="Arial" style:font-style-complex="normal" fo:font-size="8pt" fo:font-weight="normal" style:text-underline-style="none" style:text-underline-color="font-color" style:text-line-through-type="none" fo:font-style="normal" style:text-outline="false" fo:color="#000000" style:font-name-complex="Arial" style:font-size-asian="8pt" style:font-size-complex="8pt" style:font-weight-asian="normal" style:font-weight-complex="normal" style:font-style-asian="normal" fo:text-shadow="none" style:text-position="-33% 58%"/>
    </style:style>
    <style:style style:name="T395" style:family="text">
      <style:text-properties style:font-name="Arial" style:font-style-complex="normal" fo:font-size="8pt" fo:font-weight="normal" style:text-underline-style="none" style:text-underline-color="font-color" style:text-line-through-type="none" fo:font-style="normal" style:text-outline="false" fo:color="#000000" style:font-name-complex="Arial" style:font-size-asian="8pt" style:font-size-complex="8pt" style:font-weight-asian="normal" style:font-weight-complex="normal" style:font-style-asian="normal" fo:text-shadow="none" style:text-position="0% 100%"/>
    </style:style>
    <style:style style:name="T396" style:family="text">
      <style:text-properties fo:text-shadow="none" style:font-name="Arial" fo:font-size="8pt" fo:font-weight="normal" style:text-underline-style="none" style:text-underline-color="font-color" style:text-line-through-type="none" fo:font-style="normal" style:text-outline="false" fo:color="#000000" style:font-name-complex="Arial" style:font-size-asian="8pt" style:font-size-complex="8pt" style:font-weight-asian="normal" style:font-weight-complex="normal" style:font-style-asian="normal" style:font-style-complex="normal" style:text-position="-33% 58%"/>
    </style:style>
    <style:style style:name="T397" style:family="text">
      <style:text-properties fo:text-shadow="none" style:font-name="Arial" fo:font-size="8pt" fo:font-weight="normal" style:text-underline-style="none" style:text-underline-color="font-color" style:text-line-through-type="none" fo:font-style="normal" style:text-outline="false" fo:color="#000000" style:font-name-complex="Arial" style:font-size-asian="8pt" style:font-size-complex="8pt" style:font-weight-asian="normal" style:font-weight-complex="normal" style:font-style-asian="normal" style:font-style-complex="normal" style:text-position="0% 100%"/>
    </style:style>
    <style:style style:name="T398" style:family="text">
      <style:text-properties style:font-name="Arial" style:font-style-complex="normal" style:font-style-asian="normal" style:font-size-complex="8pt" style:font-size-asian="8pt" style:font-name-complex="Arial" fo:color="#000000" style:text-position="0% 100%" style:text-outline="false" fo:font-style="normal" style:text-line-through-type="none" style:text-underline-style="none" style:text-underline-color="font-color" fo:font-size="8pt" fo:text-shadow="none" fo:font-weight="bold" style:font-weight-asian="bold" style:font-weight-complex="bold"/>
    </style:style>
    <style:style style:name="T399" style:family="text">
      <style:text-properties fo:text-shadow="none" style:font-name="Arial" fo:font-size="7pt" fo:font-weight="normal" style:text-underline-style="none" style:text-underline-color="font-color" style:text-line-through-type="none" fo:font-style="normal" style:text-outline="false" style:text-position="0% 100%" fo:color="#000000" style:font-name-complex="Arial" style:font-size-asian="7pt" style:font-size-complex="7pt" style:font-weight-asian="normal" style:font-weight-complex="normal" style:font-style-asian="normal" style:font-style-complex="normal"/>
    </style:style>
    <style:style style:name="T400" style:family="text">
      <style:text-properties fo:text-shadow="none" style:font-name="Arial" fo:font-size="7pt" style:text-underline-style="none" style:text-underline-color="font-color" style:text-line-through-type="none" fo:font-style="normal" style:text-outline="false" style:text-position="0% 100%" fo:color="#000000" style:font-name-complex="Arial" style:font-size-asian="7pt" style:font-size-complex="7pt" style:font-style-asian="normal" style:font-style-complex="normal" fo:font-weight="bold" style:font-weight-asian="bold" style:font-weight-complex="bold"/>
    </style:style>
    <style:style style:name="T401" style:family="text">
      <style:text-properties fo:text-shadow="none" style:font-name="Arial" fo:font-size="7pt" style:text-underline-style="none" style:text-underline-color="font-color" style:text-line-through-type="none" fo:font-style="normal" style:text-outline="false" style:text-position="0% 100%" fo:color="#000000" style:font-name-complex="Arial" style:font-size-asian="7pt" style:font-size-complex="7pt" style:font-style-asian="normal" style:font-style-complex="normal" fo:font-weight="normal" style:font-weight-asian="normal" style:font-weight-complex="normal"/>
    </style:style>
    <style:style style:name="T402" style:family="text">
      <style:text-properties fo:text-shadow="none" style:font-name="Arial" fo:font-size="8pt" fo:font-weight="bold" style:text-underline-style="none" style:text-underline-color="font-color" style:text-line-through-type="none" fo:font-style="normal" style:text-outline="false" style:text-position="0% 100%" fo:color="#000000" style:font-name-complex="Arial" style:font-size-asian="8pt" style:font-size-complex="8pt" style:font-weight-asian="bold" style:font-weight-complex="bold" style:font-style-asian="normal" style:font-style-complex="normal"/>
    </style:style>
    <style:style style:name="T403" style:family="text">
      <style:text-properties style:font-style-complex="normal" fo:color="#000000" fo:text-shadow="none" style:font-style-asian="normal" style:font-weight-complex="normal" style:font-weight-asian="normal" style:font-size-complex="8pt" style:font-size-asian="8pt" style:font-name-complex="Arial" style:text-outline="false" fo:font-style="normal" style:text-line-through-type="none" style:text-underline-style="none" style:text-underline-color="font-color" fo:font-weight="normal" fo:font-size="8pt" style:font-name="Arial" style:text-position="0% 100%"/>
    </style:style>
    <style:style style:name="T404" style:family="text">
      <style:text-properties style:font-style-complex="normal" fo:color="#000000" fo:text-shadow="none" style:font-style-asian="normal" style:font-size-complex="8pt" style:font-size-asian="8pt" style:font-name-complex="Arial" style:text-outline="false" fo:font-style="normal" style:text-line-through-type="none" style:text-underline-style="none" style:text-underline-color="font-color" fo:font-size="8pt" style:font-name="Arial" style:text-position="0% 100%" style:font-weight-complex="bold" fo:font-weight="bold" style:font-weight-asian="bold"/>
    </style:style>
    <style:style style:name="T405" style:family="text">
      <style:text-properties style:font-name="Arial" style:font-style-complex="normal" fo:font-size="9pt" fo:font-weight="bold" style:text-underline-style="none" style:text-underline-color="font-color" style:text-line-through-type="none" fo:font-style="normal" style:text-outline="false" style:text-position="0% 100%" fo:color="#000000" style:font-name-complex="Arial" style:font-size-asian="9pt" style:font-size-complex="9pt" style:font-weight-asian="bold" style:font-weight-complex="bold" style:font-style-asian="normal" fo:text-shadow="none"/>
    </style:style>
    <style:style style:name="T406" style:family="text">
      <style:text-properties style:font-name="Arial" style:font-style-complex="normal" fo:font-size="9pt" fo:font-weight="bold" style:text-underline-style="none" style:text-underline-color="font-color" style:text-line-through-type="none" fo:font-style="normal" style:text-outline="false" fo:color="#000000" style:font-name-complex="Arial" style:font-size-asian="9pt" style:font-size-complex="9pt" style:font-weight-asian="bold" style:font-weight-complex="bold" style:font-style-asian="normal" fo:text-shadow="none" style:text-position="-33% 58%"/>
    </style:style>
    <style:style style:name="T407" style:family="text">
      <style:text-properties style:font-name="Arial" style:font-style-complex="normal" fo:font-size="9pt" fo:font-weight="bold" style:text-underline-style="none" style:text-underline-color="font-color" style:text-line-through-type="none" fo:font-style="normal" style:text-outline="false" fo:color="#000000" style:font-name-complex="Arial" style:font-size-asian="9pt" style:font-size-complex="9pt" style:font-weight-asian="bold" style:font-weight-complex="bold" style:font-style-asian="normal" fo:text-shadow="none" style:text-position="0% 100%"/>
    </style:style>
    <style:style style:name="T408" style:family="text">
      <style:text-properties fo:text-shadow="none" style:font-name="Arial" fo:font-size="9pt" fo:font-weight="bold" style:text-underline-style="none" style:text-underline-color="font-color" style:text-line-through-type="none" fo:font-style="normal" style:text-outline="false" style:text-position="0% 100%" fo:color="#000000" style:font-name-complex="Arial" style:font-size-asian="9pt" style:font-size-complex="9pt" style:font-weight-asian="bold" style:font-weight-complex="bold" style:font-style-asian="normal" style:font-style-complex="normal"/>
    </style:style>
    <style:style style:name="T409" style:family="text">
      <style:text-properties fo:text-shadow="none" style:font-name="Arial" fo:font-size="9pt" fo:font-weight="bold" style:text-underline-style="none" style:text-underline-color="font-color" style:text-line-through-type="none" fo:font-style="normal" style:text-outline="false" fo:color="#000000" style:font-name-complex="Arial" style:font-size-asian="9pt" style:font-size-complex="9pt" style:font-weight-asian="bold" style:font-weight-complex="bold" style:font-style-asian="normal" style:font-style-complex="normal" style:text-position="-33% 58%"/>
    </style:style>
    <style:style style:name="T410" style:family="text">
      <style:text-properties fo:text-shadow="none" style:font-name="Arial" fo:font-size="9pt" fo:font-weight="bold" style:text-underline-style="none" style:text-underline-color="font-color" style:text-line-through-type="none" fo:font-style="normal" style:text-outline="false" fo:color="#000000" style:font-name-complex="Arial" style:font-size-asian="9pt" style:font-size-complex="9pt" style:font-weight-asian="bold" style:font-weight-complex="bold" style:font-style-asian="normal" style:font-style-complex="normal" style:text-position="0% 100%"/>
    </style:style>
    <style:style style:name="T411" style:family="text">
      <style:text-properties fo:text-shadow="none" style:font-name="Arial" fo:font-size="9pt" fo:font-weight="normal" style:text-underline-style="none" style:text-underline-color="font-color" style:text-line-through-type="none" fo:font-style="normal" style:text-outline="false" style:text-position="0% 100%" fo:color="#000000" style:font-name-complex="Arial" style:font-size-asian="9pt" style:font-size-complex="9pt" style:font-weight-asian="normal" style:font-weight-complex="normal" style:font-style-asian="normal" style:font-style-complex="normal"/>
    </style:style>
    <style:style style:name="T412" style:family="text">
      <style:text-properties fo:text-shadow="none" style:font-name="Arial" fo:font-size="9pt" fo:font-weight="normal" style:text-underline-style="none" style:text-underline-color="font-color" style:text-line-through-type="none" fo:font-style="normal" style:text-outline="false" fo:color="#000000" style:font-name-complex="Arial" style:font-size-asian="9pt" style:font-size-complex="9pt" style:font-weight-asian="normal" style:font-weight-complex="normal" style:font-style-asian="normal" style:font-style-complex="normal" style:text-position="-33% 58%"/>
    </style:style>
    <style:style style:name="T413" style:family="text">
      <style:text-properties fo:text-shadow="none" style:font-name="Arial" fo:font-size="9pt" fo:font-weight="normal" style:text-underline-style="none" style:text-underline-color="font-color" style:text-line-through-type="none" fo:font-style="normal" style:text-outline="false" fo:color="#000000" style:font-name-complex="Arial" style:font-size-asian="9pt" style:font-size-complex="9pt" style:font-weight-asian="normal" style:font-weight-complex="normal" style:font-style-asian="normal" style:font-style-complex="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3:.$I$4])" table:allow-empty-cell="true" table:display-list="unsorted" table:base-cell-address="'1. Water Report Input'.B3">
          <table:error-message table:message-type="stop" table:display="true"/>
        </table:content-validation>
        <table:content-validation table:name="val2" table:condition="of:cell-content-is-in-list([.$B$41:.$B$49])" table:allow-empty-cell="true" table:display-list="unsorted" table:base-cell-address="'2. Sparge Acidification'.B8">
          <table:help-message table:display="true">
            <text:p>Select acid type here</text:p>
          </table:help-message>
          <table:error-message table:message-type="stop" table:display="true"/>
        </table:content-validation>
        <table:content-validation table:name="val3" table:condition="of:cell-content-is-in-list([.$B$53:.$B$56])" table:allow-empty-cell="true" table:display-list="unsorted" table:base-cell-address="'2. Sparge Acidification'.C9">
          <table:help-message table:display="true">
            <text:p>Select: percentage, normality, molarity, or solid.</text:p>
          </table:help-message>
          <table:error-message table:message-type="stop" table:display="true"/>
        </table:content-validation>
        <table:content-validation table:name="val4" table:condition="of:cell-content-is-decimal-number() and cell-content-is-between(0.1,2)" table:allow-empty-cell="true" table:base-cell-address="'3. Grain Bill Input'.A26">
          <table:error-message table:message-type="stop" table:display="true"/>
        </table:content-validation>
        <table:content-validation table:name="val5" table:condition="of:cell-content-is-in-list([.$Q$2:.$Q$5])" table:allow-empty-cell="true" table:display-list="unsorted" table:base-cell-address="'3. Grain Bill Input'.B6">
          <table:error-message table:message-type="stop" table:display="true"/>
        </table:content-validation>
        <table:content-validation table:name="val6" table:condition="of:cell-content-is-in-list([.$Q$28:.$Q$29])" table:allow-empty-cell="true" table:display-list="unsorted" table:base-cell-address="'3. Grain Bill Input'.B20">
          <table:error-message table:message-type="stop" table:display="true"/>
        </table:content-validation>
        <table:content-validation table:name="val7" table:condition="of:cell-content-is-in-list([.$N$28:.$N$29])" table:allow-empty-cell="true" table:display-list="unsorted" table:base-cell-address="'3. Grain Bill Input'.B21">
          <table:error-message table:message-type="stop" table:display="true"/>
        </table:content-validation>
        <table:content-validation table:name="val8" table:condition="of:cell-content-is-in-list([.$B$38:.$B$103])" table:allow-empty-cell="true" table:display-list="unsorted" table:base-cell-address="'4. Water Adjustment'.A5">
          <table:help-message table:display="true">
            <text:p>Select desired water profile from the drop-down listing.</text:p>
          </table:help-message>
          <table:error-message table:message-type="stop" table:display="true"/>
        </table:content-validation>
        <table:content-validation table:name="val9" table:condition="of:cell-content-is-in-list([.$B$108:.$B$109])" table:allow-empty-cell="true" table:display-list="unsorted" table:base-cell-address="'4. Water Adjustment'.A8">
          <table:help-message table:display="true">
            <text:p>Select the type of dilution water from the drop-down listing.</text:p>
          </table:help-message>
          <table:error-message table:message-type="stop" table:display="true"/>
        </table:content-validation>
        <table:content-validation table:name="val10" table:condition="of:cell-content-is-in-list([.$U$26:.$U$33])" table:allow-empty-cell="true" table:display-list="unsorted" table:base-cell-address="'4. Water Adjustment'.A29">
          <table:error-message table:message-type="stop" table:display="true"/>
        </table:content-validation>
        <table:content-validation table:name="val11" table:condition="of:cell-content-is-in-list([.$U$4:.$U$7])" table:allow-empty-cell="true" table:display-list="unsorted" table:base-cell-address="'4. Water Adjustment'.E29">
          <table:error-message table:message-type="stop" table:display="true"/>
        </table:content-validation>
      </table:content-validations>
      <table:table table:name="0. Instructions" table:style-name="ta1">
        <office:forms form:automatic-focus="false" form:apply-design-mode="false"/>
        <table:table-column table:style-name="co1" table:number-columns-repeated="2" table:default-cell-style-name="Default"/>
        <table:table-column table:style-name="co2" table:number-columns-repeated="9" table:default-cell-style-name="Default"/>
        <table:table-column table:style-name="co3" table:number-columns-repeated="15" table:default-cell-style-name="Default"/>
        <table:table-column table:style-name="co1" table:number-columns-repeated="38" table:default-cell-style-name="Default"/>
        <table:table-row table:style-name="ro1">
          <table:table-cell table:style-name="ce1" office:value-type="string" calcext:value-type="string" table:number-columns-spanned="2" table:number-rows-spanned="1">
            <text:p>Bru'n Water</text:p>
          </table:table-cell>
          <table:covered-table-cell table:style-name="ce19"/>
          <table:table-cell table:style-name="ce26" office:value-type="string" calcext:value-type="string" table:number-columns-spanned="9" table:number-rows-spanned="1">
            <text:p><text:span text:style-name="T374">Copyright © 2020 </text:span><text:span text:style-name="T375">Martin Brungard</text:span><text:span text:style-name="T376">. All rights reserved. Reproduction in whole or in part in any form or medium without the express written permission of Martin Brungard, is prohibited. Bru'n Water is not Freeware or Shareware and it is illegal to distribute or transfer this program in any form except by Martin Brungard.</text:span></text:p>
          </table:table-cell>
          <table:covered-table-cell table:number-columns-repeated="8"/>
          <table:table-cell table:number-columns-repeated="53"/>
        </table:table-row>
        <table:table-row table:style-name="ro2">
          <table:table-cell table:style-name="ce2" office:value-type="string" calcext:value-type="string" table:number-columns-spanned="11" table:number-rows-spanned="1">
            <text:p>Instructions</text:p>
          </table:table-cell>
          <table:covered-table-cell table:number-columns-repeated="10" table:style-name="ce20"/>
          <table:table-cell table:number-columns-repeated="53"/>
        </table:table-row>
        <table:table-row table:style-name="ro3">
          <table:table-cell table:style-name="ce3" office:value-type="string" calcext:value-type="string" table:number-columns-spanned="11" table:number-rows-spanned="1">
            <text:p>Created by Martin Brungard, P.E. D.WRE <text:s/>(mabrungard@hotmail.com)</text:p>
          </table:table-cell>
          <table:covered-table-cell table:number-columns-repeated="9" table:style-name="ce21"/>
          <table:covered-table-cell table:style-name="ce19"/>
          <table:table-cell table:number-columns-repeated="53"/>
        </table:table-row>
        <table:table-row table:style-name="ro4">
          <table:table-cell table:style-name="ce4" office:value-type="string" calcext:value-type="string" table:number-columns-spanned="11" table:number-rows-spanned="1">
            <text:p><text:span text:style-name="T2">            Most water sources that have an acceptable taste can be used to brew beer.  But to brew great beer across a wide variety of styles, adjustment of brewing water is probably needed.   </text:span><text:span text:style-name="T3">Bru'n Water</text:span><text:span text:style-name="T4"> is a brewing water analysis program that enables a brewer to successfully evaluate and modify their water supply to improve their beer.  The program steps through the evaluation of a brewer's water supply, adjustment to a desired water profile, evaluation of potential mash pH, and adjustments to produce desirable mash pH. </text:span></text:p>
          </table:table-cell>
          <table:covered-table-cell table:number-columns-repeated="9" table:style-name="ce22"/>
          <table:covered-table-cell table:style-name="ce28"/>
          <table:table-cell table:number-columns-repeated="53"/>
        </table:table-row>
        <table:table-row table:style-name="ro5">
          <table:table-cell table:style-name="ce5" office:value-type="string" calcext:value-type="string" table:number-columns-spanned="11" table:number-rows-spanned="1">
            <text:p>Homebrewing and Craftbrewing are unique in their need to frequently assess and adjust their brewing water to better suit their upcoming beer. <text:s/>This differs from the needs of production breweries that brew thousands of barrels of the same beer every year. <text:s/>Consistency is the key for production brewers and they have little need to evaluate or change their brewing water. <text:s/>Through trial and error and advanced laboratory analyses, production breweries typically know exactly what adjustments they need for their brewing water. <text:s/>Homebrewers and Craftbrewers rarely have the tools at their disposal to perfect their water and since they often change what beer they brew, a capable tool is helpful. <text:s/>This brewing tool is intended to aid those who want to get great results out of every batch.</text:p>
          </table:table-cell>
          <table:covered-table-cell table:number-columns-repeated="9" table:style-name="ce20"/>
          <table:covered-table-cell table:style-name="ce29"/>
          <table:table-cell table:number-columns-repeated="53"/>
        </table:table-row>
        <table:table-row table:style-name="ro6">
          <table:table-cell table:style-name="ce6" office:value-type="string" calcext:value-type="string" table:number-columns-spanned="11" table:number-rows-spanned="1">
            <text:p>Getting Started</text:p>
          </table:table-cell>
          <table:covered-table-cell table:number-columns-repeated="9" table:style-name="ce23"/>
          <table:covered-table-cell table:style-name="ce30"/>
          <table:table-cell table:number-columns-repeated="53"/>
        </table:table-row>
        <table:table-row table:style-name="ro7">
          <table:table-cell table:style-name="ce4" office:value-type="string" calcext:value-type="string" table:number-columns-spanned="11" table:number-rows-spanned="1">
            <text:p><text:span text:style-name="T5">            The first thing needed for brewing water analysis is to know your water supply characteristics and ion concentrations.  Of course, you want a water supply that is safe to drink and tastes good.  Water that leaves black, brown, or red water staining may be an indication that the water will need additional treatment to be suitable for brewing.  Water that has been softened by typical salt-based water softeners (ion exchange) is not typically desirable for brewing due to several factors including:  </text:span><text:span text:style-name="T6">elevated sodium or potassium content, low calcium and magnesium content, while still containing excessive alkalinity.</text:span><text:span text:style-name="T7">   Brewers with softened water may find that obtaining their brewing water from a point upstream of their softener unit will produce better brewing results.  An exception is if the raw water has iron or manganese at perceptible levels.  Hard water is not typically an obstacle to brewing good beer.  However, alkalinity is a problem typical to many brewers. </text:span><text:span text:style-name="T6"> Ion-exchange water softeners do not affect alkalinity significantly and the resulting water is often poorly suited to brewing.</text:span></text:p>
          </table:table-cell>
          <table:covered-table-cell table:number-columns-repeated="9" table:style-name="ce22"/>
          <table:covered-table-cell table:style-name="ce28"/>
          <table:table-cell table:number-columns-repeated="53"/>
        </table:table-row>
        <table:table-row table:style-name="ro8">
          <table:table-cell table:style-name="ce4" office:value-type="string" calcext:value-type="string" table:number-columns-spanned="11" table:number-rows-spanned="1">
            <text:p><text:span text:style-name="T2">A comprehensive instruction on brewing water knowledge is included in this program to assist the brewer in understanding brewing water chemistry.  Select the </text:span><text:span text:style-name="T3">Water Knowledge</text:span><text:span text:style-name="T4"> tab to view.  A link to the on-line version of the Water Knowledge is provided below.  The on-line version is more up to date and should be the preferred resource.</text:span></text:p>
          </table:table-cell>
          <table:covered-table-cell table:number-columns-repeated="9" table:style-name="ce22"/>
          <table:covered-table-cell table:style-name="ce28"/>
          <table:table-cell table:number-columns-repeated="53"/>
        </table:table-row>
        <table:table-row table:style-name="ro9">
          <table:table-cell table:style-name="ce7" office:value-type="string" calcext:value-type="string" table:number-columns-spanned="11" table:number-rows-spanned="1">
            <text:p><text:a xlink:href="https://sites.google.com/site/brunwater/water-knowledge" xlink:type="simple">Bru'n Water Knowledge</text:a></text:p>
          </table:table-cell>
          <table:covered-table-cell table:number-columns-repeated="9" table:style-name="ce22"/>
          <table:covered-table-cell table:style-name="ce28"/>
          <table:table-cell table:number-columns-repeated="53"/>
        </table:table-row>
        <table:table-row table:style-name="ro9">
          <table:table-cell table:style-name="ce4" office:value-type="string" calcext:value-type="string" table:number-columns-spanned="11" table:number-rows-spanned="1">
            <text:p>Here are a few program setup recommendations to aid your use of Bru'n Water. </text:p>
          </table:table-cell>
          <table:covered-table-cell table:number-columns-repeated="9" table:style-name="ce22"/>
          <table:covered-table-cell table:style-name="ce28"/>
          <table:table-cell table:number-columns-repeated="53"/>
        </table:table-row>
        <table:table-row table:style-name="ro10">
          <table:table-cell table:style-name="ce4" office:value-type="string" calcext:value-type="string" table:number-columns-spanned="11" table:number-rows-spanned="1">
            <text:p><text:span text:style-name="T8">1. Go to </text:span><text:span text:style-name="T9">Excel Options</text:span><text:span text:style-name="T10"> and its </text:span><text:span text:style-name="T11">Formulas</text:span><text:span text:style-name="T12"> subdirectory and be sure that </text:span><text:span text:style-name="T13">Automatic</text:span><text:span text:style-name="T14"> calculation is selected and </text:span><text:span text:style-name="T9">Enable Iterative Calculation</text:span><text:span text:style-name="T10"> is also check-marked. These ensure that the changes to your inputs are instantly incorporated in the answers. The iterative calculation feature is necessary since the program uses the results of the calculations to refine its answers and this creates a </text:span><text:span text:style-name="T15">circular reference</text:span><text:span text:style-name="T10"> warning in Excel. Enabling the iterative calculation gets rid of the warning and allows the program to function properly.</text:span></text:p>
          </table:table-cell>
          <table:covered-table-cell table:number-columns-repeated="9" table:style-name="ce22"/>
          <table:covered-table-cell table:style-name="ce28"/>
          <table:table-cell table:number-columns-repeated="53"/>
        </table:table-row>
        <table:table-row table:style-name="ro11">
          <table:table-cell table:style-name="ce4" office:value-type="string" calcext:value-type="string" table:number-columns-spanned="11" table:number-rows-spanned="1">
            <text:p><text:span text:style-name="T16">This program steps the brewer through a set of spreadsheets to complete the water analysis and adjustment.  If a brewer's water source is relatively stable and its characteristics do not change, then it is likely that the brewer will only visit sheets 1 and 2 (</text:span><text:span text:style-name="T17">Water Report Input</text:span><text:span text:style-name="T18"> and </text:span><text:span text:style-name="T19">Sparge Acidification</text:span><text:span text:style-name="T20">) once.  Sheets 3 and 4 (</text:span><text:span text:style-name="T17">Grain Bill Input </text:span><text:span text:style-name="T21">and </text:span><text:span text:style-name="T19">Water Adjustment</text:span><text:span text:style-name="T21">) will be used for each new brewing session.  The brewer should work sequentially through sheets 1 through 4 to define and assess their brewing water chemistry.  If the mash acidification results indicate that the water adjustments will not produce a desirable result, the brewer may need to revisit the </text:span><text:span text:style-name="T17">Water Adjustment</text:span><text:span text:style-name="T18"> page (Sheet 4) and adjust the dilution, mineral, or acid additions to achieve their desired mash pH.  Be sure to input your water's Bicarbonate content on the </text:span><text:span text:style-name="T22">Water Report Input </text:span><text:span text:style-name="T20">sheet to get proper output on the </text:span><text:span text:style-name="T19">Grain Bill Input </text:span><text:span text:style-name="T23">and </text:span><text:span text:style-name="T24">Adjustment Summary </text:span><text:span text:style-name="T23">sheets. If the Sparging Water is diluted with RO or Distilled water, that information must be input on the </text:span><text:span text:style-name="T17">Sparge Acidification</text:span><text:span text:style-name="T23"> sheet.  </text:span></text:p>
          </table:table-cell>
          <table:covered-table-cell table:number-columns-repeated="9" table:style-name="ce22"/>
          <table:covered-table-cell table:style-name="ce28"/>
          <table:table-cell table:number-columns-repeated="53"/>
        </table:table-row>
        <table:table-row table:style-name="ro12">
          <table:table-cell table:style-name="ce5" office:value-type="string" calcext:value-type="string" table:number-columns-spanned="11" table:number-rows-spanned="1">
            <text:p><text:span text:style-name="T25">Set the units</text:span><text:span text:style-name="T26"> desired for the brewing calculations at the top of the </text:span><text:span text:style-name="T27">Water Report Input</text:span><text:span text:style-name="T28"> sheet.  Homebrewers may select either </text:span><text:span text:style-name="T29">Gallons</text:span><text:span text:style-name="T28"> or</text:span><text:span text:style-name="T30"> Liters</text:span><text:span text:style-name="T28">.The units for grain amounts switch to pounds when the water volume is set to either gallons or Barrels and to kilograms when the water volume is set to liters or hectoliters. </text:span></text:p>
          </table:table-cell>
          <table:covered-table-cell table:number-columns-repeated="9" table:style-name="ce20"/>
          <table:covered-table-cell table:style-name="ce29"/>
          <table:table-cell table:number-columns-repeated="53"/>
        </table:table-row>
        <table:table-row table:style-name="ro13">
          <table:table-cell table:style-name="ce8" office:value-type="string" calcext:value-type="string" table:number-columns-spanned="11" table:number-rows-spanned="1">
            <text:p>How to Use Bru'n Water</text:p>
          </table:table-cell>
          <table:covered-table-cell table:number-columns-repeated="9" table:style-name="ce21"/>
          <table:covered-table-cell table:style-name="ce19"/>
          <table:table-cell table:number-columns-repeated="53"/>
        </table:table-row>
        <table:table-row table:style-name="ro14">
          <table:table-cell table:style-name="ce9"/>
          <table:table-cell table:style-name="ce24" office:value-type="string" calcext:value-type="string" table:number-columns-spanned="10" table:number-rows-spanned="1">
            <text:p><text:span text:style-name="T2">1. Knowing your Existing Water is a key requirement for assessing how to adjust it.  Input the ion content of the existing water source on the </text:span><text:span text:style-name="T3">Water Report Input </text:span><text:span text:style-name="T4">sheet.  </text:span></text:p>
          </table:table-cell>
          <table:covered-table-cell table:number-columns-repeated="8" table:style-name="ce22"/>
          <table:covered-table-cell table:style-name="ce28"/>
          <table:table-cell table:number-columns-repeated="53"/>
        </table:table-row>
        <table:table-row table:style-name="ro15">
          <table:table-cell table:style-name="ce10"/>
          <table:table-cell table:style-name="ce24" office:value-type="string" calcext:value-type="string" table:number-columns-spanned="10" table:number-rows-spanned="1">
            <text:p><text:span text:style-name="T361">2. Water reports can be difficult to understand and they sometimes have errors.  A warning will display on the </text:span><text:span text:style-name="T362">Water Report Input </text:span><text:span text:style-name="T363">sheet</text:span><text:span text:style-name="T170"> </text:span><text:span text:style-name="T364">if the ion inputs are out of balance.  If the warning is displayed, double check the reporting units from the water report and convert any quantities that are not reported in actual ppm or mg/L units for each ion. Sometimes, water reports provide information in units other than ppm or mg/L and those values need to be converted. For example: (not as ppm as CaCO3, or not as Sulfate as Sulfur (SO4-S), or not as Nitrate as Nitrogen (N03-N)  ). There is a </text:span><text:span text:style-name="T365">Conversion tool </text:span><text:span text:style-name="T364">at the bottom of the </text:span><text:span text:style-name="T170">Water Report Input </text:span><text:span text:style-name="T167">sheet to aid the brewer in converting reported values to their actual ionic concentrations. For accurate results, the ionic content of your water must be known and entered properly. The ion balance warning will disappear when the input is reasonably balanced. </text:span><text:span text:style-name="T170">Be sure to dechlorinate your brewing water if you get your water from a municipal supply!</text:span></text:p>
          </table:table-cell>
          <table:covered-table-cell table:number-columns-repeated="8" table:style-name="ce22"/>
          <table:covered-table-cell table:style-name="ce28"/>
          <table:table-cell table:number-columns-repeated="53"/>
        </table:table-row>
        <table:table-row table:style-name="ro16">
          <table:table-cell table:style-name="ce10"/>
          <table:table-cell table:style-name="ce24" office:value-type="string" calcext:value-type="string" table:number-columns-spanned="10" table:number-rows-spanned="1">
            <text:p><text:span text:style-name="T64">3. All sparging Water must have </text:span><text:span text:style-name="T65">low</text:span><text:span text:style-name="T66"> alkalinity. If your water source has moderate to high alkalinity, that water must be acidified to reduce its alkalinity.  The alkalinity of the tap water is calculated from the information input on the </text:span><text:span text:style-name="T67">Water Report Input</text:span><text:span text:style-name="T68"> sheet and it is copied to the </text:span><text:span text:style-name="T67">Sparge Acidification</text:span><text:span text:style-name="T68"> sheet.  It is used to calculate the amount of acid needed to bring the Sparging Water pH and Alkalinity down to a proper level.  </text:span></text:p>
          </table:table-cell>
          <table:covered-table-cell table:number-columns-repeated="8" table:style-name="ce22"/>
          <table:covered-table-cell table:style-name="ce28"/>
          <table:table-cell table:number-columns-repeated="53"/>
        </table:table-row>
        <table:table-row table:style-name="ro17">
          <table:table-cell table:style-name="ce10"/>
          <table:table-cell table:style-name="ce25" office:value-type="string" calcext:value-type="string" table:number-columns-spanned="10" table:number-rows-spanned="1">
            <text:p><text:span text:style-name="T366">4. The water profile used for brewing should be adjusted to produce a proper mash pH and produce desirable beer taste.  Select a target brewing water profile on the </text:span><text:span text:style-name="T367">Water Adjustment </text:span><text:span text:style-name="T368">sheet and experiment with mineral and acid additions and/or water dilution to produce that desired water profile.  </text:span><text:span text:style-name="T369">An exact match is NOT required</text:span><text:span text:style-name="T370"> between your adjusted water and the suggested water profiles.  Getting within +/-10 ppm of the target should be OK.  DO NOT TARGET the bicarbonate value shown in water profiles. The bicarbonate content shown for the water profile is only what might exist to balance the water profile.  The bicarbonate content of your mashing water may need to be higher or lower than the value shown in the water profile.  </text:span><text:span text:style-name="T371">Adjust the bicarbonate value as needed to produce your desired mash pH.</text:span><text:span text:style-name="T372"> </text:span><text:span text:style-name="T373"> The final bicarbonate content of the mashing water may vary based on the acidity of your grain bill.  </text:span></text:p>
          </table:table-cell>
          <table:covered-table-cell table:number-columns-repeated="8" table:style-name="ce22"/>
          <table:covered-table-cell table:style-name="ce28"/>
          <table:table-cell table:number-columns-repeated="53"/>
        </table:table-row>
        <table:table-row table:style-name="ro18">
          <table:table-cell table:style-name="ce10"/>
          <table:table-cell table:style-name="ce25" office:value-type="string" calcext:value-type="string" table:number-columns-spanned="10" table:number-rows-spanned="1">
            <text:p><text:span text:style-name="T5">5. Bru'n Water assesses the acidity of the brewer's grain bill to predict mash pH.  </text:span><text:span text:style-name="T54">Input the mashing grain bill</text:span><text:span text:style-name="T7"> on the </text:span><text:span text:style-name="T6">Grain Bill Input</text:span><text:span text:style-name="T7"> sheet.  </text:span></text:p>
          </table:table-cell>
          <table:covered-table-cell table:number-columns-repeated="8" table:style-name="ce22"/>
          <table:covered-table-cell table:style-name="ce28"/>
          <table:table-cell table:number-columns-repeated="53"/>
        </table:table-row>
        <table:table-row table:style-name="ro19">
          <table:table-cell table:style-name="ce10"/>
          <table:table-cell table:style-name="ce25" office:value-type="string" calcext:value-type="string" table:number-columns-spanned="10" table:number-rows-spanned="1">
            <text:p><text:span text:style-name="T8">6. Because the water profiles on the </text:span><text:span text:style-name="T9">Water Adjustment </text:span><text:span text:style-name="T10">sheet may not always produce a good mash pH, minor adjustment of the bicarbonate content of those water profiles may be needed.  Check the resulting </text:span><text:span text:style-name="T11">Estimated Mash pH</text:span><text:span text:style-name="T12"> on either the </text:span><text:span text:style-name="T13">Grain Bill Input</text:span><text:span text:style-name="T14"> or </text:span><text:span text:style-name="T9">Water Adjustment</text:span><text:span text:style-name="T10"> sheets.  If the pH is lower than desired, increase the bicarbonate content of the mashing water on the </text:span><text:span text:style-name="T15">Water Adjustment </text:span><text:span text:style-name="T10">sheet.  If the pH is higher than desired, reduce the bicarbonate content.  Adjust the mashing water ion concentrations until the desired mash pH is predicted.</text:span></text:p>
          </table:table-cell>
          <table:covered-table-cell table:number-columns-repeated="8" table:style-name="ce22"/>
          <table:covered-table-cell table:style-name="ce28"/>
          <table:table-cell table:number-columns-repeated="53"/>
        </table:table-row>
        <table:table-row table:style-name="ro20">
          <table:table-cell table:style-name="ce10"/>
          <table:table-cell table:style-name="ce25" office:value-type="string" calcext:value-type="string" table:number-columns-spanned="10" table:number-rows-spanned="1">
            <text:p><text:span text:style-name="T5">7. A listing of the recommended </text:span><text:span text:style-name="T54">Water Adjustments</text:span><text:span text:style-name="T7"> for mashing and sparging water is presented on the </text:span><text:span text:style-name="T6">Adjustment Summary</text:span><text:span text:style-name="T7"> sheet.  That sheet is configured for printing and presents all the water adjustment information needed for that brew.  </text:span></text:p>
          </table:table-cell>
          <table:covered-table-cell table:number-columns-repeated="8" table:style-name="ce22"/>
          <table:covered-table-cell table:style-name="ce28"/>
          <table:table-cell table:number-columns-repeated="53"/>
        </table:table-row>
        <table:table-row table:style-name="ro21">
          <table:table-cell table:style-name="ce4" office:value-type="string" calcext:value-type="string" table:number-columns-spanned="11" table:number-rows-spanned="1">
            <text:p><text:span text:style-name="T31">If Reverse Osmosis (RO) or Distilled Water is the brewer's primary water source, then you must input appropriate ion concentrations on the </text:span><text:span text:style-name="T32">Water Report Input </text:span><text:span text:style-name="T33">sheet so that the </text:span><text:span text:style-name="T34">Sparge Acidification</text:span><text:span text:style-name="T35"> calculations are correct. The water adjustments can then be properly entered to create the desired water profile. In the </text:span><text:span text:style-name="T36">Supporter's version</text:span><text:span text:style-name="T37"> of </text:span><text:span text:style-name="T34">Bru'n Water</text:span><text:span text:style-name="T37">, this task is easily accomplished by setting the Dilution Water setting to either RO or Distilled and setting the sparging and mashing Dilution values to 100%.</text:span></text:p>
          </table:table-cell>
          <table:covered-table-cell table:number-columns-repeated="9" table:style-name="ce22"/>
          <table:covered-table-cell table:style-name="ce28"/>
          <table:table-cell table:number-columns-repeated="53"/>
        </table:table-row>
        <table:table-row table:style-name="ro22">
          <table:table-cell table:style-name="ce4" office:value-type="string" calcext:value-type="string" table:number-columns-spanned="11" table:number-rows-spanned="1">
            <text:p>This program is unique in that it enables the evaluation of both brewing water alkalinity and mash acidity to more closely estimate and assess the mash water adjustments needed. <text:s/>The mash acidity is calculated from the actual grain bill used for each brewing session. <text:s text:c="2"/></text:p>
          </table:table-cell>
          <table:covered-table-cell table:number-columns-repeated="9" table:style-name="ce22"/>
          <table:covered-table-cell table:style-name="ce28"/>
          <table:table-cell table:number-columns-repeated="53"/>
        </table:table-row>
        <table:table-row table:style-name="ro23">
          <table:table-cell table:style-name="ce4" office:value-type="string" calcext:value-type="string" table:number-columns-spanned="11" table:number-rows-spanned="1">
            <text:p><text:span text:style-name="T38">The program is set up with color-coded cells to aid and direct the brewer.  </text:span><text:span text:style-name="T39">Blue</text:span><text:span text:style-name="T40"> colored cells accept brewer input. </text:span><text:span text:style-name="T41"> </text:span><text:span text:style-name="T42">Yellow</text:span><text:span text:style-name="T43"> colored cells present calculated data and results.  </text:span><text:span text:style-name="T44">Pink</text:span><text:span text:style-name="T45"> cells contain drop-down selection boxes. Many cells within each sheet contain informational comments that help the brewer understand the inputs and results.  Cells with comments have a small </text:span><text:span text:style-name="T46">red</text:span><text:span text:style-name="T47"> </text:span><text:span text:style-name="T48">mark</text:span><text:span text:style-name="T49"> in their right upper corner.  Hover the cursor over cells to see the informational comments.  When using Excel to run Bru'n Water, some cells will change their color to </text:span><text:span text:style-name="T50">Green</text:span><text:span text:style-name="T51"> when inputs are within recommended tolerance and some cells will turn </text:span><text:span text:style-name="T52">Red</text:span><text:span text:style-name="T45"> if potentially incorrect or problematic input or result is provided.  </text:span><text:span text:style-name="T53">If the sheet does not show comments or red corner marks, select the REVIEW tab in the Excel program menu and click the SHOW ALL COMMENTS </text:span><text:span text:style-name="T45">button twice.</text:span></text:p>
          </table:table-cell>
          <table:covered-table-cell table:number-columns-repeated="9" table:style-name="ce22"/>
          <table:covered-table-cell table:style-name="ce28"/>
          <table:table-cell table:number-columns-repeated="53"/>
        </table:table-row>
        <table:table-row table:style-name="ro24">
          <table:table-cell table:style-name="ce4" office:value-type="string" calcext:value-type="string" table:number-columns-spanned="11" table:number-rows-spanned="1">
            <text:p><text:span text:style-name="T5">This program </text:span><text:span text:style-name="T54">does not</text:span><text:span text:style-name="T7"> use </text:span><text:span text:style-name="T6">Macros</text:span><text:span text:style-name="T7"> to operate effectively. There should be no warnings or notifications for Macros when operating Bru'n Water.</text:span></text:p>
          </table:table-cell>
          <table:covered-table-cell table:number-columns-repeated="9" table:style-name="ce22"/>
          <table:covered-table-cell table:style-name="ce28"/>
          <table:table-cell table:number-columns-repeated="53"/>
        </table:table-row>
        <table:table-row table:style-name="ro25">
          <table:table-cell table:style-name="ce4" office:value-type="string" calcext:value-type="string" table:number-columns-spanned="11" table:number-rows-spanned="1">
            <text:p>When opening the program for the first time, the zoom on each of the sheets is set low (small) so that most users can see the full extent of the working area when they open the program. <text:s/>Increase the zoom setting on each sheet so that each sheet is enlarged and visible on your monitor. <text:s/>When the program is saved, your preferred zoom settings on each sheet will be saved. <text:s/>If text in some cells does not appear correctly, increasing the zoom may improve the appearance.</text:p>
          </table:table-cell>
          <table:covered-table-cell table:number-columns-repeated="9" table:style-name="ce22"/>
          <table:covered-table-cell table:style-name="ce28"/>
          <table:table-cell table:number-columns-repeated="53"/>
        </table:table-row>
        <table:table-row table:style-name="ro26">
          <table:table-cell table:style-name="ce5" office:value-type="string" calcext:value-type="string" table:number-columns-spanned="11" table:number-rows-spanned="1">
            <text:p><text:span text:style-name="T8">The </text:span><text:span text:style-name="T9">minimum water information</text:span><text:span text:style-name="T10"> needed to properly use </text:span><text:span text:style-name="T11">Bru'n Water</text:span><text:span text:style-name="T12"> includes the following:  </text:span><text:span text:style-name="T13">Calcium, Magnesium, Sodium, Alkalinity or Bicarbonate, Sulfate, and Chloride </text:span><text:span text:style-name="T14">concentrations.  These are the most important components to brewing and they are known as </text:span><text:span text:style-name="T9">Secondary Water Quality</text:span><text:span text:style-name="T10"> parameters or </text:span><text:span text:style-name="T15">Inorganic</text:span><text:span text:style-name="T10"> parameters in the water supply profession.  </text:span></text:p>
            <text:p/>
            <text:p><text:span text:style-name="T5">If the water pH is not known, it can generally be estimated as 8.0 without much error.  If you obtain water from a municipal water supply, you may be able to obtain this information from the water company's </text:span><text:span text:style-name="T54">water quality testing report</text:span><text:span text:style-name="T7">.  If that information is not readily available or if the water is from a private source, you may need to have the water tested for those parameters.  A suite of tests such as the </text:span><text:span text:style-name="T6">Household Mineral Test </text:span><text:span text:style-name="T7">from Ward Labs (wardlab.com) is suitable. ( Sodium, Calcium, Magnesium, Potassium, Carbonate, Bicarbonate, Chloride, Sulfate, Nitrate, pH, Total Hardness, and Total Alkalinity).  Ward Labs is easily accessible to US brewers.  </text:span></text:p>
            <text:p/>
            <text:p><text:span text:style-name="T55">Brewers in other countries may find a suitable water quality testing laboratory locally.  UK brewers may find Murphy (murphyhomebrew.com) useful excepting that they do not report the water's sodium content.  If only the sodium content is missing from a report, it may be possible to assume that the sodium content is at a level that produces a balanced cation and anion total. Typically, only a small water sample 4 to 8 oz (100 to 200 ml) is required for the testing.  </text:span></text:p>
          </table:table-cell>
          <table:covered-table-cell table:number-columns-repeated="9" table:style-name="ce20"/>
          <table:covered-table-cell table:style-name="ce29"/>
          <table:table-cell table:number-columns-repeated="53"/>
        </table:table-row>
        <table:table-row table:style-name="ro14">
          <table:table-cell table:style-name="ce11" office:value-type="string" calcext:value-type="string" table:number-columns-spanned="11" table:number-rows-spanned="1">
            <text:p>Measurements</text:p>
          </table:table-cell>
          <table:covered-table-cell table:number-columns-repeated="9"/>
          <table:covered-table-cell table:style-name="ce28"/>
          <table:table-cell table:number-columns-repeated="53"/>
        </table:table-row>
        <table:table-row table:style-name="ro27">
          <table:table-cell table:style-name="ce4" office:value-type="string" calcext:value-type="string" table:number-columns-spanned="11" table:number-rows-spanned="1">
            <text:p><text:span text:style-name="T56">Mineral and acid additions must be measured and added accurately to achieve good brewing results.  Homebrewers should obtain a </text:span><text:span text:style-name="T57">scale with an accuracy of at least 0.1 grams</text:span><text:span text:style-name="T58"> to more accurately measure mineral and acid additions for typical homebrew sized batches.  Craftbrewers brewing larger batches should have a scale with an accuracy of at least 1 gram to accurately measure their additions.  Scales may be mechanical or digital, but their resolution should meet the recommendations above.  An internet search for "</text:span><text:span text:style-name="T59">digital scale 0.1"</text:span><text:span text:style-name="T60"> should reveal there are scales available for under 30 USD.  A scale that can weigh at least 500 grams is recommended so the scale can be used for multiple uses including weighing hop additions.  Higher scale capacity typically increases the cost of the scale, but the durability may also be improved.       </text:span></text:p>
          </table:table-cell>
          <table:covered-table-cell table:number-columns-repeated="9" table:style-name="ce22"/>
          <table:covered-table-cell table:style-name="ce28"/>
          <table:table-cell table:number-columns-repeated="53"/>
        </table:table-row>
        <table:table-row table:style-name="ro28">
          <table:table-cell table:style-name="ce4" office:value-type="string" calcext:value-type="string" table:number-columns-spanned="11" table:number-rows-spanned="1">
            <text:p>Liquid acid additions should also be measured accurately. <text:s/>An inexpensive measurement option for typical homebrew sized batches is to obtain and use a graduated medicine dropper from a drug store. <text:s/>A craftbrewer could consider obtaining a graduated cylinder or pipette for larger acid additions. <text:s text:c="2"/></text:p>
          </table:table-cell>
          <table:covered-table-cell table:number-columns-repeated="9" table:style-name="ce22"/>
          <table:covered-table-cell table:style-name="ce28"/>
          <table:table-cell table:number-columns-repeated="53"/>
        </table:table-row>
        <table:table-row table:style-name="ro29">
          <table:table-cell table:style-name="ce4" office:value-type="string" calcext:value-type="string" table:number-columns-spanned="11" table:number-rows-spanned="1">
            <text:p><text:span text:style-name="T61">Some municipal water supplies get their water from several sources and the ionic content of the water may vary over time.  That may require additional testing or analysis to ascertain.  Contact the water utility to find out the water source variability.  Water test kits may be used to provide the brewer with a quick assessment of the primary water quality parameters and are discussed below.  </text:span><text:span text:style-name="T62">Water test kits are recommended if the source and/or quality of the water supply varies.</text:span></text:p>
          </table:table-cell>
          <table:covered-table-cell table:number-columns-repeated="9" table:style-name="ce22"/>
          <table:covered-table-cell table:style-name="ce28"/>
          <table:table-cell table:number-columns-repeated="53"/>
        </table:table-row>
        <table:table-row table:style-name="ro30">
          <table:table-cell table:style-name="ce4" office:value-type="string" calcext:value-type="string" table:number-columns-spanned="11" table:number-rows-spanned="1">
            <text:p><text:span text:style-name="T63">Aquarium test kits</text:span><text:span text:style-name="T7"> can provide reasonably accurate assessment of the primary brewing water quality parameters of calcium content (or hardness) and alkalinity (which is also termed 'carbonate hardness').  Aquarium test kits from manufacturers such as Aquarium Pharaceuticals, Elos, Salifert, and Red Sea are available and can determine the concentration of these components.   If better accuracy is desired, water testing kits from suppliers such as Hach and Lamotte are suggested.  The hardness and alkalinity concentrations are the primary components that influence mash pH.  The calcium kits may have names such as Calcium Test or General Hardness.  The Alkalinity kits may have names such as Alkalinity/pH Test or Carbonate Hardness.   Search the web for '</text:span><text:span text:style-name="T6">Aquarium Test Kits</text:span><text:span text:style-name="T7">'.    Colorimetric kits that you add drops to are recommended since they are generally more sensitive than kits that use Test Strips.</text:span></text:p>
          </table:table-cell>
          <table:covered-table-cell table:number-columns-repeated="9" table:style-name="ce22"/>
          <table:covered-table-cell table:style-name="ce28"/>
          <table:table-cell table:number-columns-repeated="53"/>
        </table:table-row>
        <table:table-row table:style-name="ro31">
          <table:table-cell table:style-name="ce4" office:value-type="string" calcext:value-type="string" table:number-columns-spanned="11" table:number-rows-spanned="1">
            <text:p><text:span text:style-name="T64">Aquarium test kits may report their results in terms of German degrees of Hardness, American Grains per Gallon, milliequivalents per liter, milligrams per liter, or parts per million.  Results must converted to milligrams per liter (mg/L) or parts per million (ppm) for use in </text:span><text:span text:style-name="T65">Bru'n Water</text:span><text:span text:style-name="T66">.  Note that ppm and mg/L are generally equivalent.  Conversion factors are provided below and some are included in the </text:span><text:span text:style-name="T67">Conversion Calculator </text:span><text:span text:style-name="T68">on the </text:span><text:span text:style-name="T67">Water Report Input</text:span><text:span text:style-name="T68"> sheet.  </text:span></text:p>
          </table:table-cell>
          <table:covered-table-cell table:number-columns-repeated="9" table:style-name="ce22"/>
          <table:covered-table-cell table:style-name="ce28"/>
          <table:table-cell table:number-columns-repeated="53"/>
        </table:table-row>
        <table:table-row table:style-name="ro32">
          <table:table-cell table:style-name="ce4" office:value-type="string" calcext:value-type="string" table:number-columns-spanned="11" table:number-rows-spanned="1">
            <text:p><text:span text:style-name="T2">          1 German degree Hardness = 17.85 ppm as CaCO</text:span><text:span text:style-name="T69">3</text:span><text:span text:style-name="T70"> = 7.14 ppm Ca</text:span></text:p>
            <text:p><text:span text:style-name="T71">          1 German degree Carbonate Hardness = 17.85 ppm Alkalinity as CaCO</text:span><text:span text:style-name="T72">3</text:span><text:span text:style-name="T73"> = 21.8 ppm HCO</text:span><text:span text:style-name="T72">3</text:span><text:span text:style-name="T73">   </text:span></text:p>
            <text:p><text:span text:style-name="T2">          1 American degree Hardness = 1 grain per gallon = 17.1 ppm as CaCO</text:span><text:span text:style-name="T69">3</text:span><text:span text:style-name="T70"> = 6.86 ppm Ca </text:span></text:p>
            <text:p><text:span text:style-name="T74">          1 American degree Alkalinity = 1 grain per gallon = 17.1 ppm as CaCO</text:span><text:span text:style-name="T75">3</text:span><text:span text:style-name="T76"> = 20.8 ppm HCO</text:span><text:span text:style-name="T75">3</text:span></text:p>
            <text:p><text:span text:style-name="T2">          1 mEq/L Hardness = 50 ppm Hardness as CaCO</text:span><text:span text:style-name="T69">3</text:span><text:span text:style-name="T70"> = 20 ppm Ca </text:span></text:p>
            <text:p><text:span text:style-name="T74">          1 mEq/L Alkalinity = 50 ppm Alkalinity as CaCO</text:span><text:span text:style-name="T75">3</text:span><text:span text:style-name="T76"> = 61 ppm HCO</text:span><text:span text:style-name="T75">3  </text:span></text:p>
            <text:p><text:span text:style-name="T77">     </text:span></text:p>
          </table:table-cell>
          <table:covered-table-cell table:number-columns-repeated="9" table:style-name="ce22"/>
          <table:covered-table-cell table:style-name="ce28"/>
          <table:table-cell table:number-columns-repeated="53"/>
        </table:table-row>
        <table:table-row table:style-name="ro33">
          <table:table-cell table:style-name="ce6" office:value-type="string" calcext:value-type="string" table:number-columns-spanned="11" table:number-rows-spanned="1">
            <text:p>Water Report Input</text:p>
          </table:table-cell>
          <table:covered-table-cell table:number-columns-repeated="9" table:style-name="ce23"/>
          <table:covered-table-cell table:style-name="ce30"/>
          <table:table-cell table:number-columns-repeated="53"/>
        </table:table-row>
        <table:table-row table:style-name="ro34">
          <table:table-cell table:style-name="ce4" office:value-type="string" calcext:value-type="string" table:number-columns-spanned="11" table:number-rows-spanned="1">
            <text:p><text:span text:style-name="T78">            Water testing results are entered on the </text:span><text:span text:style-name="T79">Water Report Input</text:span><text:span text:style-name="T80"> sheet.  The concentrations for each ion are entered in the </text:span><text:span text:style-name="T81">blue cells</text:span><text:span text:style-name="T82">.  </text:span><text:span text:style-name="T83">Yellow cells</text:span><text:span text:style-name="T84"> display calculated results.  Water reports typically present the ion concentrations as milligrams per liter (mg/L) or parts per million (ppm).  These units are roughly equivalent and are used interchangeably.  This program includes helpful pop-up informational comments in some cells.  Cells with a</text:span><text:span text:style-name="T85"> red mark</text:span><text:span text:style-name="T86"> in the upper right cell corner will display the comment when the mouse cursor is hovered over that cell.   </text:span><text:span text:style-name="T87">If the sheet does not show comments or red corner marks, select the REVIEW tab in the Excel program menu and click the SHOW ALL COMMENTS button twice.  This should coax the software to display the comments.</text:span></text:p>
          </table:table-cell>
          <table:covered-table-cell table:number-columns-repeated="9" table:style-name="ce22"/>
          <table:covered-table-cell table:style-name="ce28"/>
          <table:table-cell table:number-columns-repeated="53"/>
        </table:table-row>
        <table:table-row table:style-name="ro35">
          <table:table-cell table:style-name="ce4" office:value-type="string" calcext:value-type="string" table:number-columns-spanned="11" table:number-rows-spanned="1">
            <text:p><text:span text:style-name="T88">Select the volume units used in the brewery for</text:span><text:span text:style-name="T89"> Bru'n Water</text:span><text:span text:style-name="T90">.  The </text:span><text:span text:style-name="T91">Pink</text:span><text:span text:style-name="T92"> drop-down box is used to select the volume units used throughout the program.  Both U.S. and S.I. units are available in homebrewing sizes. (Gallons and Barrels, or Liters and Hectoliters). Note: Barrels and Hectoliters are available in the Supporter's version of </text:span><text:span text:style-name="T93">Bru'n Water</text:span><text:span text:style-name="T94">.</text:span></text:p>
          </table:table-cell>
          <table:covered-table-cell table:number-columns-repeated="9" table:style-name="ce22"/>
          <table:covered-table-cell table:style-name="ce28"/>
          <table:table-cell table:number-columns-repeated="53"/>
        </table:table-row>
        <table:table-row table:style-name="ro36">
          <table:table-cell table:style-name="ce4" office:value-type="string" calcext:value-type="string" table:number-columns-spanned="11" table:number-rows-spanned="1">
            <text:p><text:span text:style-name="T95">If the brewer's water report does not include information on minor ions such as potassium, fluoride, iron, nitrate, or nitrite, </text:span><text:span text:style-name="T96">enter Zero</text:span><text:span text:style-name="T97"> for those concentrations.  The concentration of these ions is typically low and should only produce a minor error in the cation/anion difference if they are entered as </text:span><text:span text:style-name="T98">Zero</text:span><text:span text:style-name="T99">.   In the case of Murphy's water reports which don't report sodium, input all the other reported ions (</text:span><text:span text:style-name="T98">be sure to convert the Alkalinity value to mg/L of HCO</text:span><text:span text:style-name="T100">3</text:span><text:span text:style-name="T101">) into the </text:span><text:span text:style-name="T102">Water Report Input </text:span><text:span text:style-name="T103">area and input increasing sodium concentrations until the cation and anions are balanced.  That can serve as an estimate of the water's sodium content.</text:span></text:p>
          </table:table-cell>
          <table:covered-table-cell table:number-columns-repeated="9" table:style-name="ce22"/>
          <table:covered-table-cell table:style-name="ce28"/>
          <table:table-cell table:number-columns-repeated="53"/>
        </table:table-row>
        <table:table-row table:style-name="ro28">
          <table:table-cell table:style-name="ce4" office:value-type="string" calcext:value-type="string" table:number-columns-spanned="11" table:number-rows-spanned="1">
            <text:p><text:span text:style-name="T64">Metallic taste can be discerned in water by most people when the </text:span><text:span text:style-name="T65">iron concentration exceeds 0.3 ppm</text:span><text:span text:style-name="T66"> or when </text:span><text:span text:style-name="T67">manganese</text:span><text:span text:style-name="T68"> </text:span><text:span text:style-name="T67">concentration exceeds 0.1 ppm</text:span><text:span text:style-name="T68">. When metallic tastes are detected in beer or water, testing for these ions is recommended.  Special water treatment may be required if these ions exceed the taste thresholds indicated above.   </text:span></text:p>
          </table:table-cell>
          <table:covered-table-cell table:number-columns-repeated="9" table:style-name="ce22"/>
          <table:covered-table-cell table:style-name="ce28"/>
          <table:table-cell table:number-columns-repeated="53"/>
        </table:table-row>
        <table:table-row table:style-name="ro37">
          <table:table-cell table:style-name="ce4" office:value-type="string" calcext:value-type="string" table:number-columns-spanned="11" table:number-rows-spanned="1">
            <text:p><text:span text:style-name="T2">Water testing reports can contain testing and reporting errors.  Therefore, a review of the ionic balance between the positively-charged ions (Cations) and negatively-charged ions (Anions) is helpful.  The </text:span><text:span text:style-name="T3">Water Report Input</text:span><text:span text:style-name="T4"> sheet includes an Ion Balance calculation that warns you when the cation and anion totals are more than 0.5 meq/L apart (they should be equal). There can be some difference in the totals if there were errors in the testing or reporting or if there are other ions in the water that were not reported.  If no ion balance warning is displayed, the water report inputs should be close enough to operate the program.</text:span></text:p>
          </table:table-cell>
          <table:covered-table-cell table:number-columns-repeated="9" table:style-name="ce22"/>
          <table:covered-table-cell table:style-name="ce28"/>
          <table:table-cell table:number-columns-repeated="53"/>
        </table:table-row>
        <table:table-row table:style-name="ro38">
          <table:table-cell table:style-name="ce4" office:value-type="string" calcext:value-type="string" table:number-columns-spanned="11" table:number-rows-spanned="1">
            <text:p><text:span text:style-name="T31">The ion concentrations that were entered on the </text:span><text:span text:style-name="T32">Water Report Input</text:span><text:span text:style-name="T33"> sheet are automatically entered in the </text:span><text:span text:style-name="T34">Water Adjustment</text:span><text:span text:style-name="T35"> sheet.  If the water source is fairly stable, the brewer may not need to adjust the </text:span><text:span text:style-name="T36">Water Report Input</text:span><text:span text:style-name="T37"> page in the future.  Saving the program with those values on the </text:span><text:span text:style-name="T34">Water Report Input</text:span><text:span text:style-name="T37"> sheet will speed the future use of the program.  </text:span></text:p>
          </table:table-cell>
          <table:covered-table-cell table:number-columns-repeated="9" table:style-name="ce22"/>
          <table:covered-table-cell table:style-name="ce28"/>
          <table:table-cell table:number-columns-repeated="53"/>
        </table:table-row>
        <table:table-row table:style-name="ro39">
          <table:table-cell table:style-name="ce4" office:value-type="string" calcext:value-type="string" table:number-columns-spanned="11" table:number-rows-spanned="1">
            <text:p><text:span text:style-name="T104">Some laboratory test reports provide information on </text:span><text:span text:style-name="T105">Total Dissolved Solids</text:span><text:span text:style-name="T106"> (</text:span><text:span text:style-name="T107">TDS</text:span><text:span text:style-name="T106">).  The </text:span><text:span text:style-name="T107">Water Report Input</text:span><text:span text:style-name="T108"> sheet shows the </text:span><text:span text:style-name="T109">TDS </text:span><text:span text:style-name="T108">calculated from the input water parameters for comparison to the laboratory test report.  This comparison may be useful in finding errors in the water report or inputs.  In most cases, the </text:span><text:span text:style-name="T109">TDS</text:span><text:span text:style-name="T106"> value calculated on the </text:span><text:span text:style-name="T109">Water Report Input</text:span><text:span text:style-name="T106"> sheet will be a little lower than the value reported in a lab test report since the water report may include more ion species in their calculation.  </text:span></text:p>
            <text:p/>
            <text:p><text:span text:style-name="T110">WARNING:</text:span><text:span text:style-name="T111"> TDS measurements from a TDS meter are not highly accurate and they may not agree closely with the calculated values. A TDS meter should only be used as a qualitative measurement to determine if the TDS is higher or lower than previous measurements. </text:span></text:p>
          </table:table-cell>
          <table:covered-table-cell table:number-columns-repeated="9" table:style-name="ce22"/>
          <table:covered-table-cell table:style-name="ce28"/>
          <table:table-cell table:number-columns-repeated="53"/>
        </table:table-row>
        <table:table-row table:style-name="ro40">
          <table:table-cell table:style-name="ce5" office:value-type="string" calcext:value-type="string" table:number-columns-spanned="11" table:number-rows-spanned="1">
            <text:p><text:span text:style-name="T2">Proceed to the </text:span><text:span text:style-name="T3">Sparge Acidification</text:span><text:span text:style-name="T4"> sheet to calculate the quantity of acid needed to properly adjust water alkalinity for sparging.</text:span></text:p>
          </table:table-cell>
          <table:covered-table-cell table:number-columns-repeated="9" table:style-name="ce20"/>
          <table:covered-table-cell table:style-name="ce29"/>
          <table:table-cell table:number-columns-repeated="53"/>
        </table:table-row>
        <table:table-row table:style-name="ro41">
          <table:table-cell table:style-name="ce12" office:value-type="string" calcext:value-type="string" table:number-columns-spanned="11" table:number-rows-spanned="1">
            <text:p>**Things to Check when your Water Report does not balance**</text:p>
          </table:table-cell>
          <table:covered-table-cell table:number-columns-repeated="9" table:style-name="ce23"/>
          <table:covered-table-cell table:style-name="ce30"/>
          <table:table-cell table:number-columns-repeated="53"/>
        </table:table-row>
        <table:table-row table:style-name="ro42">
          <table:table-cell table:style-name="ce4" office:value-type="string" calcext:value-type="string" table:number-columns-spanned="11" table:number-rows-spanned="1">
            <text:p>When the reported water testing results do not indicate balanced ion concentrations, there are things the brewer can check to evaluate what the potential errors are. <text:s/></text:p>
          </table:table-cell>
          <table:covered-table-cell table:number-columns-repeated="9" table:style-name="ce22"/>
          <table:covered-table-cell table:style-name="ce28"/>
          <table:table-cell table:number-columns-repeated="53"/>
        </table:table-row>
        <table:table-row table:style-name="ro43">
          <table:table-cell table:style-name="ce4" office:value-type="string" calcext:value-type="string" table:number-columns-spanned="11" table:number-rows-spanned="1">
            <text:p><text:span text:style-name="T112">The first thing to check is the units used to report the ion concentrations.  All units are input into </text:span><text:span text:style-name="T113">Bru'n Water</text:span><text:span text:style-name="T114"> in </text:span><text:span text:style-name="T115">ppm </text:span><text:span text:style-name="T116">or </text:span><text:span text:style-name="T113">mg/L</text:span><text:span text:style-name="T117"> (milligrams per liter) units, but sometimes water reports present some concentrations in parts per billion (</text:span><text:span text:style-name="T113">ppb</text:span><text:span text:style-name="T118">) or </text:span><text:span text:style-name="T119">µg/L</text:span><text:span text:style-name="T120"> (micrograms per liter) units.  If a concentration is reported in the </text:span><text:span text:style-name="T121">ppb</text:span><text:span text:style-name="T117"> or</text:span><text:span text:style-name="T122"> µg/L</text:span><text:span text:style-name="T123"> units, that value must be divided by 1000 to convert it to ppm or mg/L units.  For instance, </text:span><text:span text:style-name="T113">200 ppb</text:span><text:span text:style-name="T123"> is equal to </text:span><text:span text:style-name="T113">0.2 ppm.</text:span></text:p>
          </table:table-cell>
          <table:covered-table-cell table:number-columns-repeated="9" table:style-name="ce22"/>
          <table:covered-table-cell table:style-name="ce28"/>
          <table:table-cell table:number-columns-repeated="53"/>
        </table:table-row>
        <table:table-row table:style-name="ro44">
          <table:table-cell table:style-name="ce4" office:value-type="string" calcext:value-type="string" table:number-columns-spanned="11" table:number-rows-spanned="1">
            <text:p><text:span text:style-name="T124">Some water reports may display ion concentrations in standard units such as (as CaCO</text:span><text:span text:style-name="T125">3</text:span><text:span text:style-name="T124">, as NO</text:span><text:span text:style-name="T125">3</text:span><text:span text:style-name="T124">-N, or as SO</text:span><text:span text:style-name="T125">4</text:span><text:span text:style-name="T124">-S).  In these cases, the reported concentration must be adjusted to the true ion concentration in ppm or mg/L.  Conversion factors for these ions are presented below.   </text:span><text:span text:style-name="T126">A Calculator with these Unit Conversions is provided at the bottom of the Water Report Input sheet.</text:span></text:p>
          </table:table-cell>
          <table:covered-table-cell table:number-columns-repeated="9" table:style-name="ce22"/>
          <table:covered-table-cell table:style-name="ce28"/>
          <table:table-cell table:style-name="ce31"/>
          <table:table-cell table:number-columns-repeated="52"/>
        </table:table-row>
        <table:table-row table:style-name="ro45">
          <table:table-cell table:style-name="ce4" office:value-type="string" calcext:value-type="string" table:number-columns-spanned="11" table:number-rows-spanned="1">
            <text:p><text:span text:style-name="T127">                        </text:span><text:span text:style-name="T128">Ion </text:span><text:span text:style-name="T129">                                                       </text:span><text:span text:style-name="T130">Conversion </text:span></text:p>
            <text:p><text:span text:style-name="T2">                        Calcium as CaCO</text:span><text:span text:style-name="T69">3 </text:span><text:span text:style-name="T70">(ppm):                   multiply by 0.401 to convert to (ppm) Calcium</text:span></text:p>
            <text:p><text:span text:style-name="T2">                        Magnesium as CaCO</text:span><text:span text:style-name="T69">3 </text:span><text:span text:style-name="T70">(ppm):              multiply by 0.243 to convert to (ppm) Magnesium                                                            </text:span></text:p>
            <text:p><text:span text:style-name="T2">                        Bicarbonate as CaCO</text:span><text:span text:style-name="T69">3</text:span><text:span text:style-name="T70">(ppm):              multiply by 1.22 to convert to (ppm) Bicarbonate</text:span></text:p>
            <text:p><text:span text:style-name="T2">                        Carbonate as CaCO</text:span><text:span text:style-name="T69">3</text:span><text:span text:style-name="T70">(ppm):                multiply by 0.60 to convert to (ppm) Carbonate</text:span></text:p>
            <text:p><text:span text:style-name="T2">                        Sulfate as Sulfur (ppm as SO</text:span><text:span text:style-name="T69">4</text:span><text:span text:style-name="T70">-S):        multiply by 3.0 to convert to (ppm) Sulfate</text:span></text:p>
            <text:p><text:span text:style-name="T2">                        Nitrate as Nitrogen (ppm as NO</text:span><text:span text:style-name="T69">3</text:span><text:span text:style-name="T70">-N):     multiply by 4.43 to convert to (ppm) Nitrate</text:span></text:p>
          </table:table-cell>
          <table:covered-table-cell table:number-columns-repeated="9" table:style-name="ce22"/>
          <table:covered-table-cell table:style-name="ce28"/>
          <table:table-cell table:style-name="ce31"/>
          <table:table-cell table:number-columns-repeated="52"/>
        </table:table-row>
        <table:table-row table:style-name="ro16">
          <table:table-cell table:style-name="ce4" office:value-type="string" calcext:value-type="string" table:number-columns-spanned="11" table:number-rows-spanned="1">
            <text:p><text:span text:style-name="T5">If the water report includes Total Alkalinity or Temporary Hardness but does not report the Bicarbonate or Carbonate concentrations, a calculator is included on the </text:span><text:span text:style-name="T54">Water Report Input</text:span><text:span text:style-name="T7"> sheet to estimate those concentrations.  Water pH does influence the relative amount of these ions, so the water pH must be entered.  If the water report does not provide the pH, </text:span><text:span text:style-name="T6">use a typical pH of 8.0</text:span><text:span text:style-name="T7"> for the calculation.</text:span></text:p>
          </table:table-cell>
          <table:covered-table-cell table:number-columns-repeated="9" table:style-name="ce22"/>
          <table:covered-table-cell table:style-name="ce28"/>
          <table:table-cell table:number-columns-repeated="53"/>
        </table:table-row>
        <table:table-row table:style-name="ro46">
          <table:table-cell table:style-name="ce4" office:value-type="string" calcext:value-type="string" table:number-columns-spanned="11" table:number-rows-spanned="1">
            <text:p><text:span text:style-name="T2">If the calculated Alkalinity value does not agree with the Alkalinity presented in the Water Report, adjust the Bicarbonate content on the </text:span><text:span text:style-name="T3">Water Report Input</text:span><text:span text:style-name="T4"> sheet to better match the reported value.  </text:span></text:p>
          </table:table-cell>
          <table:covered-table-cell table:number-columns-repeated="9" table:style-name="ce22"/>
          <table:covered-table-cell table:style-name="ce28"/>
          <table:table-cell table:number-columns-repeated="53"/>
        </table:table-row>
        <table:table-row table:style-name="ro47">
          <table:table-cell table:style-name="ce4" office:value-type="string" calcext:value-type="string" table:number-columns-spanned="11" table:number-rows-spanned="1">
            <text:p><text:span text:style-name="T2">Potassium, iron, nitrate, nitrite, and fluoride are typically present in low concentration, so their values should be small (frequently less than 10 ppm).  Verify if they were reported in parts per billion (ppb) units if their concentration values are significantly greater than 10.  Use the conversion tool in </text:span><text:span text:style-name="T3">Bru'n Water</text:span><text:span text:style-name="T4"> to convert from ppb to ppm.  </text:span></text:p>
          </table:table-cell>
          <table:covered-table-cell table:number-columns-repeated="9" table:style-name="ce22"/>
          <table:covered-table-cell table:style-name="ce28"/>
          <table:table-cell table:number-columns-repeated="53"/>
        </table:table-row>
        <table:table-row table:style-name="ro48">
          <table:table-cell table:style-name="ce4" office:value-type="string" calcext:value-type="string" table:number-columns-spanned="11" table:number-rows-spanned="1">
            <text:p>If any of these corrections produce a better ion balance, then the brewer may elect to use these revised concentrations for their water profile instead of having another water test performed or asking for additional water testing information.</text:p>
          </table:table-cell>
          <table:covered-table-cell table:number-columns-repeated="9" table:style-name="ce22"/>
          <table:covered-table-cell table:style-name="ce28"/>
          <table:table-cell table:number-columns-repeated="53"/>
        </table:table-row>
        <table:table-row table:style-name="ro49">
          <table:table-cell table:style-name="ce6" office:value-type="string" calcext:value-type="string" table:number-columns-spanned="11" table:number-rows-spanned="1">
            <text:p>Sparge Water Acidification</text:p>
          </table:table-cell>
          <table:covered-table-cell table:number-columns-repeated="9" table:style-name="ce23"/>
          <table:covered-table-cell table:style-name="ce30"/>
          <table:table-cell table:number-columns-repeated="53"/>
        </table:table-row>
        <table:table-row table:style-name="ro18">
          <table:table-cell table:style-name="ce4" office:value-type="string" calcext:value-type="string" table:number-columns-spanned="11" table:number-rows-spanned="1">
            <text:p><text:span text:style-name="T2">           </text:span><text:span text:style-name="T3">WARNING!</text:span><text:span text:style-name="T4">  Acids can seriously injure persons.  All acid usage should be made with great care and proper storage, dosing, and protective equipment must be used.  Hydrochloric and Sulfuric Acids produce fumes that will attack eyes, skin, membranes, etc.</text:span></text:p>
          </table:table-cell>
          <table:covered-table-cell table:number-columns-repeated="9" table:style-name="ce22"/>
          <table:covered-table-cell table:style-name="ce28"/>
          <table:table-cell table:number-columns-repeated="53"/>
        </table:table-row>
        <table:table-row table:style-name="ro50">
          <table:table-cell table:style-name="ce4" office:value-type="string" calcext:value-type="string" table:number-columns-spanned="11" table:number-rows-spanned="1">
            <text:p><text:span text:style-name="T5">Acidification of brewing water to reduce alkalinity can be difficult to perform accurately without a good tool.  The adjustment of sparging water alkalinity is important for producing good brewing results.   Proper pH and temperature of sparging water will help reduce tannin extraction.   The </text:span><text:span text:style-name="T54">recommended maximums for pH and temperature</text:span><text:span text:style-name="T7"> of sparging water to reduce tannin and silicate extraction are </text:span><text:span text:style-name="T6">6.0 and 170F (76C)</text:span><text:span text:style-name="T7">, respectively.</text:span></text:p>
          </table:table-cell>
          <table:covered-table-cell table:number-columns-repeated="9" table:style-name="ce22"/>
          <table:covered-table-cell table:style-name="ce28"/>
          <table:table-cell table:number-columns-repeated="53"/>
        </table:table-row>
        <table:table-row table:style-name="ro51">
          <table:table-cell table:style-name="ce4" office:value-type="string" calcext:value-type="string" table:number-columns-spanned="11" table:number-rows-spanned="1">
            <text:p><text:span text:style-name="T5">Hot water added to the mash (Infusions) to raise the temperature of the mash should be considered to be a portion of the brewer's </text:span><text:span text:style-name="T54">Sparging Water </text:span><text:span text:style-name="T7">volume.  Acidify and treat the Water Infusions as recommended for Sparging Water on the </text:span><text:span text:style-name="T6">Sparge Acidification</text:span><text:span text:style-name="T7"> sheet. </text:span></text:p>
          </table:table-cell>
          <table:covered-table-cell table:number-columns-repeated="9" table:style-name="ce22"/>
          <table:covered-table-cell table:style-name="ce28"/>
          <table:table-cell table:number-columns-repeated="53"/>
        </table:table-row>
        <table:table-row table:style-name="ro4">
          <table:table-cell table:style-name="ce4" office:value-type="string" calcext:value-type="string" table:number-columns-spanned="11" table:number-rows-spanned="1">
            <text:p><text:span text:style-name="T2">If only RO or Distilled Water is used for brewing, it may not be necessary to acidify the sparge water since RO and Distilled water already have low alkalinity.  Acidification of sparge water is only needed when water supply alkalinity is moderate or high.  pH targets for acidification only serve as indicators of low alkalinity.  </text:span><text:span text:style-name="T3">Sparging water alkalinity reduction is the real goal of acidification, not pH adjustment</text:span><text:span text:style-name="T4">.  When the starting water alkalinity is less than about 25 ppm, then further acidification should not be necessary.</text:span></text:p>
          </table:table-cell>
          <table:covered-table-cell table:number-columns-repeated="9" table:style-name="ce22"/>
          <table:covered-table-cell table:style-name="ce28"/>
          <table:table-cell table:number-columns-repeated="53"/>
        </table:table-row>
        <table:table-row table:style-name="ro43">
          <table:table-cell table:style-name="ce4" office:value-type="string" calcext:value-type="string" table:number-columns-spanned="11" table:number-rows-spanned="1">
            <text:p><text:span text:style-name="T31">With the alkalinity information for the </text:span><text:span text:style-name="T32">Existing Water</text:span><text:span text:style-name="T33"> entered in the </text:span><text:span text:style-name="T34">Water Report Input </text:span><text:span text:style-name="T35">sheet, the proper amount of acid can be calculated for that water without significant trial and error.   The </text:span><text:span text:style-name="T36">Sparge Acidification</text:span><text:span text:style-name="T37"> sheet is intended only for sparge water adjustments and should not be used for mashing water adjustment.  A separate mashing acidification (alkalinity adjustment) tool is provided at the bottom of the </text:span><text:span text:style-name="T34">Water Adjustment </text:span><text:span text:style-name="T37">sheet for mashing water adjustment.</text:span></text:p>
          </table:table-cell>
          <table:covered-table-cell table:number-columns-repeated="9" table:style-name="ce22"/>
          <table:covered-table-cell table:style-name="ce28"/>
          <table:table-cell table:number-columns-repeated="53"/>
        </table:table-row>
        <table:table-row table:style-name="ro52">
          <table:table-cell table:style-name="ce4" office:value-type="string" calcext:value-type="string" table:number-columns-spanned="11" table:number-rows-spanned="1">
            <text:p><text:span text:style-name="T64">The </text:span><text:span text:style-name="T65">Water Report Input</text:span><text:span text:style-name="T66"> sheet calculates and displays the Alkalinity of the existing water.   That Alkalinity value is transferred to the </text:span><text:span text:style-name="T67">Sparge Acidification</text:span><text:span text:style-name="T68"> sheet.  Enter the Starting Water pH in the </text:span><text:span text:style-name="T67">Sparge Acidification</text:span><text:span text:style-name="T68"> sheet.  The Starting Water pH may be provided in the laboratory report.  </text:span></text:p>
          </table:table-cell>
          <table:covered-table-cell table:number-columns-repeated="9" table:style-name="ce22"/>
          <table:covered-table-cell table:style-name="ce28"/>
          <table:table-cell table:number-columns-repeated="53"/>
        </table:table-row>
        <table:table-row table:style-name="ro12">
          <table:table-cell table:style-name="ce4" office:value-type="string" calcext:value-type="string" table:number-columns-spanned="11" table:number-rows-spanned="1">
            <text:p><text:span text:style-name="T64">If the </text:span><text:span text:style-name="T65">Starting Water pH </text:span><text:span text:style-name="T66">is not known, you can assume a relatively neutral pH between 7 and 8 without much impact to the acidification results.  The </text:span><text:span text:style-name="T67">Target Water pH</text:span><text:span text:style-name="T68"> is also entered here.  Although the pH of sparging water is not the primary concern, it is the parameter used to adjust the sparging water acidification. The </text:span><text:span text:style-name="T67">Target Water pH</text:span><text:span text:style-name="T68"> for sparge water generally ranges between 5.5 and 6.0.  </text:span></text:p>
          </table:table-cell>
          <table:covered-table-cell table:number-columns-repeated="9" table:style-name="ce22"/>
          <table:covered-table-cell table:style-name="ce28"/>
          <table:table-cell table:number-columns-repeated="53"/>
        </table:table-row>
        <table:table-row table:style-name="ro53">
          <table:table-cell table:style-name="ce4" office:value-type="string" calcext:value-type="string" table:number-columns-spanned="11" table:number-rows-spanned="1">
            <text:p><text:span text:style-name="T2">If the brewer will be diluting the existing tap water with distilled or RO water, you will have to manually calculate the resulting alkalinity for your sparging water. That calculation is included in the Supporter's version of </text:span><text:span text:style-name="T3">Bru'n Water</text:span><text:span text:style-name="T4">.  </text:span></text:p>
          </table:table-cell>
          <table:covered-table-cell table:number-columns-repeated="9" table:style-name="ce22"/>
          <table:covered-table-cell table:style-name="ce28"/>
          <table:table-cell table:number-columns-repeated="53"/>
        </table:table-row>
        <table:table-row table:style-name="ro54">
          <table:table-cell table:style-name="ce4" office:value-type="string" calcext:value-type="string" table:number-columns-spanned="11" table:number-rows-spanned="1">
            <text:p><text:span text:style-name="T5">If the </text:span><text:span text:style-name="T54">Existing</text:span><text:span text:style-name="T7"> or </text:span><text:span text:style-name="T6">Diluted Water Alkalinity</text:span><text:span text:style-name="T7"> is less than 25 ppm, then it may not be necessary to acidify the diluted sparging water.  </text:span></text:p>
          </table:table-cell>
          <table:covered-table-cell table:number-columns-repeated="9" table:style-name="ce22"/>
          <table:covered-table-cell table:style-name="ce28"/>
          <table:table-cell table:number-columns-repeated="53"/>
        </table:table-row>
        <table:table-row table:style-name="ro55">
          <table:table-cell table:style-name="ce4" office:value-type="string" calcext:value-type="string" table:number-columns-spanned="11" table:number-rows-spanned="1">
            <text:p><text:span text:style-name="T5">The </text:span><text:span text:style-name="T131">Final Water Alkalinity </text:span><text:span text:style-name="T132">of the sparging water is the criteria used to guide the degree of acidification.  Reduce sparging water alkalinity to </text:span><text:span text:style-name="T6">25 ppm</text:span><text:span text:style-name="T7"> or less (as CaCO</text:span><text:span text:style-name="T133">3</text:span><text:span text:style-name="T134">) for best results.  </text:span></text:p>
          </table:table-cell>
          <table:covered-table-cell table:number-columns-repeated="9" table:style-name="ce22"/>
          <table:covered-table-cell table:style-name="ce28"/>
          <table:table-cell table:number-columns-repeated="53"/>
        </table:table-row>
        <table:table-row table:style-name="ro53">
          <table:table-cell table:style-name="ce4" office:value-type="string" calcext:value-type="string" table:number-columns-spanned="11" table:number-rows-spanned="1">
            <text:p><text:span text:style-name="T5">To adjust the Final Alkalinity, vary the </text:span><text:span text:style-name="T54">Target Water pH</text:span><text:span text:style-name="T7"> value until a desirable low Final Alkalinity result is produced.  The </text:span><text:span text:style-name="T6">Set the Target Water pH</text:span><text:span text:style-name="T7"> value is the primary way to adjust the level of sparging water acidification.</text:span></text:p>
          </table:table-cell>
          <table:covered-table-cell table:number-columns-repeated="9" table:style-name="ce22"/>
          <table:covered-table-cell table:style-name="ce28"/>
          <table:table-cell table:number-columns-repeated="53"/>
        </table:table-row>
        <table:table-row table:style-name="ro21">
          <table:table-cell table:style-name="ce4" office:value-type="string" calcext:value-type="string" table:number-columns-spanned="11" table:number-rows-spanned="1">
            <text:p><text:span text:style-name="T135">Under most conditions, the brewer should</text:span><text:span text:style-name="T136"> leave the Water Volume to Treat set to 1.0</text:span><text:span text:style-name="T137">.  Setting the water volume to either </text:span><text:span text:style-name="T138">One (1)</text:span><text:span text:style-name="T139"> </text:span><text:span text:style-name="T140">Gallon or Liter </text:span><text:span text:style-name="T141">and the program will automatically scale the acid addition to correspond to the sparging water volume that is entered on the </text:span><text:span text:style-name="T142">Water Adjustment </text:span><text:span text:style-name="T137">sheet.  The Water Volume on the </text:span><text:span text:style-name="T142">Sparge Acidificaton</text:span><text:span text:style-name="T137"> sheet can be reset to an actual volume (other than 1) if the brewer wants to perform a quick acid addition calculation instead of working through the rest of the program.  </text:span><text:span text:style-name="T142">For normal brewing usage, set the water volume to 1. </text:span></text:p>
          </table:table-cell>
          <table:covered-table-cell table:number-columns-repeated="9" table:style-name="ce22"/>
          <table:covered-table-cell table:style-name="ce28"/>
          <table:table-cell table:number-columns-repeated="53"/>
        </table:table-row>
        <table:table-row table:style-name="ro56">
          <table:table-cell table:style-name="ce4" office:value-type="string" calcext:value-type="string" table:number-columns-spanned="11" table:number-rows-spanned="1">
            <text:p><text:span text:style-name="T8">Use drop-down box to select the type of acid used for sparging acidification.  The </text:span><text:span text:style-name="T9">Supporter's version</text:span><text:span text:style-name="T10"> of </text:span><text:span text:style-name="T11">Bru'n Water</text:span><text:span text:style-name="T12"> includes the capability to use 2 acids for your sparging water and another 2 acids in your mashing water.  Typical solid and liquid acids used in brewing and wine-making are provided in the selection boxes.  </text:span><text:span text:style-name="T13">If the acid is a liquid,</text:span><text:span text:style-name="T14"> enter the numerical strength reported for the acid and select the strength parameter   (</text:span><text:span text:style-name="T9">% = Percentage, N = Normality, M = Molarity</text:span><text:span text:style-name="T10">).  When entering acid percentage, enter as a whole number.  For example: enter 88% as 88 and not 0.88.  </text:span><text:span text:style-name="T15">When using solid acids, the strength parameter setting is not used and has no effect on the calculations</text:span><text:span text:style-name="T10">.</text:span></text:p>
          </table:table-cell>
          <table:covered-table-cell table:number-columns-repeated="9" table:style-name="ce22"/>
          <table:covered-table-cell table:style-name="ce28"/>
          <table:table-cell/>
          <table:table-cell table:style-name="ce31"/>
          <table:table-cell table:number-columns-repeated="51"/>
        </table:table-row>
        <table:table-row table:style-name="ro38">
          <table:table-cell table:style-name="ce4" office:value-type="string" calcext:value-type="string" table:number-columns-spanned="11" table:number-rows-spanned="1">
            <text:p><text:span text:style-name="T143">The following acids: </text:span><text:span text:style-name="T144">Citric</text:span><text:span text:style-name="T145">, </text:span><text:span text:style-name="T146">Malic</text:span><text:span text:style-name="T147">, and </text:span><text:span text:style-name="T148">Tartaric</text:span><text:span text:style-name="T149"> can only be used in their </text:span><text:span text:style-name="T150">SOLID</text:span><text:span text:style-name="T149"> form in </text:span><text:span text:style-name="T146">Bru'n Water</text:span><text:span text:style-name="T151">. The program is set up to employ those acids </text:span><text:span text:style-name="T150">only in their solid form</text:span><text:span text:style-name="T152">. Do not attempt to calculate additions for those acids in </text:span><text:span text:style-name="T150">Bru'n Water</text:span><text:span text:style-name="T152"> if those acids are in their liquid forms since the result will not be accurate.</text:span></text:p>
          </table:table-cell>
          <table:covered-table-cell table:number-columns-repeated="9" table:style-name="ce22"/>
          <table:covered-table-cell table:style-name="ce28"/>
          <table:table-cell/>
          <table:table-cell table:style-name="ce31"/>
          <table:table-cell table:number-columns-repeated="51"/>
        </table:table-row>
        <table:table-row table:style-name="ro57">
          <table:table-cell table:style-name="ce4" office:value-type="string" calcext:value-type="string" table:number-columns-spanned="11" table:number-rows-spanned="1">
            <text:p><text:span text:style-name="T31">To increase the program's versatility, </text:span><text:span text:style-name="T32">Bru'n Water</text:span><text:span text:style-name="T33"> allows brewers to use </text:span><text:span text:style-name="T34">2 different acids in both the sparging and mashing water treatment (up to 4 different acid additions)</text:span><text:span text:style-name="T35">. This feature may be useful for brewers with high alkalinity water that may incur excessive anion concentrations if only one type of acid is used. Using multiple acids may help keep those anions, such as lactate or sulfate, under their taste thresholds. The brewer must set the acid type and strength on both the </text:span><text:span text:style-name="T36">Sparge Acidification</text:span><text:span text:style-name="T37"> and </text:span><text:span text:style-name="T34">Water Adjustment</text:span><text:span text:style-name="T37"> sheets since each acid entry is separate.</text:span></text:p>
          </table:table-cell>
          <table:covered-table-cell table:number-columns-repeated="9" table:style-name="ce22"/>
          <table:covered-table-cell table:style-name="ce28"/>
          <table:table-cell/>
          <table:table-cell table:style-name="ce31"/>
          <table:table-cell table:number-columns-repeated="51"/>
        </table:table-row>
        <table:table-row table:style-name="ro58">
          <table:table-cell table:style-name="ce4" office:value-type="string" calcext:value-type="string" table:number-columns-spanned="11" table:number-rows-spanned="1">
            <text:p><text:span text:style-name="T153">The </text:span><text:span text:style-name="T154">Outputs</text:span><text:span text:style-name="T155"> section on the </text:span><text:span text:style-name="T154">Sparge Acidification</text:span><text:span text:style-name="T156"> sheet reports the quantity of the specified acid needed to bring the water to the desired pH and alkalinity.  If the specified acid is in solid form, the acid amount is provided as a mass.  If the specified acid is in liquid form, the acid amount is provided as a volume.  A conversion from milliliters (mL) to teaspoons (tsp) is provided for user convenience. If the </text:span><text:span text:style-name="T157">Water Volume </text:span><text:span text:style-name="T158">setting is </text:span><text:span text:style-name="T154">1</text:span><text:span text:style-name="T158">, the acid amounts shown on the </text:span><text:span text:style-name="T159">Sparge Acidificaton</text:span><text:span text:style-name="T160"> sheet are for </text:span><text:span text:style-name="T157">1</text:span><text:span text:style-name="T156"> unit (gallon or liter) of water. The </text:span><text:span text:style-name="T159">total </text:span><text:span text:style-name="T161">acid additions for the </text:span><text:span text:style-name="T154">total</text:span><text:span text:style-name="T162"> sparging water volume are correctly adjusted on the </text:span><text:span text:style-name="T154">Water Adjustment </text:span><text:span text:style-name="T161">and </text:span><text:span text:style-name="T163">Adjustment Summary</text:span><text:span text:style-name="T161"> sheets for the water volumes entered there. </text:span></text:p>
          </table:table-cell>
          <table:covered-table-cell table:number-columns-repeated="9" table:style-name="ce22"/>
          <table:covered-table-cell table:style-name="ce28"/>
          <table:table-cell table:number-columns-repeated="53"/>
        </table:table-row>
        <table:table-row table:style-name="ro59">
          <table:table-cell table:style-name="ce4" office:value-type="string" calcext:value-type="string" table:number-columns-spanned="11" table:number-rows-spanned="1">
            <text:p><text:span text:style-name="T104">The </text:span><text:span text:style-name="T105">Sparge Acidification</text:span><text:span text:style-name="T106"> sheet also reports the concentrations of the anions from those acids. Chloride and sulfate concentrations from hydrochloric and sulfuric acids are reported. The </text:span><text:span text:style-name="T107">Supporter's version</text:span><text:span text:style-name="T106"> of </text:span><text:span text:style-name="T107">Bru'n Water</text:span><text:span text:style-name="T108"> includes CRS acid as a selection.  In addition, the various anions from lactic, acetic, phosphoric, tartaric, malic, and citric acids are also reported. While concentrations of the ions are reported on the </text:span><text:span text:style-name="T109">Sparge Acidification</text:span><text:span text:style-name="T108"> and </text:span><text:span text:style-name="T109">Water Adjustment </text:span><text:span text:style-name="T106">sheets, refer to the </text:span><text:span text:style-name="T109">Adjustment Summary</text:span><text:span text:style-name="T106"> sheet to find what the averaged concentrations of those anions are in the kettle and if they may be over their taste threshold. Anions over their taste threshold may affect beer flavor.  </text:span></text:p>
          </table:table-cell>
          <table:covered-table-cell table:number-columns-repeated="9" table:style-name="ce22"/>
          <table:covered-table-cell table:style-name="ce28"/>
          <table:table-cell table:number-columns-repeated="53"/>
        </table:table-row>
        <table:table-row table:style-name="ro60">
          <table:table-cell table:style-name="ce4" office:value-type="string" calcext:value-type="string" table:number-columns-spanned="11" table:number-rows-spanned="1">
            <text:p><text:span text:style-name="T61">An accurate scale should be used for measuring solid acid additions and an accurate volume measure such as a graduated cylinder, pipette, or graduated dropper should be used for liquid additions.  Care and proper protective gear must be used when working with acid since it can cause serious physical harm.  Measure carefully and use instruments such as graduated pipettes or droppers to transfer acid.  If the brewer has a calibrated pH meter or test strips available, add about 3/4 of the calculated acid amount and mix the water thoroughly prior to checking the pH.  Add the remainder of the acid incrementally while checking the water pH to make sure the pH isn't overshot.  Once the performance of the Existing Water and the acid are confirmed to hit the Target pH, acid additions for future brewing sessions can typically be added all at once. </text:span><text:span text:style-name="T62"> Use caution when using pH strips since there is evidence that the typical strips used by homebrewers measure about 0.2 to 0.3 units LOWER than actually present in the mash.  pH measurement with a calibrated meter is recommended.  If using pH strips, a pH reading that is about 0.2 units BELOW your targeted pH should be considered good.  Plastic (ColorpHast brand) pH strips are preferred since paper pH strips are known to be unsuitable for brewery use. Measurements from a properly calibrated pH meter will always be more accurate than strips. </text:span></text:p>
          </table:table-cell>
          <table:covered-table-cell table:number-columns-repeated="9" table:style-name="ce22"/>
          <table:covered-table-cell table:style-name="ce28"/>
          <table:table-cell table:number-columns-repeated="53"/>
        </table:table-row>
        <table:table-row table:style-name="ro61">
          <table:table-cell table:style-name="ce4" office:value-type="string" calcext:value-type="string" table:number-columns-spanned="11" table:number-rows-spanned="1">
            <text:p><text:span text:style-name="T2">Variation in the water source pH or alkalinity can cause the pH target to be missed.  Heating or boiling water with moderate to high Temporary Hardness will Decarbonate the water.  This reduces the hardness and alkalinity of that water which will result in the overdosing of acid additions.   Since acid additions are calculated based on the unboiled alkalinity, </text:span><text:span text:style-name="T3">Add acid before heating water to avoid decarbonation and dropping water pH too low. </text:span><text:span text:style-name="T4"> The brewer should be aware of this possibility and measure their actual pH's when possible. </text:span></text:p>
          </table:table-cell>
          <table:covered-table-cell table:number-columns-repeated="9" table:style-name="ce22"/>
          <table:covered-table-cell table:style-name="ce28"/>
          <table:table-cell table:number-columns-repeated="53"/>
        </table:table-row>
        <table:table-row table:style-name="ro62">
          <table:table-cell table:style-name="ce4" office:value-type="string" calcext:value-type="string" table:number-columns-spanned="11" table:number-rows-spanned="1">
            <text:p><text:span text:style-name="T5">When Sulfuric acid or CRS acid-blend is used, the concentration of added sulfate ions is provided in the </text:span><text:span text:style-name="T54">Outputs</text:span><text:span text:style-name="T7">.  When Hydrochloric acid or CRS acid-blend is used, the concentration of added chloride ions is provided in the </text:span><text:span text:style-name="T6">Outputs</text:span><text:span text:style-name="T7">.  These ion concentrations are averaged into the overall ionic profile of the finished water profile.     </text:span></text:p>
          </table:table-cell>
          <table:covered-table-cell table:number-columns-repeated="9" table:style-name="ce22"/>
          <table:covered-table-cell table:style-name="ce28"/>
          <table:table-cell table:number-columns-repeated="53"/>
        </table:table-row>
        <table:table-row table:style-name="ro63">
          <table:table-cell table:style-name="ce4" office:value-type="string" calcext:value-type="string" table:number-columns-spanned="11" table:number-rows-spanned="1">
            <text:p><text:span text:style-name="T8">All acids used for acidification in the brewery should be sourced as Food-Grade chemicals.  The brewer should use acids with the designation: </text:span><text:span text:style-name="T9">Food Chemical Codex (FCC) or United States Pharmacopeia (USP)</text:span><text:span text:style-name="T10">.  This is particularly important for the acids since they can easily dissolve and contaminated with heavy metals that are hazardous to health.  Although the highest purity classification for chemicals in the U.S. is </text:span><text:span text:style-name="T11">Reagent ACS </text:span><text:span text:style-name="T12">grade as designated by the American Chemical Society (ACS), it does not guarantee that hazardous or deleterious substances have not been introduced into the acid.  The </text:span><text:span text:style-name="T13">FCC</text:span><text:span text:style-name="T14"> grade should be preferentially sourced for brewery use.  </text:span><text:span text:style-name="T9">Reagent ACS</text:span><text:span text:style-name="T10"> or </text:span><text:span text:style-name="T15">Reagen</text:span><text:span text:style-name="T10">t grade acids might be considered if food-grade acids cannot be obtained.</text:span></text:p>
          </table:table-cell>
          <table:covered-table-cell table:number-columns-repeated="9" table:style-name="ce22"/>
          <table:covered-table-cell table:style-name="ce28"/>
          <table:table-cell table:number-columns-repeated="53"/>
        </table:table-row>
        <table:table-row table:style-name="ro33">
          <table:table-cell table:style-name="ce5" office:value-type="string" calcext:value-type="string" table:number-columns-spanned="11" table:number-rows-spanned="1">
            <text:p><text:span text:style-name="T2">Proceed to the </text:span><text:span text:style-name="T3">Grain Bill Input</text:span><text:span text:style-name="T4"> sheet to enter the grains in the mash.  </text:span></text:p>
          </table:table-cell>
          <table:covered-table-cell table:number-columns-repeated="9" table:style-name="ce20"/>
          <table:covered-table-cell table:style-name="ce29"/>
          <table:table-cell table:number-columns-repeated="53"/>
        </table:table-row>
        <table:table-row table:style-name="ro41">
          <table:table-cell table:style-name="ce6" office:value-type="string" calcext:value-type="string" table:number-columns-spanned="11" table:number-rows-spanned="1">
            <text:p>Grain Bill Input</text:p>
          </table:table-cell>
          <table:covered-table-cell table:number-columns-repeated="9" table:style-name="ce23"/>
          <table:covered-table-cell table:style-name="ce30"/>
          <table:table-cell table:number-columns-repeated="53"/>
        </table:table-row>
        <table:table-row table:style-name="ro64">
          <table:table-cell table:style-name="ce4" office:value-type="string" calcext:value-type="string" table:number-columns-spanned="11" table:number-rows-spanned="1">
            <text:p><text:span text:style-name="T2">The </text:span><text:span text:style-name="T3">Grain Bill Input</text:span><text:span text:style-name="T4"> sheet is where the brewer enters the actual types and quantities of grains used in the mash.</text:span></text:p>
          </table:table-cell>
          <table:covered-table-cell table:number-columns-repeated="9" table:style-name="ce22"/>
          <table:covered-table-cell table:style-name="ce28"/>
          <table:table-cell table:number-columns-repeated="53"/>
        </table:table-row>
        <table:table-row table:style-name="ro65">
          <table:table-cell table:style-name="ce4" office:value-type="string" calcext:value-type="string" table:number-columns-spanned="11" table:number-rows-spanned="1">
            <text:p><text:span text:style-name="T2">In the past, rough correlations between beer color and appropriate Residual Alkalinity (RA) had been proposed.  Due to the non-linear relationships between grain color and its acidity, a good correlation cannot definitively be made between RA and beer color.  This </text:span><text:span text:style-name="T3">Grain Bill Input </text:span><text:span text:style-name="T4">sheet was developed to provide brewers with a more accurate assessment of beer color, alkalinity, and the resulting Net Acidity that drives the mash pH. </text:span></text:p>
          </table:table-cell>
          <table:covered-table-cell table:number-columns-repeated="9" table:style-name="ce22"/>
          <table:covered-table-cell table:style-name="ce28"/>
          <table:table-cell table:number-columns-repeated="53"/>
        </table:table-row>
        <table:table-row table:style-name="ro18">
          <table:table-cell table:style-name="ce4" office:value-type="string" calcext:value-type="string" table:number-columns-spanned="11" table:number-rows-spanned="1">
            <text:p><text:span text:style-name="T164">Grain Color Setting</text:span><text:span text:style-name="T165">: Enter the Color System used for the malts at the bottom of the </text:span><text:span text:style-name="T166">Grain Bill Input</text:span><text:span text:style-name="T167"> sheet.  Click the cell and a </text:span><text:span text:style-name="T168">drop-down box</text:span><text:span text:style-name="T169"> will display </text:span><text:span text:style-name="T168">Lovibond </text:span><text:span text:style-name="T167">or </text:span><text:span text:style-name="T170">EBC</text:span><text:span text:style-name="T167"> selections for grain color systems.</text:span></text:p>
          </table:table-cell>
          <table:covered-table-cell table:number-columns-repeated="9" table:style-name="ce22"/>
          <table:covered-table-cell table:style-name="ce28"/>
          <table:table-cell table:number-columns-repeated="53"/>
        </table:table-row>
        <table:table-row table:style-name="ro66">
          <table:table-cell table:style-name="ce4" office:value-type="string" calcext:value-type="string" table:number-columns-spanned="11" table:number-rows-spanned="1">
            <text:p><text:span text:style-name="T5">Enter each grain used in the mash grist in the spreadsheet.  The grain names can be entered to help identify each component, but the grain names are not necessary.  Enter the </text:span><text:span text:style-name="T54">Mass</text:span><text:span text:style-name="T7"> of each grain in either pounds and ounces or kilograms and grams.  Enter the </text:span><text:span text:style-name="T6">Color</text:span><text:span text:style-name="T7"> of each grain in the proper units.  </text:span></text:p>
          </table:table-cell>
          <table:covered-table-cell table:number-columns-repeated="9" table:style-name="ce22"/>
          <table:covered-table-cell table:style-name="ce28"/>
          <table:table-cell table:number-columns-repeated="53"/>
        </table:table-row>
        <table:table-row table:style-name="ro67">
          <table:table-cell table:style-name="ce4" office:value-type="string" calcext:value-type="string" table:number-columns-spanned="11" table:number-rows-spanned="1">
            <text:p><text:span text:style-name="T171">Grain Type</text:span><text:span text:style-name="T172">: For each grain, use the </text:span><text:span text:style-name="T173">Pink</text:span><text:span text:style-name="T174"> </text:span><text:span text:style-name="T175">drop-down boxes</text:span><text:span text:style-name="T176"> to signify what type of grain is on that line (</text:span><text:span text:style-name="T177">Base Malt, Crystal Malt, Roast Malt, or Acid Malt</text:span><text:span text:style-name="T176">).  This selection is important since each category of malt has differing acidity versus grain color characteristics.  Grains with color greater than about 180 Lovibond should be entered as Roast Malts.  Be aware that these rules are not always true and some grains may be better represented with another grain-type setting. Grains with color lower than 478 EBC (180 Lovibond) should typically be entered as Base or Crystal Malts.  Acid Malt is also referred to as Saurermalt.</text:span></text:p>
          </table:table-cell>
          <table:covered-table-cell table:number-columns-repeated="9" table:style-name="ce22"/>
          <table:covered-table-cell table:style-name="ce28"/>
          <table:table-cell table:number-columns-repeated="53"/>
        </table:table-row>
        <table:table-row table:style-name="ro68">
          <table:table-cell table:style-name="ce4" office:value-type="string" calcext:value-type="string" table:number-columns-spanned="11" table:number-rows-spanned="1">
            <text:p><text:span text:style-name="T178">The color of the cells in the Grain Color column change to help signal the brewer what grain type is selected and if a color rating greater than 478 EBC (180 Lovibond) is used for a non-roasted grain or if a low color rating is used for a roasted grain.  When using Excel to run Bru'n Water, the cells are </text:span><text:span text:style-name="T179">BLUE</text:span><text:span text:style-name="T180"> for Base Grains, </text:span><text:span text:style-name="T181">LIGHT TAN</text:span><text:span text:style-name="T182"> </text:span><text:span text:style-name="T183">for Crystal Malts,</text:span><text:span text:style-name="T184"> DARK TAN</text:span><text:span text:style-name="T185"> for Roast Malts, and </text:span><text:span text:style-name="T186">GREEN</text:span><text:span text:style-name="T187"> for Acid Malt.  The cells turn </text:span><text:span text:style-name="T188">RED</text:span><text:span text:style-name="T189"> when the color rating and roast malt settings do not agree with each other. </text:span></text:p>
          </table:table-cell>
          <table:covered-table-cell table:number-columns-repeated="9" table:style-name="ce22"/>
          <table:covered-table-cell table:style-name="ce28"/>
          <table:table-cell table:number-columns-repeated="53"/>
        </table:table-row>
        <table:table-row table:style-name="ro4">
          <table:table-cell table:style-name="ce13" office:value-type="string" calcext:value-type="string" table:number-columns-spanned="11" table:number-rows-spanned="1">
            <text:p><text:span text:style-name="T63">Special Note:</text:span><text:span text:style-name="T190"> It appears that base malts from </text:span><text:span text:style-name="T191">Rahr</text:span><text:span text:style-name="T7"> </text:span><text:span text:style-name="T6">Malting</text:span><text:span text:style-name="T7"> and other maltsters may be pre-acidified by that company and they may provide more acidity than expected for similar base malts.   Other maltsters may also produce base malts that can be more acidic than typical. This may produce a mash pH lower than expected or calculated by this program.  A work-around for this problem is to set the color rating of the malt about 3 Lovibond higher than reported by the maltster to allow the program to calculate the correct acidity.   </text:span></text:p>
          </table:table-cell>
          <table:covered-table-cell table:number-columns-repeated="9" table:style-name="ce22"/>
          <table:covered-table-cell table:style-name="ce28"/>
          <table:table-cell table:number-columns-repeated="53"/>
        </table:table-row>
        <table:table-row table:style-name="ro69">
          <table:table-cell table:style-name="ce4" office:value-type="string" calcext:value-type="string" table:number-columns-spanned="11" table:number-rows-spanned="1">
            <text:p><text:span text:style-name="T5">After the grain information is entered, the </text:span><text:span text:style-name="T54">Total Weight</text:span><text:span text:style-name="T7"> of the grist and its </text:span><text:span text:style-name="T6">Water to Grist Ratio</text:span><text:span text:style-name="T7"> are provided at the bottom of the sheet.  Compare the calculated total weight to your recipe total to verify the grain entries are correct.   A listing of the relative percentage of each grain in the grist is provided for confirmation with any other brewing recipe software the brewer uses. </text:span></text:p>
          </table:table-cell>
          <table:covered-table-cell table:number-columns-repeated="9" table:style-name="ce22"/>
          <table:covered-table-cell table:style-name="ce28"/>
          <table:table-cell table:number-columns-repeated="53"/>
        </table:table-row>
        <table:table-row table:style-name="ro70">
          <table:table-cell table:style-name="ce4" office:value-type="string" calcext:value-type="string" table:number-columns-spanned="11" table:number-rows-spanned="1">
            <text:p><text:span text:style-name="T192">Water to Grist Ratio</text:span><text:span text:style-name="T4"> is an indication of how thick the mash is.  A thick grist may have a water to grist ratio of around 1 quarts per pound of grain while a thin grist may be up to 2 quarts per pound (2 to 4 L/kg).   The typical range is 1.25 to 1.5 quarts per pound (2.5 to 3 L/kg) although thinner grists may have advantages.  Since the water used for mashing typically contains alkalinity, a thinner grist will have more milliequivalents (mEq) of alkalinity than a thick grist.  More alkalinity consumes more of the grain acidity and the mash pH will likely be higher with a thin mash than a thick mash.  Therefore, it may be necessary to further reduce the water alkalinity to provide appropriate mash pH when the mash is thinned.  </text:span><text:span text:style-name="T3">Adjusting the Water to Grist Ratio can be used to adjust the mash pH.</text:span></text:p>
          </table:table-cell>
          <table:covered-table-cell table:number-columns-repeated="9" table:style-name="ce22"/>
          <table:covered-table-cell table:style-name="ce28"/>
          <table:table-cell table:number-columns-repeated="53"/>
        </table:table-row>
        <table:table-row table:style-name="ro71">
          <table:table-cell table:style-name="ce4" office:value-type="string" calcext:value-type="string" table:number-columns-spanned="11" table:number-rows-spanned="1">
            <text:p><text:span text:style-name="T5">The </text:span><text:span text:style-name="T54">Estimated Color</text:span><text:span text:style-name="T7"> of the beer (in EBC and SRM units) is provided at the bottom of the sheet for comparison with the brewer's brewing calculations or software results (Promash, Beersmith, etc.).  Note that the batch volume (entered on the </text:span><text:span text:style-name="T6">Water Adjustment</text:span><text:span text:style-name="T7"> sheet) affects this calculation and must be the same as the brewing calculation's or software's input in order to see agreement.  The Morey equation is used for the color calculation. </text:span></text:p>
          </table:table-cell>
          <table:covered-table-cell table:number-columns-repeated="9" table:style-name="ce22"/>
          <table:covered-table-cell table:style-name="ce28"/>
          <table:table-cell table:number-columns-repeated="53"/>
        </table:table-row>
        <table:table-row table:style-name="ro31">
          <table:table-cell table:style-name="ce4" office:value-type="string" calcext:value-type="string" table:number-columns-spanned="11" table:number-rows-spanned="1">
            <text:p><text:span text:style-name="T193">Water Source Setting</text:span><text:span text:style-name="T123">: At the bottom of the </text:span><text:span text:style-name="T194">Grain Bill Input</text:span><text:span text:style-name="T117"> sheet, a drop-down box allows the brewer to toggle between the brewer's </text:span><text:span text:style-name="T122">Existing</text:span><text:span text:style-name="T123"> </text:span><text:span text:style-name="T115">Water</text:span><text:span text:style-name="T123"> (unadjusted) and the </text:span><text:span text:style-name="T121">Adjusted</text:span><text:span text:style-name="T120"> </text:span><text:span text:style-name="T119">Water</text:span><text:span text:style-name="T118"> (Finished) calculated on the </text:span><text:span text:style-name="T115">Water  Adjustment</text:span><text:span text:style-name="T116"> sheet.  Typically, the box should be left on the </text:span><text:span text:style-name="T113">Adjusted Water</text:span><text:span text:style-name="T123"> setting, but the brewer can use the other setting to see what the </text:span><text:span text:style-name="T113">mash pH</text:span><text:span text:style-name="T123"> would be without water adjustment.  Select the cell and the drop-down selection box will appear.</text:span></text:p>
          </table:table-cell>
          <table:covered-table-cell table:number-columns-repeated="9" table:style-name="ce22"/>
          <table:covered-table-cell table:style-name="ce28"/>
          <table:table-cell table:number-columns-repeated="53"/>
        </table:table-row>
        <table:table-row table:style-name="ro22">
          <table:table-cell table:style-name="ce4" office:value-type="string" calcext:value-type="string" table:number-columns-spanned="11" table:number-rows-spanned="1">
            <text:p><text:span text:style-name="T5">The </text:span><text:span text:style-name="T54">Supporter's version </text:span><text:span text:style-name="T7">of</text:span><text:span text:style-name="T6"> Bru'n Water </text:span><text:span text:style-name="T7">includes the ability to reserve crystal malts or roasted grains from the mash to improve the mashing pH. That version also includes the ability to adjust the strength setting of Acid Malt so that it better reflects the pH adjustment it creates.  </text:span></text:p>
          </table:table-cell>
          <table:covered-table-cell table:number-columns-repeated="9" table:style-name="ce22"/>
          <table:covered-table-cell table:style-name="ce28"/>
          <table:table-cell table:number-columns-repeated="53"/>
        </table:table-row>
        <table:table-row table:style-name="ro10">
          <table:table-cell table:style-name="ce4" office:value-type="string" calcext:value-type="string" table:number-columns-spanned="11" table:number-rows-spanned="1">
            <text:p><text:span text:style-name="T195">The results of the analyses are summarized as the </text:span><text:span text:style-name="T196">Mash pH. </text:span><text:span text:style-name="T197">If the mash pH falls well outside the preferred range,  </text:span><text:span text:style-name="T196">BE SURE THAT ALL THE CORRECT GRAIN TYPE SELECTIONS ARE MADE FOR EACH GRAIN LISTING.  IT MAKES A BIG DIFFERENCE IN THE RESULTS!  </text:span><text:span text:style-name="T198">When using Excel to run Bru'n Water, the </text:span><text:span text:style-name="T199">Estimated Mash pH</text:span><text:span text:style-name="T197"> cell color changes from </text:span><text:span text:style-name="T200">RED</text:span><text:span text:style-name="T201"> to </text:span><text:span text:style-name="T202">ORANGE</text:span><text:span text:style-name="T203"> to </text:span><text:span text:style-name="T204">GREEN</text:span><text:span text:style-name="T203"> to indicate to the brewer the deviation in the result from the suggested range. </text:span></text:p>
          </table:table-cell>
          <table:covered-table-cell table:number-columns-repeated="9" table:style-name="ce22"/>
          <table:covered-table-cell table:style-name="ce28"/>
          <table:table-cell table:number-columns-repeated="53"/>
        </table:table-row>
        <table:table-row table:style-name="ro72">
          <table:table-cell table:style-name="ce4" office:value-type="string" calcext:value-type="string" table:number-columns-spanned="11" table:number-rows-spanned="1">
            <text:p>Mash pH may be checked about 15 minutes after combining the water and grist. <text:s/>But for more accurate results, the mash pH should be checked at around 30 to 45 minutes after combining the water and grist. <text:s text:c="2"/>A calibrated pH meter is the recommended and preferred measurement device. <text:s/>Always check wort pH in room-temperature samples. <text:s/>Note: pH strips reportedly indicate the mash pH is about 0.2 to 0.3 units lower than actual. <text:s/>Therefore, accept a LOWER pH when measuring with strips. <text:s/></text:p>
          </table:table-cell>
          <table:covered-table-cell table:number-columns-repeated="9" table:style-name="ce22"/>
          <table:covered-table-cell table:style-name="ce28"/>
          <table:table-cell table:number-columns-repeated="53"/>
        </table:table-row>
        <table:table-row table:style-name="ro47">
          <table:table-cell table:style-name="ce4" office:value-type="string" calcext:value-type="string" table:number-columns-spanned="11" table:number-rows-spanned="1">
            <text:p><text:span text:style-name="T2">In a typical mash, the mash pH tends to trend toward a pH of about 5.4. If the pH is initially lower than 5.4, it tends to rise during the course of the mash. If the pH is initially above 5.4, it tends to fall during the mash.  </text:span><text:span text:style-name="T3">Bru'n Water</text:span><text:span text:style-name="T4"> pH prediction tends to present the pH during the early stage of mashing when most enzymatic activity and starch conversion occurs.  </text:span></text:p>
          </table:table-cell>
          <table:covered-table-cell table:number-columns-repeated="9" table:style-name="ce22"/>
          <table:covered-table-cell table:style-name="ce28"/>
          <table:table-cell table:number-columns-repeated="53"/>
        </table:table-row>
        <table:table-row table:style-name="ro73">
          <table:table-cell table:style-name="ce4" office:value-type="string" calcext:value-type="string" table:number-columns-spanned="11" table:number-rows-spanned="1">
            <text:p><text:span text:style-name="T2">The </text:span><text:span text:style-name="T3">Bru'n Water</text:span><text:span text:style-name="T4"> mash pH estimation should only be considered a good approximation.  Variation in water, mineral, and grain quality can easily alter the actual mash pH.  The brewer can expect that the estimated mash pH should typically be within 0.2 units from the room-temperature mash pH reading.  The algorithm used to estimate the mash pH was produced through the evaluation of actual mashs and resulting pH.  That algorithm will be modified based on the results of brewer's reports.  A copy of this program that includes the brewer's input data along with their measured room-temperature mash pH can be sent to the program author for inclusion in this study and refinement.  </text:span></text:p>
          </table:table-cell>
          <table:covered-table-cell table:number-columns-repeated="9" table:style-name="ce22"/>
          <table:covered-table-cell table:style-name="ce28"/>
          <table:table-cell table:number-columns-repeated="53"/>
        </table:table-row>
        <table:table-row table:style-name="ro74">
          <table:table-cell table:style-name="ce4" office:value-type="string" calcext:value-type="string" table:number-columns-spanned="11" table:number-rows-spanned="1">
            <text:p><text:span text:style-name="T55">Characteristics of wort from the mash can be altered slightly through adjustment of the mash pH.  The Extract and Fermentability of the wort can be enhanced by adjusting the wort pH toward the low end of the range.  Conversely, the Body and Mouthfeel of the wort can be enhanced by adjusting the wort pH toward the high end of the range (from Malting and Brewing Science, 1981).  The brewer should consider these results when adjusting the mashing water alkalinity and the resulting mash pH. </text:span></text:p>
          </table:table-cell>
          <table:covered-table-cell table:number-columns-repeated="9" table:style-name="ce22"/>
          <table:covered-table-cell table:style-name="ce28"/>
          <table:table-cell table:number-columns-repeated="53"/>
        </table:table-row>
        <table:table-row table:style-name="ro75">
          <table:table-cell table:style-name="ce4" office:value-type="string" calcext:value-type="string" table:number-columns-spanned="11" table:number-rows-spanned="1">
            <text:p><text:span text:style-name="T110">Remember:</text:span><text:span text:style-name="T111"> </text:span></text:p>
            <text:p><text:span text:style-name="T61">              </text:span><text:span text:style-name="T62">Lower mash pH = higher fermentability and less body</text:span></text:p>
            <text:p><text:span text:style-name="T61">             </text:span><text:span text:style-name="T62"> Higher mash pH = lower fermentability and more body</text:span></text:p>
            <text:p><text:span text:style-name="T55">                                   </text:span></text:p>
            <text:p><text:span text:style-name="T55">Keep mash pH within the desired pH range to help produce your desired result.</text:span></text:p>
          </table:table-cell>
          <table:covered-table-cell table:number-columns-repeated="9" table:style-name="ce22"/>
          <table:covered-table-cell table:style-name="ce28"/>
          <table:table-cell table:number-columns-repeated="53"/>
        </table:table-row>
        <table:table-row table:style-name="ro37">
          <table:table-cell table:style-name="ce4" office:value-type="string" calcext:value-type="string" table:number-columns-spanned="11" table:number-rows-spanned="1">
            <text:p><text:span text:style-name="T61">The overall pH of the pre-boil wort can also alter the flavor perception of the beer.  The pre-boil wort pH is a product of the mash pH and sparging water pH.  </text:span><text:span text:style-name="T62">Lower pre-boil wort pH can produce a sharper and tarter flavor perception.  Lower pre-boil wort pH can also reduce hop and bittering expression in the finished beer.  Higher pre-boil wort pH can produce a rounder and fuller flavor perception.   In the mash, higher pH helps to extract flavor and color from roast malts, but recognize that excessive mash pH (&gt;5.8) may lead to excessive tannin and silicate extraction.</text:span></text:p>
          </table:table-cell>
          <table:covered-table-cell table:number-columns-repeated="9" table:style-name="ce22"/>
          <table:covered-table-cell table:style-name="ce28"/>
          <table:table-cell table:number-columns-repeated="53"/>
        </table:table-row>
        <table:table-row table:style-name="ro22">
          <table:table-cell table:style-name="ce4" office:value-type="string" calcext:value-type="string" table:number-columns-spanned="11" table:number-rows-spanned="1">
            <text:p><text:span text:style-name="T61">To produce the mash pH effects mentioned above, the brewer should generally target a room-temperature pH range of between 5.3 and 5.5.  </text:span><text:span text:style-name="T62">Target a mash pH of 5.3 for the lower mash pH perceptions and target a mash pH of 5.5 for the higher mash pH perceptions.</text:span></text:p>
          </table:table-cell>
          <table:covered-table-cell table:number-columns-repeated="9" table:style-name="ce22"/>
          <table:covered-table-cell table:style-name="ce28"/>
          <table:table-cell table:number-columns-repeated="53"/>
        </table:table-row>
        <table:table-row table:style-name="ro67">
          <table:table-cell table:style-name="ce4" office:value-type="string" calcext:value-type="string" table:number-columns-spanned="11" table:number-rows-spanned="1">
            <text:p><text:span text:style-name="T143">Adjust the acid malt content of the grain bill or revisit the </text:span><text:span text:style-name="T144">Water Adjustment</text:span><text:span text:style-name="T145"> sheet if the </text:span><text:span text:style-name="T146">Predicted Mash pH </text:span><text:span text:style-name="T147">does not fall within the brewer's target pH range. The </text:span><text:span text:style-name="T148">Water Adjustment</text:span><text:span text:style-name="T149"> sheet provides tools to adjust the mash pH.  The mash pH prediction from the </text:span><text:span text:style-name="T150">Grain Bill Input</text:span><text:span text:style-name="T149"> sheet is also shown on the </text:span><text:span text:style-name="T146">Water Adjustment </text:span><text:span text:style-name="T151">sheet so that the brewer can fine-tune the mineral and acid additions without switching to the </text:span><text:span text:style-name="T150">Grain Bill Input</text:span><text:span text:style-name="T152"> sheet.  Be aware that the mash pH predictions are not valid until the mash grist and water volume are properly entered on the </text:span><text:span text:style-name="T150">Grain Bill Input</text:span><text:span text:style-name="T152"> sheet.</text:span></text:p>
          </table:table-cell>
          <table:covered-table-cell table:number-columns-repeated="9" table:style-name="ce22"/>
          <table:covered-table-cell table:style-name="ce28"/>
          <table:table-cell table:number-columns-repeated="53"/>
        </table:table-row>
        <table:table-row table:style-name="ro76">
          <table:table-cell table:style-name="ce4" office:value-type="string" calcext:value-type="string" table:number-columns-spanned="11" table:number-rows-spanned="1">
            <text:p><text:span text:style-name="T2">If more acidity is needed, a recommended alternative is to decrease the water alkalinity by reducing the water's bicarbonate content by adding more acid or reducing any Baking Soda, Chalk, or Pickling Lime additions.  If less acidity is needed, decrease any acid addition or increase the bicarbonate content to the mash water to consume more grain acidity.  If dilution was used to produce the </text:span><text:span text:style-name="T3">Adjusted Water</text:span><text:span text:style-name="T4">, reducing the dilution percentage can typically increase the bicarbonate content since most drinking water has alkalinity.</text:span></text:p>
          </table:table-cell>
          <table:covered-table-cell table:number-columns-repeated="9" table:style-name="ce22"/>
          <table:covered-table-cell table:style-name="ce28"/>
          <table:table-cell table:number-columns-repeated="53"/>
        </table:table-row>
        <table:table-row table:style-name="ro48">
          <table:table-cell table:style-name="ce4" office:value-type="string" calcext:value-type="string" table:number-columns-spanned="11" table:number-rows-spanned="1">
            <text:p>The Mash Acidification analysis provides a better assessment of what mash pH will be produced. <text:s/>This enables the brewer to better adjust their water or mashing conditions to produce the beer characteristics they prefer or require. <text:s/></text:p>
          </table:table-cell>
          <table:covered-table-cell table:number-columns-repeated="9" table:style-name="ce22"/>
          <table:covered-table-cell table:style-name="ce28"/>
          <table:table-cell table:number-columns-repeated="53"/>
        </table:table-row>
        <table:table-row table:style-name="ro77">
          <table:table-cell table:style-name="ce5" office:value-type="string" calcext:value-type="string" table:number-columns-spanned="11" table:number-rows-spanned="1">
            <text:p><text:span text:style-name="T2">Proceed to the </text:span><text:span text:style-name="T3">Water Adjustment </text:span><text:span text:style-name="T4">sheet to calculate the mineral and acid additions to create the desired mashing water profile.  </text:span></text:p>
          </table:table-cell>
          <table:covered-table-cell table:number-columns-repeated="9" table:style-name="ce20"/>
          <table:covered-table-cell table:style-name="ce29"/>
          <table:table-cell table:number-columns-repeated="53"/>
        </table:table-row>
        <table:table-row table:style-name="ro64">
          <table:table-cell table:style-name="ce6" office:value-type="string" calcext:value-type="string" table:number-columns-spanned="11" table:number-rows-spanned="1">
            <text:p>Water Adjustment</text:p>
          </table:table-cell>
          <table:covered-table-cell table:number-columns-repeated="9" table:style-name="ce23"/>
          <table:covered-table-cell table:style-name="ce30"/>
          <table:table-cell table:number-columns-repeated="53"/>
        </table:table-row>
        <table:table-row table:style-name="ro25">
          <table:table-cell table:style-name="ce4" office:value-type="string" calcext:value-type="string" table:number-columns-spanned="11" table:number-rows-spanned="1">
            <text:p><text:span text:style-name="T104">            After entering the Water Report information, water adjustment can be properly estimated for the Existing Water.  The </text:span><text:span text:style-name="T105">Existing Water Profile</text:span><text:span text:style-name="T106"> is automatically entered into the </text:span><text:span text:style-name="T107">Water Adjustment</text:span><text:span text:style-name="T106"> sheet from the </text:span><text:span text:style-name="T107">Water Report Input</text:span><text:span text:style-name="T108"> sheet.  If the </text:span><text:span text:style-name="T109">Existing Water Profile</text:span><text:span text:style-name="T108"> is not shown or is not correct on the </text:span><text:span text:style-name="T109">Water Adjustment</text:span><text:span text:style-name="T106"> sheet, correct the entries on the </text:span><text:span text:style-name="T109">Water Report Input</text:span><text:span text:style-name="T106"> sheet.</text:span></text:p>
          </table:table-cell>
          <table:covered-table-cell table:number-columns-repeated="9" table:style-name="ce22"/>
          <table:covered-table-cell table:style-name="ce28"/>
          <table:table-cell table:number-columns-repeated="53"/>
        </table:table-row>
        <table:table-row table:style-name="ro47">
          <table:table-cell table:style-name="ce4" office:value-type="string" calcext:value-type="string" table:number-columns-spanned="11" table:number-rows-spanned="1">
            <text:p><text:span text:style-name="T31">If the Brewery has a consistent source water quality, its likely that the </text:span><text:span text:style-name="T32">Water Report Input</text:span><text:span text:style-name="T33"> and </text:span><text:span text:style-name="T34">Sparge Acidification</text:span><text:span text:style-name="T35"> sheets will not need to be updated for subsequent brews.  Only the </text:span><text:span text:style-name="T36">Water Adjustment</text:span><text:span text:style-name="T37"> and </text:span><text:span text:style-name="T34">Grain Bill Input</text:span><text:span text:style-name="T37"> sheets will have to be updated for each brew.  </text:span></text:p>
          </table:table-cell>
          <table:covered-table-cell table:number-columns-repeated="9" table:style-name="ce22"/>
          <table:covered-table-cell table:style-name="ce28"/>
          <table:table-cell table:number-columns-repeated="53"/>
        </table:table-row>
        <table:table-row table:style-name="ro78">
          <table:table-cell table:style-name="ce4" office:value-type="string" calcext:value-type="string" table:number-columns-spanned="11" table:number-rows-spanned="1">
            <text:p><text:span text:style-name="T64">A </text:span><text:span text:style-name="T65">Desired Water Profile</text:span><text:span text:style-name="T66"> can be selected in the </text:span><text:span text:style-name="T67">Water Adjustment</text:span><text:span text:style-name="T68"> sheet from either a selection of profiles that generally fit the intended beer style.  The </text:span><text:span text:style-name="T67">Water Adjustment</text:span><text:span text:style-name="T68"> sheet includes typical minerals and acids that can be used to adjust the water ion content.</text:span></text:p>
          </table:table-cell>
          <table:covered-table-cell table:number-columns-repeated="9" table:style-name="ce22"/>
          <table:covered-table-cell table:style-name="ce28"/>
          <table:table-cell table:number-columns-repeated="53"/>
        </table:table-row>
        <table:table-row table:style-name="ro79">
          <table:table-cell table:style-name="ce4" office:value-type="string" calcext:value-type="string" table:number-columns-spanned="11" table:number-rows-spanned="1">
            <text:p><text:span text:style-name="T205">A wide range of target water profiles are available in the </text:span><text:span text:style-name="T206">Pink</text:span><text:span text:style-name="T207"> drop-down selector box to suit a variety of beer styles.  These water profiles have been thoroughly researched and represent accurate and balanced ion concentrations for either the brewing center location or the beer style.  Unfortunately, water profiles previously published in both print and electronic resources have had serious errors in ion content and ionic balance and cannot always be considered accurate or appropriate.  The water profiles presented in this program provide the brewer with the best information available.  </text:span></text:p>
          </table:table-cell>
          <table:covered-table-cell table:number-columns-repeated="9" table:style-name="ce22"/>
          <table:covered-table-cell table:style-name="ce28"/>
          <table:table-cell table:number-columns-repeated="53"/>
        </table:table-row>
        <table:table-row table:style-name="ro70">
          <table:table-cell table:style-name="ce4" office:value-type="string" calcext:value-type="string" table:number-columns-spanned="11" table:number-rows-spanned="1">
            <text:p><text:span text:style-name="T61">Brewers should use caution in the use of historical water profiles.  Although the water profiles are accurate, that does not mean that the brewers in those locations used that water without modification.  For example, brewers performed operations such as Decarbonation by Boiling to reduce hardness and alkalinity and used acid rests and saurermalt (acid malt) or saurergut (soured wort) to reduce high alkalinity.  Profiles with high bicarbonate concentrations are likely to have been treated by those means prior to mashing when light-colored beers were brewed.  </text:span><text:span text:style-name="T62">Brewers should approach these profiles with a focus on the mash pH they produce with their proposed grain bill and be ready to adjust the mashing water alkalinity if the water does not produce a desirable mash pH. </text:span></text:p>
          </table:table-cell>
          <table:covered-table-cell table:number-columns-repeated="9" table:style-name="ce22"/>
          <table:covered-table-cell table:style-name="ce28"/>
          <table:table-cell table:number-columns-repeated="53"/>
        </table:table-row>
        <table:table-row table:style-name="ro80">
          <table:table-cell table:style-name="ce4" office:value-type="string" calcext:value-type="string" table:number-columns-spanned="11" table:number-rows-spanned="1">
            <text:p><text:span text:style-name="T64">Some historical water profiles that are suitable for Decarbonation by Boiling are provided in the water choices with their estimated post-boiling ionic content (for example: </text:span><text:span text:style-name="T65">(Munich boiled)</text:span><text:span text:style-name="T66">).  These profiles may be useful for </text:span><text:span text:style-name="T67">brewing lighter-colored beers</text:span><text:span text:style-name="T68"> that may have been brewed in those cities.  Boiling a water with high Temporary Hardness will reduce the bicarbonate content to between 60 and 80 ppm.  For the purpose of these estimates, the upper end of the bicarbonate range (80 ppm)(indicating less effective decarbonation) was used to estimate the post-boiling water that those historic brewers might have been able to attain.  The decarbonation process causes calcium carbonate to precipitate from the water, reducing the concentrations of both calcium and bicarbonate.  The concentrations of the other water profile ions remain as in the original water profiles.  See the </text:span><text:span text:style-name="T67">Water Knowledge</text:span><text:span text:style-name="T68"> site for more information on Decarbonation. </text:span></text:p>
          </table:table-cell>
          <table:covered-table-cell table:number-columns-repeated="9" table:style-name="ce22"/>
          <table:covered-table-cell table:style-name="ce28"/>
          <table:table-cell table:number-columns-repeated="53"/>
        </table:table-row>
        <table:table-row table:style-name="ro74">
          <table:table-cell table:style-name="ce4" office:value-type="string" calcext:value-type="string" table:number-columns-spanned="11" table:number-rows-spanned="1">
            <text:p><text:span text:style-name="T5">The </text:span><text:span text:style-name="T54">Bru'n Water </text:span><text:span text:style-name="T7">water profiles include recommendations based on the color of the beer to be produced.  These profiles were devised to provide relatively low mineralization while providing minimum recommended calcium concentration and modest levels of magnesium, sodium, chloride, and sulfate.  For the brewer's convenience, a description of the color range for the color descriptors used in the provided water profiles is provided below and on the </text:span><text:span text:style-name="T6">Water Adjustment</text:span><text:span text:style-name="T7"> sheet.  </text:span></text:p>
          </table:table-cell>
          <table:covered-table-cell table:number-columns-repeated="9" table:style-name="ce22"/>
          <table:covered-table-cell table:style-name="ce28"/>
          <table:table-cell table:number-columns-repeated="53"/>
        </table:table-row>
        <table:table-row table:style-name="ro74">
          <table:table-cell table:style-name="ce4" office:value-type="string" calcext:value-type="string" table:number-columns-spanned="11" table:number-rows-spanned="1">
            <text:p><text:span text:style-name="T61">                                                        </text:span><text:span text:style-name="T208">Beer Color Descriptors</text:span></text:p>
            <text:p><text:span text:style-name="T55">                                                       Yellow:              SRM &lt; 6</text:span></text:p>
            <text:p><text:span text:style-name="T55">                                                       Amber:              SRM between 7 and 17</text:span></text:p>
            <text:p><text:span text:style-name="T55">                                                       Brown:              SRM between 18 and 30</text:span></text:p>
            <text:p><text:span text:style-name="T55">                                                       Black:               SRM &gt; 31</text:span></text:p>
          </table:table-cell>
          <table:covered-table-cell table:number-columns-repeated="9" table:style-name="ce22"/>
          <table:covered-table-cell table:style-name="ce28"/>
          <table:table-cell table:number-columns-repeated="53"/>
        </table:table-row>
        <table:table-row table:style-name="ro81">
          <table:table-cell table:style-name="ce4" office:value-type="string" calcext:value-type="string" table:number-columns-spanned="11" table:number-rows-spanned="1">
            <text:p><text:span text:style-name="T5">The brewer should typically start with a water profile that agrees with their intended beer color.  If brewing a lighter colored beer and the brewer wants to use a historic water profile, select the "boiled" version of the historic profile to avoid excessive alkalinity.  Water profiles should be considered approximate.  Variation of the water profile to meet the brewer's taste is acceptable and recommended.   It may be necessary to revise the selected mineral profile if the proposed grain bill and water profile do not produce a desirable mash pH.  </text:span><text:span text:style-name="T54">WHEN THE MASH pH DOES NOT FALL WITHIN A DESIRABLE RANGE, ADJUST THE PROFILE'S ALKALINITY AWAY FROM THE TARGET VALUE</text:span><text:span text:style-name="T7">. In most cases, it is also acceptable to let the calcium content vary from the profile's target value. The only recommendation for calcium content is to have </text:span><text:span text:style-name="T6">at least 40 ppm in the mash</text:span><text:span text:style-name="T7"> to precipitate oxalate. Since the water profiles do not consider what the actual grist used was or what the brewers in that historic brewing location had to do to use their water (acid rest, boiling, etc.), the brewer should rely more on the pH result rather than the ionic content recommended by the water profile.   An appropriate mash pH result is the brewer's primary goal.</text:span></text:p>
          </table:table-cell>
          <table:covered-table-cell table:number-columns-repeated="9" table:style-name="ce22"/>
          <table:covered-table-cell table:style-name="ce28"/>
          <table:table-cell table:number-columns-repeated="53"/>
        </table:table-row>
        <table:table-row table:style-name="ro20">
          <table:table-cell table:style-name="ce4" office:value-type="string" calcext:value-type="string" table:number-columns-spanned="11" table:number-rows-spanned="1">
            <text:p><text:span text:style-name="T63">Entering or Revising Water Profiles</text:span><text:span text:style-name="T7">: Any of the water profiles included in </text:span><text:span text:style-name="T6">Bru'n Water</text:span><text:span text:style-name="T7"> can be altered to fit the brewer's taste. Go to the table at the bottom of the Water Adjustment sheet and revise the existing data and names, as desired. The profiles for Distilled and RO water can also be adjusted as desired.</text:span></text:p>
          </table:table-cell>
          <table:covered-table-cell table:number-columns-repeated="9" table:style-name="ce22"/>
          <table:covered-table-cell table:style-name="ce28"/>
          <table:table-cell table:number-columns-repeated="53"/>
        </table:table-row>
        <table:table-row table:style-name="ro72">
          <table:table-cell table:style-name="ce4" office:value-type="string" calcext:value-type="string" table:number-columns-spanned="11" table:number-rows-spanned="1">
            <text:p><text:span text:style-name="T209">Add Minerals in the </text:span><text:span text:style-name="T210">Water Additions</text:span><text:span text:style-name="T211"> section of the </text:span><text:span text:style-name="T212">Water Adjustment</text:span><text:span text:style-name="T213"> sheet to increase the appropriate ion concentrations.  The </text:span><text:span text:style-name="T214">YELLOW</text:span><text:span text:style-name="T215"> cells in the Mineral Table show which ions each mineral will increase.  For instance, adding Gypsum will add Calcium and Sulfate.  Review the </text:span><text:span text:style-name="T216">Target Water Adjustment</text:span><text:span text:style-name="T217"> and </text:span><text:span text:style-name="T216">Actual Water Adjustment</text:span><text:span text:style-name="T218"> cells for each ion.  If cells in the Target Water Adjustment row are </text:span><text:span text:style-name="T219">RED</text:span><text:span text:style-name="T218">, see the Dilution instructions below.  </text:span></text:p>
          </table:table-cell>
          <table:covered-table-cell table:number-columns-repeated="9" table:style-name="ce22"/>
          <table:covered-table-cell table:style-name="ce28"/>
          <table:table-cell table:number-columns-repeated="53"/>
        </table:table-row>
        <table:table-row table:style-name="ro82">
          <table:table-cell table:style-name="ce4" office:value-type="string" calcext:value-type="string" table:number-columns-spanned="11" table:number-rows-spanned="1">
            <text:p><text:span text:style-name="T220">If the </text:span><text:span text:style-name="T221">Existing Water Profile</text:span><text:span text:style-name="T222"> has ion concentrations that are higher than the </text:span><text:span text:style-name="T221">Desired Water Profile</text:span><text:span text:style-name="T223">, then dilution with distilled water (DI) or reverse osmosis (RO) water can be used to reduce those ion concentrations.  To help identify when ion concentrations in the </text:span><text:span text:style-name="T224">Existing Water Profile</text:span><text:span text:style-name="T222"> are higher than the </text:span><text:span text:style-name="T225">Desired Water Profile</text:span><text:span text:style-name="T226">, cells within the </text:span><text:span text:style-name="T227">Target Water Adjustment</text:span><text:span text:style-name="T228"> line will be colored </text:span><text:span text:style-name="T229">RED</text:span><text:span text:style-name="T230">.  If the difference between the </text:span><text:span text:style-name="T231">Existing</text:span><text:span text:style-name="T232"> and </text:span><text:span text:style-name="T233">Desired</text:span><text:span text:style-name="T232"> ion concentrations are small, the brewer may decide to ignore the need to dilute the existing water to reduce the </text:span><text:span text:style-name="T234">Existing</text:span><text:span text:style-name="T232"> concentrations.  The brewer should avoid adding minerals that increase over-Target ion concentrations.  </text:span></text:p>
          </table:table-cell>
          <table:covered-table-cell table:number-columns-repeated="9" table:style-name="ce22"/>
          <table:covered-table-cell table:style-name="ce28"/>
          <table:table-cell table:number-columns-repeated="53"/>
        </table:table-row>
        <table:table-row table:style-name="ro83">
          <table:table-cell table:style-name="ce4" office:value-type="string" calcext:value-type="string" table:number-columns-spanned="11" table:number-rows-spanned="1">
            <text:p><text:span text:style-name="T235">Dilution: </text:span><text:span text:style-name="T236">If dilution is desired, select the type of dilution water from the drop-down box and dial up the percentage of dilution water added to the existing water until the </text:span><text:span text:style-name="T237">RED</text:span><text:span text:style-name="T238"> </text:span><text:span text:style-name="T239">cells in the </text:span><text:span text:style-name="T240">Target Water Adjustment</text:span><text:span text:style-name="T241"> line return to </text:span><text:span text:style-name="T242">YELLOW</text:span><text:span text:style-name="T241"> color.  Dilution water must have low ionic content in order to be effective. Water such Distilled and RO water are potential resources. Distilled water is typically available in bottles or jugs and it typically contains virtually no ionic content.  RO is produced by specialized apparatus that is available in residential and industrial sizes. Commercial water vending machines such as those in grocery stores typically provide RO water.  RO water does contain low concentrations of ions.  A typical RO water profile is included in </text:span><text:span text:style-name="T243">Bru'n Water</text:span><text:span text:style-name="T241">.  That RO profile can be adjusted to reflect the brewer's RO water quality at the bottom of the water profile table.   </text:span></text:p>
          </table:table-cell>
          <table:covered-table-cell table:number-columns-repeated="9" table:style-name="ce22"/>
          <table:covered-table-cell table:style-name="ce28"/>
          <table:table-cell table:number-columns-repeated="53"/>
        </table:table-row>
        <table:table-row table:style-name="ro84">
          <table:table-cell table:style-name="ce4" office:value-type="string" calcext:value-type="string" table:number-columns-spanned="11" table:number-rows-spanned="1">
            <text:p><text:span text:style-name="T244">If only the bicarbonate (HCO</text:span><text:span text:style-name="T245">3</text:span><text:span text:style-name="T246">) concentration of the water supply is too high and the other ions are not too high, then acidification may be preferred for bicarbonate reduction instead of dilution.  An </text:span><text:span text:style-name="T247">Acid Addition </text:span><text:span text:style-name="T248">calculator is provided at the bottom of the </text:span><text:span text:style-name="T249">Water Additions</text:span><text:span text:style-name="T250"> section that shows the bicarbonate reduction provided by acid addition.  An acid can be selected on the </text:span><text:span text:style-name="T251">Water Adjustment</text:span><text:span text:style-name="T252"> sheet. The acid type, form, and strength parameters are entered on the </text:span><text:span text:style-name="T253">Water Adjustment</text:span><text:span text:style-name="T248"> sheet. The </text:span><text:span text:style-name="T254">Supporter's version</text:span><text:span text:style-name="T255"> of </text:span><text:span text:style-name="T253">Bru'n Water</text:span><text:span text:style-name="T256"> enables you to use 2 different acids in the mash.  The </text:span><text:span text:style-name="T251">Acid Addition</text:span><text:span text:style-name="T250"> calculator indicates the bicarbonate consumed (-HCO</text:span><text:span text:style-name="T257">3</text:span><text:span text:style-name="T258">) by the acid addition.  It also indicates the sulfate added when using Sulfuric Acid or the chloride added when using Hydrochloric Acid.  These ion additions are included in the </text:span><text:span text:style-name="T251">Actual Water Adjustment</text:span><text:span text:style-name="T250">.  </text:span></text:p>
          </table:table-cell>
          <table:covered-table-cell table:number-columns-repeated="9" table:style-name="ce22"/>
          <table:covered-table-cell table:style-name="ce28"/>
          <table:table-cell table:number-columns-repeated="53"/>
        </table:table-row>
        <table:table-row table:style-name="ro85">
          <table:table-cell table:style-name="ce4" office:value-type="string" calcext:value-type="string" table:number-columns-spanned="11" table:number-rows-spanned="1">
            <text:p><text:span text:style-name="T8">The </text:span><text:span text:style-name="T9">Supporter's version</text:span><text:span text:style-name="T10"> of </text:span><text:span text:style-name="T11">Bru'n Water</text:span><text:span text:style-name="T12"> includes reporting on the concentration of acid anions that you add to your water. These can be important since many acid anions add flavor to the beer and can be detrimental at excessive concentrations.</text:span><text:span text:style-name="T13">  </text:span><text:span text:style-name="T14">The concentrations of anions such as </text:span><text:span text:style-name="T9">lactate, phosphate, malate, citrate, tartarate,</text:span><text:span text:style-name="T10"> and </text:span><text:span text:style-name="T15">acetate</text:span><text:span text:style-name="T10"> are calculated and displayed alongside the acid calculations. Text displays alert the brewer if the concentrations are above or below the typical taste thresholds for each ion. If an anion is reported to be above its taste threshold, the brewer may elect to alter the amount of the excessive acid.  </text:span></text:p>
          </table:table-cell>
          <table:covered-table-cell table:number-columns-repeated="9" table:style-name="ce22"/>
          <table:covered-table-cell table:style-name="ce28"/>
          <table:table-cell table:number-columns-repeated="53"/>
        </table:table-row>
        <table:table-row table:style-name="ro86">
          <table:table-cell table:style-name="ce4" office:value-type="string" calcext:value-type="string" table:number-columns-spanned="11" table:number-rows-spanned="1">
            <text:p><text:span text:style-name="T110">Safety</text:span><text:span text:style-name="T111">: Care must be exercised when working with acid since they can cause serious physical harm.  Measure carefully and use instruments such as graduated pipettes or droppers to transfer acid.</text:span></text:p>
          </table:table-cell>
          <table:covered-table-cell table:number-columns-repeated="9" table:style-name="ce22"/>
          <table:covered-table-cell table:style-name="ce28"/>
          <table:table-cell table:number-columns-repeated="53"/>
        </table:table-row>
        <table:table-row table:style-name="ro36">
          <table:table-cell table:style-name="ce4" office:value-type="string" calcext:value-type="string" table:number-columns-spanned="11" table:number-rows-spanned="1">
            <text:p><text:span text:style-name="T259">Water Volumes</text:span><text:span text:style-name="T260">: Enter the water volumes to be used in the brewing and production in the </text:span><text:span text:style-name="T261">BLUE</text:span><text:span text:style-name="T262"> cells at the top of the </text:span><text:span text:style-name="T263">Water Additions</text:span><text:span text:style-name="T264"> area.  Enter the total volume of water that will be added to the mash tun as the </text:span><text:span text:style-name="T265">Mash Water Volume</text:span><text:span text:style-name="T266">.  Enter the total volume of water that will be added for mash out and sparging as the </text:span><text:span text:style-name="T267">Sparge Water Volume</text:span><text:span text:style-name="T264">.  Enter the total finished volume of the batch as the </text:span><text:span text:style-name="T265">Total Batch Volume</text:span><text:span text:style-name="T268">.  The </text:span><text:span text:style-name="T265">Total Batch Volume</text:span><text:span text:style-name="T269"> is only used to estimate the beer color (SRM) on the </text:span><text:span text:style-name="T263">Grain Bill Input </text:span><text:span text:style-name="T269">sheet.  Note that the </text:span><text:span text:style-name="T263">Total Batch Volume</text:span><text:span text:style-name="T269"> will be less than the mash plus sparge volume due to grain adsorption, evaporation, etc.  </text:span></text:p>
          </table:table-cell>
          <table:covered-table-cell table:number-columns-repeated="9" table:style-name="ce22"/>
          <table:covered-table-cell table:style-name="ce28"/>
          <table:table-cell table:number-columns-repeated="53"/>
        </table:table-row>
        <table:table-row table:style-name="ro74">
          <table:table-cell table:style-name="ce4" office:value-type="string" calcext:value-type="string" table:number-columns-spanned="11" table:number-rows-spanned="1">
            <text:p><text:span text:style-name="T270">Estimated Mash pH</text:span><text:span text:style-name="T271"> is provided on both the </text:span><text:span text:style-name="T272">Water Adjustment </text:span><text:span text:style-name="T273">and </text:span><text:span text:style-name="T274">Grain Bill Input</text:span><text:span text:style-name="T275"> sheets to allow the brewer to quickly assess the effect of the water adjustments on the mash.  The estimated pH value is identical on both sheets. This pH estimate is not valid until the grain additions are properly entered on the </text:span><text:span text:style-name="T274">Grain Bill Input</text:span><text:span text:style-name="T276"> sheet.  When using Excel to run Bru'n Water, the color of the pH estimate cell changes color from </text:span><text:span text:style-name="T277">RED</text:span><text:span text:style-name="T278"> to </text:span><text:span text:style-name="T279">ORANGE</text:span><text:span text:style-name="T280"> to </text:span><text:span text:style-name="T281">GREEN</text:span><text:span text:style-name="T280"> to help alert the brewer if their pH result is in range.  </text:span></text:p>
          </table:table-cell>
          <table:covered-table-cell table:number-columns-repeated="9" table:style-name="ce22"/>
          <table:covered-table-cell table:style-name="ce28"/>
          <table:table-cell table:number-columns-repeated="53"/>
        </table:table-row>
        <table:table-row table:style-name="ro66">
          <table:table-cell table:style-name="ce4" office:value-type="string" calcext:value-type="string" table:number-columns-spanned="11" table:number-rows-spanned="1">
            <text:p><text:span text:style-name="T282">Using the minerals and acids the brewer has on hand, add quantities of those minerals and acids on a trial and error basis in the </text:span><text:span text:style-name="T283">BLUE</text:span><text:span text:style-name="T284"> cells under the </text:span><text:span text:style-name="T285">Water Additions</text:span><text:span text:style-name="T286"> area until acceptable agreement between the </text:span><text:span text:style-name="T287">Target </text:span><text:span text:style-name="T288">and </text:span><text:span text:style-name="T289">Actual</text:span><text:span text:style-name="T288"> Water adjustments is achieved.    </text:span></text:p>
          </table:table-cell>
          <table:covered-table-cell table:number-columns-repeated="9" table:style-name="ce22"/>
          <table:covered-table-cell table:style-name="ce28"/>
          <table:table-cell table:number-columns-repeated="53"/>
        </table:table-row>
        <table:table-row table:style-name="ro87">
          <table:table-cell table:style-name="ce4" office:value-type="string" calcext:value-type="string" table:number-columns-spanned="11" table:number-rows-spanned="1">
            <text:p><text:span text:style-name="T5">A very useful feature of the </text:span><text:span text:style-name="T54">Supporter's version</text:span><text:span text:style-name="T7"> of </text:span><text:span text:style-name="T6">Bru'n Water</text:span><text:span text:style-name="T7">, is its ability to estimate the overall concentrations of ions in the final wort. Those concentrations can be quite different from the mashing water concentrations. In addition, that version includes the ability to tell the program that you are considering techniques such as adding all the mashing and sparging mineral additions to the mash or reserving the mineral additions for the kettle. </text:span></text:p>
          </table:table-cell>
          <table:covered-table-cell table:number-columns-repeated="9" table:style-name="ce22"/>
          <table:covered-table-cell table:style-name="ce28"/>
          <table:table-cell table:number-columns-repeated="53"/>
        </table:table-row>
        <table:table-row table:style-name="ro54">
          <table:table-cell table:style-name="ce4" office:value-type="string" calcext:value-type="string" table:number-columns-spanned="11" table:number-rows-spanned="1">
            <text:p><text:span text:style-name="T290">Alkalinity is adjusted by increasing or decreasing the bicarbonate (HCO</text:span><text:span text:style-name="T291">3</text:span><text:span text:style-name="T292">-</text:span><text:span text:style-name="T293">) or hydroxyl (OH</text:span><text:span text:style-name="T292">-</text:span><text:span text:style-name="T293">) concentration.  Add chalk, baking soda, or pickling lime (aka: slaked lime) to increase alkalinity.  Add acid or dilute with distilled or RO water to reduce alkalinity.</text:span></text:p>
          </table:table-cell>
          <table:covered-table-cell table:number-columns-repeated="9" table:style-name="ce22"/>
          <table:covered-table-cell table:style-name="ce28"/>
          <table:table-cell table:number-columns-repeated="53"/>
        </table:table-row>
        <table:table-row table:style-name="ro11">
          <table:table-cell table:style-name="ce4" office:value-type="string" calcext:value-type="string" table:number-columns-spanned="11" table:number-rows-spanned="1">
            <text:p><text:span text:style-name="T63">Warning: </text:span><text:span text:style-name="T7">Pickling Lime is a strong caustic and can cause burns.  Pickling Lime is typically available as a fine powder and can easily be blown onto skin, eyes, nose, and mouth.  Use great care when using Pickling Lime and measure carefully.  ADD PICKLING LIME ONLY TO THE MASH.  AVOID ADDING LIME TO ONLY THE WATER OR THE WATER pH MAY INCREASE EXCESSIVELY AND MAY PRECIPITATE CALCIUM CARBONATE.   Most alkalinity adjustment requires very small Pickling Lime additions.  If the brewer does not have a scale that can measure down to 0.1 gram accuracy, creating a Lime Water solution may be an acceptable alternative.  For instance, a solution can be created by adding 1 gram of Pickling Lime to 1 liter of water.  Add tenths of the liter of solution to the mash corresponding to the tenths of a gram of Pickling Lime indicated on the </text:span><text:span text:style-name="T6">Water Adjustment </text:span><text:span text:style-name="T7">sheet.  Craftbrewer batch sizes are typically large enough to reduce the need to dose lime at tenth of a gram accuracy.</text:span></text:p>
          </table:table-cell>
          <table:covered-table-cell table:number-columns-repeated="9" table:style-name="ce22"/>
          <table:covered-table-cell table:style-name="ce28"/>
          <table:table-cell table:number-columns-repeated="53"/>
        </table:table-row>
        <table:table-row table:style-name="ro88">
          <table:table-cell table:style-name="ce4" office:value-type="string" calcext:value-type="string" table:number-columns-spanned="11" table:number-rows-spanned="1">
            <text:p><text:span text:style-name="T294">Customizing Water Profiles:</text:span><text:span text:style-name="T295"> If the brewer desires to adjust the ion concentrations or names of the supplied water profiles, the water profile table is located at the bottom of the </text:span><text:span text:style-name="T296">Water Adjustment</text:span><text:span text:style-name="T297"> sheet (scroll down) and the water profiles can be adjusted by the brewer.  The </text:span><text:span text:style-name="T298">Distilled</text:span><text:span text:style-name="T299"> and </text:span><text:span text:style-name="T300">RO</text:span><text:span text:style-name="T297"> water profiles can also be renamed and their concentrations changed. Be sure to verify that the Cation and Anion totals match when adjustments to a water profile are entered.  The Cation and Anion cells in the table will turn </text:span><text:span text:style-name="T301">GREEN </text:span><text:span text:style-name="T302">when the ion totals are within 0.1 of each other to alert the brewer that the ion totals are appropriate.</text:span></text:p>
          </table:table-cell>
          <table:covered-table-cell table:number-columns-repeated="9" table:style-name="ce22"/>
          <table:covered-table-cell table:style-name="ce28"/>
          <table:table-cell table:number-columns-repeated="53"/>
        </table:table-row>
        <table:table-row table:style-name="ro36">
          <table:table-cell table:style-name="ce4" office:value-type="string" calcext:value-type="string" table:number-columns-spanned="11" table:number-rows-spanned="1">
            <text:p><text:span text:style-name="T2">The variation of Dry, Balanced, and Full water profiles generally reflect the relative content of sulfate (SO</text:span><text:span text:style-name="T69">4</text:span><text:span text:style-name="T70">) and chloride (Cl) in the water profile.  Select the water profile that generally meets your taste goal.  As an example, a hoppy American style may benefit from a bitter water profile while a sweeter German style may benefit from a malty water profile.  The concept of this sulfate/chloride ratio was modified from the Handbook of Brewing, Priest &amp; Stewart, 2006 and the water chapter by David Taylor.  This concept assumes that chloride accentuates malt and sweetness and sulfate accentuates dryness and bitterness.   Therefore, the ratio of these ions is used as an indicator of the sweetness or bitterness perception of the finished beer.   </text:span></text:p>
          </table:table-cell>
          <table:covered-table-cell table:number-columns-repeated="9" table:style-name="ce22"/>
          <table:covered-table-cell table:style-name="ce28"/>
          <table:table-cell table:number-columns-repeated="53"/>
        </table:table-row>
        <table:table-row table:style-name="ro87">
          <table:table-cell table:style-name="ce4" office:value-type="string" calcext:value-type="string" table:number-columns-spanned="11" table:number-rows-spanned="1">
            <text:p><text:span text:style-name="T2">Minerals for sparging water can be added to the sparging water prior to sparging or can be added directly to the kettle prior to the boil.  </text:span><text:span text:style-name="T3">DO NOT ADD MINERALS AND ACIDS TO THE GRAIN OR MASH SINCE IT IS VERY DIFFICULT TO DISTRIBUTE THOSE ADDITIONS EVENLY THROUGHOUT THE MASH BY MIXING OR STIRRING</text:span><text:span text:style-name="T4">. Add the minerals and acids to the water prior to adding the grain in order to assure those additions are evenly distributed.  </text:span></text:p>
          </table:table-cell>
          <table:covered-table-cell table:number-columns-repeated="9" table:style-name="ce22"/>
          <table:covered-table-cell table:style-name="ce28"/>
          <table:table-cell table:number-columns-repeated="53"/>
        </table:table-row>
        <table:table-row table:style-name="ro89">
          <table:table-cell table:style-name="ce4" office:value-type="string" calcext:value-type="string" table:number-columns-spanned="11" table:number-rows-spanned="1">
            <text:p><text:span text:style-name="T303">Acids and Bases (Baking Soda, Chalk, and Pickling Lime) should not both be added to water since they counteract each other.  Add either an acid or a base as needed to control mash pH, not both.  If both an acid and base are entered on the </text:span><text:span text:style-name="T304">Water Adjustment </text:span><text:span text:style-name="T305">sheet, warnings will be displayed on the </text:span><text:span text:style-name="T306">Water Adjustment </text:span><text:span text:style-name="T307">sheet (</text:span><text:span text:style-name="T308">red cells</text:span><text:span text:style-name="T309">) to alert the brewer of this error. This warning is also displayed if acid malt is included in the grain bill and a base is added to the mashing water.</text:span></text:p>
          </table:table-cell>
          <table:covered-table-cell table:number-columns-repeated="9" table:style-name="ce22"/>
          <table:covered-table-cell table:style-name="ce28"/>
          <table:table-cell table:number-columns-repeated="53"/>
        </table:table-row>
        <table:table-row table:style-name="ro90">
          <table:table-cell table:style-name="ce4" office:value-type="string" calcext:value-type="string" table:number-columns-spanned="11" table:number-rows-spanned="1">
            <text:p><text:span text:style-name="T2">The bicarbonate contributions shown for Baking Soda, Chalk, and Pickling Lime in the </text:span><text:span text:style-name="T3">Water Additions</text:span><text:span text:style-name="T4"> area represent their equivalent bicarbonate alkalinity contributions.  Baking Soda and Pickling Lime will easily dissolve in water or the mash.  Since Chalk has limited solubility in water or in the mash, special measures will be required to dissolve the Chalk and produce its expected bicarbonate and alkalinity contribution.  Adding Chalk powder directly to the mash has been proven to be ineffective in adding alkalinity to the mash.</text:span></text:p>
          </table:table-cell>
          <table:covered-table-cell table:number-columns-repeated="9" table:style-name="ce22"/>
          <table:covered-table-cell table:style-name="ce28"/>
          <table:table-cell table:number-columns-repeated="53"/>
        </table:table-row>
        <table:table-row table:style-name="ro61">
          <table:table-cell table:style-name="ce4" office:value-type="string" calcext:value-type="string" table:number-columns-spanned="11" table:number-rows-spanned="1">
            <text:p><text:span text:style-name="T71">To effectively use Chalk, the Chalk has to be fully dissolved by mixing it with water in a sealed container and then pressurizing with Carbon Dioxide (CO</text:span><text:span text:style-name="T72">2</text:span><text:span text:style-name="T73">).  The CO</text:span><text:span text:style-name="T72">2</text:span><text:span text:style-name="T73"> dissolves the Chalk in the water, changing the water from cloudy to clear.   This process is not quick and requires planning and preparation.  Therefore, using Chalk to add alkalinity to mash water is not recommended unless the brewer is going to perform these measures.   </text:span></text:p>
          </table:table-cell>
          <table:covered-table-cell table:number-columns-repeated="9" table:style-name="ce22"/>
          <table:covered-table-cell table:style-name="ce28"/>
          <table:table-cell table:number-columns-repeated="53"/>
        </table:table-row>
        <table:table-row table:style-name="ro91">
          <table:table-cell table:style-name="ce4" office:value-type="string" calcext:value-type="string" table:number-columns-spanned="11" table:number-rows-spanned="1">
            <text:p><text:span text:style-name="T310">If the </text:span><text:span text:style-name="T311">Desired Water Profile</text:span><text:span text:style-name="T312"> has a significantly lower than desired bicarbonate (HCO</text:span><text:span text:style-name="T313">3</text:span><text:span text:style-name="T314">) concentration (Alkalinity), then a preferred method to add bicarbonate to mashing water is to add Pickling Lime or Baking Soda since Chalk is difficult to dissolve in water or the mash.  When alkalinity needs to be added to the mash water, Pickling Lime or Baking Soda will provide more certain results.  Care should be exercised when adding Baking Soda since the Sodium concentration should typically not exceed 100 ppm for good brewing results.  ONLY MASHING WATER SHOULD HAVE ITS BICARBONATE CONCENTRATION INCREASED.  </text:span><text:span text:style-name="T315">SPARGING WATER NEVER NEEDS ADDED ALKALINITY</text:span><text:span text:style-name="T316">.</text:span></text:p>
          </table:table-cell>
          <table:covered-table-cell table:number-columns-repeated="9" table:style-name="ce22"/>
          <table:covered-table-cell table:style-name="ce28"/>
          <table:table-cell table:number-columns-repeated="53"/>
        </table:table-row>
        <table:table-row table:style-name="ro56">
          <table:table-cell table:style-name="ce4" office:value-type="string" calcext:value-type="string" table:number-columns-spanned="11" table:number-rows-spanned="1">
            <text:p><text:span text:style-name="T317">A variety of minerals used for water chemistry adjustment are referenced in the spreadsheet.  Vary the mineral amounts and compare the </text:span><text:span text:style-name="T318">Target Water Adjustment </text:span><text:span text:style-name="T319">and </text:span><text:span text:style-name="T320">Actual Water Adjustment</text:span><text:span text:style-name="T319"> results to find the combination of minerals that best approximate the </text:span><text:span text:style-name="T321">Desired Water Profile.</text:span><text:span text:style-name="T322">  When using </text:span><text:span text:style-name="T323">Excel</text:span><text:span text:style-name="T324"> to run </text:span><text:span text:style-name="T323">Bru'n Water</text:span><text:span text:style-name="T325">, the </text:span><text:span text:style-name="T323">Target </text:span><text:span text:style-name="T319">and </text:span><text:span text:style-name="T326">Actual</text:span><text:span text:style-name="T327"> adjustment cells will turn </text:span><text:span text:style-name="T328">GREEN </text:span><text:span text:style-name="T329">when the values are within 10 ppm of each other.  You should not be too concerned with a difference greater than </text:span><text:span text:style-name="T330">10 ppm</text:span><text:span text:style-name="T331">, but that is a reasonable target range.  In general, you should use a lower than targeted concentration when they have difficulty in finding the correct combination of minerals to add to meet the targeted concentrations.  </text:span></text:p>
          </table:table-cell>
          <table:covered-table-cell table:number-columns-repeated="9" table:style-name="ce22"/>
          <table:covered-table-cell table:style-name="ce28"/>
          <table:table-cell table:number-columns-repeated="53"/>
        </table:table-row>
        <table:table-row table:style-name="ro12">
          <table:table-cell table:style-name="ce4" office:value-type="string" calcext:value-type="string" table:number-columns-spanned="11" table:number-rows-spanned="1">
            <text:p><text:span text:style-name="T8">The </text:span><text:span text:style-name="T9">Water Adjustment</text:span><text:span text:style-name="T10"> sheet reports the ion concentrations for both Mashing and Finished worts. The </text:span><text:span text:style-name="T11">Mashing Water Profile</text:span><text:span text:style-name="T12"> enables separate monitoring of calcium, magnesium, and bicarbonate levels in the mash that are important for pH and oxalate reduction. To estimate the</text:span><text:span text:style-name="T13"> Finished Water Profile </text:span><text:span text:style-name="T14">which reports overall ion concentrations in the kettle that are important for yeast flocculation and beer flavor, you should upgrade to the </text:span><text:span text:style-name="T9">Supporter's version</text:span><text:span text:style-name="T10"> of </text:span><text:span text:style-name="T15">Bru'n Water</text:span><text:span text:style-name="T10">.  </text:span></text:p>
          </table:table-cell>
          <table:covered-table-cell table:number-columns-repeated="9" table:style-name="ce22"/>
          <table:covered-table-cell table:style-name="ce28"/>
          <table:table-cell table:number-columns-repeated="53"/>
        </table:table-row>
        <table:table-row table:style-name="ro42">
          <table:table-cell table:style-name="ce4" office:value-type="string" calcext:value-type="string" table:number-columns-spanned="11" table:number-rows-spanned="1">
            <text:p><text:span text:style-name="T2">All minerals and acids used for water adjustment should be identified as </text:span><text:span text:style-name="T3">Food-Grade</text:span><text:span text:style-name="T4"> chemicals.  This is particularly important for the acids used for water adjustment since acids can easily dissolve and contain heavy metals that are hazardous to health. </text:span></text:p>
          </table:table-cell>
          <table:covered-table-cell table:number-columns-repeated="9" table:style-name="ce22"/>
          <table:covered-table-cell table:style-name="ce28"/>
          <table:table-cell table:number-columns-repeated="53"/>
        </table:table-row>
        <table:table-row table:style-name="ro25">
          <table:table-cell table:style-name="ce4" office:value-type="string" calcext:value-type="string" table:number-columns-spanned="11" table:number-rows-spanned="1">
            <text:p>Homebrewers are encouraged to use a scale with an accuracy of at least 0.1 gram to measure mineral additions. <text:s/>Craftbrewers can use scales with 1 gram accuracy since their batch size is typically larger. <text:s/>Volume measures such as teaspoon or tablespoon can be significantly less accurate than weight measures for dry mineral additions. <text:s/>Inexpensive scales with good accuracy are available and recommended.</text:p>
          </table:table-cell>
          <table:covered-table-cell table:number-columns-repeated="9" table:style-name="ce22"/>
          <table:covered-table-cell table:style-name="ce28"/>
          <table:table-cell table:number-columns-repeated="53"/>
        </table:table-row>
        <table:table-row table:style-name="ro92">
          <table:table-cell table:style-name="ce4" office:value-type="string" calcext:value-type="string" table:number-columns-spanned="11" table:number-rows-spanned="1">
            <text:p><text:span text:style-name="T25">Working with Calcium Chloride</text:span><text:span text:style-name="T26">: Calcium chloride can easily absorb moisture from the air and alter the density of the solid calcium chloride mineral. In addition, calcium chloride is commonly available in anhydrous (no water) and dihydrate (2 water molecule) forms. This version of </text:span><text:span text:style-name="T27">Bru'n Water</text:span><text:span text:style-name="T28"> assumes your calcium chloride is in the anhydrous form which helps you avoid overdosing with calcium or chloride.  Since the mineral can easily pick up moisture and alter its density, which subsequently changes how much calcium chloride is actually added to the water, an alternative is to use a calcium chloride solution. Calcium chloride solution strength is more consistent when it is stored in an air-tight container. The </text:span><text:span text:style-name="T29">Supporter's version</text:span><text:span text:style-name="T28"> of </text:span><text:span text:style-name="T30">Bru'n Water</text:span><text:span text:style-name="T28"> includes the capability to select anhydrous, dihydrate, and liquid forms of calcium chloride as inputs for your additions.</text:span></text:p>
          </table:table-cell>
          <table:covered-table-cell table:number-columns-repeated="9" table:style-name="ce22"/>
          <table:covered-table-cell table:style-name="ce28"/>
          <table:table-cell table:number-columns-repeated="53"/>
        </table:table-row>
        <table:table-row table:style-name="ro88">
          <table:table-cell table:style-name="ce4" office:value-type="string" calcext:value-type="string" table:number-columns-spanned="11" table:number-rows-spanned="1">
            <text:p><text:span text:style-name="T2">All </text:span><text:span text:style-name="T3">Mash Water</text:span><text:span text:style-name="T4"> mineral and acid additions are typically added to the mash in order to create the desired water profile and produce the desired mash pH.  These additions are not typically added directly to the boil kettle except when the hardening the mash water will increase the need for alkalinity in the mash water.  If the mash pH calculations indicate that additional alkalinity is required, the brewer may consider adding hardening minerals such as gypsum, calcium chloride, and epsom salt directly to the kettle to avoid hardening the water and reducing mash pH. </text:span></text:p>
          </table:table-cell>
          <table:covered-table-cell table:number-columns-repeated="9" table:style-name="ce22"/>
          <table:covered-table-cell table:style-name="ce28"/>
          <table:table-cell table:number-columns-repeated="53"/>
        </table:table-row>
        <table:table-row table:style-name="ro93">
          <table:table-cell table:style-name="ce4" office:value-type="string" calcext:value-type="string" table:number-columns-spanned="11" table:number-rows-spanned="1">
            <text:p><text:span text:style-name="T332">Mineral and acid additions to Mash and Sparge Water are calculated for their water volumes and shown on the </text:span><text:span text:style-name="T333">Water Adjustment</text:span><text:span text:style-name="T334"> sheet.  Sparge additions should not include the alkalinity increasing minerals (Baking Soda, Chalk, &amp; Pickling Lime) since alkalinity is not needed or desirable in the sparge water. When using </text:span><text:span text:style-name="T335">Excel</text:span><text:span text:style-name="T336"> to run </text:span><text:span text:style-name="T337">Bru'n Water</text:span><text:span text:style-name="T338">, the cells for acids and alkalinity increasing minerals will turn </text:span><text:span text:style-name="T339">Red </text:span><text:span text:style-name="T340">if both acids and bases are both entered for the mash. Since those materials counteract each other, the brewer should avoid adding both. Remove one of the materials and reduce the quantity of the other to avoid adding both materials. If the grain bill includes Acid malt and an alkalinity increasing mineral is added to the mashing water, the cells will also turn </text:span><text:span text:style-name="T341">Red </text:span><text:span text:style-name="T340">to warn the brewer. </text:span></text:p>
          </table:table-cell>
          <table:covered-table-cell table:number-columns-repeated="9" table:style-name="ce22"/>
          <table:covered-table-cell table:style-name="ce28"/>
          <table:table-cell table:number-columns-repeated="53"/>
        </table:table-row>
        <table:table-row table:style-name="ro16">
          <table:table-cell table:style-name="ce4" office:value-type="string" calcext:value-type="string" table:number-columns-spanned="11" table:number-rows-spanned="1">
            <text:p><text:span text:style-name="T63">Sparging Water</text:span><text:span text:style-name="T7"> mineral additions can be added directly to the Sparging Water or can be reserved and added directly to the boil kettle.  Acid additions calculated for the Sparging Water must be added to the Sparging Water to reduce its alkalinity prior to use.  If CRS, Hydrochloric, or Sulfuric acids are used to acidify the sparging water, their chloride or sulfate ion contributions are included in the overall ionic concentrations computed by </text:span><text:span text:style-name="T6">Bru'n Water</text:span><text:span text:style-name="T7">.</text:span></text:p>
          </table:table-cell>
          <table:covered-table-cell table:number-columns-repeated="9" table:style-name="ce22"/>
          <table:covered-table-cell table:style-name="ce28"/>
          <table:table-cell table:number-columns-repeated="53"/>
        </table:table-row>
        <table:table-row table:style-name="ro94">
          <table:table-cell table:style-name="ce4" office:value-type="string" calcext:value-type="string" table:number-columns-spanned="11" table:number-rows-spanned="1">
            <text:p><text:span text:style-name="T2">Proceed to the </text:span><text:span text:style-name="T3">Adjustment Summary</text:span><text:span text:style-name="T4"> sheet to review the final water adjustment results.</text:span></text:p>
          </table:table-cell>
          <table:covered-table-cell table:number-columns-repeated="9" table:style-name="ce22"/>
          <table:covered-table-cell table:style-name="ce28"/>
          <table:table-cell table:number-columns-repeated="53"/>
        </table:table-row>
        <table:table-row table:style-name="ro95">
          <table:table-cell table:style-name="ce11" office:value-type="string" calcext:value-type="string" table:number-columns-spanned="11" table:number-rows-spanned="1">
            <text:p>Special Considerations for Extract Brewers:</text:p>
          </table:table-cell>
          <table:covered-table-cell table:number-columns-repeated="9"/>
          <table:covered-table-cell table:style-name="ce28"/>
          <table:table-cell table:number-columns-repeated="53"/>
        </table:table-row>
        <table:table-row table:style-name="ro96">
          <table:table-cell table:style-name="ce4" office:value-type="string" calcext:value-type="string" table:number-columns-spanned="11" table:number-rows-spanned="1">
            <text:p>Brewers using Malt Extract for their brewing can still benefit from Water Adjustments. <text:s/>This is particularly true when using either highly mineralized or alkaline water or when using RO or Distilled Water. <text:s/>Best results for Extract Brewers will typically be achieved by using water with very low mineralization. <text:s/>If desired for flavor purposes, small additions of either gypsum or calcium chloride can be added to the water for flavor purposes. <text:s/>Its recommended that no more than 50 ppm chloride be added to low mineralized water when creating malty styles and no more than about 150 ppm sulfate be added to low mineralized water when brewing hoppy styles since the extract typically provides some mineralization to the water.</text:p>
          </table:table-cell>
          <table:covered-table-cell table:number-columns-repeated="9" table:style-name="ce22"/>
          <table:covered-table-cell table:style-name="ce28"/>
          <table:table-cell table:number-columns-repeated="53"/>
        </table:table-row>
        <table:table-row table:style-name="ro59">
          <table:table-cell table:style-name="ce4" office:value-type="string" calcext:value-type="string" table:number-columns-spanned="11" table:number-rows-spanned="1">
            <text:p><text:span text:style-name="T31">When using highly mineralized or alkaline water, the water can impart poor flavor to the beer.  Using highly alkaline water may increase the pH of the resulting wort and create a coarser and rougher flavored beer.  If the water has high ion concentrations, dilution with RO or Distilled Water may be appropriate.  The brewer should know what is in their tap water prior to contemplating mineral additions.  The </text:span><text:span text:style-name="T32">Dilution Calculator</text:span><text:span text:style-name="T33"> on the </text:span><text:span text:style-name="T34">Water Adjustment</text:span><text:span text:style-name="T35"> sheet can help the brewer assess how much dilution will be needed to produce a desirable water profile.  If the water has high alkalinity, the </text:span><text:span text:style-name="T36">Sparge Water Acidification Calculator</text:span><text:span text:style-name="T37"> can be used to reduce water alkalinity to under 50 ppm which should allow the wort and resulting beer to reach desirable pH.  The Water Profiles on the </text:span><text:span text:style-name="T34">Water Adjustment</text:span><text:span text:style-name="T37"> sheet are appropriate goals for Extract Brewers.</text:span></text:p>
          </table:table-cell>
          <table:covered-table-cell table:number-columns-repeated="9" table:style-name="ce22"/>
          <table:covered-table-cell table:style-name="ce28"/>
          <table:table-cell table:number-columns-repeated="53"/>
        </table:table-row>
        <table:table-row table:style-name="ro85">
          <table:table-cell table:style-name="ce4" office:value-type="string" calcext:value-type="string" table:number-columns-spanned="11" table:number-rows-spanned="1">
            <text:p><text:span text:style-name="T2">When brewing with RO or Distilled Water and Malt Extracts, the extract should provide most of the minerals needed for proper fermentation performance.  Although the ion content in the Malt Extract is typically low to moderate, some extract products may have high content.  Be aware that Briess malt extracts have high sodium content (about 100 ppm Na in a wort reconstituted to 1.045 gravity, 200 ppm @ 1.089).  If the brewer desires a specific flavor profile, additional sodium-, sulfate- or chloride-containing minerals can be added to the brewing water.  The </text:span><text:span text:style-name="T3">Water Adjustment</text:span><text:span text:style-name="T4"> sheet can help the brewer assess how much of these minerals should be added to the brewing water.   </text:span></text:p>
          </table:table-cell>
          <table:covered-table-cell table:number-columns-repeated="9" table:style-name="ce22"/>
          <table:covered-table-cell table:style-name="ce28"/>
          <table:table-cell table:number-columns-repeated="53"/>
        </table:table-row>
        <table:table-row table:style-name="ro49">
          <table:table-cell table:style-name="ce6" office:value-type="string" calcext:value-type="string" table:number-columns-spanned="11" table:number-rows-spanned="1">
            <text:p>Adjustment Summary</text:p>
          </table:table-cell>
          <table:covered-table-cell table:number-columns-repeated="9" table:style-name="ce23"/>
          <table:covered-table-cell table:style-name="ce30"/>
          <table:table-cell table:number-columns-repeated="53"/>
        </table:table-row>
        <table:table-row table:style-name="ro22">
          <table:table-cell table:style-name="ce4" office:value-type="string" calcext:value-type="string" table:number-columns-spanned="11" table:number-rows-spanned="1">
            <text:p><text:span text:style-name="T31">The </text:span><text:span text:style-name="T32">Adjustment Summary </text:span><text:span text:style-name="T33">sheet provides the brewer with a concise report of the </text:span><text:span text:style-name="T34">Existing, Mashing,</text:span><text:span text:style-name="T35"> and </text:span><text:span text:style-name="T36">Finished Water</text:span><text:span text:style-name="T37"> characteristics and the Mineral and Acid adjustments recommended to produce the </text:span><text:span text:style-name="T34">Finished Water. </text:span><text:span text:style-name="T37"> It is intended to provide a single sheet that can be used as a quick reference during brewing.</text:span></text:p>
          </table:table-cell>
          <table:covered-table-cell table:number-columns-repeated="9" table:style-name="ce22"/>
          <table:covered-table-cell table:style-name="ce28"/>
          <table:table-cell table:number-columns-repeated="53"/>
        </table:table-row>
        <table:table-row table:style-name="ro22">
          <table:table-cell table:style-name="ce4" office:value-type="string" calcext:value-type="string" table:number-columns-spanned="11" table:number-rows-spanned="1">
            <text:p><text:span text:style-name="T63">Note to previous Bru'n Water users:</text:span><text:span text:style-name="T190"> References to </text:span><text:span text:style-name="T191">Residual Alkalinity</text:span><text:span text:style-name="T7"> and the </text:span><text:span text:style-name="T6">SO4/Cl ratio</text:span><text:span text:style-name="T7"> have been largely erased from the new version. Those concepts have done a great disservice to brewing water chemistry and removing them from this version is your first step to ridding them from your brewing practice. We extend our apologies if you felt they were useful. </text:span></text:p>
          </table:table-cell>
          <table:covered-table-cell table:number-columns-repeated="9" table:style-name="ce22"/>
          <table:covered-table-cell table:style-name="ce28"/>
          <table:table-cell table:number-columns-repeated="53"/>
        </table:table-row>
        <table:table-row table:style-name="ro30">
          <table:table-cell table:style-name="ce4" office:value-type="string" calcext:value-type="string" table:number-columns-spanned="11" table:number-rows-spanned="1">
            <text:p><text:span text:style-name="T16">Recommended ranges for the various ions are shown on the sheet to provide the brewer with a quick check of their proposed brewing water profile.  The brewer's identifier or batch name is shown at the top of the sheet.  The </text:span><text:span text:style-name="T17">Water Profile</text:span><text:span text:style-name="T18"> name selected on the </text:span><text:span text:style-name="T19">Water Adjustment</text:span><text:span text:style-name="T20"> sheet is shown on the summary sheet for reference.  All of the information shown on the </text:span><text:span text:style-name="T17">Adjustment Summary</text:span><text:span text:style-name="T21"> is input or calculated on the other sheets within </text:span><text:span text:style-name="T19">Bru'n Water</text:span><text:span text:style-name="T21">.  No inputs are performed on the </text:span><text:span text:style-name="T17">Adjustment Summary</text:span><text:span text:style-name="T18"> sheet.  Be sure that water volumes are properly entered on the </text:span><text:span text:style-name="T22">Sparge Acidification</text:span><text:span text:style-name="T20"> and </text:span><text:span text:style-name="T19">Water Adjustment</text:span><text:span text:style-name="T23"> sheets.  The water volume input on the </text:span><text:span text:style-name="T24">Sparge Acidification</text:span><text:span text:style-name="T23"> sheet can be entered as either the unit (1) volume or the total sparge volume.  The water volumes input on the </text:span><text:span text:style-name="T17">Water Adjustment</text:span><text:span text:style-name="T23"> sheet should reflect the total volumes of water to be used for mashing and for sparging. </text:span></text:p>
          </table:table-cell>
          <table:covered-table-cell table:number-columns-repeated="9" table:style-name="ce22"/>
          <table:covered-table-cell table:style-name="ce28"/>
          <table:table-cell table:number-columns-repeated="53"/>
        </table:table-row>
        <table:table-row table:style-name="ro61">
          <table:table-cell table:style-name="ce4" office:value-type="string" calcext:value-type="string" table:number-columns-spanned="11" table:number-rows-spanned="1">
            <text:p><text:span text:style-name="T153">The volumes of dilution water for both the mashing and sparging are shown on the </text:span><text:span text:style-name="T154">Adjustment Summary </text:span><text:span text:style-name="T155">sheet.  The </text:span><text:span text:style-name="T154">Dilution Water</text:span><text:span text:style-name="T156"> volume is calculated from the dilution percentages input for the mashing water adjustments and the total mashing and sparging water volumes.  The </text:span><text:span text:style-name="T157">Supporter's version</text:span><text:span text:style-name="T158"> of </text:span><text:span text:style-name="T154">Bru'n Water</text:span><text:span text:style-name="T158"> includes information on Sparging water dilution volume. The </text:span><text:span text:style-name="T159">Total Water</text:span><text:span text:style-name="T160"> volumes are equal to </text:span><text:span text:style-name="T157">Dilution Water</text:span><text:span text:style-name="T156"> volume plus </text:span><text:span text:style-name="T159">Tap Water</text:span><text:span text:style-name="T161"> volume.  A suggested approach is to add the </text:span><text:span text:style-name="T154">Dilution Water</text:span><text:span text:style-name="T162"> volume to the vessel and then add </text:span><text:span text:style-name="T154">Tap Water </text:span><text:span text:style-name="T161">to reach the desired </text:span><text:span text:style-name="T163">Total Water </text:span><text:span text:style-name="T161">volume.</text:span></text:p>
          </table:table-cell>
          <table:covered-table-cell table:number-columns-repeated="9" table:style-name="ce22"/>
          <table:covered-table-cell table:style-name="ce28"/>
          <table:table-cell table:number-columns-repeated="53"/>
        </table:table-row>
        <table:table-row table:style-name="ro68">
          <table:table-cell table:style-name="ce4" office:value-type="string" calcext:value-type="string" table:number-columns-spanned="11" table:number-rows-spanned="1">
            <text:p><text:span text:style-name="T342">The sheet includes information on the total mineral and acid quantities needed for both the mashing and sparging water.  The estimated mash pH is also shown.  The mash pH cell changes color to signal how the estimated pH compares to the optimum range (5.3 to 5.5).  When using Excel to run Bru'n Water, the cell is </text:span><text:span text:style-name="T343">GREEN</text:span><text:span text:style-name="T344"> when the estimated pH is within that range and </text:span><text:span text:style-name="T345">ORANGE</text:span><text:span text:style-name="T346"> when just outside that range.  The cell turns </text:span><text:span text:style-name="T347">RED</text:span><text:span text:style-name="T348"> when the estimated pH falls outside the recommended range of 5.2 to 5.8.   </text:span></text:p>
          </table:table-cell>
          <table:covered-table-cell table:number-columns-repeated="9" table:style-name="ce22"/>
          <table:covered-table-cell table:style-name="ce28"/>
          <table:table-cell table:number-columns-repeated="53"/>
        </table:table-row>
        <table:table-row table:style-name="ro42">
          <table:table-cell table:style-name="ce4" office:value-type="string" calcext:value-type="string" table:number-columns-spanned="11" table:number-rows-spanned="1">
            <text:p><text:span text:style-name="T64">The acids used for both sparging and mashing are shown on the </text:span><text:span text:style-name="T65">Adjustment Summary</text:span><text:span text:style-name="T66">. The cells may be blank if no acids were selected or used on the </text:span><text:span text:style-name="T67">Sparge Acidification </text:span><text:span text:style-name="T68">and </text:span><text:span text:style-name="T67">Water Adjustment</text:span><text:span text:style-name="T68"> sheets. </text:span></text:p>
          </table:table-cell>
          <table:covered-table-cell table:number-columns-repeated="9" table:style-name="ce22"/>
          <table:covered-table-cell table:style-name="ce28"/>
          <table:table-cell table:number-columns-repeated="53"/>
        </table:table-row>
        <table:table-row table:style-name="ro36">
          <table:table-cell table:style-name="ce5" office:value-type="string" calcext:value-type="string" table:number-columns-spanned="11" table:number-rows-spanned="1">
            <text:p><text:span text:style-name="T349">The </text:span><text:span text:style-name="T350">Supporter's version</text:span><text:span text:style-name="T351"> of </text:span><text:span text:style-name="T352">Bru'n Water</text:span><text:span text:style-name="T353"> includes a </text:span><text:span text:style-name="T354">Raw Text Summary </text:span><text:span text:style-name="T355">sheet that is provided to enable the brewer to convey their brewing water information to others.  By copying the information in the cells highlighted in </text:span><text:span text:style-name="T356">GRAY</text:span><text:span text:style-name="T357"> cells on the </text:span><text:span text:style-name="T358">Raw Text Summary</text:span><text:span text:style-name="T359"> sheet, the brewer can easily paste that information in emails, webpages, brewing logs, or into notes in typical brewing software such as ProMash or Beersmith.  The formatting of the information on that sheet will typically produce uniform columns when pasted as TEXT.  The </text:span><text:span text:style-name="T360">Supporter's version</text:span><text:span text:style-name="T359"> also includes the capability to save 100 </text:span><text:span text:style-name="T360">Bru'n Water </text:span><text:span text:style-name="T359">sessions in the program so that they can be recalled and reused the next time you brew that beer. </text:span></text:p>
          </table:table-cell>
          <table:covered-table-cell table:number-columns-repeated="9" table:style-name="ce20"/>
          <table:covered-table-cell table:style-name="ce29"/>
          <table:table-cell table:number-columns-repeated="53"/>
        </table:table-row>
        <table:table-row table:style-name="ro13">
          <table:table-cell table:style-name="ce6" office:value-type="string" calcext:value-type="string" table:number-columns-spanned="11" table:number-rows-spanned="1">
            <text:p>Acknowledgements</text:p>
          </table:table-cell>
          <table:covered-table-cell table:number-columns-repeated="9" table:style-name="ce23"/>
          <table:covered-table-cell table:style-name="ce30"/>
          <table:table-cell table:number-columns-repeated="53"/>
        </table:table-row>
        <table:table-row table:style-name="ro69">
          <table:table-cell table:style-name="ce5" office:value-type="string" calcext:value-type="string" table:number-columns-spanned="11" table:number-rows-spanned="1">
            <text:p><text:s text:c="12"/>The Author thanks A.J. DeLange for producing and publishing outstanding resources on mash chemistry and acidification and serving as a continuing resource to the brewing community. <text:s/>The Author also thanks Kai Troester for the grain acidity information used in this program and his service to the brewing community. <text:s/>Thanks to James Marsh for pointing out programming enhancements for the program.</text:p>
          </table:table-cell>
          <table:covered-table-cell table:number-columns-repeated="9" table:style-name="ce20"/>
          <table:covered-table-cell table:style-name="ce29"/>
          <table:table-cell table:number-columns-repeated="53"/>
        </table:table-row>
        <table:table-row table:style-name="ro1">
          <table:table-cell table:style-name="ce6" office:value-type="string" calcext:value-type="string" table:number-columns-spanned="11" table:number-rows-spanned="1">
            <text:p>About the Author </text:p>
          </table:table-cell>
          <table:covered-table-cell table:number-columns-repeated="9" table:style-name="ce23"/>
          <table:covered-table-cell table:style-name="ce30"/>
          <table:table-cell table:style-name="ce32" table:number-columns-repeated="15"/>
          <table:table-cell table:number-columns-repeated="38"/>
        </table:table-row>
        <table:table-row table:style-name="ro97">
          <table:table-cell table:style-name="ce5" office:value-type="string" calcext:value-type="string" table:number-columns-spanned="11" table:number-rows-spanned="1">
            <text:p><text:span text:style-name="T2">           Martin Brungard is a civil and environmental engineer with over 35 years of professional experience.  His practice area focuses on water resources engineering and he has been named a Diplomate of Water Resources Engineering by the American Academy of Water Resources Engineers.  His engineering practice includes providing engineering consulting services to municipalities and major and craft brewers across the United States.  Martin provides consulting services to brewery clients through his Bru'n Solutions company which is found at </text:span><text:span text:style-name="T3">www.Brunsolutions.com</text:span><text:span text:style-name="T4">.  He has been homebrewing since 1999, is a member of the American Homebrewers Association, and has attained the rank of National Judge from the Beer Judge Certification Program (BJCP).  Comments and concerns regarding this program may be sent to the author at the link below</text:span></text:p>
          </table:table-cell>
          <table:covered-table-cell table:number-columns-repeated="9" table:style-name="ce20"/>
          <table:covered-table-cell table:style-name="ce29"/>
          <table:table-cell table:number-columns-repeated="53"/>
        </table:table-row>
        <table:table-row table:style-name="ro98">
          <table:table-cell table:style-name="ce14" office:value-type="string" calcext:value-type="string" table:number-columns-spanned="11" table:number-rows-spanned="1">
            <text:p>mabrungard@hotmail.com</text:p>
          </table:table-cell>
          <table:covered-table-cell table:number-columns-repeated="9" table:style-name="ce21"/>
          <table:covered-table-cell table:style-name="ce19"/>
          <table:table-cell table:number-columns-repeated="53"/>
        </table:table-row>
        <table:table-row table:style-name="ro99">
          <table:table-cell table:style-name="ce6" office:value-type="string" calcext:value-type="string" table:number-columns-spanned="11" table:number-rows-spanned="1">
            <text:p>Support the development of Bru'n Water</text:p>
          </table:table-cell>
          <table:covered-table-cell table:number-columns-repeated="9" table:style-name="ce23"/>
          <table:covered-table-cell table:style-name="ce30"/>
          <table:table-cell table:number-columns-repeated="53"/>
        </table:table-row>
        <table:table-row table:style-name="ro11">
          <table:table-cell table:style-name="ce5" office:value-type="string" calcext:value-type="string" table:number-columns-spanned="11" table:number-rows-spanned="1">
            <text:p><text:span text:style-name="T143">The </text:span><text:span text:style-name="T144">Supporter's version</text:span><text:span text:style-name="T145"> of </text:span><text:span text:style-name="T146">Bru'n Water</text:span><text:span text:style-name="T147"> includes a significant number of enhancements that aid brewers in improving their beers. Donating at least $10 will get you the latest Supporter's version and keep you in the upgrade loop.  Users that value the use and development of </text:span><text:span text:style-name="T148">Bru'n Water</text:span><text:span text:style-name="T149"> can support the continued development and show support by donating through their PayPal account.    To assist the team in continuing the improvement of this program and to indicate your approval and support, donations through </text:span><text:span text:style-name="T150">PayPal</text:span><text:span text:style-name="T149"> are welcome.  A few dollars are truly welcome from those that find this program and water knowledge useful.  Use the email address </text:span><text:span text:style-name="T146">mabrungard@hotmail.com</text:span><text:span text:style-name="T151"> to forward comments about the program and to direct donations to the development team.  For those with a </text:span><text:span text:style-name="T150">PayPal</text:span><text:span text:style-name="T152"> account, a link to the</text:span><text:span text:style-name="T150"> Bru'n Water website </text:span><text:span text:style-name="T152">is provided below.  The website has links to Paypal to support Bru'n Water.  Use the SEND MONEY tool and select the PERSONAL tab to direct a GIFT amount to the developers.                                                                                                                        </text:span></text:p>
          </table:table-cell>
          <table:covered-table-cell table:number-columns-repeated="9" table:style-name="ce20"/>
          <table:covered-table-cell table:style-name="ce29"/>
          <table:table-cell table:number-columns-repeated="53"/>
        </table:table-row>
        <table:table-row table:style-name="ro100">
          <table:table-cell table:style-name="ce15" office:value-type="string" calcext:value-type="string" table:number-columns-spanned="11" table:number-rows-spanned="1">
            <text:p><text:a xlink:href="https://sites.google.com/site/brunwater/" xlink:type="simple">https://www.brunwater.com/ </text:a></text:p>
          </table:table-cell>
          <table:covered-table-cell table:number-columns-repeated="9" table:style-name="ce21"/>
          <table:covered-table-cell table:style-name="ce19"/>
          <table:table-cell table:number-columns-repeated="53"/>
        </table:table-row>
        <table:table-row table:style-name="ro58">
          <table:table-cell table:style-name="ce16" office:value-type="string" calcext:value-type="string" table:number-columns-spanned="11" table:number-rows-spanned="1">
            <text:p>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able:table-cell>
          <table:covered-table-cell table:number-columns-repeated="9" table:style-name="ce21"/>
          <table:covered-table-cell table:style-name="ce19"/>
          <table:table-cell table:number-columns-repeated="53"/>
        </table:table-row>
        <table:table-row table:style-name="ro101">
          <table:table-cell table:style-name="ce17" office:value-type="string" calcext:value-type="string" table:number-columns-spanned="2" table:number-rows-spanned="1">
            <text:p>Bru'n Water v. 1.25</text:p>
          </table:table-cell>
          <table:covered-table-cell table:style-name="ce23"/>
          <table:table-cell/>
          <table:table-cell table:style-name="ce18" table:number-columns-repeated="3"/>
          <table:table-cell table:number-columns-repeated="3"/>
          <table:table-cell table:style-name="ce27" office:value-type="date" office:date-value="2020-06-06" calcext:value-type="date" table:number-columns-spanned="2" table:number-rows-spanned="1">
            <text:p>6/6/2020</text:p>
          </table:table-cell>
          <table:covered-table-cell table:style-name="ce23"/>
          <table:table-cell table:number-columns-repeated="53"/>
        </table:table-row>
        <table:table-row table:style-name="ro101">
          <table:table-cell table:style-name="ce18" table:number-columns-repeated="6"/>
          <table:table-cell table:number-columns-repeated="58"/>
        </table:table-row>
        <table:table-row table:style-name="ro102" table:number-rows-repeated="838">
          <table:table-cell table:number-columns-repeated="64"/>
        </table:table-row>
        <table:table-row table:style-name="ro103" table:number-rows-repeated="1047575">
          <table:table-cell table:number-columns-repeated="64"/>
        </table:table-row>
        <table:table-row table:style-name="ro103">
          <table:table-cell table:number-columns-repeated="64"/>
        </table:table-row>
      </table:table>
      <table:table table:name="1. Water Report Input" table:style-name="ta2">
        <table:table-column table:style-name="co4" table:default-cell-style-name="Default"/>
        <table:table-column table:style-name="co5" table:number-columns-repeated="2" table:default-cell-style-name="Default"/>
        <table:table-column table:style-name="co4" table:default-cell-style-name="Default"/>
        <table:table-column table:style-name="co6" table:default-cell-style-name="Default"/>
        <table:table-column table:style-name="co7" table:default-cell-style-name="Default"/>
        <table:table-column table:style-name="co7" table:visibility="collapse" table:number-columns-repeated="20" table:default-cell-style-name="Default"/>
        <table:table-column table:style-name="co7" table:default-cell-style-name="Default"/>
        <table:table-column table:style-name="co8" table:number-columns-repeated="3" table:default-cell-style-name="Default"/>
        <table:table-column table:style-name="co1" table:number-columns-repeated="34" table:default-cell-style-name="Default"/>
        <table:table-row table:style-name="ro41">
          <table:table-cell table:style-name="ce33" office:value-type="string" calcext:value-type="string">
            <text:p>Bru'n Water</text:p>
          </table:table-cell>
          <table:table-cell table:style-name="ce54" office:value-type="string" calcext:value-type="string" table:number-columns-spanned="3" table:number-rows-spanned="1">
            <text:p><text:a xlink:href="https://sites.google.com/site/brunwater/home/files" xlink:type="simple">Link to Bru'n Water website for updates and to donate</text:a></text:p>
          </table:table-cell>
          <table:covered-table-cell table:number-columns-repeated="2"/>
          <table:table-cell table:style-name="ce31"/>
          <table:table-cell table:style-name="ce53" table:number-columns-repeated="25"/>
          <table:table-cell table:number-columns-repeated="34"/>
        </table:table-row>
        <table:table-row table:style-name="ro41">
          <table:table-cell table:style-name="ce34" office:value-type="string" calcext:value-type="string">
            <text:p><text:span text:style-name="T377">Enter data into </text:span><text:span text:style-name="T378">Light Blue</text:span><text:span text:style-name="T379"> cells, </text:span><text:span text:style-name="T380">Yellow</text:span><text:span text:style-name="T379"> cells display calculated results, </text:span><text:span text:style-name="T381">Pink</text:span><text:span text:style-name="T379"> cells contain selection boxes</text:span></text:p>
          </table:table-cell>
          <table:table-cell table:style-name="ce55"/>
          <table:table-cell table:style-name="ce65" table:number-columns-repeated="2"/>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41">
          <table:table-cell table:style-name="ce35" office:value-type="string" calcext:value-type="string">
            <office:annotation draw:style-name="gr1" draw:text-style-name="P2" svg:width="19.909cm" svg:height="3.598cm" svg:x="7.761cm" svg:y="3.836cm" draw:caption-point-x="-0.407cm" draw:caption-point-y="-1.445cm">
              <dc:date>2021-02-12T00:00:00</dc:date>
              <text:p text:style-name="P1"><text:span text:style-name="T1">======</text:span></text:p>
              <text:p text:style-name="P1"><text:span text:style-name="T1">ID#AAAAH1AC7k0</text:span></text:p>
              <text:p text:style-name="P1"><text:span text:style-name="T1">martin.brungard <text:s text:c="3"/>(2021-02-12 10:36:59)</text:span></text:p>
              <text:p text:style-name="P1"><text:span text:style-name="T1">Select the preferred volume measurement for brewing calculations. <text:s/>All mineral and acid additions are provided in grams and milliliters for all settings. <text:s/>Grain addition settings switch to pounds and ounces when the volume setting is either gallons or barrels. <text:s/>Grain addition settings switch to kilograms and grams when the volume setting is either liters or hectoliters.</text:span></text:p>
            </office:annotation>
            <text:p>Program Volume Setting</text:p>
          </table:table-cell>
          <table:table-cell table:style-name="ce56" table:content-validation-name="val1" office:value-type="string" calcext:value-type="string">
            <office:annotation draw:style-name="gr2" draw:text-style-name="P2" svg:width="17.444cm" svg:height="4.71cm" svg:x="12.185cm" svg:y="3.836cm" draw:caption-point-x="-0.407cm" draw:caption-point-y="-1.445cm">
              <dc:date>2021-02-12T00:00:00</dc:date>
              <text:p text:style-name="P1"><text:span text:style-name="T1">======</text:span></text:p>
              <text:p text:style-name="P1"><text:span text:style-name="T1">ID#AAAAH1AC7oM</text:span></text:p>
              <text:p text:style-name="P1"><text:span text:style-name="T1">Martin Brungard <text:s text:c="3"/>(2021-02-12 10:36:59)</text:span></text:p>
              <text:p text:style-name="P1"><text:span text:style-name="T1">Click to select: Gallons or Liters. </text:span></text:p>
              <text:p text:style-name="P1"><text:span text:style-name="T1"/></text:p>
              <text:p text:style-name="P1"><text:span text:style-name="T1">Additional capability to perform calculations in Barrels, or Hectoliters is available in the Supporter's version.</text:span></text:p>
            </office:annotation>
            <text:p>Gallons</text:p>
          </table:table-cell>
          <table:table-cell table:style-name="ce66" office:value-type="string" calcext:value-type="string">
            <text:p>&lt; Select</text:p>
          </table:table-cell>
          <table:table-cell table:style-name="ce76"/>
          <table:table-cell table:style-name="ce79"/>
          <table:table-cell table:style-name="ce53"/>
          <table:table-cell table:style-name="ce83"/>
          <table:table-cell table:style-name="ce83" office:value-type="float" office:value="1" calcext:value-type="float">
            <text:p>1</text:p>
          </table:table-cell>
          <table:table-cell table:style-name="ce83" office:value-type="string" calcext:value-type="string">
            <text:p>Gallons</text:p>
          </table:table-cell>
          <table:table-cell table:style-name="ce83" table:number-columns-repeated="2"/>
          <table:table-cell table:style-name="ce53" table:number-columns-repeated="19"/>
          <table:table-cell table:number-columns-repeated="34"/>
        </table:table-row>
        <table:table-row table:style-name="ro13">
          <table:table-cell table:style-name="ce36" office:value-type="string" calcext:value-type="string" table:number-columns-spanned="2" table:number-rows-spanned="1">
            <office:annotation draw:style-name="gr3" draw:text-style-name="P2" svg:width="19.909cm" svg:height="3.095cm" svg:x="7.761cm" svg:y="4.895cm" draw:caption-point-x="4.017cm" draw:caption-point-y="-1.314cm">
              <dc:date>2021-02-12T00:00:00</dc:date>
              <text:p text:style-name="P1"><text:span text:style-name="T1">======</text:span></text:p>
              <text:p text:style-name="P1"><text:span text:style-name="T1">ID#AAAAH1AC7qM</text:span></text:p>
              <text:p text:style-name="P1"><text:span text:style-name="T1">martin.brungard <text:s text:c="3"/>(2021-02-12 10:36:59)</text:span></text:p>
              <text:p text:style-name="P1"><text:span text:style-name="T1">Input data into blue and pink cells only. <text:s/>Calculated data is shown in yellow cells.</text:span></text:p>
            </office:annotation>
            <text:p>Water Report Input </text:p>
          </table:table-cell>
          <table:covered-table-cell table:style-name="ce20"/>
          <table:table-cell table:style-name="ce67" office:value-type="string" calcext:value-type="string" table:number-columns-spanned="2" table:number-rows-spanned="1">
            <text:p>Hover cursor over cells w/ red corner marks to display information</text:p>
          </table:table-cell>
          <table:covered-table-cell table:style-name="ce20"/>
          <table:table-cell table:style-name="ce31"/>
          <table:table-cell table:style-name="ce53"/>
          <table:table-cell table:style-name="ce83"/>
          <table:table-cell table:style-name="ce83" office:value-type="float" office:value="2" calcext:value-type="float">
            <text:p>2</text:p>
          </table:table-cell>
          <table:table-cell table:style-name="ce83" office:value-type="string" calcext:value-type="string">
            <text:p>Liters</text:p>
          </table:table-cell>
          <table:table-cell table:style-name="ce83" table:number-columns-repeated="2"/>
          <table:table-cell table:style-name="ce53" table:number-columns-repeated="19"/>
          <table:table-cell table:number-columns-repeated="34"/>
        </table:table-row>
        <table:table-row table:style-name="ro104">
          <table:table-cell table:style-name="ce37" office:value-type="string" calcext:value-type="string">
            <office:annotation draw:style-name="gr4" draw:text-style-name="P2" svg:width="19.909cm" svg:height="2.619cm" svg:x="7.761cm" svg:y="5.927cm" draw:caption-point-x="-0.407cm" draw:caption-point-y="-1.287cm">
              <dc:date>2021-02-12T00:00:00</dc:date>
              <text:p text:style-name="P1"><text:span text:style-name="T1">======</text:span></text:p>
              <text:p text:style-name="P1"><text:span text:style-name="T1">ID#AAAAH1AC7io</text:span></text:p>
              <text:p text:style-name="P1"><text:span text:style-name="T1">Martin Brungard <text:s text:c="3"/>(2021-02-12 10:36:59)</text:span></text:p>
              <text:p text:style-name="P1"><text:span text:style-name="T1">Cations are postively-charged ions</text:span></text:p>
            </office:annotation>
            <text:p>Cations</text:p>
          </table:table-cell>
          <table:table-cell table:style-name="ce57" office:value-type="string" calcext:value-type="string" table:number-columns-spanned="2" table:number-rows-spanned="1">
            <office:annotation draw:style-name="gr5" draw:text-style-name="P2" svg:width="17.444cm" svg:height="3.73cm" svg:x="12.185cm" svg:y="5.927cm" draw:caption-point-x="4.016cm" draw:caption-point-y="-1.287cm">
              <dc:date>2021-02-12T00:00:00</dc:date>
              <text:p text:style-name="P1"><text:span text:style-name="T1">======</text:span></text:p>
              <text:p text:style-name="P1"><text:span text:style-name="T1">ID#AAAAH1AC7ok</text:span></text:p>
              <text:p text:style-name="P1"><text:span text:style-name="T1">martin.brungard <text:s text:c="3"/>(2021-02-12 10:36:59)</text:span></text:p>
              <text:p text:style-name="P1"><text:span text:style-name="T1">Enter in mg/L or ppm units only. <text:s/></text:span></text:p>
              <text:p text:style-name="P1"><text:span text:style-name="T1"/></text:p>
              <text:p text:style-name="P1"><text:span text:style-name="T1">If concentration is given in ug/L or ppb, divide that value by 1000 before entering the value into table below.</text:span></text:p>
            </office:annotation>
            <text:p>Enter Ion Concentrations from Water Report <text:s text:c="4"/>(mg/L or ppm)</text:p>
          </table:table-cell>
          <table:covered-table-cell table:style-name="ce19"/>
          <table:table-cell table:style-name="ce37" office:value-type="string" calcext:value-type="string">
            <office:annotation draw:style-name="gr4" draw:text-style-name="P2" svg:width="5.656cm" svg:height="2.619cm" svg:x="23.973cm" svg:y="5.927cm" draw:caption-point-x="-0.407cm" draw:caption-point-y="-1.287cm">
              <dc:date>2021-02-12T00:00:00</dc:date>
              <text:p text:style-name="P1"><text:span text:style-name="T1">======</text:span></text:p>
              <text:p text:style-name="P1"><text:span text:style-name="T1">ID#AAAAH1AC7qI</text:span></text:p>
              <text:p text:style-name="P1"><text:span text:style-name="T1">Martin Brungard <text:s text:c="3"/>(2021-02-12 10:36:59)</text:span></text:p>
              <text:p text:style-name="P1"><text:span text:style-name="T1">Anions are negatively-charged ions</text:span></text:p>
            </office:annotation>
            <text:p>Anions</text:p>
          </table:table-cell>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105">
          <table:table-cell table:style-name="ce38" office:value-type="string" calcext:value-type="string">
            <office:annotation draw:style-name="gr6" draw:text-style-name="P2" svg:width="19.909cm" svg:height="3.81cm" svg:x="7.761cm" svg:y="6.482cm" draw:caption-point-x="-0.407cm" draw:caption-point-y="-0.81cm">
              <dc:date>2021-02-12T00:00:00</dc:date>
              <text:p text:style-name="P1"><text:span text:style-name="T1">======</text:span></text:p>
              <text:p text:style-name="P1"><text:span text:style-name="T1">ID#AAAAH1AC7kc</text:span></text:p>
              <text:p text:style-name="P1"><text:span text:style-name="T1">Martin Brungard <text:s text:c="3"/>(2021-02-12 10:36:59)</text:span></text:p>
              <text:p text:style-name="P1"><text:span text:style-name="T1">Calcium content can vary depending on the water source. <text:s/>Calcium content is sometimes reported (as CaCO3) and must be converted to (ppm) by multiplying by 0.401 for use in this program. <text:s/></text:span></text:p>
              <text:p text:style-name="P1"><text:span text:style-name="T1"/></text:p>
              <text:p text:style-name="P1"><text:span text:style-name="T1">If hardness and calcium values are provided in the water report, check the Hardness results shown below and compare to the Hardness shown in the water report. <text:s/>If they don't closely agree, there may be an error in the input units. Use the calculators below to try converting the calcium concentration to the proper ppm units.</text:span></text:p>
            </office:annotation>
            <text:p>Calcium (Ca)</text:p>
          </table:table-cell>
          <table:table-cell table:style-name="ce58" office:value-type="float" office:value="0" calcext:value-type="float">
            <text:p>0.0</text:p>
          </table:table-cell>
          <table:table-cell table:style-name="ce68" office:value-type="float" office:value="0" calcext:value-type="float">
            <text:p>0.0</text:p>
          </table:table-cell>
          <table:table-cell table:style-name="ce38" office:value-type="string" calcext:value-type="string">
            <office:annotation draw:style-name="gr7" draw:text-style-name="P2" svg:width="5.656cm" svg:height="8.101cm" svg:x="23.973cm" svg:y="3.741cm" draw:caption-point-x="-0.407cm" draw:caption-point-y="1.931cm">
              <dc:date>2021-02-12T00:00:00</dc:date>
              <text:p text:style-name="P1"><text:span text:style-name="T1">======</text:span></text:p>
              <text:p text:style-name="P1"><text:span text:style-name="T1">ID#AAAAH1AC7p8</text:span></text:p>
              <text:p text:style-name="P1"><text:span text:style-name="T1">Martin Brungard <text:s text:c="3"/>(2021-02-12 10:36:59)</text:span></text:p>
              <text:p text:style-name="P1"><text:span text:style-name="T1">Bicarbonate is typically the predominant Alkalinity producer at typical drinking water pH between 6.5 and 10.5. <text:s text:c="2"/>Bicarbonate is frequently reported (as CaCO3) units. <text:s/>This must be converted to (ppm) by multiplying by 1.22 for use in this program. <text:s text:c="2"/>If the report does not balance, check the reporting units and convert as necessary. <text:s/>Check the alkalinity result below and compare to the alkalinity from the water report. <text:s/>If they don't match very well, there may be a units error. <text:s/>Use the calculators below.</text:span></text:p>
            </office:annotation>
            <text:p><text:span text:style-name="T2">Bicarbonate (HCO</text:span><text:span text:style-name="T69">3</text:span><text:span text:style-name="T70">)</text:span></text:p>
          </table:table-cell>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105">
          <table:table-cell table:style-name="ce38" office:value-type="string" calcext:value-type="string">
            <office:annotation draw:style-name="gr6" draw:text-style-name="P2" svg:width="19.909cm" svg:height="3.81cm" svg:x="7.761cm" svg:y="7.038cm" draw:caption-point-x="-0.407cm" draw:caption-point-y="-0.811cm">
              <dc:date>2021-02-12T00:00:00</dc:date>
              <text:p text:style-name="P1"><text:span text:style-name="T1">======</text:span></text:p>
              <text:p text:style-name="P1"><text:span text:style-name="T1">ID#AAAAH1AC7k4</text:span></text:p>
              <text:p text:style-name="P1"><text:span text:style-name="T1">Martin Brungard <text:s text:c="3"/>(2021-02-12 10:36:59)</text:span></text:p>
              <text:p text:style-name="P1"><text:span text:style-name="T1">Magnesium is typically low in most drinking water and is almost always at lower concentration than Calcium. <text:s/>Magnesium is sometimes reported (as CaCO3) and must be converted to (ppm) by multiplying by 0.243 for use in this program. <text:s/></text:span></text:p>
              <text:p text:style-name="P1"><text:span text:style-name="T1"/></text:p>
              <text:p text:style-name="P1"><text:span text:style-name="T1">If hardness and magnesium values are given in the water report, check the Hardness results shown below and compare to the Hardness shown in the water report. <text:s/>If they don't closely agree, there may be an error in the input units. <text:s/>Use the calculators below to try converting the magnesium concentration to proper ppm units.</text:span></text:p>
            </office:annotation>
            <text:p>Magnesium (Mg)</text:p>
          </table:table-cell>
          <table:table-cell table:style-name="ce58" office:value-type="float" office:value="0" calcext:value-type="float">
            <text:p>0.0</text:p>
          </table:table-cell>
          <table:table-cell table:style-name="ce68" office:value-type="float" office:value="0" calcext:value-type="float">
            <text:p>0.0</text:p>
          </table:table-cell>
          <table:table-cell table:style-name="ce38" office:value-type="string" calcext:value-type="string">
            <office:annotation draw:style-name="gr8" draw:text-style-name="P2" svg:width="5.656cm" svg:height="10.076cm" svg:x="23.973cm" svg:y="3.905cm" draw:caption-point-x="-0.407cm" draw:caption-point-y="2.322cm">
              <dc:date>2021-02-12T00:00:00</dc:date>
              <text:p text:style-name="P1"><text:span text:style-name="T1">======</text:span></text:p>
              <text:p text:style-name="P1"><text:span text:style-name="T1">ID#AAAAH1AC7iQ</text:span></text:p>
              <text:p text:style-name="P1"><text:span text:style-name="T1">Martin Brungard <text:s text:c="3"/>(2021-02-12 10:36:59)</text:span></text:p>
              <text:p text:style-name="P1"><text:span text:style-name="T1">Most drinking water supplies typically have a pH of less than 9. <text:s/>Carbonate ion does not exist in water with pH below 8 and is a minor component in water with its pH between 8 and 9. <text:s/>Carbonate may be reported in (as CaCO3) units and must be converted to (ppm) by multiplying by 0.60 for use in this program. <text:s text:c="2"/>If the water supply pH is below 9, Carbonate can be assumed to be Zero with little error. <text:s/>This is a component that can be ignored if the concentration is unknown.</text:span></text:p>
              <text:p text:style-name="P1"><text:span text:style-name="T1"/></text:p>
              <text:p text:style-name="P1"><text:span text:style-name="T1">This Carbonate concentration is converted by the program to an equivalent Bicarbonate concentration for subsequent calculations.</text:span></text:p>
            </office:annotation>
            <text:p><text:span text:style-name="T2">Carbonate (CO</text:span><text:span text:style-name="T69">3</text:span><text:span text:style-name="T70">)</text:span></text:p>
          </table:table-cell>
          <table:table-cell table:style-name="ce31"/>
          <table:table-cell table:style-name="ce53"/>
          <table:table-cell table:style-name="ce83"/>
          <table:table-cell table:style-name="ce83" table:number-matrix-columns-spanned="1" table:number-matrix-rows-spanned="1" table:formula="of:=INDEX([.H3:.H6]; MATCH([.B3]; [.I3:.I6];0))" office:value-type="float" office:value="1" calcext:value-type="float">
            <text:p>1</text:p>
          </table:table-cell>
          <table:table-cell table:style-name="ce83" table:number-columns-repeated="3"/>
          <table:table-cell table:style-name="ce53" table:number-columns-repeated="19"/>
          <table:table-cell table:number-columns-repeated="34"/>
        </table:table-row>
        <table:table-row table:style-name="ro105">
          <table:table-cell table:style-name="ce38" office:value-type="string" calcext:value-type="string">
            <office:annotation draw:style-name="gr9" draw:text-style-name="P2" svg:width="19.909cm" svg:height="2.699cm" svg:x="7.761cm" svg:y="7.593cm" draw:caption-point-x="-0.407cm" draw:caption-point-y="-0.81cm">
              <dc:date>2021-02-12T00:00:00</dc:date>
              <text:p text:style-name="P1"><text:span text:style-name="T1">======</text:span></text:p>
              <text:p text:style-name="P1"><text:span text:style-name="T1">ID#AAAAH1AC7jw</text:span></text:p>
              <text:p text:style-name="P1"><text:span text:style-name="T1">Martin Brungard <text:s text:c="3"/>(2021-02-12 10:36:59)</text:span></text:p>
              <text:p text:style-name="P1"><text:span text:style-name="T1">Sodium content in drinking water is highly variable. <text:s/>Low to moderate sodium is an important factor in producing good beer. <text:s/>This is a component that should not be ignored.</text:span></text:p>
            </office:annotation>
            <text:p>Sodium (Na)</text:p>
          </table:table-cell>
          <table:table-cell table:style-name="ce58" office:value-type="float" office:value="0" calcext:value-type="float">
            <text:p>0.0</text:p>
          </table:table-cell>
          <table:table-cell table:style-name="ce68" office:value-type="float" office:value="0" calcext:value-type="float">
            <text:p>0.0</text:p>
          </table:table-cell>
          <table:table-cell table:style-name="ce38" office:value-type="string" calcext:value-type="string">
            <office:annotation draw:style-name="gr10" draw:text-style-name="P2" svg:width="5.656cm" svg:height="4.941cm" svg:x="23.973cm" svg:y="6.472cm" draw:caption-point-x="-0.407cm" draw:caption-point-y="0.311cm">
              <dc:date>2021-02-12T00:00:00</dc:date>
              <text:p text:style-name="P1"><text:span text:style-name="T1">======</text:span></text:p>
              <text:p text:style-name="P1"><text:span text:style-name="T1">ID#AAAAH1AC7pw</text:span></text:p>
              <text:p text:style-name="P1"><text:span text:style-name="T1">Martin Brungard <text:s text:c="3"/>(2021-02-12 10:36:59)</text:span></text:p>
              <text:p text:style-name="P1"><text:span text:style-name="T1">Sulfate is an important flavor component in brewing water. <text:s/>If the water report result is presented in (SO4-S) units, that value must be multiplied by 3 for use in this program. <text:s/>Use the calculator below to convert from SO4-S units to SO4 units.</text:span></text:p>
            </office:annotation>
            <text:p><text:span text:style-name="T2">Sulfate (SO</text:span><text:span text:style-name="T69">4</text:span><text:span text:style-name="T70">)</text:span></text:p>
          </table:table-cell>
          <table:table-cell table:style-name="ce80" office:value-type="string" calcext:value-type="string">
            <text:p><text:span text:style-name="T2">multiply lab result by 3 if lab reports as SO</text:span><text:span text:style-name="T69">4</text:span><text:span text:style-name="T70">-S</text:span></text:p>
          </table:table-cell>
          <table:table-cell table:style-name="ce53">
            <office:annotation draw:style-name="gr11" draw:text-style-name="P2" svg:width="0.001cm" svg:height="100.2cm" svg:x="29.629cm" svg:y="0cm" draw:caption-point-x="-0.407cm" draw:caption-point-y="6.783cm">
              <dc:date>2021-02-12T00:00:00</dc:date>
              <text:p text:style-name="P1"><text:span text:style-name="T1">======</text:span></text:p>
              <text:p text:style-name="P1"><text:span text:style-name="T1">ID#AAAAH1AC7pM</text:span></text:p>
              <text:p text:style-name="P1"><text:span text:style-name="T1">martin.brungard <text:s text:c="3"/>(2021-02-12 10:36:59)</text:span></text:p>
              <text:p text:style-name="P1"><text:span text:style-name="T1">Some laboratories cater to agricultural clients and those clients are more interested in the total Sulfur content. <text:s/>They report in terms of 'Sulfate as Sulphur which is denoted 'SO4-S". <text:s/>The Brewer needs to convert that result to its true sulfate concentration by multiplying the SO4-S result by 3.</text:span></text:p>
            </office:annotation>
          </table:table-cell>
          <table:table-cell table:style-name="ce83" table:number-columns-repeated="5"/>
          <table:table-cell table:style-name="ce53" table:number-columns-repeated="19"/>
          <table:table-cell table:number-columns-repeated="34"/>
        </table:table-row>
        <table:table-row table:style-name="ro105">
          <table:table-cell table:style-name="ce39" table:number-columns-repeated="2"/>
          <table:table-cell table:style-name="ce69" office:value-type="float" office:value="0" calcext:value-type="float">
            <text:p>0.0</text:p>
          </table:table-cell>
          <table:table-cell table:style-name="ce77" office:value-type="string" calcext:value-type="string">
            <office:annotation draw:style-name="gr12" draw:text-style-name="P2" svg:width="5.656cm" svg:height="5.731cm" svg:x="23.973cm" svg:y="6.633cm" draw:caption-point-x="-0.407cm" draw:caption-point-y="0.705cm">
              <dc:date>2021-02-12T00:00:00</dc:date>
              <text:p text:style-name="P1"><text:span text:style-name="T1">======</text:span></text:p>
              <text:p text:style-name="P1"><text:span text:style-name="T1">ID#AAAAH1AC7oI</text:span></text:p>
              <text:p text:style-name="P1"><text:span text:style-name="T1">Martin Brungard <text:s text:c="3"/>(2021-02-12 10:36:59)</text:span></text:p>
              <text:p text:style-name="P1"><text:span text:style-name="T1">Chloride is an important flavor component in brewing water. <text:s/>It is not the same as Chlorine. <text:s/>Do not enter Chlorine concentration here. <text:s/>Chlorine is a common water disinfectant and typically ranges from about 1 to 3 ppm in most municipal water supplies. <text:s text:c="2"/>Chloride concentration is typically higher than that.</text:span></text:p>
            </office:annotation>
            <text:p>Chloride (Cl)</text:p>
          </table:table-cell>
          <table:table-cell table:style-name="ce80"/>
          <table:table-cell table:style-name="ce53"/>
          <table:table-cell table:style-name="ce83" table:number-columns-repeated="5"/>
          <table:table-cell table:style-name="ce53" table:number-columns-repeated="19"/>
          <table:table-cell table:number-columns-repeated="34"/>
        </table:table-row>
        <table:table-row table:style-name="ro105">
          <table:table-cell table:style-name="ce40" office:value-type="string" calcext:value-type="string" table:number-columns-spanned="2" table:number-rows-spanned="1">
            <text:p><text:span text:style-name="T110">Optional Inputs</text:span><text:span text:style-name="T111"> (not required, but may improve ion balance)</text:span></text:p>
          </table:table-cell>
          <table:covered-table-cell table:style-name="ce59"/>
          <table:table-cell table:style-name="ce70" office:value-type="float" office:value="0" calcext:value-type="float">
            <text:p>0.0</text:p>
          </table:table-cell>
          <table:table-cell table:style-name="ce78" office:value-type="string" calcext:value-type="string">
            <office:annotation draw:style-name="gr13" draw:text-style-name="P2" svg:width="5.656cm" svg:height="8.891cm" svg:x="23.973cm" svg:y="8.44cm" draw:caption-point-x="-0.407cm" draw:caption-point-y="-0.546cm">
              <dc:date>2021-02-12T00:00:00</dc:date>
              <text:p text:style-name="P1"><text:span text:style-name="T1">======</text:span></text:p>
              <text:p text:style-name="P1"><text:span text:style-name="T1">ID#AAAAH1AC7iI</text:span></text:p>
              <text:p text:style-name="P1"><text:span text:style-name="T1">Martin Brungard <text:s text:c="3"/>(2021-02-12 10:36:59)</text:span></text:p>
              <text:p text:style-name="P1"><text:span text:style-name="T1">Nitrate is typically low in most drinking water. <text:s/>If the result is presented in (NO3-N) units, it must be multiplied by 4.43 for use in this program. <text:s/></text:span></text:p>
              <text:p text:style-name="P1"><text:span text:style-name="T1"/></text:p>
              <text:p text:style-name="P1"><text:span text:style-name="T1">Enter Zero if this concentration is not known. <text:s/>This is a component that can be ignored if its concentration is unknown.</text:span></text:p>
              <text:p text:style-name="P1"><text:span text:style-name="T1"/></text:p>
              <text:p text:style-name="P1"><text:span text:style-name="T1">Nitrate should typically be less than 44 ppm for potable water.</text:span></text:p>
              <text:p text:style-name="P1"><text:span text:style-name="T1"/></text:p>
              <text:p text:style-name="P1"><text:span text:style-name="T1">This ion is not used for brewing calculations, but may be useful for assessing the balance of cations and anions.</text:span></text:p>
            </office:annotation>
            <text:p><text:span text:style-name="T2">Nitrate (NO</text:span><text:span text:style-name="T69">3</text:span><text:span text:style-name="T70">)</text:span></text:p>
          </table:table-cell>
          <table:table-cell table:style-name="ce80" office:value-type="string" calcext:value-type="string">
            <text:p><text:span text:style-name="T2">multiply lab result by 4.43 if lab reports as NO</text:span><text:span text:style-name="T69">3</text:span><text:span text:style-name="T70">-N</text:span></text:p>
          </table:table-cell>
          <table:table-cell table:style-name="ce53">
            <office:annotation draw:style-name="gr11" draw:text-style-name="P2" svg:width="0.001cm" svg:height="100.2cm" svg:x="29.629cm" svg:y="0cm" draw:caption-point-x="-0.407cm" draw:caption-point-y="7.894cm">
              <dc:date>2021-02-12T00:00:00</dc:date>
              <text:p text:style-name="P1"><text:span text:style-name="T1">======</text:span></text:p>
              <text:p text:style-name="P1"><text:span text:style-name="T1">ID#AAAAH1AC7ig</text:span></text:p>
              <text:p text:style-name="P1"><text:span text:style-name="T1">martin.brungard <text:s text:c="3"/>(2021-02-12 10:36:59)</text:span></text:p>
              <text:p text:style-name="P1"><text:span text:style-name="T1">Some laboratories cater to agricultural clients and those clients are more interested in the total Nitrogen content. <text:s/>They report in terms of 'Nitrate as Nitrogen which is denoted 'NO3-N". <text:s/>The Brewer needs to convert that result to its true nitrate concentration by multiplying the NO3-N result by 4.43.</text:span></text:p>
            </office:annotation>
          </table:table-cell>
          <table:table-cell table:style-name="ce83" table:number-columns-repeated="5"/>
          <table:table-cell table:style-name="ce53" table:number-columns-repeated="19"/>
          <table:table-cell table:number-columns-repeated="34"/>
        </table:table-row>
        <table:table-row table:style-name="ro105">
          <table:table-cell table:style-name="ce41" office:value-type="string" calcext:value-type="string">
            <office:annotation draw:style-name="gr14" draw:text-style-name="P2" svg:width="19.909cm" svg:height="5.503cm" svg:x="7.761cm" svg:y="9.26cm" draw:caption-point-x="-0.407cm" draw:caption-point-y="-0.81cm">
              <dc:date>2021-02-12T00:00:00</dc:date>
              <text:p text:style-name="P1"><text:span text:style-name="T1">======</text:span></text:p>
              <text:p text:style-name="P1"><text:span text:style-name="T1">ID#AAAAH1AC7i4</text:span></text:p>
              <text:p text:style-name="P1"><text:span text:style-name="T1">Martin Brungard <text:s text:c="3"/>(2021-02-12 10:36:59)</text:span></text:p>
              <text:p text:style-name="P1"><text:span text:style-name="T1">Potassium is typically low in most drinking water. <text:s/>If the Potassium content is unknown, enter Zero. <text:s/>This is a water component that can be ignored for most water sources.</text:span></text:p>
              <text:p text:style-name="P1"><text:span text:style-name="T1"/></text:p>
              <text:p text:style-name="P1"><text:span text:style-name="T1">This ion is not used for brewing calculations, but may be useful for assessing the balance of cations and anions.</text:span></text:p>
            </office:annotation>
            <text:p>Potassium (K)</text:p>
          </table:table-cell>
          <table:table-cell table:style-name="ce58" office:value-type="float" office:value="0" calcext:value-type="float">
            <text:p>0.0</text:p>
          </table:table-cell>
          <table:table-cell table:style-name="ce68" office:value-type="float" office:value="0" calcext:value-type="float">
            <text:p>0.0</text:p>
          </table:table-cell>
          <table:table-cell table:style-name="ce41" office:value-type="string" calcext:value-type="string">
            <office:annotation draw:style-name="gr15" draw:text-style-name="P2" svg:width="5.656cm" svg:height="7.25cm" svg:x="23.973cm" svg:y="9.26cm" draw:caption-point-x="-0.407cm" draw:caption-point-y="-0.81cm">
              <dc:date>2021-02-12T00:00:00</dc:date>
              <text:p text:style-name="P1"><text:span text:style-name="T1">======</text:span></text:p>
              <text:p text:style-name="P1"><text:span text:style-name="T1">ID#AAAAH1AC7kg</text:span></text:p>
              <text:p text:style-name="P1"><text:span text:style-name="T1">Martin Brungard <text:s text:c="3"/>(2021-02-12 10:36:59)</text:span></text:p>
              <text:p text:style-name="P1"><text:span text:style-name="T1">Nitrite is typically low in most drinking water. <text:s/></text:span></text:p>
              <text:p text:style-name="P1"><text:span text:style-name="T1"/></text:p>
              <text:p text:style-name="P1"><text:span text:style-name="T1">Enter Zero if this concentration is not known. <text:s/>This is a component that can be ignored if its concentration is unknown.</text:span></text:p>
              <text:p text:style-name="P1"><text:span text:style-name="T1"/></text:p>
              <text:p text:style-name="P1"><text:span text:style-name="T1">This ion is not used for brewing calculations, but may be useful for assessing the balance of cations and anions.</text:span></text:p>
            </office:annotation>
            <text:p><text:span text:style-name="T2">Nitrite (NO</text:span><text:span text:style-name="T69">2</text:span><text:span text:style-name="T70">)</text:span></text:p>
          </table:table-cell>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105">
          <table:table-cell table:style-name="ce41" office:value-type="string" calcext:value-type="string">
            <office:annotation draw:style-name="gr16" draw:text-style-name="P2" svg:width="19.909cm" svg:height="8.599cm" svg:x="7.761cm" svg:y="9.816cm" draw:caption-point-x="-0.407cm" draw:caption-point-y="-0.811cm">
              <dc:date>2021-02-12T00:00:00</dc:date>
              <text:p text:style-name="P1"><text:span text:style-name="T1">======</text:span></text:p>
              <text:p text:style-name="P1"><text:span text:style-name="T1">ID#AAAAH1AC7mQ</text:span></text:p>
              <text:p text:style-name="P1"><text:span text:style-name="T1">Martin Brungard <text:s text:c="3"/>(2021-02-12 10:36:59)</text:span></text:p>
              <text:p text:style-name="P1"><text:span text:style-name="T1">Iron is typically at low concentration (&lt;0.3 ppm) in good brewing water. <text:s/>Iron greater than this concentration may be tasted in the water and beer. <text:s/>If the Iron concentration is not known, enter Zero. <text:s/>This is a water component that can be ignored in this input table if its concentration is not known. <text:s/></text:span></text:p>
              <text:p text:style-name="P1"><text:span text:style-name="T1"/></text:p>
              <text:p text:style-name="P1"><text:span text:style-name="T1">Iron concentration is often reported as ug/L, ppb, or parts per billion. <text:s/>Divide iron reported as ug/L or ppb by 1000 to convert to mg/L or ppm. <text:s/>1000 ug/L is equal to 1 mg/L. </text:span></text:p>
              <text:p text:style-name="P1"><text:span text:style-name="T1"/></text:p>
              <text:p text:style-name="P1"><text:span text:style-name="T1">If the reported Iron concentration is greater than 1, then the reporting units may need to be converted.</text:span></text:p>
              <text:p text:style-name="P1"><text:span text:style-name="T1"/></text:p>
              <text:p text:style-name="P1"><text:span text:style-name="T1">This ion is not used for brewing calculations, but may be useful for assessing the balance of cations and anions.</text:span></text:p>
            </office:annotation>
            <text:p>Iron (Fe)</text:p>
          </table:table-cell>
          <table:table-cell table:style-name="ce60" office:value-type="float" office:value="0" calcext:value-type="float">
            <text:p>0.0</text:p>
          </table:table-cell>
          <table:table-cell table:style-name="ce68" office:value-type="float" office:value="0" calcext:value-type="float">
            <text:p>0.0</text:p>
          </table:table-cell>
          <table:table-cell table:style-name="ce41" office:value-type="string" calcext:value-type="string">
            <office:annotation draw:style-name="gr17" draw:text-style-name="P2" svg:width="5.656cm" svg:height="7.249cm" svg:x="23.973cm" svg:y="9.816cm" draw:caption-point-x="-0.407cm" draw:caption-point-y="-0.811cm">
              <dc:date>2021-02-12T00:00:00</dc:date>
              <text:p text:style-name="P1"><text:span text:style-name="T1">======</text:span></text:p>
              <text:p text:style-name="P1"><text:span text:style-name="T1">ID#AAAAH1AC7h0</text:span></text:p>
              <text:p text:style-name="P1"><text:span text:style-name="T1">Martin Brungard <text:s text:c="3"/>(2021-02-12 10:36:59)</text:span></text:p>
              <text:p text:style-name="P1"><text:span text:style-name="T1">Fluoride is typically at low concentrations in drinking water. <text:s/></text:span></text:p>
              <text:p text:style-name="P1"><text:span text:style-name="T1"/></text:p>
              <text:p text:style-name="P1"><text:span text:style-name="T1">Enter Zero if the concentration is not known. <text:s/>This is a component that can be ignored if its concentration is unknown.</text:span></text:p>
              <text:p text:style-name="P1"><text:span text:style-name="T1"/></text:p>
              <text:p text:style-name="P1"><text:span text:style-name="T1">This ion is not used for brewing calculations, but may be useful for assessing the balance of cations and anions.</text:span></text:p>
            </office:annotation>
            <text:p>Fluoride (F)</text:p>
          </table:table-cell>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98">
          <table:table-cell table:style-name="ce42" table:formula="of:=IF((ABS([.I14]-[.I15])&gt;0.5); &quot;Water Report is unbalanced. Check your inputs&quot;;&quot;&quot;)" table:number-columns-spanned="4" table:number-rows-spanned="1">
            <office:annotation draw:style-name="gr18" draw:text-style-name="P2" svg:width="19.909cm" svg:height="6.059cm" svg:x="7.761cm" svg:y="10.451cm" draw:caption-point-x="15.805cm" draw:caption-point-y="-0.89cm">
              <dc:date>2021-02-12T00:00:00</dc:date>
              <text:p text:style-name="P1"><text:span text:style-name="T1">======</text:span></text:p>
              <text:p text:style-name="P1"><text:span text:style-name="T1">ID#AAAAH1AC7mw</text:span></text:p>
              <text:p text:style-name="P1"><text:span text:style-name="T1">Martin Brungard <text:s text:c="3"/>(2021-02-12 10:36:59)</text:span></text:p>
              <text:p text:style-name="P1"><text:span text:style-name="T1">This warning tells you if the input ion concentrations are faulty. This warning is likely to display until all of the ion concentrations are input. The warning should disappear when the final entries are complete.</text:span></text:p>
              <text:p text:style-name="P1"><text:span text:style-name="T1"/></text:p>
              <text:p text:style-name="P1"><text:span text:style-name="T1">If the warning does not disappear, double check your inputs and their values. Make sure that all conversions were performed correctly.</text:span></text:p>
            </office:annotation>
            <text:p/>
          </table:table-cell>
          <table:covered-table-cell table:number-columns-repeated="3"/>
          <table:table-cell table:style-name="ce31"/>
          <table:table-cell table:style-name="ce53"/>
          <table:table-cell table:style-name="ce83" table:number-columns-repeated="5"/>
          <table:table-cell table:style-name="ce53" table:number-columns-repeated="19"/>
          <table:table-cell table:number-columns-repeated="34"/>
        </table:table-row>
        <table:table-row table:style-name="ro105">
          <table:table-cell table:style-name="ce43" office:value-type="string" calcext:value-type="string" table:number-columns-spanned="4" table:number-rows-spanned="1">
            <text:p>Calculated Alkalinity</text:p>
          </table:table-cell>
          <table:covered-table-cell table:number-columns-repeated="2" table:style-name="ce21"/>
          <table:covered-table-cell table:style-name="ce19"/>
          <table:table-cell table:style-name="ce31"/>
          <table:table-cell table:style-name="ce53"/>
          <table:table-cell table:style-name="ce83" table:number-columns-repeated="2"/>
          <table:table-cell table:style-name="ce84" table:formula="of:=(N([.B6])/20.05)+(N([.B7])/12.15)+(N([.B8])/23)+(N([.B11])/39.1)+(N([.B12])/28)" office:value-type="float" office:value="0" calcext:value-type="float">
            <text:p>0.00</text:p>
          </table:table-cell>
          <table:table-cell table:style-name="ce84" table:formula="of:=ABS([.I14]-[.I15])" office:value-type="float" office:value="0" calcext:value-type="float">
            <text:p>0.00</text:p>
          </table:table-cell>
          <table:table-cell table:style-name="ce83"/>
          <table:table-cell table:style-name="ce53" table:number-columns-repeated="19"/>
          <table:table-cell table:number-columns-repeated="34"/>
        </table:table-row>
        <table:table-row table:style-name="ro105">
          <table:table-cell table:style-name="ce44" office:value-type="string" calcext:value-type="string">
            <text:p><text:span text:style-name="T2">Alkalinity (ppm as CaCO</text:span><text:span text:style-name="T69">3</text:span><text:span text:style-name="T70">)</text:span></text:p>
          </table:table-cell>
          <table:table-cell table:style-name="ce61" table:formula="of:=50*((N([.C6])/61)+(2*(N([.C7])/60)))" office:value-type="float" office:value="0" calcext:value-type="float">
            <text:p>0</text:p>
          </table:table-cell>
          <table:table-cell table:style-name="ce71" office:value-type="string" calcext:value-type="string" table:number-columns-spanned="3" table:number-rows-spanned="1">
            <text:p><text:span text:style-name="T2">&lt;-- This value is automatically entered on the </text:span><text:span text:style-name="T3">Sparge Acidification</text:span><text:span text:style-name="T4"> sheet</text:span></text:p>
          </table:table-cell>
          <table:covered-table-cell table:number-columns-repeated="2"/>
          <table:table-cell table:style-name="ce53"/>
          <table:table-cell table:style-name="ce83" table:number-columns-repeated="2"/>
          <table:table-cell table:style-name="ce84" table:formula="of:=(N([.C6])/61)+(N([.C7])/30)+(N([.C8])/48)+(N([.C9])/35.45)+(N([.C10])/62)+(N([.C11])/46)+(N([.C12])/19)" office:value-type="float" office:value="0" calcext:value-type="float">
            <text:p>0.00</text:p>
          </table:table-cell>
          <table:table-cell table:style-name="ce83" table:number-columns-repeated="2"/>
          <table:table-cell table:style-name="ce53" table:number-columns-repeated="19"/>
          <table:table-cell table:number-columns-repeated="34"/>
        </table:table-row>
        <table:table-row table:style-name="ro106">
          <table:table-cell table:style-name="ce45" office:value-type="string" calcext:value-type="string" table:number-columns-spanned="4" table:number-rows-spanned="1">
            <text:p>Use the calculators below, only if your water report does not balance and you need to convert some values.</text:p>
          </table:table-cell>
          <table:covered-table-cell table:number-columns-repeated="3"/>
          <table:table-cell table:style-name="ce31"/>
          <table:table-cell table:style-name="ce53"/>
          <table:table-cell table:style-name="ce83" table:number-columns-repeated="2"/>
          <table:table-cell table:style-name="ce84"/>
          <table:table-cell table:style-name="ce83" table:number-columns-repeated="2"/>
          <table:table-cell table:style-name="ce53" table:number-columns-repeated="19"/>
          <table:table-cell table:number-columns-repeated="34"/>
        </table:table-row>
        <table:table-row table:style-name="ro107">
          <table:table-cell table:style-name="ce46" office:value-type="string" calcext:value-type="string" table:number-columns-spanned="4" table:number-rows-spanned="1">
            <text:p>Alkalinity Conversion Calculator</text:p>
          </table:table-cell>
          <table:covered-table-cell table:number-columns-repeated="3" table:style-name="ce20"/>
          <table:table-cell table:style-name="ce31"/>
          <table:table-cell table:style-name="ce53" table:number-columns-repeated="25"/>
          <table:table-cell table:number-columns-repeated="34"/>
        </table:table-row>
        <table:table-row table:style-name="ro99">
          <table:table-cell table:style-name="ce47" office:value-type="string" calcext:value-type="string" table:number-columns-spanned="4" table:number-rows-spanned="1">
            <office:annotation draw:style-name="gr19" draw:text-style-name="P2" svg:width="19.909cm" svg:height="3.493cm" svg:x="7.761cm" svg:y="14.922cm" draw:caption-point-x="15.805cm" draw:caption-point-y="-1.525cm">
              <dc:date>2021-02-12T00:00:00</dc:date>
              <text:p text:style-name="P1"><text:span text:style-name="T1">======</text:span></text:p>
              <text:p text:style-name="P1"><text:span text:style-name="T1">ID#AAAAH1AC7oo</text:span></text:p>
              <text:p text:style-name="P1"><text:span text:style-name="T1">martin.brungard <text:s text:c="3"/>(2021-02-12 10:36:59)</text:span></text:p>
              <text:p text:style-name="P1"><text:span text:style-name="T1">Total Alkalinity and Temporary Hardness are typically equal to each other and can be used to estimate bicarbonate content.</text:span></text:p>
            </office:annotation>
            <text:p><text:span text:style-name="T5">If water report provides only </text:span><text:span text:style-name="T131">Total Alkalinity</text:span><text:span text:style-name="T132"> or </text:span><text:span text:style-name="T6">Temporary Hardnes</text:span><text:span text:style-name="T7">s (as CaCO</text:span><text:span text:style-name="T133">3</text:span><text:span text:style-name="T134">), use this calculator to estimate the Bicarbonate and Carbonate concentrations.  Insert the estimated Bicarbonate and Carbonate results in the Water Report table above.</text:span></text:p>
          </table:table-cell>
          <table:covered-table-cell table:number-columns-repeated="2" table:style-name="ce21"/>
          <table:covered-table-cell table:style-name="ce19"/>
          <table:table-cell table:style-name="ce31"/>
          <table:table-cell table:style-name="ce53" table:number-columns-repeated="25"/>
          <table:table-cell table:number-columns-repeated="34"/>
        </table:table-row>
        <table:table-row table:style-name="ro41">
          <table:table-cell table:style-name="ce44" office:value-type="string" calcext:value-type="string">
            <text:p>Reported Total Alkalinity or Temporary Hardness (as CaCO3) (mg/L or ppm)</text:p>
          </table:table-cell>
          <table:table-cell table:style-name="ce44" office:value-type="string" calcext:value-type="string">
            <text:p>Reported or Measured Water pH</text:p>
          </table:table-cell>
          <table:table-cell table:style-name="ce44" office:value-type="string" calcext:value-type="string">
            <text:p>Estimated Bicarbonate Concentration (ppm)</text:p>
          </table:table-cell>
          <table:table-cell table:style-name="ce44" office:value-type="string" calcext:value-type="string">
            <text:p>Estimated Carbonate <text:s text:c="18"/>Concentration (ppm)</text:p>
          </table:table-cell>
          <table:table-cell table:style-name="ce31"/>
          <table:table-cell table:style-name="ce53" table:number-columns-repeated="25"/>
          <table:table-cell table:number-columns-repeated="34"/>
        </table:table-row>
        <table:table-row table:style-name="ro105">
          <table:table-cell table:style-name="ce48" office:value-type="float" office:value="0" calcext:value-type="float">
            <text:p>0.0</text:p>
          </table:table-cell>
          <table:table-cell table:style-name="ce48" office:value-type="float" office:value="7" calcext:value-type="float">
            <office:annotation draw:style-name="gr20" draw:text-style-name="P2" svg:width="17.444cm" svg:height="6.191cm" svg:x="12.185cm" svg:y="16.669cm" draw:caption-point-x="-0.407cm" draw:caption-point-y="-0.811cm">
              <dc:date>2021-02-12T00:00:00</dc:date>
              <text:p text:style-name="P1"><text:span text:style-name="T1">======</text:span></text:p>
              <text:p text:style-name="P1"><text:span text:style-name="T1">ID#AAAAH1AC7kQ</text:span></text:p>
              <text:p text:style-name="P1"><text:span text:style-name="T1">Martin Brungard <text:s text:c="3"/>(2021-02-12 10:36:59)</text:span></text:p>
              <text:p text:style-name="P1"><text:span text:style-name="T1">If pH is unknown, ENTER 8</text:span></text:p>
              <text:p text:style-name="P1"><text:span text:style-name="T1"/></text:p>
              <text:p text:style-name="P1"><text:span text:style-name="T1">This value is NOT used anywhere else in the program is only used to calculate the relative concentrations of bicarbonate and carbonate ions.</text:span></text:p>
              <text:p text:style-name="P1"><text:span text:style-name="T1"/></text:p>
              <text:p text:style-name="P1"><text:span text:style-name="T1">To find the equivalent Carbonate concentration for a reported Alkalinity, set the pH to 14. <text:s/>Reporting as Carbonate is common in some countries. <text:s/></text:span></text:p>
              <text:p text:style-name="P1"><text:span text:style-name="T1"/></text:p>
              <text:p text:style-name="P1"><text:span text:style-name="T1">To find the equivalent Bicarbonate concentration for a reported Alkalinity, set the pH value to 6 or less.</text:span></text:p>
            </office:annotation>
            <text:p>7.0</text:p>
          </table:table-cell>
          <table:table-cell table:style-name="ce72" table:formula="of:=((N([.A20])/50)/(1+(2*10^(N([.B20])-10.33))))*61" office:value-type="float" office:value="0" calcext:value-type="float">
            <office:annotation draw:style-name="gr21" draw:text-style-name="P2" svg:width="13.021cm" svg:height="2.857cm" svg:x="16.608cm" svg:y="16.669cm" draw:caption-point-x="-0.407cm" draw:caption-point-y="-0.811cm">
              <dc:date>2021-02-12T00:00:00</dc:date>
              <text:p text:style-name="P1"><text:span text:style-name="T1">======</text:span></text:p>
              <text:p text:style-name="P1"><text:span text:style-name="T1">ID#AAAAH1AC7qY</text:span></text:p>
              <text:p text:style-name="P1"><text:span text:style-name="T1">Martin Brungard <text:s text:c="3"/>(2021-02-12 10:36:59)</text:span></text:p>
              <text:p text:style-name="P1"><text:span text:style-name="T1">Enter this result in the Bicarbonate cell above.</text:span></text:p>
            </office:annotation>
            <text:p>0.0</text:p>
          </table:table-cell>
          <table:table-cell table:style-name="ce72" table:formula="of:=((N([.A20])/50)/(1+(2*(10^(N([.B20])-10.33))))*(10^(N([.B20])-10.33)))*60" office:value-type="float" office:value="0" calcext:value-type="float">
            <office:annotation draw:style-name="gr21" draw:text-style-name="P2" svg:width="5.656cm" svg:height="2.857cm" svg:x="23.973cm" svg:y="16.669cm" draw:caption-point-x="-0.407cm" draw:caption-point-y="-0.811cm">
              <dc:date>2021-02-12T00:00:00</dc:date>
              <text:p text:style-name="P1"><text:span text:style-name="T1">======</text:span></text:p>
              <text:p text:style-name="P1"><text:span text:style-name="T1">ID#AAAAH1AC7p0</text:span></text:p>
              <text:p text:style-name="P1"><text:span text:style-name="T1">Martin Brungard <text:s text:c="3"/>(2021-02-12 10:36:59)</text:span></text:p>
              <text:p text:style-name="P1"><text:span text:style-name="T1">Enter this result in the Carbonate cell above.</text:span></text:p>
            </office:annotation>
            <text:p>0.0</text:p>
          </table:table-cell>
          <table:table-cell table:style-name="ce31"/>
          <table:table-cell table:style-name="ce53" table:number-columns-repeated="25"/>
          <table:table-cell table:number-columns-repeated="34"/>
        </table:table-row>
        <table:table-row table:style-name="ro105">
          <table:table-cell table:style-name="ce49" table:number-columns-repeated="4"/>
          <table:table-cell table:style-name="ce31"/>
          <table:table-cell table:style-name="ce53" table:number-columns-repeated="25"/>
          <table:table-cell table:number-columns-repeated="34"/>
        </table:table-row>
        <table:table-row table:style-name="ro108">
          <table:table-cell table:style-name="ce46" office:value-type="string" calcext:value-type="string" table:number-columns-spanned="4" table:number-rows-spanned="1">
            <office:annotation draw:style-name="gr22" draw:text-style-name="P2" svg:width="19.909cm" svg:height="2.592cm" svg:x="7.761cm" svg:y="18.045cm" draw:caption-point-x="15.805cm" draw:caption-point-y="-1.076cm">
              <dc:date>2021-02-12T00:00:00</dc:date>
              <text:p text:style-name="P1"><text:span text:style-name="T1">======</text:span></text:p>
              <text:p text:style-name="P1"><text:span text:style-name="T1">ID#AAAAH1AC7mE</text:span></text:p>
              <text:p text:style-name="P1"><text:span text:style-name="T1">martin.brungard <text:s text:c="3"/>(2021-02-12 10:36:59)</text:span></text:p>
              <text:p text:style-name="P1"><text:span text:style-name="T1">Use this calculator to convert water report results that are given in (as CaCO3), (SO4-S), or (NO3-N) units into their actual ion concentrations in ppm for use in the Water Report Input section above.</text:span></text:p>
            </office:annotation>
            <text:p>Ion Concentration Conversion Calculator</text:p>
          </table:table-cell>
          <table:covered-table-cell table:number-columns-repeated="3" table:style-name="ce20"/>
          <table:table-cell table:style-name="ce31"/>
          <table:table-cell table:style-name="ce53" table:number-columns-repeated="25"/>
          <table:table-cell table:number-columns-repeated="34"/>
        </table:table-row>
        <table:table-row table:style-name="ro103">
          <table:table-cell table:style-name="ce37" office:value-type="string" calcext:value-type="string">
            <text:p>Input Reporting Unit <text:s/></text:p>
          </table:table-cell>
          <table:table-cell table:style-name="ce62" office:value-type="string" calcext:value-type="string">
            <text:p>Input</text:p>
          </table:table-cell>
          <table:table-cell table:style-name="ce73" office:value-type="string" calcext:value-type="string">
            <text:p>Output</text:p>
          </table:table-cell>
          <table:table-cell table:style-name="ce37" office:value-type="string" calcext:value-type="string">
            <text:p>Output Reporting Unit</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Calcium (ppm as CaCO</text:span><text:span text:style-name="T69">3</text:span><text:span text:style-name="T70">)</text:span></text:p>
          </table:table-cell>
          <table:table-cell table:style-name="ce63" office:value-type="float" office:value="0" calcext:value-type="float">
            <text:p>0.0</text:p>
          </table:table-cell>
          <table:table-cell table:style-name="ce74" table:formula="of:=0.401*[.B24]" office:value-type="float" office:value="0" calcext:value-type="float">
            <text:p>0.0</text:p>
          </table:table-cell>
          <table:table-cell table:style-name="ce38" office:value-type="string" calcext:value-type="string">
            <text:p>Calc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Magnesium (ppm as CaCO</text:span><text:span text:style-name="T69">3</text:span><text:span text:style-name="T70">)</text:span></text:p>
          </table:table-cell>
          <table:table-cell table:style-name="ce63" office:value-type="float" office:value="0" calcext:value-type="float">
            <text:p>0.0</text:p>
          </table:table-cell>
          <table:table-cell table:style-name="ce74" table:formula="of:=0.243*[.B25]" office:value-type="float" office:value="0" calcext:value-type="float">
            <text:p>0.0</text:p>
          </table:table-cell>
          <table:table-cell table:style-name="ce38" office:value-type="string" calcext:value-type="string">
            <text:p>Magnes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Bicarbonate (ppm as CaCO</text:span><text:span text:style-name="T69">3</text:span><text:span text:style-name="T70">)</text:span></text:p>
          </table:table-cell>
          <table:table-cell table:style-name="ce63" office:value-type="float" office:value="0" calcext:value-type="float">
            <text:p>0.0</text:p>
          </table:table-cell>
          <table:table-cell table:style-name="ce74" table:formula="of:=1.22*[.B26]" office:value-type="float" office:value="0" calcext:value-type="float">
            <text:p>0.0</text:p>
          </table:table-cell>
          <table:table-cell table:style-name="ce38" office:value-type="string" calcext:value-type="string">
            <text:p>Bicarbon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Carbonate (ppm as CaCO</text:span><text:span text:style-name="T69">3</text:span><text:span text:style-name="T70">)</text:span></text:p>
          </table:table-cell>
          <table:table-cell table:style-name="ce63" office:value-type="float" office:value="0" calcext:value-type="float">
            <text:p>0.0</text:p>
          </table:table-cell>
          <table:table-cell table:style-name="ce74" table:formula="of:=0.6*[.B27]" office:value-type="float" office:value="0" calcext:value-type="float">
            <text:p>0.0</text:p>
          </table:table-cell>
          <table:table-cell table:style-name="ce38" office:value-type="string" calcext:value-type="string">
            <text:p>Carbon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Sulfate (ppm as SO</text:span><text:span text:style-name="T69">4</text:span><text:span text:style-name="T70">-S)</text:span></text:p>
          </table:table-cell>
          <table:table-cell table:style-name="ce63" office:value-type="float" office:value="0" calcext:value-type="float">
            <text:p>0.0</text:p>
          </table:table-cell>
          <table:table-cell table:style-name="ce74" table:formula="of:=3*[.B28]" office:value-type="float" office:value="0" calcext:value-type="float">
            <text:p>0.0</text:p>
          </table:table-cell>
          <table:table-cell table:style-name="ce38" office:value-type="string" calcext:value-type="string">
            <text:p>Sulf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text:span text:style-name="T2">Nitrate (ppm as NO</text:span><text:span text:style-name="T69">3</text:span><text:span text:style-name="T70">-N)</text:span></text:p>
          </table:table-cell>
          <table:table-cell table:style-name="ce63" office:value-type="float" office:value="0" calcext:value-type="float">
            <text:p>0.0</text:p>
          </table:table-cell>
          <table:table-cell table:style-name="ce74" table:formula="of:=4.43*[.B29]" office:value-type="float" office:value="0" calcext:value-type="float">
            <text:p>0.0</text:p>
          </table:table-cell>
          <table:table-cell table:style-name="ce38" office:value-type="string" calcext:value-type="string">
            <text:p>Nitr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US Hardness (grains/gallon)</text:p>
          </table:table-cell>
          <table:table-cell table:style-name="ce63" office:value-type="float" office:value="0" calcext:value-type="float">
            <text:p>0.0</text:p>
          </table:table-cell>
          <table:table-cell table:style-name="ce74" table:formula="of:=6.86*[.B30]" office:value-type="float" office:value="0" calcext:value-type="float">
            <text:p>0.0</text:p>
          </table:table-cell>
          <table:table-cell table:style-name="ce38" office:value-type="string" calcext:value-type="string">
            <text:p>Calc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English (Clark) Hardness (grains/Imp gal)</text:p>
          </table:table-cell>
          <table:table-cell table:style-name="ce63" office:value-type="float" office:value="0" calcext:value-type="float">
            <text:p>0.0</text:p>
          </table:table-cell>
          <table:table-cell table:style-name="ce74" table:formula="of:=5.71*[.B31]" office:value-type="float" office:value="0" calcext:value-type="float">
            <text:p>0.0</text:p>
          </table:table-cell>
          <table:table-cell table:style-name="ce38" office:value-type="string" calcext:value-type="string">
            <text:p>Calc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German Hardness (GH) (degrees)</text:p>
          </table:table-cell>
          <table:table-cell table:style-name="ce63" office:value-type="float" office:value="0" calcext:value-type="float">
            <text:p>0.0</text:p>
          </table:table-cell>
          <table:table-cell table:style-name="ce74" table:formula="of:=7.14*[.B32]" office:value-type="float" office:value="0" calcext:value-type="float">
            <text:p>0.0</text:p>
          </table:table-cell>
          <table:table-cell table:style-name="ce38" office:value-type="string" calcext:value-type="string">
            <text:p>Calc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Karbonate Hardness (KH) (degrees)</text:p>
          </table:table-cell>
          <table:table-cell table:style-name="ce63" office:value-type="float" office:value="0" calcext:value-type="float">
            <text:p>0.0</text:p>
          </table:table-cell>
          <table:table-cell table:style-name="ce74" table:formula="of:=21.8*[.B33]" office:value-type="float" office:value="0" calcext:value-type="float">
            <text:p>0.0</text:p>
          </table:table-cell>
          <table:table-cell table:style-name="ce38" office:value-type="string" calcext:value-type="string">
            <text:p>Bicarbon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Calcium Hardness (meq/L) or (mval)</text:p>
          </table:table-cell>
          <table:table-cell table:style-name="ce63" office:value-type="float" office:value="0" calcext:value-type="float">
            <text:p>0.0</text:p>
          </table:table-cell>
          <table:table-cell table:style-name="ce74" table:formula="of:=20*[.B34]" office:value-type="float" office:value="0" calcext:value-type="float">
            <text:p>0.0</text:p>
          </table:table-cell>
          <table:table-cell table:style-name="ce38" office:value-type="string" calcext:value-type="string">
            <text:p>Calcium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Alkalinity (meq/L) or (mval)</text:p>
          </table:table-cell>
          <table:table-cell table:style-name="ce63" office:value-type="float" office:value="0" calcext:value-type="float">
            <text:p>0.0</text:p>
          </table:table-cell>
          <table:table-cell table:style-name="ce74" table:formula="of:=61*[.B35]" office:value-type="float" office:value="0" calcext:value-type="float">
            <text:p>0.0</text:p>
          </table:table-cell>
          <table:table-cell table:style-name="ce38" office:value-type="string" calcext:value-type="string">
            <office:annotation draw:style-name="gr23" draw:text-style-name="P2" svg:width="5.656cm" svg:height="4.445cm" svg:x="23.973cm" svg:y="25.241cm" draw:caption-point-x="-0.407cm" draw:caption-point-y="-0.81cm">
              <dc:date>2021-02-12T00:00:00</dc:date>
              <text:p text:style-name="P1"><text:span text:style-name="T1">======</text:span></text:p>
              <text:p text:style-name="P1"><text:span text:style-name="T1">ID#AAAAH1AC7n8</text:span></text:p>
              <text:p text:style-name="P1"><text:span text:style-name="T1">martin.brungard <text:s text:c="3"/>(2021-02-12 10:36:59)</text:span></text:p>
              <text:p text:style-name="P1"><text:span text:style-name="T1">This approximation is only valid when water pH is less than 8.5.</text:span></text:p>
            </office:annotation>
            <text:p>Bicarbonate (ppm)</text:p>
          </table:table-cell>
          <table:table-cell table:style-name="ce31"/>
          <table:table-cell table:style-name="ce53" table:number-columns-repeated="25"/>
          <table:table-cell table:number-columns-repeated="34"/>
        </table:table-row>
        <table:table-row table:style-name="ro105">
          <table:table-cell table:style-name="ce38" office:value-type="string" calcext:value-type="string">
            <text:p>Convert (ug/L or ppb) to (mg/L or ppm)</text:p>
          </table:table-cell>
          <table:table-cell table:style-name="ce64" office:value-type="float" office:value="0" calcext:value-type="float">
            <text:p>0.0</text:p>
          </table:table-cell>
          <table:table-cell table:style-name="ce75" table:formula="of:=[.B36]/1000" office:value-type="float" office:value="0" calcext:value-type="float">
            <text:p>0.00</text:p>
          </table:table-cell>
          <table:table-cell table:style-name="ce38" office:value-type="string" calcext:value-type="string">
            <text:p>(ppm)</text:p>
          </table:table-cell>
          <table:table-cell table:style-name="ce31"/>
          <table:table-cell table:style-name="ce53" table:number-columns-repeated="25"/>
          <table:table-cell table:number-columns-repeated="34"/>
        </table:table-row>
        <table:table-row table:style-name="ro22">
          <table:table-cell table:style-name="ce50" office:value-type="string" calcext:value-type="string" table:number-columns-spanned="4" table:number-rows-spanned="1">
            <text:p>Copyright © 2020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style-name="ce23"/>
          <table:table-cell table:style-name="ce31"/>
          <table:table-cell table:style-name="ce53" table:number-columns-repeated="25"/>
          <table:table-cell table:number-columns-repeated="34"/>
        </table:table-row>
        <table:table-row table:style-name="ro105">
          <table:table-cell table:style-name="ce31" table:number-columns-repeated="5"/>
          <table:table-cell table:style-name="ce53" table:number-columns-repeated="25"/>
          <table:table-cell table:number-columns-repeated="34"/>
        </table:table-row>
        <table:table-row table:style-name="ro105">
          <table:table-cell table:style-name="ce51" office:value-type="string" calcext:value-type="string">
            <text:p>Bru'n Water v. 1.25</text:p>
          </table:table-cell>
          <table:table-cell table:style-name="ce31" table:number-columns-repeated="4"/>
          <table:table-cell table:style-name="ce53" table:number-columns-repeated="25"/>
          <table:table-cell table:number-columns-repeated="34"/>
        </table:table-row>
        <table:table-row table:style-name="ro108">
          <table:table-cell table:style-name="ce52" office:value-type="string" calcext:value-type="string">
            <text:p>If the sheet does not show comments or red corner marks, select the REVIEW tab in the Excel program menu and click the SHOW ALL COMMENTS button twice.</text:p>
          </table:table-cell>
          <table:table-cell table:style-name="ce31" table:number-columns-repeated="3"/>
          <table:table-cell table:style-name="ce81"/>
          <table:table-cell table:style-name="ce82" table:number-columns-repeated="4"/>
          <table:table-cell table:style-name="ce53" table:number-columns-repeated="21"/>
          <table:table-cell table:number-columns-repeated="34"/>
        </table:table-row>
        <table:table-row table:style-name="ro102" table:number-rows-repeated="3">
          <table:table-cell table:style-name="ce53" table:number-columns-repeated="4"/>
          <table:table-cell table:style-name="ce31"/>
          <table:table-cell table:style-name="ce53" table:number-columns-repeated="25"/>
          <table:table-cell table:number-columns-repeated="34"/>
        </table:table-row>
        <table:table-row table:style-name="ro102" table:number-rows-repeated="17">
          <table:table-cell table:style-name="ce53" table:number-columns-repeated="30"/>
          <table:table-cell table:number-columns-repeated="34"/>
        </table:table-row>
        <table:table-row table:style-name="ro102" table:number-rows-repeated="49">
          <table:table-cell table:style-name="ce53" table:number-columns-repeated="27"/>
          <table:table-cell table:style-name="ce31" table:number-columns-repeated="3"/>
          <table:table-cell table:number-columns-repeated="34"/>
        </table:table-row>
        <table:table-row table:style-name="ro102" table:number-rows-repeated="3">
          <table:table-cell table:style-name="ce31" table:number-columns-repeated="4"/>
          <table:table-cell table:style-name="ce53" table:number-columns-repeated="23"/>
          <table:table-cell table:style-name="ce31" table:number-columns-repeated="3"/>
          <table:table-cell table:number-columns-repeated="34"/>
        </table:table-row>
        <table:table-row table:style-name="ro102" table:number-rows-repeated="888">
          <table:table-cell table:style-name="ce31" table:number-columns-repeated="5"/>
          <table:table-cell table:style-name="ce53" table:number-columns-repeated="22"/>
          <table:table-cell table:style-name="ce31" table:number-columns-repeated="3"/>
          <table:table-cell table:number-columns-repeated="34"/>
        </table:table-row>
        <table:table-row table:style-name="ro103" table:number-rows-repeated="1047575">
          <table:table-cell table:number-columns-repeated="64"/>
        </table:table-row>
        <table:table-row table:style-name="ro103">
          <table:table-cell table:number-columns-repeated="64"/>
        </table:table-row>
        <calcext:conditional-formats>
          <calcext:conditional-format calcext:target-range-address="'1. Water Report Input'.B12:'1. Water Report Input'.B12">
            <calcext:condition calcext:apply-style-name="ConditionalStyle_1" calcext:value="formula-is([.B12]&gt;0.3)" calcext:base-cell-address="'1. Water Report Input'.B12"/>
          </calcext:conditional-format>
          <calcext:conditional-format calcext:target-range-address="'1. Water Report Input'.B12:'1. Water Report Input'.B12 '1. Water Report Input'.C10:'1. Water Report Input'.C10">
            <calcext:condition calcext:apply-style-name="ConditionalStyle_1" calcext:value="formula-is([.B12]&lt;0)" calcext:base-cell-address="'1. Water Report Input'.B12"/>
          </calcext:conditional-format>
          <calcext:conditional-format calcext:target-range-address="'1. Water Report Input'.C10:'1. Water Report Input'.C10">
            <calcext:condition calcext:apply-style-name="ConditionalStyle_2" calcext:value="formula-is([.C10]&gt;44)" calcext:base-cell-address="'1. Water Report Input'.C10"/>
          </calcext:conditional-format>
          <calcext:conditional-format calcext:target-range-address="'1. Water Report Input'.C6:'1. Water Report Input'.C9 '1. Water Report Input'.B6:'1. Water Report Input'.B8 '1. Water Report Input'.B11:'1. Water Report Input'.B11 '1. Water Report Input'.C11:'1. Water Report Input'.C12">
            <calcext:condition calcext:apply-style-name="ConditionalStyle_1" calcext:value="formula-is([.B6]&lt;0)" calcext:base-cell-address="'1. Water Report Input'.B6"/>
          </calcext:conditional-format>
        </calcext:conditional-formats>
      </table:table>
      <table:table table:name="2. Sparge Acidification"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3" table:visibility="collapse" table:number-columns-repeated="21" table:default-cell-style-name="Default"/>
        <table:table-column table:style-name="co13" table:default-cell-style-name="Default"/>
        <table:table-column table:style-name="co2" table:number-columns-repeated="13" table:default-cell-style-name="Default"/>
        <table:table-column table:style-name="co1" table:number-columns-repeated="24" table:default-cell-style-name="Default"/>
        <table:table-row table:style-name="ro102">
          <table:table-cell table:style-name="ce85" office:value-type="string" calcext:value-type="string">
            <text:p>Bru'n Water</text:p>
          </table:table-cell>
          <table:table-cell table:style-name="ce97" office:value-type="string" calcext:value-type="string" table:number-columns-spanned="4" table:number-rows-spanned="1">
            <text:p><text:a xlink:href="https://sites.google.com/site/brunwater/home/files" xlink:type="simple">Link to Bru'n Water website for updates and to donate</text:a></text:p>
          </table:table-cell>
          <table:covered-table-cell table:number-columns-repeated="3"/>
          <table:table-cell table:style-name="ce53" table:number-columns-repeated="26"/>
          <table:table-cell table:style-name="ce31" table:number-columns-repeated="9"/>
          <table:table-cell table:number-columns-repeated="24"/>
        </table:table-row>
        <table:table-row table:style-name="ro109">
          <table:table-cell table:style-name="ce86" office:value-type="string" calcext:value-type="string" table:number-columns-spanned="4" table:number-rows-spanned="1">
            <office:annotation draw:style-name="gr24" draw:text-style-name="P2" svg:width="11.171cm" svg:height="2.751cm" svg:x="5.773cm" svg:y="1.561cm" draw:caption-point-x="8.719cm" draw:caption-point-y="-1.102cm">
              <dc:date>2021-02-12T00:00:00</dc:date>
              <text:p text:style-name="P1"><text:span text:style-name="T1">======</text:span></text:p>
              <text:p text:style-name="P1"><text:span text:style-name="T1">ID#AAAAH1AC7lI</text:span></text:p>
              <text:p text:style-name="P1"><text:span text:style-name="T1">martin.brungard <text:s text:c="3"/>(2021-02-12 10:36:59)</text:span></text:p>
              <text:p text:style-name="P1"><text:span text:style-name="T1">Use this tool for acidification of Sparging Water and Mash Out Water.</text:span></text:p>
            </office:annotation>
            <text:p>Sparging Water Acidification Calculator</text:p>
          </table:table-cell>
          <table:covered-table-cell table:number-columns-repeated="3" table:style-name="ce20"/>
          <table:table-cell table:style-name="ce53" table:number-columns-repeated="27"/>
          <table:table-cell table:style-name="ce31" table:number-columns-repeated="9"/>
          <table:table-cell table:number-columns-repeated="24"/>
        </table:table-row>
        <table:table-row table:style-name="ro110">
          <table:table-cell table:style-name="ce87" office:value-type="string" calcext:value-type="string" table:number-columns-spanned="4" table:number-rows-spanned="1">
            <text:p>INPUTS</text:p>
          </table:table-cell>
          <table:covered-table-cell table:number-columns-repeated="2" table:style-name="ce21"/>
          <table:covered-table-cell table:style-name="ce19"/>
          <table:table-cell table:style-name="ce123"/>
          <table:table-cell table:style-name="ce53" table:number-columns-repeated="26"/>
          <table:table-cell table:style-name="ce31" table:number-columns-repeated="9"/>
          <table:table-cell table:number-columns-repeated="24"/>
        </table:table-row>
        <table:table-row table:style-name="ro110">
          <table:table-cell table:style-name="ce88" office:value-type="string" calcext:value-type="string">
            <text:p>Starting Water Alkalinity =</text:p>
          </table:table-cell>
          <table:table-cell table:style-name="ce98" table:formula="of:=[$'1. Water Report Input'.$B$15]" office:value-type="float" office:value="0" calcext:value-type="float">
            <office:annotation draw:style-name="gr25" draw:text-style-name="P2" svg:width="7.617cm" svg:height="7.311cm" svg:x="9.327cm" svg:y="1.61cm" draw:caption-point-x="-0.407cm" draw:caption-point-y="0.278cm">
              <dc:date>2021-02-12T00:00:00</dc:date>
              <text:p text:style-name="P1"><text:span text:style-name="T1">======</text:span></text:p>
              <text:p text:style-name="P1"><text:span text:style-name="T1">ID#AAAAH1AC7i8</text:span></text:p>
              <text:p text:style-name="P1"><text:span text:style-name="T1">Martin Brungard <text:s text:c="3"/>(2021-02-12 10:36:59)</text:span></text:p>
              <text:p text:style-name="P1"><text:span text:style-name="T1">This value is taken from the Alkalinity value calculated on the Water Report Input sheet. <text:s/>Use the water inputs on that sheet to adjust this Alkalinity value.</text:span></text:p>
              <text:p text:style-name="P1"><text:span text:style-name="T1"/></text:p>
              <text:p text:style-name="P1"><text:span text:style-name="T1">This cell turns Green if the Starting Water Alkalinity input is less than 25 ppm. <text:s/>That indicates that sparging water acidification is not needed.</text:span></text:p>
              <text:p text:style-name="P1"><text:span text:style-name="T1"/></text:p>
              <text:p text:style-name="P1"><text:span text:style-name="T1">If diluting the Starting Water with RO or distilled water, the resulting alkalinity will need to be manually adjusted on the Water Report Input sheet. That function is built in to the Supporter's version.</text:span></text:p>
            </office:annotation>
            <text:p>0</text:p>
          </table:table-cell>
          <table:table-cell table:style-name="ce110" office:value-type="string" calcext:value-type="string" table:number-columns-spanned="2" table:number-rows-spanned="1">
            <text:p><text:span text:style-name="T385">ppm as CaCO</text:span><text:span text:style-name="T386">3</text:span></text:p>
          </table:table-cell>
          <table:covered-table-cell table:style-name="ce23"/>
          <table:table-cell table:style-name="ce123"/>
          <table:table-cell table:style-name="ce53" table:number-columns-repeated="26"/>
          <table:table-cell table:style-name="ce31" table:number-columns-repeated="9"/>
          <table:table-cell table:number-columns-repeated="24"/>
        </table:table-row>
        <table:table-row table:style-name="ro110">
          <table:table-cell table:style-name="ce89" office:value-type="string" calcext:value-type="string">
            <text:p>Starting Water pH =</text:p>
          </table:table-cell>
          <table:table-cell table:style-name="ce99" office:value-type="float" office:value="7" calcext:value-type="float">
            <office:annotation draw:style-name="gr26" draw:text-style-name="P2" svg:width="7.617cm" svg:height="3.361cm" svg:x="9.327cm" svg:y="3.003cm" draw:caption-point-x="-0.407cm" draw:caption-point-y="-0.533cm">
              <dc:date>2021-02-12T00:00:00</dc:date>
              <text:p text:style-name="P1"><text:span text:style-name="T1">======</text:span></text:p>
              <text:p text:style-name="P1"><text:span text:style-name="T1">ID#AAAAH1AC7iU</text:span></text:p>
              <text:p text:style-name="P1"><text:span text:style-name="T1">Martin Brungard <text:s text:c="3"/>(2021-02-12 10:36:59)</text:span></text:p>
              <text:p text:style-name="P1"><text:span text:style-name="T1">Starting pH of the water may be provided by the water company, lab report, or can be measured directly with test strips or pH meter. <text:s/>If this value is unknown, enter 8 as a good estimate of typical water pH.</text:span></text:p>
            </office:annotation>
            <text:p>7.0</text:p>
          </table:table-cell>
          <table:table-cell table:style-name="ce111" office:value-type="string" calcext:value-type="string" table:number-columns-spanned="2" table:number-rows-spanned="1">
            <text:p>Standard Units</text:p>
          </table:table-cell>
          <table:covered-table-cell/>
          <table:table-cell table:style-name="ce123"/>
          <table:table-cell table:style-name="ce53" table:number-columns-repeated="26"/>
          <table:table-cell table:style-name="ce31" table:number-columns-repeated="9"/>
          <table:table-cell table:number-columns-repeated="24"/>
        </table:table-row>
        <table:table-row table:style-name="ro110">
          <table:table-cell table:style-name="ce89" office:value-type="string" calcext:value-type="string">
            <text:p>Set the Target Water pH =</text:p>
          </table:table-cell>
          <table:table-cell table:style-name="ce99" office:value-type="float" office:value="5.6" calcext:value-type="float">
            <office:annotation draw:style-name="gr27" draw:text-style-name="P2" svg:width="7.617cm" svg:height="6.916cm" svg:x="9.327cm" svg:y="2.971cm" draw:caption-point-x="-0.407cm" draw:caption-point-y="0.081cm">
              <dc:date>2021-02-12T00:00:00</dc:date>
              <text:p text:style-name="P1"><text:span text:style-name="T1">======</text:span></text:p>
              <text:p text:style-name="P1"><text:span text:style-name="T1">ID#AAAAH1AC7n4</text:span></text:p>
              <text:p text:style-name="P1"><text:span text:style-name="T1">Martin Brungard <text:s text:c="3"/>(2021-02-12 10:36:59)</text:span></text:p>
              <text:p text:style-name="P1"><text:span text:style-name="T1">This is the PRIMARY ADJUSTMENT used in sparging water acidification. Enter the target water pH of the Sparge Water.</text:span></text:p>
              <text:p text:style-name="P1"><text:span text:style-name="T1"/></text:p>
              <text:p text:style-name="P1"><text:span text:style-name="T1">Brewing Sparge Water is usually neutralized to a pH between 5.5 and 6.0</text:span></text:p>
              <text:p text:style-name="P1"><text:span text:style-name="T1"/></text:p>
              <text:p text:style-name="P1"><text:span text:style-name="T1">Use the Final Water Alkalinity result below to assess if the Desired Water pH should be increased or decreased from the input value. <text:s/>Final Water Alkalinity of less than 50 ppm is suggested for best results. <text:s/>If the Starting Water Alkalinity is less than 25 ppm, acidification is not needed.</text:span></text:p>
            </office:annotation>
            <text:p>5.6</text:p>
          </table:table-cell>
          <table:table-cell table:style-name="ce111" office:value-type="string" calcext:value-type="string" table:number-columns-spanned="2" table:number-rows-spanned="1">
            <text:p>Standard Units</text:p>
          </table:table-cell>
          <table:covered-table-cell/>
          <table:table-cell table:style-name="ce123"/>
          <table:table-cell table:style-name="ce53" table:number-columns-repeated="26"/>
          <table:table-cell table:style-name="ce31" table:number-columns-repeated="9"/>
          <table:table-cell table:number-columns-repeated="24"/>
        </table:table-row>
        <table:table-row table:style-name="ro110">
          <table:table-cell table:style-name="ce89" office:value-type="string" calcext:value-type="string">
            <text:p>Water Volume to Treat=</text:p>
          </table:table-cell>
          <table:table-cell table:style-name="ce100" office:value-type="float" office:value="1" calcext:value-type="float">
            <office:annotation draw:style-name="gr28" draw:text-style-name="P2" svg:width="7.617cm" svg:height="8.626cm" svg:x="9.327cm" svg:y="4.471cm" draw:caption-point-x="-0.407cm" draw:caption-point-y="-0.837cm">
              <dc:date>2021-02-12T00:00:00</dc:date>
              <text:p text:style-name="P1"><text:span text:style-name="T1">======</text:span></text:p>
              <text:p text:style-name="P1"><text:span text:style-name="T1">ID#AAAAH1AC7m8</text:span></text:p>
              <text:p text:style-name="P1"><text:span text:style-name="T1">Martin Brungard <text:s text:c="3"/>(2021-02-12 10:36:59)</text:span></text:p>
              <text:p text:style-name="P1"><text:span text:style-name="T1">Enter water volume to be treated. <text:s/>(usually 1.0)</text:span></text:p>
              <text:p text:style-name="P1"><text:span text:style-name="T1"/></text:p>
              <text:p text:style-name="P1"><text:span text:style-name="T1">If the volume is entered as 1 (liter, gallon, barrel, or hectoliter) here, the amount of acid for sparge water adjustment calculated below will be automatically multiplied by the number of liters, gallons, barrels, or hectoliters of sparge water entered on the Water Adjustment sheet and the resulting acid amount will be shown on the Adjustment Summary sheet.</text:span></text:p>
              <text:p text:style-name="P1"><text:span text:style-name="T1"/></text:p>
              <text:p text:style-name="P1"><text:span text:style-name="T1">This cell turns DARKER BLUE if a value other than 1 is entered to alert the User that this helpful feature was overriden by the User.</text:span></text:p>
            </office:annotation>
            <text:p>1.0</text:p>
          </table:table-cell>
          <table:table-cell table:style-name="ce112" table:formula="of:=[.I57]" office:value-type="string" office:string-value="Gallons" calcext:value-type="string">
            <text:p>Gallons</text:p>
          </table:table-cell>
          <table:table-cell table:style-name="ce118" office:value-type="string" calcext:value-type="string">
            <text:p><text:span text:style-name="T387">Input 1.0 for the volume to have the program automatically calculate acid additions for the sparging volume input on the </text:span><text:span text:style-name="T388">Water Adjustment</text:span><text:span text:style-name="T389"> sheet.</text:span></text:p>
          </table:table-cell>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89" office:value-type="string" calcext:value-type="string">
            <office:annotation draw:style-name="gr29" draw:text-style-name="P2" svg:width="11.171cm" svg:height="13.388cm" svg:x="5.773cm" svg:y="5.053cm" draw:caption-point-x="-0.407cm" draw:caption-point-y="-0.837cm">
              <dc:date>2021-02-12T00:00:00</dc:date>
              <text:p text:style-name="P1"><text:span text:style-name="T1">======</text:span></text:p>
              <text:p text:style-name="P1"><text:span text:style-name="T1">ID#AAAAH1AC7n0</text:span></text:p>
              <text:p text:style-name="P1"><text:span text:style-name="T1">martin.brungard <text:s text:c="3"/>(2021-02-12 10:36:59)</text:span></text:p>
              <text:p text:style-name="P1"><text:span text:style-name="T1">Enter the type and strength of acid used in the brewing. <text:s/>This acid will be utilized for sparging water adjustments. <text:s/>Separate acid selections are also shown on the Water Adjustment sheet for mashing water. All acids are shown on the Adjustment Summary sheet.</text:span></text:p>
              <text:p text:style-name="P1"><text:span text:style-name="T1"/></text:p>
              <text:p text:style-name="P1"><text:span text:style-name="T1">Note: The program assumes Citric, Malic, and Tartaric acids are in Solid form. Liquid forms of these acids CANNOT be calculated with this program.</text:span></text:p>
              <text:p text:style-name="P1"><text:span text:style-name="T1"/></text:p>
              <text:p text:style-name="P1"><text:span text:style-name="T1">The Supporter's version includes the ability to use two acids in your Sparging Water.</text:span></text:p>
              <text:p text:style-name="P1"><text:span text:style-name="T1"/></text:p>
              <text:p text:style-name="P1"><text:span text:style-name="T1">Calculations for CRS acid is only available in the Supporter's version.</text:span></text:p>
            </office:annotation>
            <text:p>Acid Type =</text:p>
          </table:table-cell>
          <table:table-cell table:style-name="ce605" table:content-validation-name="val2" office:value-type="string" calcext:value-type="string">
            <office:annotation draw:style-name="gr30" draw:text-style-name="P2" svg:width="7.617cm" svg:height="2.752cm" svg:x="9.327cm" svg:y="5.053cm" draw:caption-point-x="-0.407cm" draw:caption-point-y="-0.837cm">
              <dc:date>2021-02-12T00:00:00</dc:date>
              <text:p text:style-name="P1"><text:span text:style-name="T1">======</text:span></text:p>
              <text:p text:style-name="P1"><text:span text:style-name="T1">ID#AAAAH1AC7k8</text:span></text:p>
              <text:p text:style-name="P1"><text:span text:style-name="T1">Martin Brungard <text:s text:c="3"/>(2021-02-12 10:36:59)</text:span></text:p>
              <text:p text:style-name="P1"><text:span text:style-name="T1">Click cell to display drop-down selection of acids.</text:span></text:p>
            </office:annotation>
            <text:p>Phosphoric</text:p>
          </table:table-cell>
          <table:table-cell table:style-name="ce113" office:value-type="string" calcext:value-type="string">
            <text:p>Acid type used in sparging water</text:p>
          </table:table-cell>
          <table:table-cell table:style-name="ce114"/>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89" office:value-type="string" calcext:value-type="string">
            <text:p>Acid Strength =</text:p>
          </table:table-cell>
          <table:table-cell table:style-name="ce102" office:value-type="float" office:value="1" calcext:value-type="float">
            <office:annotation draw:style-name="gr31" draw:text-style-name="P2" svg:width="7.617cm" svg:height="20.637cm" svg:x="9.327cm" svg:y="5.636cm" draw:caption-point-x="-0.407cm" draw:caption-point-y="-0.838cm">
              <dc:date>2021-02-12T00:00:00</dc:date>
              <text:p text:style-name="P1"><text:span text:style-name="T1">======</text:span></text:p>
              <text:p text:style-name="P1"><text:span text:style-name="T1">ID#AAAAH1AC7mk</text:span></text:p>
              <text:p text:style-name="P1"><text:span text:style-name="T1">FOR LIQUID ACIDS ONLY <text:s text:c="3"/>(2021-02-12 10:36:59)</text:span></text:p>
              <text:p text:style-name="P1"><text:span text:style-name="T1">Enter acid Percentage (%) in whole terms. For example, enter 88 for 88% Lactic, not 0.88</text:span></text:p>
              <text:p text:style-name="P1"><text:span text:style-name="T1"/></text:p>
              <text:p text:style-name="P1"><text:span text:style-name="T1">Enter acid Normality (N) or Molarity (M) as indicated on acid container. </text:span></text:p>
              <text:p text:style-name="P1"><text:span text:style-name="T1"/></text:p>
              <text:p text:style-name="P1"><text:span text:style-name="T1">Adjust the strength units in the adjacent drop-down box.</text:span></text:p>
              <text:p text:style-name="P1"><text:span text:style-name="T1"/></text:p>
              <text:p text:style-name="P1"><text:span text:style-name="T1">FOR SOLID ACIDS: </text:span></text:p>
              <text:p text:style-name="P1"><text:span text:style-name="T1"/></text:p>
              <text:p text:style-name="P1"><text:span text:style-name="T1">Be sure the select "Solid" in the adjacent drop-down box.</text:span></text:p>
              <text:p text:style-name="P1"><text:span text:style-name="T1"/></text:p>
              <text:p text:style-name="P1"><text:span text:style-name="T1">The Acid Strength value is not used for solid acids and the value in the Acid Strength box can be any value or be blank.</text:span></text:p>
            </office:annotation>
            <text:p>1</text:p>
          </table:table-cell>
          <table:table-cell table:style-name="ce605" table:content-validation-name="val3" office:value-type="string" calcext:value-type="string">
            <office:annotation draw:style-name="gr26" draw:text-style-name="P2" svg:width="4.957cm" svg:height="3.361cm" svg:x="11.987cm" svg:y="5.331cm" draw:caption-point-x="-0.407cm" draw:caption-point-y="-0.533cm">
              <dc:date>2021-02-12T00:00:00</dc:date>
              <text:p text:style-name="P1"><text:span text:style-name="T1">======</text:span></text:p>
              <text:p text:style-name="P1"><text:span text:style-name="T1">ID#AAAAH1AC7o8</text:span></text:p>
              <text:p text:style-name="P1"><text:span text:style-name="T1">Martin Brungard <text:s text:c="3"/>(2021-02-12 10:36:59)</text:span></text:p>
              <text:p text:style-name="P1"><text:span text:style-name="T1">Click cell to display drop-down selection of acid strength parameters: percentage, normality, molarity, or solid.</text:span></text:p>
            </office:annotation>
            <text:p>%</text:p>
          </table:table-cell>
          <table:table-cell table:style-name="ce119" office:value-type="string" calcext:value-type="string">
            <text:p>&lt; Select</text:p>
          </table:table-cell>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87" office:value-type="string" calcext:value-type="string" table:number-columns-spanned="4" table:number-rows-spanned="1">
            <text:p>OUTPUTS</text:p>
          </table:table-cell>
          <table:covered-table-cell table:number-columns-repeated="2" table:style-name="ce21"/>
          <table:covered-table-cell table:style-name="ce19"/>
          <table:table-cell table:style-name="ce123"/>
          <table:table-cell table:style-name="ce127" table:formula="of:=IF(N([.B9])=0;1;N([.B9]))" office:value-type="float" office:value="1" calcext:value-type="float">
            <text:p>1</text:p>
          </table:table-cell>
          <table:table-cell table:style-name="ce83" table:number-columns-repeated="9"/>
          <table:table-cell table:style-name="ce53" table:number-columns-repeated="16"/>
          <table:table-cell table:style-name="ce31" table:number-columns-repeated="9"/>
          <table:table-cell table:number-columns-repeated="24"/>
        </table:table-row>
        <table:table-row table:style-name="ro110">
          <table:table-cell table:style-name="ce88" office:value-type="string" calcext:value-type="string">
            <text:p>Final Water Alkalinity =</text:p>
          </table:table-cell>
          <table:table-cell table:style-name="ce103" table:formula="of:=[.B4]-(((Acid_Required+Acid_Required2))*50)" office:value-type="float" office:value="-0.500120594321575" calcext:value-type="float">
            <office:annotation draw:style-name="gr32" draw:text-style-name="P2" svg:width="7.617cm" svg:height="12.223cm" svg:x="9.327cm" svg:y="6.8cm" draw:caption-point-x="-0.407cm" draw:caption-point-y="-0.837cm">
              <dc:date>2021-02-12T00:00:00</dc:date>
              <text:p text:style-name="P1"><text:span text:style-name="T1">======</text:span></text:p>
              <text:p text:style-name="P1"><text:span text:style-name="T1">ID#AAAAH1AC7jc</text:span></text:p>
              <text:p text:style-name="P1"><text:span text:style-name="T1">martin.brungard <text:s text:c="3"/>(2021-02-12 10:36:59)</text:span></text:p>
              <text:p text:style-name="P1"><text:span text:style-name="T1">A Final Alkalinity of about 25 ppm or less is desirable, but not required. <text:s/>A Final Alkalinity of less than 50 ppm is strongly recommended. <text:s/>Adjust the Desired Water pH value to alter the Final Water Alkalinity.</text:span></text:p>
              <text:p text:style-name="P1"><text:span text:style-name="T1"/></text:p>
              <text:p text:style-name="P1"><text:span text:style-name="T1">If a check of acidification is desired, compare the measured water pH to the Desired Water pH value.</text:span></text:p>
              <text:p text:style-name="P1"><text:span text:style-name="T1"/></text:p>
              <text:p text:style-name="P1"><text:span text:style-name="T1">This cell turns Orange if the alkalinity is greater than 50 and the Desired pH value should be reduced. <text:s/>This cell turns Green if the alkalinity is less than 25 and no additional acidification is needed.</text:span></text:p>
            </office:annotation>
            <text:p>-1</text:p>
          </table:table-cell>
          <table:table-cell table:style-name="ce114" office:value-type="string" calcext:value-type="string">
            <text:p><text:span text:style-name="T385">ppm as CaCO</text:span><text:span text:style-name="T386">3</text:span></text:p>
          </table:table-cell>
          <table:table-cell table:style-name="ce112"/>
          <table:table-cell table:style-name="ce123"/>
          <table:table-cell table:style-name="ce127"/>
          <table:table-cell table:style-name="ce83" table:number-columns-repeated="9"/>
          <table:table-cell table:style-name="ce53" table:number-columns-repeated="16"/>
          <table:table-cell table:style-name="ce31" table:number-columns-repeated="9"/>
          <table:table-cell table:number-columns-repeated="24"/>
        </table:table-row>
        <table:table-row table:style-name="ro110">
          <table:table-cell table:style-name="ce90" table:formula="of:=VLOOKUP([.$A$40];table;11;0)" office:value-type="string" office:string-value="Phosphoric Acid Required =" calcext:value-type="string">
            <text:p>Phosphoric Acid Required =</text:p>
          </table:table-cell>
          <table:table-cell table:style-name="ce104" table:formula="of:=VLOOKUP([.$A$40];table;13;0)" office:value-type="float" office:value="0.361072950558936" calcext:value-type="float">
            <office:annotation draw:style-name="gr33" draw:text-style-name="P2" svg:width="7.617cm" svg:height="11.059cm" svg:x="9.327cm" svg:y="7.382cm" draw:caption-point-x="-0.407cm" draw:caption-point-y="-0.837cm">
              <dc:date>2021-02-12T00:00:00</dc:date>
              <text:p text:style-name="P1"><text:span text:style-name="T1">======</text:span></text:p>
              <text:p text:style-name="P1"><text:span text:style-name="T1">ID#AAAAH1AC7qA</text:span></text:p>
              <text:p text:style-name="P1"><text:span text:style-name="T1">martin.brungard <text:s text:c="3"/>(2021-02-12 10:36:59)</text:span></text:p>
              <text:p text:style-name="P1"><text:span text:style-name="T1">Add this quantity of the first acid to the water volume indicated above.</text:span></text:p>
              <text:p text:style-name="P1"><text:span text:style-name="T1"/></text:p>
              <text:p text:style-name="P1"><text:span text:style-name="T1">Both the Water Adjustment and Adjustment Summary sheets present the total amount of acid to add.</text:span></text:p>
            </office:annotation>
            <text:p>0.4</text:p>
          </table:table-cell>
          <table:table-cell table:style-name="ce115" table:formula="of:=VLOOKUP([.$A$40];table;8;0)" office:value-type="string" office:string-value="(ml)" calcext:value-type="string">
            <text:p>(ml)</text:p>
          </table:table-cell>
          <table:table-cell table:style-name="ce120" table:formula="of:=VLOOKUP([.$A$40];table;14;0)" office:value-type="float" office:value="0.0732617016684082" calcext:value-type="float">
            <office:annotation draw:style-name="gr34" draw:text-style-name="P2" svg:width="2.045cm" svg:height="9.286cm" svg:x="14.899cm" svg:y="7.382cm" draw:caption-point-x="-0.407cm" draw:caption-point-y="-0.837cm">
              <dc:date>2021-02-12T00:00:00</dc:date>
              <text:p text:style-name="P1"><text:span text:style-name="T1">======</text:span></text:p>
              <text:p text:style-name="P1"><text:span text:style-name="T1">ID#AAAAH1AC7iY</text:span></text:p>
              <text:p text:style-name="P1"><text:span text:style-name="T1">martin.brungard <text:s text:c="3"/>(2021-02-12 10:36:59)</text:span></text:p>
              <text:p text:style-name="P1"><text:span text:style-name="T1">This alternate measure is provided for the acid addition.</text:span></text:p>
            </office:annotation>
            <text:p>0.1</text:p>
          </table:table-cell>
          <table:table-cell table:style-name="ce112" table:formula="of:=VLOOKUP([.$A$40];table;9;0)" office:value-type="string" office:string-value="(tsp)" calcext:value-type="string">
            <text:p>(tsp)</text:p>
          </table:table-cell>
          <table:table-cell table:style-name="ce127"/>
          <table:table-cell table:style-name="ce83" table:number-columns-repeated="9"/>
          <table:table-cell table:style-name="ce53" table:number-columns-repeated="16"/>
          <table:table-cell table:style-name="ce31" table:number-columns-repeated="9"/>
          <table:table-cell table:number-columns-repeated="24"/>
        </table:table-row>
        <table:table-row table:style-name="ro110">
          <table:table-cell table:style-name="ce89" office:value-type="string" calcext:value-type="string">
            <text:p>Sulfate Added to Water =</text:p>
          </table:table-cell>
          <table:table-cell table:style-name="ce105" table:formula="of:=IF([.A40]=5;VLOOKUP([.A52];strtable;4;0);0)" office:value-type="float" office:value="0" calcext:value-type="float">
            <office:annotation draw:style-name="gr33" draw:text-style-name="P2" svg:width="7.617cm" svg:height="11.059cm" svg:x="9.327cm" svg:y="7.964cm" draw:caption-point-x="-0.407cm" draw:caption-point-y="-0.837cm">
              <dc:date>2021-02-12T00:00:00</dc:date>
              <text:p text:style-name="P1"><text:span text:style-name="T1">======</text:span></text:p>
              <text:p text:style-name="P1"><text:span text:style-name="T1">ID#AAAAH1AC7oA</text:span></text:p>
              <text:p text:style-name="P1"><text:span text:style-name="T1">martin.brungard <text:s text:c="3"/>(2021-02-12 10:36:59)</text:span></text:p>
              <text:p text:style-name="P1"><text:span text:style-name="T1">Indicates the sulfate concentration added to the water by a Sulfuric acid or CRS addition. <text:s/>This result is zero for all other acids.</text:span></text:p>
              <text:p text:style-name="P1"><text:span text:style-name="T1"/></text:p>
              <text:p text:style-name="P1"><text:span text:style-name="T1">Calculations for CRS acid is only available in the Supporter's version.</text:span></text:p>
            </office:annotation>
            <text:p>0</text:p>
          </table:table-cell>
          <table:table-cell table:style-name="ce114" office:value-type="string" calcext:value-type="string">
            <text:p>ppm</text:p>
          </table:table-cell>
          <table:table-cell table:style-name="ce112"/>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89" office:value-type="string" calcext:value-type="string">
            <text:p>Chloride Added to Water =</text:p>
          </table:table-cell>
          <table:table-cell table:style-name="ce106" table:formula="of:=IF([.A40]=2;VLOOKUP([.A52];strtable;5;0);0)" office:value-type="float" office:value="0" calcext:value-type="float">
            <office:annotation draw:style-name="gr35" draw:text-style-name="P2" svg:width="7.617cm" svg:height="14.181cm" svg:x="9.327cm" svg:y="8.546cm" draw:caption-point-x="-0.407cm" draw:caption-point-y="-0.837cm">
              <dc:date>2021-02-12T00:00:00</dc:date>
              <text:p text:style-name="P1"><text:span text:style-name="T1">======</text:span></text:p>
              <text:p text:style-name="P1"><text:span text:style-name="T1">ID#AAAAH1AC7lc</text:span></text:p>
              <text:p text:style-name="P1"><text:span text:style-name="T1">martin.brungard <text:s text:c="3"/>(2021-02-12 10:36:59)</text:span></text:p>
              <text:p text:style-name="P1"><text:span text:style-name="T1">Indicates the chloride concentration added to the water by a Hydrochloric acid or CRS addition. <text:s/>This result is zero for all other acid additions.</text:span></text:p>
              <text:p text:style-name="P1"><text:span text:style-name="T1"/></text:p>
              <text:p text:style-name="P1"><text:span text:style-name="T1">Calculations for CRS acid is only available in the Supporter's version.</text:span></text:p>
            </office:annotation>
            <text:p>0</text:p>
          </table:table-cell>
          <table:table-cell table:style-name="ce114" office:value-type="string" calcext:value-type="string">
            <text:p>ppm</text:p>
          </table:table-cell>
          <table:table-cell table:style-name="ce112"/>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91" office:value-type="string" calcext:value-type="string">
            <text:p>Hover cursor over cells w/ red corner mark to display helpful information</text:p>
          </table:table-cell>
          <table:table-cell table:style-name="ce107" table:number-columns-repeated="3"/>
          <table:table-cell table:style-name="ce123"/>
          <table:table-cell table:style-name="ce128"/>
          <table:table-cell table:style-name="ce83" table:number-columns-repeated="9"/>
          <table:table-cell table:style-name="ce53" table:number-columns-repeated="16"/>
          <table:table-cell table:style-name="ce31" table:number-columns-repeated="9"/>
          <table:table-cell table:number-columns-repeated="24"/>
        </table:table-row>
        <table:table-row table:style-name="ro34">
          <table:table-cell table:style-name="ce92" office:value-type="string" calcext:value-type="string" table:number-columns-spanned="4" table:number-rows-spanned="1">
            <text:p><text:span text:style-name="T382">Recommendations for Sparging Water:</text:span><text:span text:style-name="T383">  Low to moderate alkalinity is desirable for Sparging Water. </text:span><text:span text:style-name="T384">                           DO NOT add minerals such as chalk, baking soda, or pickling lime to sparging water </text:span><text:span text:style-name="T383">since these minerals increase water alkalinity.  Sparging water is acidified to reduce pH and alkalinity.                                                                 An alternative to adding these alkalinity increasing minerals is to increase the addition of calcium- or sodium-containing minerals (gypsum, calcium chloride, table salt) to compensate for the deletion of chalk, baking soda, or pickling lime from the sparging water mineral additions.  Another option to avoid adding these alkalinity producing minerals to the sparging water is to reserve these minerals additions from the sparging water and add them directly to the kettle.</text:span></text:p>
          </table:table-cell>
          <table:covered-table-cell table:number-columns-repeated="3"/>
          <table:table-cell table:style-name="ce123"/>
          <table:table-cell table:style-name="ce128" table:formula="of:=IF([.A40]=9;([.C53]*64)/([.J57]*[.B7]);IF([.A40]=2;VLOOKUP([.A52];strtable;5;0);0))" office:value-type="float" office:value="0" calcext:value-type="float">
            <text:p>0.00</text:p>
          </table:table-cell>
          <table:table-cell table:style-name="ce128" table:formula="of:=IF([.A67]=9;([.C80]*88.57)/([.J57]*[.B7]);IF([.A67]=5;VLOOKUP([.A79];strtable2;4;0);0))" office:value-type="float" office:value="0" calcext:value-type="float">
            <text:p>0.00</text:p>
          </table:table-cell>
          <table:table-cell table:style-name="ce83" table:number-columns-repeated="8"/>
          <table:table-cell table:style-name="ce53" table:number-columns-repeated="16"/>
          <table:table-cell table:style-name="ce31" table:number-columns-repeated="9"/>
          <table:table-cell table:number-columns-repeated="24"/>
        </table:table-row>
        <table:table-row table:style-name="ro91">
          <table:table-cell table:style-name="ce93" office:value-type="string" calcext:value-type="string" table:number-columns-spanned="4" table:number-rows-spanned="1">
            <text:p>Copyright © 2020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table-cell table:style-name="ce123"/>
          <table:table-cell table:style-name="ce83"/>
          <table:table-cell table:style-name="ce128" table:formula="of:=IF([.A67]=9;([.C80]*64)/([.J57]*[.B7]);IF([.A67]=2;VLOOKUP([.A79];strtable2;5;0);0))" office:value-type="float" office:value="0" calcext:value-type="float">
            <text:p>0.00</text:p>
          </table:table-cell>
          <table:table-cell table:style-name="ce83" table:number-columns-repeated="8"/>
          <table:table-cell table:style-name="ce53" table:number-columns-repeated="16"/>
          <table:table-cell table:style-name="ce31" table:number-columns-repeated="9"/>
          <table:table-cell table:number-columns-repeated="24"/>
        </table:table-row>
        <table:table-row table:style-name="ro105">
          <table:table-cell table:style-name="ce94" office:value-type="string" calcext:value-type="string" table:number-columns-spanned="4" table:number-rows-spanned="1">
            <text:p>Bru'n Water v. 1.25</text:p>
          </table:table-cell>
          <table:covered-table-cell table:number-columns-repeated="3"/>
          <table:table-cell table:style-name="ce123"/>
          <table:table-cell table:style-name="ce83" table:number-columns-repeated="10"/>
          <table:table-cell table:style-name="ce53" table:number-columns-repeated="16"/>
          <table:table-cell table:style-name="ce31" table:number-columns-repeated="9"/>
          <table:table-cell table:number-columns-repeated="24"/>
        </table:table-row>
        <table:table-row table:style-name="ro94">
          <table:table-cell table:style-name="ce95" office:value-type="string" calcext:value-type="string" table:number-columns-spanned="4" table:number-rows-spanned="1">
            <text:p>If the sheet does not show comments or red corner marks, select the REVIEW tab in the Excel program menu and click the SHOW ALL COMMENTS button twice.</text:p>
          </table:table-cell>
          <table:covered-table-cell table:number-columns-repeated="3"/>
          <table:table-cell table:style-name="ce107"/>
          <table:table-cell table:style-name="ce83" table:number-columns-repeated="10"/>
          <table:table-cell table:style-name="ce53" table:number-columns-repeated="16"/>
          <table:table-cell table:style-name="ce31" table:number-columns-repeated="9"/>
          <table:table-cell table:number-columns-repeated="24"/>
        </table:table-row>
        <table:table-row table:style-name="ro110">
          <table:table-cell table:style-name="ce83" table:number-columns-repeated="4"/>
          <table:table-cell table:style-name="ce124"/>
          <table:table-cell table:style-name="ce83" table:number-columns-repeated="10"/>
          <table:table-cell table:style-name="ce53" table:number-columns-repeated="12"/>
          <table:table-cell table:style-name="ce83" table:number-columns-repeated="3"/>
          <table:table-cell table:style-name="ce53"/>
          <table:table-cell table:style-name="ce31" table:number-columns-repeated="9"/>
          <table:table-cell table:number-columns-repeated="24"/>
        </table:table-row>
        <table:table-row table:style-name="ro111">
          <table:table-cell table:style-name="ce83" table:number-columns-repeated="4"/>
          <table:table-cell table:style-name="ce125"/>
          <table:table-cell table:style-name="ce96"/>
          <table:table-cell table:style-name="ce83" table:number-columns-repeated="16"/>
          <table:table-cell table:style-name="ce53" table:number-columns-repeated="5"/>
          <table:table-cell table:style-name="ce83" table:number-columns-repeated="3"/>
          <table:table-cell table:style-name="ce53" table:number-columns-repeated="10"/>
          <table:table-cell table:number-columns-repeated="24"/>
        </table:table-row>
        <table:table-row table:style-name="ro112">
          <table:table-cell table:style-name="ce83" table:number-columns-repeated="4"/>
          <table:table-cell table:style-name="ce126" table:number-columns-repeated="2"/>
          <table:table-cell table:style-name="ce96" table:number-columns-repeated="10"/>
          <table:table-cell table:style-name="ce83" table:number-columns-repeated="2"/>
          <table:table-cell table:style-name="ce121" office:value-type="string" calcext:value-type="string">
            <text:p>r1o=</text:p>
          </table:table-cell>
          <table:table-cell table:style-name="ce133" table:formula="of:=10^(N([.B5])-6.38)" office:value-type="float" office:value="4.16869383470335" calcext:value-type="float">
            <text:p>4.168694</text:p>
          </table:table-cell>
          <table:table-cell table:style-name="ce96"/>
          <table:table-cell table:style-name="ce83"/>
          <table:table-cell table:style-name="ce53" table:number-columns-repeated="5"/>
          <table:table-cell table:style-name="ce83" table:number-columns-repeated="3"/>
          <table:table-cell table:style-name="ce53" table:number-columns-repeated="10"/>
          <table:table-cell table:number-columns-repeated="24"/>
        </table:table-row>
        <table:table-row table:style-name="ro103">
          <table:table-cell table:style-name="ce83" table:number-columns-repeated="4"/>
          <table:table-cell table:style-name="ce96" table:number-columns-repeated="2"/>
          <table:table-cell table:style-name="ce126" table:number-columns-repeated="2"/>
          <table:table-cell table:style-name="ce96" table:number-columns-repeated="8"/>
          <table:table-cell table:style-name="ce83" table:number-columns-repeated="2"/>
          <table:table-cell table:style-name="ce121" office:value-type="string" calcext:value-type="string">
            <text:p>r2o=</text:p>
          </table:table-cell>
          <table:table-cell table:style-name="ce133" table:formula="of:=10^(N([.B5])-10.33)" office:value-type="float" office:value="0.000467735141287198" calcext:value-type="float">
            <text:p>0.000468</text:p>
          </table:table-cell>
          <table:table-cell table:style-name="ce96"/>
          <table:table-cell table:style-name="ce83"/>
          <table:table-cell table:style-name="ce53" table:number-columns-repeated="5"/>
          <table:table-cell table:style-name="ce83" table:number-columns-repeated="3"/>
          <table:table-cell table:style-name="ce53" table:number-columns-repeated="10"/>
          <table:table-cell table:number-columns-repeated="24"/>
        </table:table-row>
        <table:table-row table:style-name="ro98">
          <table:table-cell table:style-name="ce83" table:number-columns-repeated="4"/>
          <table:table-cell table:style-name="ce96" table:number-columns-repeated="12"/>
          <table:table-cell table:style-name="ce83" table:number-columns-repeated="2"/>
          <table:table-cell table:style-name="ce121" office:value-type="string" calcext:value-type="string">
            <text:p>do=</text:p>
          </table:table-cell>
          <table:table-cell table:style-name="ce133" table:formula="of:=1+[.T22]+([.T22]*[.T23])" office:value-type="float" office:value="5.17064367930311" calcext:value-type="float">
            <text:p>5.170644</text:p>
          </table:table-cell>
          <table:table-cell table:style-name="ce96"/>
          <table:table-cell table:style-name="ce83"/>
          <table:table-cell table:style-name="ce53" table:number-columns-repeated="5"/>
          <table:table-cell table:style-name="ce83" table:number-columns-repeated="3"/>
          <table:table-cell table:style-name="ce53" table:number-columns-repeated="10"/>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1o=</text:p>
          </table:table-cell>
          <table:table-cell table:style-name="ce133" table:formula="of:=1/[.T24]" office:value-type="float" office:value="0.193399518903762" calcext:value-type="float">
            <text:p>0.193400</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20=</text:p>
          </table:table-cell>
          <table:table-cell table:style-name="ce133" table:formula="of:=[.T22]/[.T24]" office:value-type="float" office:value="0.806223382088708" calcext:value-type="float">
            <text:p>0.806223</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3o=</text:p>
          </table:table-cell>
          <table:table-cell table:style-name="ce133" table:formula="of:=([.T22]*[.T23])/[.T24]" office:value-type="float" office:value="0.000377099007530304" calcext:value-type="float">
            <text:p>0.000377</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pHb=</text:p>
          </table:table-cell>
          <table:table-cell table:style-name="ce96" office:value-type="float" office:value="4.3" calcext:value-type="float">
            <text:p>4.3</text:p>
          </table:table-cell>
          <table:table-cell table:style-name="ce96" office:value-type="string" calcext:value-type="string">
            <text:p>SU</text:p>
          </table:table-cell>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r1b=</text:p>
          </table:table-cell>
          <table:table-cell table:style-name="ce134" table:formula="of:=10^([.T29]-6.38)" office:value-type="float" office:value="0.008317637711" calcext:value-type="float">
            <text:p>0.00831764</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6"/>
          <table:table-cell table:style-name="ce96" table:number-columns-repeated="10"/>
          <table:table-cell table:style-name="ce83" table:number-columns-repeated="2"/>
          <table:table-cell table:style-name="ce121" office:value-type="string" calcext:value-type="string">
            <text:p>r2b=</text:p>
          </table:table-cell>
          <table:table-cell table:style-name="ce134" table:formula="of:=10^([.T29]-10.33)" office:value-type="float" office:value="0.0000009332543008" calcext:value-type="float">
            <text:p>0.00000093</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2"/>
          <table:table-cell table:style-name="ce83" table:number-columns-repeated="8"/>
          <table:table-cell table:style-name="ce96" table:number-columns-repeated="2"/>
          <table:table-cell table:style-name="ce83" table:number-columns-repeated="2"/>
          <table:table-cell table:style-name="ce121" office:value-type="string" calcext:value-type="string">
            <text:p>db=</text:p>
          </table:table-cell>
          <table:table-cell table:style-name="ce134" table:formula="of:=1+[.T30]+([.T30]*[.T31])" office:value-type="float" office:value="1.008317645" calcext:value-type="float">
            <text:p>1.00831765</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1b=</text:p>
          </table:table-cell>
          <table:table-cell table:style-name="ce134" table:formula="of:=1/[.T32]" office:value-type="float" office:value="0.9917509671" calcext:value-type="float">
            <text:p>0.99175097</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2b=</text:p>
          </table:table-cell>
          <table:table-cell table:style-name="ce134" table:formula="of:=[.T30]/[.T32]" office:value-type="float" office:value="0.008249025244" calcext:value-type="float">
            <text:p>0.00824903</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f3b=</text:p>
          </table:table-cell>
          <table:table-cell table:style-name="ce134" table:formula="of:=([.T30]*[.T31])/[.T32]" office:value-type="float" office:value="0.000000007698438286" calcext:value-type="float">
            <text:p>0.00000001</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office:value-type="string" calcext:value-type="string">
            <text:p>Ct=</text:p>
          </table:table-cell>
          <table:table-cell table:style-name="ce96" table:formula="of:=(N([.B4])/50)/(([.T33]-[.T25])+([.T27]-[.T35]))" office:value-type="float" office:value="0" calcext:value-type="float">
            <text:p>0</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83" table:number-columns-repeated="4"/>
          <table:table-cell table:style-name="ce96" table:number-columns-repeated="12"/>
          <table:table-cell table:style-name="ce83" table:number-columns-repeated="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matrix-columns-spanned="1" table:number-matrix-rows-spanned="1" table:formula="of:=INDEX([.$A$41:.$A$49]; MATCH([.$B$8];[.$B$41:.$B$49];0))" office:value-type="float" office:value="4" calcext:value-type="float">
            <text:p>4</text:p>
          </table:table-cell>
          <table:table-cell table:style-name="ce108" office:value-type="string" calcext:value-type="string">
            <text:p>acid</text:p>
          </table:table-cell>
          <table:table-cell table:style-name="ce108" office:value-type="string" calcext:value-type="string">
            <text:p>pK1</text:p>
          </table:table-cell>
          <table:table-cell table:style-name="ce108" office:value-type="string" calcext:value-type="string">
            <text:p>pK2</text:p>
          </table:table-cell>
          <table:table-cell table:style-name="ce108" office:value-type="string" calcext:value-type="string">
            <text:p>pK3</text:p>
          </table:table-cell>
          <table:table-cell table:style-name="ce108" office:value-type="string" calcext:value-type="string">
            <text:p>Mol. Wt.</text:p>
          </table:table-cell>
          <table:table-cell table:style-name="ce108" office:value-type="string" calcext:value-type="string">
            <text:p>SG</text:p>
          </table:table-cell>
          <table:table-cell table:style-name="ce108" office:value-type="string" calcext:value-type="string">
            <text:p>ml/mg</text:p>
          </table:table-cell>
          <table:table-cell table:style-name="ce108" office:value-type="string" calcext:value-type="string">
            <text:p>gm/tsp</text:p>
          </table:table-cell>
          <table:table-cell table:style-name="ce108" office:value-type="string" calcext:value-type="string">
            <text:p>dose</text:p>
          </table:table-cell>
          <table:table-cell table:style-name="ce83" table:number-columns-repeated="8"/>
          <table:table-cell table:style-name="ce121" office:value-type="string" calcext:value-type="string">
            <text:p>r1c=</text:p>
          </table:table-cell>
          <table:table-cell table:style-name="ce134" table:formula="of:=10^(N([.B6])-6.38)" office:value-type="float" office:value="0.1659586907" calcext:value-type="float">
            <text:p>0.16595869</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1" calcext:value-type="float">
            <text:p>1</text:p>
          </table:table-cell>
          <table:table-cell table:style-name="ce108" office:value-type="string" calcext:value-type="string">
            <text:p>Acetic</text:p>
          </table:table-cell>
          <table:table-cell table:style-name="ce109" office:value-type="float" office:value="4.75" calcext:value-type="float">
            <text:p>4.75</text:p>
          </table:table-cell>
          <table:table-cell table:number-columns-repeated="2" table:style-name="ce109" office:value-type="float" office:value="20" calcext:value-type="float">
            <text:p>20.00</text:p>
          </table:table-cell>
          <table:table-cell table:style-name="ce109" office:value-type="float" office:value="60.05" calcext:value-type="float">
            <text:p>60.05</text:p>
          </table:table-cell>
          <table:table-cell table:style-name="ce109" table:formula="of:=1000*((-7.575*10^(-10)*([.F10]^4))+(7.01*10^(-8)*([.F10]^3))+(-9.254*10^(-6)*([.F10]^2))+(1.575*10^(-3)*[.F10])+0.9979)" office:value-type="float" office:value="999.4658153" calcext:value-type="float">
            <text:p>999.47</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Acetic Acid Required =</text:p>
          </table:table-cell>
          <table:table-cell table:style-name="ce109" office:value-type="string" calcext:value-type="string">
            <text:p>Total Acid Addition (ml)</text:p>
          </table:table-cell>
          <table:table-cell table:style-name="ce131" table:formula="of:=VLOOKUP([.A52];strtable;3;0)" office:value-type="float" office:value="0.361072950558936" calcext:value-type="float">
            <text:p>0.36</text:p>
          </table:table-cell>
          <table:table-cell table:style-name="ce131" table:formula="of:=[.$B$12]*0.2029" office:value-type="float" office:value="0.0732617016684082" calcext:value-type="float">
            <text:p>0.07</text:p>
          </table:table-cell>
          <table:table-cell table:style-name="ce132" office:value-type="string" calcext:value-type="string">
            <text:p>Acetate Added to Water =</text:p>
          </table:table-cell>
          <table:table-cell table:style-name="ce109" office:value-type="float" office:value="59" calcext:value-type="float">
            <text:p>59.00</text:p>
          </table:table-cell>
          <table:table-cell table:style-name="ce132" office:value-type="string" calcext:value-type="string">
            <text:p>(ppm) Acetate added to water</text:p>
          </table:table-cell>
          <table:table-cell table:style-name="ce132"/>
          <table:table-cell table:style-name="ce121" office:value-type="string" calcext:value-type="string">
            <text:p>r2c=</text:p>
          </table:table-cell>
          <table:table-cell table:style-name="ce134" table:formula="of:=10^(N([.B6])-10.33)" office:value-type="float" office:value="0.00001862087137" calcext:value-type="float">
            <text:p>0.00001862</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2" calcext:value-type="float">
            <text:p>2</text:p>
          </table:table-cell>
          <table:table-cell table:style-name="ce108" office:value-type="string" calcext:value-type="string">
            <text:p>Hydrochloric</text:p>
          </table:table-cell>
          <table:table-cell table:style-name="ce109" office:value-type="float" office:value="-7" calcext:value-type="float">
            <text:p>-7.00</text:p>
          </table:table-cell>
          <table:table-cell table:number-columns-repeated="2" table:style-name="ce109" office:value-type="float" office:value="20" calcext:value-type="float">
            <text:p>20.00</text:p>
          </table:table-cell>
          <table:table-cell table:style-name="ce109" office:value-type="float" office:value="36.46" calcext:value-type="float">
            <text:p>36.46</text:p>
          </table:table-cell>
          <table:table-cell table:style-name="ce109" table:formula="of:=1000*((-3.1666*10^(-7)*([.$F$10]^3))+(1.8499*10^(-5)*([.$F$10]^2))+(4.7666*10^(-3)*[.$F$10])+0.998)" office:value-type="float" office:value="1002.784782" calcext:value-type="float">
            <text:p>1002.78</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Hydrochloric Acid Required =</text:p>
          </table:table-cell>
          <table:table-cell table:style-name="ce109" office:value-type="string" calcext:value-type="string">
            <text:p>Total Acid Addition (ml)</text:p>
          </table:table-cell>
          <table:table-cell table:style-name="ce131" table:formula="of:=VLOOKUP([.A52];strtable;3;0)" office:value-type="float" office:value="0.361072950558936" calcext:value-type="float">
            <text:p>0.36</text:p>
          </table:table-cell>
          <table:table-cell table:style-name="ce131" table:formula="of:=[.$B$12]*0.2029" office:value-type="float" office:value="0.0732617016684082" calcext:value-type="float">
            <text:p>0.07</text:p>
          </table:table-cell>
          <table:table-cell table:style-name="ce132" office:value-type="string" calcext:value-type="string">
            <text:p>-</text:p>
          </table:table-cell>
          <table:table-cell table:style-name="ce109"/>
          <table:table-cell table:style-name="ce132" office:value-type="string" calcext:value-type="string">
            <text:p>-</text:p>
          </table:table-cell>
          <table:table-cell table:style-name="ce132"/>
          <table:table-cell table:style-name="ce121" office:value-type="string" calcext:value-type="string">
            <text:p>dc=</text:p>
          </table:table-cell>
          <table:table-cell table:style-name="ce134" table:formula="of:=1+[.T40]+([.T40]*[.T41])" office:value-type="float" office:value="1.165961781" calcext:value-type="float">
            <text:p>1.16596178</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3" calcext:value-type="float">
            <text:p>3</text:p>
          </table:table-cell>
          <table:table-cell table:style-name="ce108" office:value-type="string" calcext:value-type="string">
            <text:p>Lactic</text:p>
          </table:table-cell>
          <table:table-cell table:style-name="ce109" office:value-type="float" office:value="3.86" calcext:value-type="float">
            <text:p>3.86</text:p>
          </table:table-cell>
          <table:table-cell table:number-columns-repeated="2" table:style-name="ce109" office:value-type="float" office:value="20" calcext:value-type="float">
            <text:p>20.00</text:p>
          </table:table-cell>
          <table:table-cell table:style-name="ce109" office:value-type="float" office:value="90.08" calcext:value-type="float">
            <text:p>90.08</text:p>
          </table:table-cell>
          <table:table-cell table:style-name="ce109" table:formula="of:=1000*((-5.6193*10^(-10)*([.$F$10]^4))+(5.115*10^(-8)*([.$F$10]^3))+(-1.1408*10^(-6)*([.$F$10]^2))+(2.4529*10^(-3)*[.$F$10])+0.998)" office:value-type="float" office:value="1000.45181" calcext:value-type="float">
            <text:p>1000.45</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Lactic Acid Required =</text:p>
          </table:table-cell>
          <table:table-cell table:style-name="ce109" office:value-type="string" calcext:value-type="string">
            <text:p>Total Acid Addition (ml)</text:p>
          </table:table-cell>
          <table:table-cell table:style-name="ce131" table:formula="of:=VLOOKUP([.A52];strtable;3;0)" office:value-type="float" office:value="0.361072950558936" calcext:value-type="float">
            <text:p>0.36</text:p>
          </table:table-cell>
          <table:table-cell table:style-name="ce131" table:formula="of:=[.$B$12]*0.2029" office:value-type="float" office:value="0.0732617016684082" calcext:value-type="float">
            <text:p>0.07</text:p>
          </table:table-cell>
          <table:table-cell table:style-name="ce132" office:value-type="string" calcext:value-type="string">
            <text:p>Lactate Added to Water =</text:p>
          </table:table-cell>
          <table:table-cell table:style-name="ce109" office:value-type="float" office:value="89" calcext:value-type="float">
            <text:p>89.00</text:p>
          </table:table-cell>
          <table:table-cell table:style-name="ce132" office:value-type="string" calcext:value-type="string">
            <text:p>(ppm) Lactate added to water</text:p>
          </table:table-cell>
          <table:table-cell table:style-name="ce132"/>
          <table:table-cell table:style-name="ce121" office:value-type="string" calcext:value-type="string">
            <text:p>f1c=</text:p>
          </table:table-cell>
          <table:table-cell table:style-name="ce134" table:formula="of:=1/[.T42]" office:value-type="float" office:value="0.8576610454" calcext:value-type="float">
            <text:p>0.85766105</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4" calcext:value-type="float">
            <text:p>4</text:p>
          </table:table-cell>
          <table:table-cell table:style-name="ce108" office:value-type="string" calcext:value-type="string">
            <text:p>Phosphoric</text:p>
          </table:table-cell>
          <table:table-cell table:style-name="ce109" office:value-type="float" office:value="2.12" calcext:value-type="float">
            <text:p>2.12</text:p>
          </table:table-cell>
          <table:table-cell table:style-name="ce109" office:value-type="float" office:value="7.2" calcext:value-type="float">
            <text:p>7.20</text:p>
          </table:table-cell>
          <table:table-cell table:style-name="ce109" office:value-type="float" office:value="12.44" calcext:value-type="float">
            <text:p>12.44</text:p>
          </table:table-cell>
          <table:table-cell table:style-name="ce109" office:value-type="float" office:value="98" calcext:value-type="float">
            <text:p>98.00</text:p>
          </table:table-cell>
          <table:table-cell table:style-name="ce109" table:formula="of:=1000*((-3.9523*10^(-9)*([.$F$10]^4))+(6.8571*10^(-7)*([.$F$10]^3))+(5.4475*10^(-7)*([.$F$10]^2))+(5.51368*10^(-3)*[.$F$10])+0.99778)" office:value-type="float" office:value="1003.294907" calcext:value-type="float">
            <text:p>1003.29</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Phosphoric Acid Required =</text:p>
          </table:table-cell>
          <table:table-cell table:style-name="ce109" office:value-type="string" calcext:value-type="string">
            <text:p>Total Acid Addition (ml)</text:p>
          </table:table-cell>
          <table:table-cell table:style-name="ce131" table:formula="of:=VLOOKUP([.A52];strtable;3;0)" office:value-type="float" office:value="0.361072950558936" calcext:value-type="float">
            <text:p>0.36</text:p>
          </table:table-cell>
          <table:table-cell table:style-name="ce131" table:formula="of:=[.$B$12]*0.2029" office:value-type="float" office:value="0.0732617016684082" calcext:value-type="float">
            <text:p>0.07</text:p>
          </table:table-cell>
          <table:table-cell table:style-name="ce132" office:value-type="string" calcext:value-type="string">
            <text:p>Phosphate Added to Water =</text:p>
          </table:table-cell>
          <table:table-cell table:style-name="ce109" office:value-type="float" office:value="95" calcext:value-type="float">
            <text:p>95.00</text:p>
          </table:table-cell>
          <table:table-cell table:style-name="ce132" office:value-type="string" calcext:value-type="string">
            <text:p>(ppm) Phosphate added to water</text:p>
          </table:table-cell>
          <table:table-cell table:style-name="ce132"/>
          <table:table-cell table:style-name="ce121" office:value-type="string" calcext:value-type="string">
            <text:p>f2c=</text:p>
          </table:table-cell>
          <table:table-cell table:style-name="ce134" table:formula="of:=[.T40]/[.T42]" office:value-type="float" office:value="0.1423363042" calcext:value-type="float">
            <text:p>0.14233630</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5" calcext:value-type="float">
            <text:p>5</text:p>
          </table:table-cell>
          <table:table-cell table:style-name="ce108" office:value-type="string" calcext:value-type="string">
            <text:p>Sulfuric</text:p>
          </table:table-cell>
          <table:table-cell table:style-name="ce109" office:value-type="float" office:value="-1" calcext:value-type="float">
            <text:p>-1.00</text:p>
          </table:table-cell>
          <table:table-cell table:style-name="ce109" office:value-type="float" office:value="1.92" calcext:value-type="float">
            <text:p>1.92</text:p>
          </table:table-cell>
          <table:table-cell table:style-name="ce109" office:value-type="float" office:value="20" calcext:value-type="float">
            <text:p>20.00</text:p>
          </table:table-cell>
          <table:table-cell table:style-name="ce109" office:value-type="float" office:value="98.07" calcext:value-type="float">
            <text:p>98.07</text:p>
          </table:table-cell>
          <table:table-cell table:style-name="ce109" table:formula="of:=1000*((-2.0911*10^(-8)*([.$F$10]^4))+(3.4312*10^(-6)*([.$F$10]^3))+(-1.3954*10^(-4)*([.$F$10]^2))+(9.0885*10^(-3)*[.$F$10])+0.9947)" office:value-type="float" office:value="1003.65237" calcext:value-type="float">
            <text:p>1003.65</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Sulfuric Acid Required =</text:p>
          </table:table-cell>
          <table:table-cell table:style-name="ce109" office:value-type="string" calcext:value-type="string">
            <text:p>Total Acid Addition (ml)</text:p>
          </table:table-cell>
          <table:table-cell table:style-name="ce131" table:formula="of:=VLOOKUP([.A52];strtable;3;0)" office:value-type="float" office:value="0.361072950558936" calcext:value-type="float">
            <text:p>0.36</text:p>
          </table:table-cell>
          <table:table-cell table:style-name="ce131" table:formula="of:=[.$B$12]*0.2029" office:value-type="float" office:value="0.0732617016684082" calcext:value-type="float">
            <text:p>0.07</text:p>
          </table:table-cell>
          <table:table-cell table:style-name="ce132" office:value-type="string" calcext:value-type="string">
            <text:p>-</text:p>
          </table:table-cell>
          <table:table-cell table:style-name="ce109"/>
          <table:table-cell table:style-name="ce132" office:value-type="string" calcext:value-type="string">
            <text:p>-</text:p>
          </table:table-cell>
          <table:table-cell table:style-name="ce132"/>
          <table:table-cell table:style-name="ce121" office:value-type="string" calcext:value-type="string">
            <text:p>f3c=</text:p>
          </table:table-cell>
          <table:table-cell table:style-name="ce134" table:formula="of:=([.T40]*[.T41])/[.T42]" office:value-type="float" office:value="0.000002650426011" calcext:value-type="float">
            <text:p>0.00000265</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6" calcext:value-type="float">
            <text:p>6</text:p>
          </table:table-cell>
          <table:table-cell table:style-name="ce108" office:value-type="string" calcext:value-type="string">
            <text:p>Citric</text:p>
          </table:table-cell>
          <table:table-cell table:style-name="ce109" office:value-type="float" office:value="3.14" calcext:value-type="float">
            <text:p>3.14</text:p>
          </table:table-cell>
          <table:table-cell table:style-name="ce109" office:value-type="float" office:value="4.77" calcext:value-type="float">
            <text:p>4.77</text:p>
          </table:table-cell>
          <table:table-cell table:style-name="ce109" office:value-type="float" office:value="6.39" calcext:value-type="float">
            <text:p>6.39</text:p>
          </table:table-cell>
          <table:table-cell table:style-name="ce109" office:value-type="float" office:value="192.13" calcext:value-type="float">
            <text:p>192.13</text:p>
          </table:table-cell>
          <table:table-cell table:style-name="ce109" office:value-type="float" office:value="1480" calcext:value-type="float">
            <text:p>1480.00</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Citric Acid Required =</text:p>
          </table:table-cell>
          <table:table-cell table:style-name="ce109" office:value-type="string" calcext:value-type="string">
            <text:p>Total Acid Addition (gram)</text:p>
          </table:table-cell>
          <table:table-cell table:style-name="ce131" table:formula="of:=(mM_required*[.F50]*N([.B7])*[.J57])/1000" office:value-type="float" office:value="0.00362262652351244" calcext:value-type="float">
            <text:p>0.00</text:p>
          </table:table-cell>
          <table:table-cell table:style-name="ce131" table:formula="of:=[.$B$12]/1000" office:value-type="float" office:value="0.000361072950558936" calcext:value-type="float">
            <text:p>0.00</text:p>
          </table:table-cell>
          <table:table-cell table:style-name="ce132" office:value-type="string" calcext:value-type="string">
            <text:p>Citrate Added to Water =</text:p>
          </table:table-cell>
          <table:table-cell table:style-name="ce109" office:value-type="float" office:value="189" calcext:value-type="float">
            <text:p>189.00</text:p>
          </table:table-cell>
          <table:table-cell table:style-name="ce132" office:value-type="string" calcext:value-type="string">
            <text:p>(ppm) Citrate added to water</text:p>
          </table:table-cell>
          <table:table-cell table:style-name="ce13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7" calcext:value-type="float">
            <text:p>7</text:p>
          </table:table-cell>
          <table:table-cell table:style-name="ce108" office:value-type="string" calcext:value-type="string">
            <text:p>Tartaric</text:p>
          </table:table-cell>
          <table:table-cell table:style-name="ce109" office:value-type="float" office:value="2.98" calcext:value-type="float">
            <text:p>2.98</text:p>
          </table:table-cell>
          <table:table-cell table:style-name="ce109" office:value-type="float" office:value="4.34" calcext:value-type="float">
            <text:p>4.34</text:p>
          </table:table-cell>
          <table:table-cell table:style-name="ce109" office:value-type="float" office:value="20" calcext:value-type="float">
            <text:p>20.00</text:p>
          </table:table-cell>
          <table:table-cell table:style-name="ce109" office:value-type="float" office:value="150.09" calcext:value-type="float">
            <text:p>150.09</text:p>
          </table:table-cell>
          <table:table-cell table:style-name="ce109" office:value-type="float" office:value="1000" calcext:value-type="float">
            <text:p>1000.00</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Tartaric Acid Required =</text:p>
          </table:table-cell>
          <table:table-cell table:style-name="ce109" office:value-type="string" calcext:value-type="string">
            <text:p>Total Acid Addition (gram)</text:p>
          </table:table-cell>
          <table:table-cell table:style-name="ce131" table:formula="of:=(mM_required*[.F50]*N([.B7])*[.J57])/1000" office:value-type="float" office:value="0.00362262652351244" calcext:value-type="float">
            <text:p>0.00</text:p>
          </table:table-cell>
          <table:table-cell table:style-name="ce131" table:formula="of:=[.$B$12]/1000" office:value-type="float" office:value="0.000361072950558936" calcext:value-type="float">
            <text:p>0.00</text:p>
          </table:table-cell>
          <table:table-cell table:style-name="ce132" office:value-type="string" calcext:value-type="string">
            <text:p>Tartarate Added to Water =</text:p>
          </table:table-cell>
          <table:table-cell table:style-name="ce109" office:value-type="float" office:value="148" calcext:value-type="float">
            <text:p>148.00</text:p>
          </table:table-cell>
          <table:table-cell table:style-name="ce132" office:value-type="string" calcext:value-type="string">
            <text:p>(ppm) Tartarate added to water</text:p>
          </table:table-cell>
          <table:table-cell table:style-name="ce132"/>
          <table:table-cell table:style-name="ce121" office:value-type="string" calcext:value-type="string">
            <text:p>Acid Required=</text:p>
          </table:table-cell>
          <table:table-cell table:style-name="ce96" table:formula="of:=[.T37]*(([.T43]-[.T25])+([.T27]-[.T45]))+10^(-N([.B6]))-10^(-N([.B5]))+0.01" office:value-type="float" office:value="0.0100024118864315" calcext:value-type="float">
            <text:p>0.010002411886432</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8" calcext:value-type="float">
            <text:p>8</text:p>
          </table:table-cell>
          <table:table-cell table:style-name="ce108" office:value-type="string" calcext:value-type="string">
            <text:p>Malic</text:p>
          </table:table-cell>
          <table:table-cell table:style-name="ce109" office:value-type="float" office:value="3.4" calcext:value-type="float">
            <text:p>3.40</text:p>
          </table:table-cell>
          <table:table-cell table:style-name="ce109" office:value-type="float" office:value="5.2" calcext:value-type="float">
            <text:p>5.20</text:p>
          </table:table-cell>
          <table:table-cell table:style-name="ce109" office:value-type="float" office:value="20" calcext:value-type="float">
            <text:p>20.00</text:p>
          </table:table-cell>
          <table:table-cell table:style-name="ce109" office:value-type="float" office:value="134.09" calcext:value-type="float">
            <text:p>134.09</text:p>
          </table:table-cell>
          <table:table-cell table:style-name="ce109" office:value-type="float" office:value="1609" calcext:value-type="float">
            <text:p>1609.00</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Malic Acid Required =</text:p>
          </table:table-cell>
          <table:table-cell table:style-name="ce109" office:value-type="string" calcext:value-type="string">
            <text:p>Total Acid Addition (gram)</text:p>
          </table:table-cell>
          <table:table-cell table:style-name="ce131" table:formula="of:=(mM_required*[.F50]*N([.B7])*[.J57])/1000" office:value-type="float" office:value="0.00362262652351244" calcext:value-type="float">
            <text:p>0.00</text:p>
          </table:table-cell>
          <table:table-cell table:style-name="ce131" table:formula="of:=[.$B$12]/1000" office:value-type="float" office:value="0.000361072950558936" calcext:value-type="float">
            <text:p>0.00</text:p>
          </table:table-cell>
          <table:table-cell table:style-name="ce132" office:value-type="string" calcext:value-type="string">
            <text:p>Malate Added to Water =</text:p>
          </table:table-cell>
          <table:table-cell table:style-name="ce109" office:value-type="float" office:value="132" calcext:value-type="float">
            <text:p>132.00</text:p>
          </table:table-cell>
          <table:table-cell table:style-name="ce132" office:value-type="string" calcext:value-type="string">
            <text:p>(ppm) Malate added to water</text:p>
          </table:table-cell>
          <table:table-cell table:style-name="ce13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table-cell table:style-name="ce108"/>
          <table:table-cell table:style-name="ce109" table:number-columns-repeated="10"/>
          <table:table-cell table:style-name="ce131" table:number-columns-repeated="2"/>
          <table:table-cell table:style-name="ce132"/>
          <table:table-cell table:style-name="ce109" table:number-columns-repeated="2"/>
          <table:table-cell table:style-name="ce132"/>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table-cell table:style-name="ce109" table:formula="of:=VLOOKUP([.$A$40];table;2;0)" office:value-type="string" office:string-value="Phosphoric" calcext:value-type="string">
            <text:p>Phosphoric</text:p>
          </table:table-cell>
          <table:table-cell table:style-name="ce109" table:formula="of:=VLOOKUP([.$A$40];table;3;0)" office:value-type="float" office:value="2.12" calcext:value-type="float">
            <text:p>2.12</text:p>
          </table:table-cell>
          <table:table-cell table:style-name="ce109" table:formula="of:=VLOOKUP([.$A$40];table;4;0)" office:value-type="float" office:value="7.2" calcext:value-type="float">
            <text:p>7.20</text:p>
          </table:table-cell>
          <table:table-cell table:style-name="ce109" table:formula="of:=VLOOKUP([.$A$40];table;5;0)" office:value-type="float" office:value="12.44" calcext:value-type="float">
            <text:p>12.44</text:p>
          </table:table-cell>
          <table:table-cell table:style-name="ce109" table:formula="of:=VLOOKUP([.$A$40];table;6;0)" office:value-type="float" office:value="98" calcext:value-type="float">
            <text:p>98.00</text:p>
          </table:table-cell>
          <table:table-cell table:style-name="ce109" table:formula="of:=VLOOKUP([.$A$40];table;7;0)" office:value-type="float" office:value="1003.294907" calcext:value-type="float">
            <text:p>1003.29</text:p>
          </table:table-cell>
          <table:table-cell table:style-name="ce109" table:formula="of:=VLOOKUP([.$A$40];table;8;0)" office:value-type="string" office:string-value="(ml)" calcext:value-type="string">
            <text:p>(ml)</text:p>
          </table:table-cell>
          <table:table-cell table:style-name="ce109" table:formula="of:=VLOOKUP([.$A$40];table;9;0)" office:value-type="string" office:string-value="(tsp)" calcext:value-type="string">
            <text:p>(tsp)</text:p>
          </table:table-cell>
          <table:table-cell table:style-name="ce109" table:formula="of:=VLOOKUP([.$A$40];table;10;0)" office:value-type="string" office:string-value="Addition        (mL/gal)" calcext:value-type="string">
            <text:p>Addition <text:s text:c="7"/>(mL/gal)</text:p>
          </table:table-cell>
          <table:table-cell table:style-name="ce109" table:formula="of:=VLOOKUP([.$A$40];table;11;0)" office:value-type="string" office:string-value="Phosphoric Acid Required =" calcext:value-type="string">
            <text:p>Phosphoric Acid Required =</text:p>
          </table:table-cell>
          <table:table-cell table:style-name="ce109" table:formula="of:=VLOOKUP([.$A$40];table;12;0)" office:value-type="string" office:string-value="Total Acid Addition (ml)" calcext:value-type="string">
            <text:p>Total Acid Addition (ml)</text:p>
          </table:table-cell>
          <table:table-cell table:style-name="ce109" table:formula="of:=VLOOKUP([.$A$40];table;13;0)" office:value-type="float" office:value="0.361072950558936" calcext:value-type="float">
            <text:p>0.36</text:p>
          </table:table-cell>
          <table:table-cell table:style-name="ce109" table:formula="of:=VLOOKUP([.$A$40];table;14;0)" office:value-type="float" office:value="0.0732617016684082" calcext:value-type="float">
            <text:p>0.07</text:p>
          </table:table-cell>
          <table:table-cell table:style-name="ce109" table:formula="of:=VLOOKUP([.$A$40];table;15;0)" office:value-type="string" office:string-value="Phosphate Added to Water =" calcext:value-type="string">
            <text:p>Phosphate Added to Water =</text:p>
          </table:table-cell>
          <table:table-cell table:style-name="ce109" table:formula="of:=VLOOKUP([.$A$40];table;16;0)" office:value-type="float" office:value="95" calcext:value-type="float">
            <text:p>95.00</text:p>
          </table:table-cell>
          <table:table-cell table:style-name="ce109" table:formula="of:=VLOOKUP([.$A$40];table;17;0)" office:value-type="string" office:string-value="(ppm) Phosphate added to water" calcext:value-type="string">
            <text:p>(ppm) Phosphate added to water</text:p>
          </table:table-cell>
          <table:table-cell table:style-name="ce13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7"/>
          <table:table-cell table:style-name="ce83" table:number-columns-repeated="7"/>
          <table:table-cell table:style-name="ce132" table:formula="of:=mM_required*[.$F$50]*N([.$B$7])*[.J57]" office:value-type="float" office:value="3.62262652351244" calcext:value-type="float">
            <text:p>4</text:p>
          </table:table-cell>
          <table:table-cell table:style-name="ce109" office:value-type="string" calcext:value-type="string">
            <text:p>mg</text:p>
          </table:table-cell>
          <table:table-cell table:style-name="ce83" table:number-columns-repeated="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matrix-columns-spanned="1" table:number-matrix-rows-spanned="1" table:formula="of:=INDEX([.$A$53:.$A$56]; MATCH([.C9];[.$B$53:.$B$56];0))" office:value-type="float" office:value="1" calcext:value-type="float">
            <text:p>1</text:p>
          </table:table-cell>
          <table:table-cell table:style-name="ce96" table:number-columns-repeated="2"/>
          <table:table-cell table:style-name="ce121" office:value-type="string" calcext:value-type="string">
            <text:p>so4</text:p>
          </table:table-cell>
          <table:table-cell table:style-name="ce121" office:value-type="string" calcext:value-type="string">
            <text:p>cl</text:p>
          </table:table-cell>
          <table:table-cell table:style-name="ce96" table:number-columns-repeated="2"/>
          <table:table-cell table:style-name="ce83" table:number-columns-repeated="11"/>
          <table:table-cell table:style-name="ce121"/>
          <table:table-cell table:style-name="ce96" table:number-columns-repeated="2"/>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1" calcext:value-type="float">
            <text:p>1</text:p>
          </table:table-cell>
          <table:table-cell table:style-name="ce108" office:value-type="string" calcext:value-type="string">
            <text:p>%</text:p>
          </table:table-cell>
          <table:table-cell table:style-name="ce116" table:formula="of:=IF([.$A$40]=9;(Acid_Required/3.657)*[.J57]*N([.B7]);((([.O51])/((N([.F10])/100)*((VLOOKUP([.$A$40];table;7;0)))))))" office:value-type="float" office:value="0.361072950558936" calcext:value-type="float">
            <text:p>0.361</text:p>
          </table:table-cell>
          <table:table-cell table:style-name="ce122" table:formula="of:=IF([.$A$40]=9;([.C53]*88.57)/([.$J$57]*[.$B$7]);mM_required*96)" office:value-type="float" office:value="0.937568129450824" calcext:value-type="float">
            <text:p>0.9</text:p>
          </table:table-cell>
          <table:table-cell table:style-name="ce122" table:formula="of:=IF([.$A$40]=9;([.C53]*64)/([.$J$57]*[.$B$7]);mM_required*35.5)" office:value-type="float" office:value="0.346704881203169" calcext:value-type="float">
            <text:p>0.3</text:p>
          </table:table-cell>
          <table:table-cell table:style-name="ce96" table:number-columns-repeated="2"/>
          <table:table-cell table:style-name="ce96" office:value-type="float" office:value="1" calcext:value-type="float">
            <text:p>1</text:p>
          </table:table-cell>
          <table:table-cell table:style-name="ce96" office:value-type="string" calcext:value-type="string">
            <text:p>Gallons</text:p>
          </table:table-cell>
          <table:table-cell table:style-name="ce96" office:value-type="float" office:value="3.785" calcext:value-type="float">
            <text:p>3.785</text:p>
          </table:table-cell>
          <table:table-cell table:style-name="ce83"/>
          <table:table-cell table:style-name="ce96" table:number-columns-repeated="2"/>
          <table:table-cell table:style-name="ce83" table:number-columns-repeated="5"/>
          <table:table-cell table:style-name="ce121" office:value-type="string" calcext:value-type="string">
            <text:p>r1d=</text:p>
          </table:table-cell>
          <table:table-cell table:style-name="ce134" table:formula="of:=10^(N([.B6])-[.C50])" office:value-type="float" office:value="3019.95172040201" calcext:value-type="float">
            <text:p>3019.95172040</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2" calcext:value-type="float">
            <text:p>2</text:p>
          </table:table-cell>
          <table:table-cell table:style-name="ce108" office:value-type="string" calcext:value-type="string">
            <text:p>N</text:p>
          </table:table-cell>
          <table:table-cell table:style-name="ce117" table:formula="of:=IF([.$A$40]=9;(Acid_Required/3.657)*[.J57]*N([.B7]);(Acid_Required/[.F10])*(N([.B7])*[.J57]))" office:value-type="float" office:value="0.0378591289901433" calcext:value-type="float">
            <text:p>0.04</text:p>
          </table:table-cell>
          <table:table-cell table:style-name="ce122" table:formula="of:=IF([.$A$40]=9;([.C54]*88.57)/([.$J$57]*[.$B$7]);mM_required*96)" office:value-type="float" office:value="0.937568129450824" calcext:value-type="float">
            <text:p>0.9</text:p>
          </table:table-cell>
          <table:table-cell table:style-name="ce122" table:formula="of:=IF([.$A$40]=9;([.C54]*64)/([.$J$57]*[.$B$7]);mM_required*35.5)" office:value-type="float" office:value="0.346704881203169" calcext:value-type="float">
            <text:p>0.3</text:p>
          </table:table-cell>
          <table:table-cell table:style-name="ce96" table:number-columns-repeated="2"/>
          <table:table-cell table:style-name="ce96" office:value-type="float" office:value="2" calcext:value-type="float">
            <text:p>2</text:p>
          </table:table-cell>
          <table:table-cell table:style-name="ce96" office:value-type="string" calcext:value-type="string">
            <text:p>Liters</text:p>
          </table:table-cell>
          <table:table-cell table:style-name="ce96" office:value-type="float" office:value="1" calcext:value-type="float">
            <text:p>1</text:p>
          </table:table-cell>
          <table:table-cell table:style-name="ce83"/>
          <table:table-cell table:style-name="ce96" table:number-columns-repeated="2"/>
          <table:table-cell table:style-name="ce83" table:number-columns-repeated="5"/>
          <table:table-cell table:style-name="ce121" office:value-type="string" calcext:value-type="string">
            <text:p>r2d=</text:p>
          </table:table-cell>
          <table:table-cell table:style-name="ce134" table:formula="of:=10^(N([.B6])-[.D50])" office:value-type="float" office:value="0.0251188643150958" calcext:value-type="float">
            <text:p>0.02511886</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3" calcext:value-type="float">
            <text:p>3</text:p>
          </table:table-cell>
          <table:table-cell table:style-name="ce108" office:value-type="string" calcext:value-type="string">
            <text:p>M</text:p>
          </table:table-cell>
          <table:table-cell table:style-name="ce117" table:formula="of:=IF([.$A$40]=9;(Acid_Required/3.657)*[.J57]*N([.B7]);(Acid_Required/[.F10])*(N([.B7])*[.J57])/frac)" office:value-type="float" office:value="0.0369655767705351" calcext:value-type="float">
            <text:p>0.04</text:p>
          </table:table-cell>
          <table:table-cell table:style-name="ce122" table:formula="of:=IF([.$A$40]=9;([.C55]*88.57)/([.$J$57]*[.$B$7]);mM_required*96)" office:value-type="float" office:value="0.937568129450824" calcext:value-type="float">
            <text:p>0.9</text:p>
          </table:table-cell>
          <table:table-cell table:style-name="ce122" table:formula="of:=IF([.$A$40]=9;([.C55]*64)/([.$J$57]*[.$B$7]);mM_required*35.5)" office:value-type="float" office:value="0.346704881203169" calcext:value-type="float">
            <text:p>0.3</text:p>
          </table:table-cell>
          <table:table-cell table:style-name="ce96" table:number-columns-repeated="5"/>
          <table:table-cell table:style-name="ce83"/>
          <table:table-cell table:style-name="ce96" table:number-columns-repeated="2"/>
          <table:table-cell table:style-name="ce83" table:number-columns-repeated="5"/>
          <table:table-cell table:style-name="ce121" office:value-type="string" calcext:value-type="string">
            <text:p>r3d=</text:p>
          </table:table-cell>
          <table:table-cell table:style-name="ce134" table:formula="of:=10^(N([.B6])-[.E50])" office:value-type="float" office:value="0.000000144543977074593" calcext:value-type="float">
            <text:p>0.00000014</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office:value-type="float" office:value="4" calcext:value-type="float">
            <text:p>4</text:p>
          </table:table-cell>
          <table:table-cell table:style-name="ce108" office:value-type="string" calcext:value-type="string">
            <text:p>Solid</text:p>
          </table:table-cell>
          <table:table-cell table:style-name="ce83" table:number-columns-repeated="2"/>
          <table:table-cell table:style-name="ce96" table:number-columns-repeated="12"/>
          <table:table-cell table:style-name="ce83" table:number-columns-repeated="2"/>
          <table:table-cell table:style-name="ce121" office:value-type="string" calcext:value-type="string">
            <text:p>dd=</text:p>
          </table:table-cell>
          <table:table-cell table:style-name="ce134" table:formula="of:=1/(1+[.T53]+([.T53]*[.T54])+([.T53]*[.T54]*[.T55]))" office:value-type="float" office:value="0.000322912986282855" calcext:value-type="float">
            <text:p>0.00032291</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table-cell table:style-name="ce109" table:formula="of:=VLOOKUP([.$A$52];strtable;2;0)" office:value-type="string" office:string-value="%" calcext:value-type="string">
            <text:p>%</text:p>
          </table:table-cell>
          <table:table-cell table:style-name="ce83" table:number-columns-repeated="2"/>
          <table:table-cell table:style-name="ce96" table:number-columns-repeated="3"/>
          <table:table-cell table:style-name="ce129" table:formula="of:=VLOOKUP([$'1. Water Report Input'.$H$7];sprgvaritable;1;0)" office:value-type="float" office:value="1" calcext:value-type="float">
            <text:p>1.00</text:p>
          </table:table-cell>
          <table:table-cell table:style-name="ce130" table:formula="of:=VLOOKUP([$'1. Water Report Input'.$H$7];sprgvaritable;2;0)" office:value-type="string" office:string-value="Gallons" calcext:value-type="string">
            <text:p>Gallons</text:p>
          </table:table-cell>
          <table:table-cell table:style-name="ce129" table:formula="of:=VLOOKUP([$'1. Water Report Input'.$H$7];sprgvaritable;3;0)" office:value-type="float" office:value="3.785" calcext:value-type="float">
            <text:p>3.79</text:p>
          </table:table-cell>
          <table:table-cell table:style-name="ce96" table:number-columns-repeated="6"/>
          <table:table-cell table:style-name="ce83" table:number-columns-repeated="2"/>
          <table:table-cell table:style-name="ce121" office:value-type="string" calcext:value-type="string">
            <text:p>f1d=</text:p>
          </table:table-cell>
          <table:table-cell table:style-name="ce134" table:formula="of:=[.T56]" office:value-type="float" office:value="0.000322912986282855" calcext:value-type="float">
            <text:p>0.00032291</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121" office:value-type="string" calcext:value-type="string">
            <text:p>f2d=</text:p>
          </table:table-cell>
          <table:table-cell table:style-name="ce134" table:formula="of:=[.T56]*[.T53]" office:value-type="float" office:value="0.975181628465059" calcext:value-type="float">
            <text:p>0.97518163</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121" office:value-type="string" calcext:value-type="string">
            <text:p>f3d=</text:p>
          </table:table-cell>
          <table:table-cell table:style-name="ce134" table:formula="of:=[.T53]*[.T54]*[.T56]" office:value-type="float" office:value="0.0244954550079879" calcext:value-type="float">
            <text:p>0.02449546</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121" office:value-type="string" calcext:value-type="string">
            <text:p>f4d=</text:p>
          </table:table-cell>
          <table:table-cell table:style-name="ce134" table:formula="of:=[.T53]*[.T54]*[.T55]*[.T56]" office:value-type="float" office:value="0.00000000354067048710633" calcext:value-type="float">
            <text:p>0.00000000</text:p>
          </table:table-cell>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121" office:value-type="string" calcext:value-type="string">
            <text:p>frac=</text:p>
          </table:table-cell>
          <table:table-cell table:style-name="ce134" table:formula="of:=[.T58]+(2*[.T59])+(3*[.T60])" office:value-type="float" office:value="1.02417254910305" calcext:value-type="float">
            <text:p>1.02417255</text:p>
          </table:table-cell>
          <table:table-cell table:style-name="ce96" office:value-type="string" calcext:value-type="string">
            <text:p>meq/mM</text:p>
          </table:table-cell>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121" office:value-type="string" calcext:value-type="string">
            <text:p>mM required=</text:p>
          </table:table-cell>
          <table:table-cell table:style-name="ce116" table:formula="of:=Acid_Required/frac" office:value-type="float" office:value="0.00976633468177941" calcext:value-type="float">
            <text:p>0.010</text:p>
          </table:table-cell>
          <table:table-cell table:style-name="ce96" office:value-type="string" calcext:value-type="string">
            <text:p>mM/L</text:p>
          </table:table-cell>
          <table:table-cell table:style-name="ce83"/>
          <table:table-cell table:style-name="ce53" table:number-columns-repeated="5"/>
          <table:table-cell table:style-name="ce83" table:number-columns-repeated="13"/>
          <table:table-cell table:number-columns-repeated="24"/>
        </table:table-row>
        <table:table-row table:style-name="ro113">
          <table:table-cell table:style-name="ce96" table:number-columns-repeated="2"/>
          <table:table-cell table:style-name="ce83" table:number-columns-repeated="2"/>
          <table:table-cell table:style-name="ce96" table:number-columns-repeated="12"/>
          <table:table-cell table:style-name="ce83" table:number-columns-repeated="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02">
          <table:table-cell table:style-name="ce83"/>
          <table:table-cell table:style-name="ce96" table:number-columns-repeated="15"/>
          <table:table-cell table:style-name="ce83" table:number-columns-repeated="6"/>
          <table:table-cell table:style-name="ce53" table:number-columns-repeated="5"/>
          <table:table-cell table:style-name="ce83" table:number-columns-repeated="13"/>
          <table:table-cell table:number-columns-repeated="24"/>
        </table:table-row>
        <table:table-row table:style-name="ro102">
          <table:table-cell table:style-name="ce83" table:number-columns-repeated="22"/>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8" table:number-columns-repeated="9"/>
          <table:table-cell table:style-name="ce83" table:number-columns-repeated="8"/>
          <table:table-cell table:style-name="ce121"/>
          <table:table-cell table:style-name="ce134"/>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02" table:number-rows-repeated="8">
          <table:table-cell table:style-name="ce96"/>
          <table:table-cell table:style-name="ce108"/>
          <table:table-cell table:style-name="ce109" table:number-columns-repeated="10"/>
          <table:table-cell table:style-name="ce131" table:number-columns-repeated="2"/>
          <table:table-cell table:style-name="ce132"/>
          <table:table-cell table:style-name="ce109"/>
          <table:table-cell table:style-name="ce132" table:number-columns-repeated="2"/>
          <table:table-cell table:style-name="ce121"/>
          <table:table-cell table:style-name="ce134"/>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8"/>
          <table:table-cell table:style-name="ce109" table:number-columns-repeated="10"/>
          <table:table-cell table:style-name="ce131" table:number-columns-repeated="2"/>
          <table:table-cell table:style-name="ce132"/>
          <table:table-cell table:style-name="ce109"/>
          <table:table-cell table:style-name="ce83"/>
          <table:table-cell table:style-name="ce132"/>
          <table:table-cell table:style-name="ce96" table:number-columns-repeated="3"/>
          <table:table-cell table:style-name="ce83"/>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9" table:number-columns-repeated="17"/>
          <table:table-cell table:style-name="ce121"/>
          <table:table-cell table:style-name="ce116"/>
          <table:table-cell table:style-name="ce96"/>
          <table:table-cell table:style-name="ce83"/>
          <table:table-cell table:style-name="ce53" table:number-columns-repeated="5"/>
          <table:table-cell table:style-name="ce83" table:number-columns-repeated="13"/>
          <table:table-cell table:number-columns-repeated="24"/>
        </table:table-row>
        <table:table-row table:style-name="ro102">
          <table:table-cell table:style-name="ce83" table:number-columns-repeated="14"/>
          <table:table-cell table:style-name="ce132"/>
          <table:table-cell table:style-name="ce109"/>
          <table:table-cell table:style-name="ce83" table:number-columns-repeated="6"/>
          <table:table-cell table:style-name="ce53" table:number-columns-repeated="5"/>
          <table:table-cell table:style-name="ce83" table:number-columns-repeated="13"/>
          <table:table-cell table:number-columns-repeated="24"/>
        </table:table-row>
        <table:table-row table:style-name="ro102">
          <table:table-cell table:style-name="ce96" table:number-columns-repeated="3"/>
          <table:table-cell table:style-name="ce121" table:number-columns-repeated="2"/>
          <table:table-cell table:style-name="ce83" table:number-columns-repeated="17"/>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8"/>
          <table:table-cell table:style-name="ce116"/>
          <table:table-cell table:style-name="ce122" table:number-columns-repeated="2"/>
          <table:table-cell table:style-name="ce83" table:number-columns-repeated="17"/>
          <table:table-cell table:style-name="ce53" table:number-columns-repeated="5"/>
          <table:table-cell table:style-name="ce83" table:number-columns-repeated="13"/>
          <table:table-cell table:number-columns-repeated="24"/>
        </table:table-row>
        <table:table-row table:style-name="ro102" table:number-rows-repeated="2">
          <table:table-cell table:style-name="ce96"/>
          <table:table-cell table:style-name="ce108"/>
          <table:table-cell table:style-name="ce117"/>
          <table:table-cell table:style-name="ce122" table:number-columns-repeated="2"/>
          <table:table-cell table:style-name="ce83" table:number-columns-repeated="17"/>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8"/>
          <table:table-cell table:style-name="ce83" table:number-columns-repeated="2"/>
          <table:table-cell table:style-name="ce96"/>
          <table:table-cell table:style-name="ce83" table:number-columns-repeated="17"/>
          <table:table-cell table:style-name="ce53" table:number-columns-repeated="5"/>
          <table:table-cell table:style-name="ce83" table:number-columns-repeated="13"/>
          <table:table-cell table:number-columns-repeated="24"/>
        </table:table-row>
        <table:table-row table:style-name="ro102">
          <table:table-cell table:style-name="ce96"/>
          <table:table-cell table:style-name="ce109"/>
          <table:table-cell table:style-name="ce83" table:number-columns-repeated="2"/>
          <table:table-cell table:style-name="ce96"/>
          <table:table-cell table:style-name="ce83" table:number-columns-repeated="17"/>
          <table:table-cell table:style-name="ce53" table:number-columns-repeated="5"/>
          <table:table-cell table:style-name="ce83" table:number-columns-repeated="13"/>
          <table:table-cell table:number-columns-repeated="24"/>
        </table:table-row>
        <table:table-row table:style-name="ro102" table:number-rows-repeated="5">
          <table:table-cell table:style-name="ce83" table:number-columns-repeated="22"/>
          <table:table-cell table:style-name="ce53" table:number-columns-repeated="5"/>
          <table:table-cell table:style-name="ce83" table:number-columns-repeated="13"/>
          <table:table-cell table:number-columns-repeated="24"/>
        </table:table-row>
        <table:table-row table:style-name="ro102" table:number-rows-repeated="7">
          <table:table-cell table:style-name="ce53" table:number-columns-repeated="27"/>
          <table:table-cell table:style-name="ce83" table:number-columns-repeated="13"/>
          <table:table-cell table:number-columns-repeated="24"/>
        </table:table-row>
        <table:table-row table:style-name="ro102" table:number-rows-repeated="7">
          <table:table-cell table:style-name="ce53" table:number-columns-repeated="27"/>
          <table:table-cell table:style-name="ce83" table:number-columns-repeated="4"/>
          <table:table-cell table:style-name="ce31" table:number-columns-repeated="9"/>
          <table:table-cell table:number-columns-repeated="24"/>
        </table:table-row>
        <table:table-row table:style-name="ro102" table:number-rows-repeated="2">
          <table:table-cell table:style-name="ce83" table:number-columns-repeated="4"/>
          <table:table-cell table:style-name="ce53" table:number-columns-repeated="23"/>
          <table:table-cell table:style-name="ce83" table:number-columns-repeated="4"/>
          <table:table-cell table:style-name="ce31" table:number-columns-repeated="9"/>
          <table:table-cell table:number-columns-repeated="24"/>
        </table:table-row>
        <table:table-row table:style-name="ro102" table:number-rows-repeated="895">
          <table:table-cell table:style-name="ce31" table:number-columns-repeated="4"/>
          <table:table-cell table:style-name="ce53" table:number-columns-repeated="23"/>
          <table:table-cell table:style-name="ce31" table:number-columns-repeated="13"/>
          <table:table-cell table:number-columns-repeated="24"/>
        </table:table-row>
        <table:table-row table:style-name="ro103" table:number-rows-repeated="1047575">
          <table:table-cell table:number-columns-repeated="64"/>
        </table:table-row>
        <table:table-row table:style-name="ro103">
          <table:table-cell table:number-columns-repeated="64"/>
        </table:table-row>
        <calcext:conditional-formats>
          <calcext:conditional-format calcext:target-range-address="'2. Sparge Acidification'.B7:'2. Sparge Acidification'.B7">
            <calcext:condition calcext:apply-style-name="ConditionalStyle_3" calcext:value="formula-is([.B7]=1)" calcext:base-cell-address="'2. Sparge Acidification'.B7"/>
          </calcext:conditional-format>
          <calcext:conditional-format calcext:target-range-address="'2. Sparge Acidification'.B11:'2. Sparge Acidification'.B11 '2. Sparge Acidification'.B4:'2. Sparge Acidification'.B4">
            <calcext:condition calcext:apply-style-name="ConditionalStyle_4" calcext:value="formula-is([.B11]&lt;25)" calcext:base-cell-address="'2. Sparge Acidification'.B11"/>
          </calcext:conditional-format>
          <calcext:conditional-format calcext:target-range-address="'2. Sparge Acidification'.B11:'2. Sparge Acidification'.B11">
            <calcext:condition calcext:apply-style-name="ConditionalStyle_1" calcext:value="formula-is([.B11]&gt;50)" calcext:base-cell-address="'2. Sparge Acidification'.B11"/>
          </calcext:conditional-format>
          <calcext:conditional-format calcext:target-range-address="'2. Sparge Acidification'.D7:'2. Sparge Acidification'.D7">
            <calcext:condition calcext:apply-style-name="ConditionalStyle_5" calcext:value="formula-is([.B7]=1)" calcext:base-cell-address="'2. Sparge Acidification'.D7"/>
          </calcext:conditional-format>
        </calcext:conditional-formats>
      </table:table>
      <table:table table:name="3. Grain Bill Input" table:style-name="ta4">
        <table:table-column table:style-name="co14" table:default-cell-style-name="Default"/>
        <table:table-column table:style-name="co15" table:default-cell-style-name="Default"/>
        <table:table-column table:style-name="co16" table:number-columns-repeated="3" table:default-cell-style-name="Default"/>
        <table:table-column table:style-name="co17" table:number-columns-repeated="2" table:default-cell-style-name="Default"/>
        <table:table-column table:style-name="co17" table:visibility="collapse" table:number-columns-repeated="19"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8" table:number-columns-repeated="14" table:default-cell-style-name="Default"/>
        <table:table-column table:style-name="co1" table:number-columns-repeated="20" table:default-cell-style-name="Default"/>
        <table:table-row table:style-name="ro102">
          <table:table-cell table:style-name="ce135" office:value-type="string" calcext:value-type="string">
            <text:p>Bru'n Water</text:p>
          </table:table-cell>
          <table:table-cell table:style-name="ce149" office:value-type="string" calcext:value-type="string" table:number-columns-spanned="5" table:number-rows-spanned="1">
            <text:p><text:a xlink:href="https://sites.google.com/site/brunwater/home/files" xlink:type="simple">Link to Bru'n Water website for updates and to donate</text:a></text:p>
          </table:table-cell>
          <table:covered-table-cell table:number-columns-repeated="4"/>
          <table:table-cell table:style-name="ce182"/>
          <table:table-cell table:style-name="ce195" table:number-columns-repeated="2"/>
          <table:table-cell table:style-name="ce211" table:number-columns-repeated="4"/>
          <table:table-cell table:style-name="ce83" table:number-columns-repeated="13"/>
          <table:table-cell table:style-name="ce53" table:number-columns-repeated="4"/>
          <table:table-cell table:style-name="ce83" table:number-columns-repeated="8"/>
          <table:table-cell table:style-name="ce31" table:number-columns-repeated="6"/>
          <table:table-cell table:number-columns-repeated="20"/>
        </table:table-row>
        <table:table-row table:style-name="ro102">
          <table:table-cell table:style-name="ce136"/>
          <table:table-cell table:style-name="ce150" table:number-columns-repeated="4"/>
          <table:table-cell table:style-name="ce175"/>
          <table:table-cell table:style-name="ce183"/>
          <table:table-cell table:style-name="ce196"/>
          <table:table-cell table:style-name="ce204"/>
          <table:table-cell table:style-name="ce83" table:number-columns-repeated="6"/>
          <table:table-cell table:style-name="ce96" office:value-type="float" office:value="1" calcext:value-type="float">
            <text:p>1</text:p>
          </table:table-cell>
          <table:table-cell table:style-name="ce96" office:value-type="string" calcext:value-type="string">
            <text:p>Base Malt</text:p>
          </table:table-cell>
          <table:table-cell table:style-name="ce83" table:number-columns-repeated="9"/>
          <table:table-cell table:style-name="ce53" table:number-columns-repeated="4"/>
          <table:table-cell table:style-name="ce83" table:number-columns-repeated="8"/>
          <table:table-cell table:style-name="ce31" table:number-columns-repeated="6"/>
          <table:table-cell table:number-columns-repeated="20"/>
        </table:table-row>
        <table:table-row table:style-name="ro114">
          <table:table-cell table:style-name="ce137" office:value-type="string" calcext:value-type="string" table:number-columns-spanned="2" table:number-rows-spanned="1">
            <text:p>Grain Bill Input </text:p>
          </table:table-cell>
          <table:covered-table-cell/>
          <table:table-cell table:style-name="ce158" office:value-type="string" calcext:value-type="string" table:number-columns-spanned="4" table:number-rows-spanned="1">
            <text:p><text:s/>Hover cursor over cells w/ red corner marks to display helpful information</text:p>
          </table:table-cell>
          <table:covered-table-cell table:number-columns-repeated="3"/>
          <table:table-cell table:style-name="ce184"/>
          <table:table-cell table:style-name="ce197" table:number-columns-repeated="2"/>
          <table:table-cell table:style-name="ce83" table:number-columns-repeated="6"/>
          <table:table-cell table:style-name="ce205" office:value-type="float" office:value="2" calcext:value-type="float">
            <text:p>2</text:p>
          </table:table-cell>
          <table:table-cell table:style-name="ce205" office:value-type="string" calcext:value-type="string">
            <text:p>Crystal Malt</text:p>
          </table:table-cell>
          <table:table-cell table:style-name="ce83" table:number-columns-repeated="9"/>
          <table:table-cell table:style-name="ce53" table:number-columns-repeated="4"/>
          <table:table-cell table:style-name="ce83" table:number-columns-repeated="8"/>
          <table:table-cell table:style-name="ce31" table:number-columns-repeated="6"/>
          <table:table-cell table:number-columns-repeated="20"/>
        </table:table-row>
        <table:table-row table:style-name="ro100">
          <table:table-cell table:style-name="ce138" office:value-type="string" calcext:value-type="string" table:number-columns-spanned="6" table:number-rows-spanned="1">
            <text:p><text:span text:style-name="T377">Enter data into </text:span><text:span text:style-name="T378">Light Blue</text:span><text:span text:style-name="T379"> cells, </text:span><text:span text:style-name="T380">Yellow</text:span><text:span text:style-name="T379"> cells display calculated results, </text:span><text:span text:style-name="T381">Pink</text:span><text:span text:style-name="T379"> cells contain selection boxes</text:span></text:p>
          </table:table-cell>
          <table:covered-table-cell table:number-columns-repeated="5" table:style-name="ce20"/>
          <table:table-cell table:style-name="ce185"/>
          <table:table-cell table:style-name="ce198"/>
          <table:table-cell table:style-name="ce205" table:number-columns-repeated="2"/>
          <table:table-cell table:style-name="ce198" table:number-columns-repeated="5"/>
          <table:table-cell table:style-name="ce96" office:value-type="float" office:value="3" calcext:value-type="float">
            <text:p>3</text:p>
          </table:table-cell>
          <table:table-cell table:style-name="ce96" office:value-type="string" calcext:value-type="string">
            <text:p>Roast Malt</text:p>
          </table:table-cell>
          <table:table-cell table:style-name="ce198" table:number-columns-repeated="9"/>
          <table:table-cell table:style-name="ce220" table:number-columns-repeated="4"/>
          <table:table-cell table:style-name="ce198" table:number-columns-repeated="8"/>
          <table:table-cell table:style-name="ce221" table:number-columns-repeated="6"/>
          <table:table-cell table:number-columns-repeated="20"/>
        </table:table-row>
        <table:table-row table:style-name="ro115">
          <table:table-cell table:style-name="ce139" office:value-type="string" calcext:value-type="string">
            <office:annotation draw:style-name="gr36" draw:text-style-name="P2" svg:width="11.283cm" svg:height="4.603cm" svg:x="6.08cm" svg:y="3.969cm" draw:caption-point-x="-0.407cm" draw:caption-point-y="-1.208cm">
              <dc:date>2021-02-12T00:00:00</dc:date>
              <text:p text:style-name="P1"><text:span text:style-name="T1">======</text:span></text:p>
              <text:p text:style-name="P1"><text:span text:style-name="T1">ID#AAAAH1AC7ik</text:span></text:p>
              <text:p text:style-name="P1"><text:span text:style-name="T1">martin.brungard <text:s text:c="3"/>(2021-02-12 10:36:59)</text:span></text:p>
              <text:p text:style-name="P1"><text:span text:style-name="T1">List mash grist grain components in lbs and/or oz or kg and/or g. <text:s/>Include the Color rating.</text:span></text:p>
              <text:p text:style-name="P1"><text:span text:style-name="T1"><text:s/></text:span></text:p>
              <text:p text:style-name="P1"><text:span text:style-name="T1">The Brewer may enter grain names in the table as they choose.</text:span></text:p>
              <text:p text:style-name="P1"><text:span text:style-name="T1"/></text:p>
              <text:p text:style-name="P1"><text:span text:style-name="T1">The cell colors change to signify the malt type setting (base, crystal, roast, or acid)</text:span></text:p>
            </office:annotation>
            <text:p>Grains</text:p>
          </table:table-cell>
          <table:table-cell table:style-name="ce139" office:value-type="string" calcext:value-type="string">
            <office:annotation draw:style-name="gr37" draw:text-style-name="P2" svg:width="11.338cm" svg:height="10.866cm" svg:x="8.796cm" svg:y="2.955cm" draw:caption-point-x="-0.407cm" draw:caption-point-y="-0.194cm">
              <dc:date>2021-02-12T00:00:00</dc:date>
              <text:p text:style-name="P1"><text:span text:style-name="T1">======</text:span></text:p>
              <text:p text:style-name="P1"><text:span text:style-name="T1">ID#AAAAH1AC7jo</text:span></text:p>
              <text:p text:style-name="P1"><text:span text:style-name="T1">martin.brungard <text:s text:c="3"/>(2021-02-12 10:36:59)</text:span></text:p>
              <text:p text:style-name="P1"><text:span text:style-name="T1">Click cells below to display drop-down menu with Base, Crystal, Roast, and Acid malt selections. </text:span></text:p>
              <text:p text:style-name="P1"><text:span text:style-name="T1"/></text:p>
              <text:p text:style-name="P1"><text:span text:style-name="T1">Base malts include: Pilsner, Lager, 2-row, 6-row, Pale, Munich, Vienna, Mild, Wheat, Oat, &amp; flaked grains.</text:span></text:p>
              <text:p text:style-name="P1"><text:span text:style-name="T1"/></text:p>
              <text:p text:style-name="P1"><text:span text:style-name="T1">Crystal malts include those with Cara or Crystal prefixes such as Carapils, CaraMunich, or Crystal 60L. <text:s/>Also includes Aromatic, Biscuit, Special B, Melanoidin, but not Carafa.</text:span></text:p>
              <text:p text:style-name="P1"><text:span text:style-name="T1"/></text:p>
              <text:p text:style-name="P1"><text:span text:style-name="T1">Roast malts include: Carafa malts, Roast Barley, Chocolate, &amp; Black malts. <text:s/>Roast Malts usually have color greater than 180 lovibond. Although Amber Malt from Crisp Malting does not meet the color threshold for roast, it should be entered as a Roast malt.</text:span></text:p>
              <text:p text:style-name="P1"><text:span text:style-name="T1"/></text:p>
              <text:p text:style-name="P1"><text:span text:style-name="T1">Acid malt is a specialty malt typically infused with 2 to 3 % Lactic Acid</text:span></text:p>
              <text:p text:style-name="P1"><text:span text:style-name="T1"/></text:p>
              <text:p text:style-name="P1"><text:span text:style-name="T1">Special Note for Rahr base malts: Since these base malts are apparently more acidic than other base malts of similar color, the user may add about 3 L to Rahr base malt color inputs to account for that extra acidity.</text:span></text:p>
              <text:p text:style-name="P1"><text:span text:style-name="T1"/></text:p>
              <text:p text:style-name="P1"><text:span text:style-name="T1">Rice Hulls are relatively inert and should not affect the mash pH. <text:s/>They should not be entered as part of the grist here.</text:span></text:p>
            </office:annotation>
            <text:p>Grain Type</text:p>
          </table:table-cell>
          <table:table-cell table:style-name="ce159" table:formula="of:=[.O35]" office:value-type="string" office:string-value="Quantity (lb)" calcext:value-type="string">
            <office:annotation draw:style-name="gr38" draw:text-style-name="P2" svg:width="11.253cm" svg:height="2.571cm" svg:x="11.652cm" svg:y="3.927cm" draw:caption-point-x="-0.407cm" draw:caption-point-y="-1.166cm">
              <dc:date>2021-02-12T00:00:00</dc:date>
              <text:p text:style-name="P1"><text:span text:style-name="T1">======</text:span></text:p>
              <text:p text:style-name="P1"><text:span text:style-name="T1">ID#AAAAH1AC7nQ</text:span></text:p>
              <text:p text:style-name="P1"><text:span text:style-name="T1">martin.brungard <text:s text:c="3"/>(2021-02-12 10:36:59)</text:span></text:p>
              <text:p text:style-name="P1"><text:span text:style-name="T1">Grain quantity can be entered as decimal units and/or decimal sub-units. <text:s/>It all adds up in the end. <text:s/>Check total grist weight to confirm that it matches your recipe weight.</text:span></text:p>
            </office:annotation>
            <text:p>Quantity (lb)</text:p>
          </table:table-cell>
          <table:table-cell table:style-name="ce159" table:formula="of:=[.P35]" office:value-type="string" office:string-value="Quantity (oz)" calcext:value-type="string">
            <text:p>Quantity (oz)</text:p>
          </table:table-cell>
          <table:table-cell table:style-name="ce170" table:formula="of:=IF([.B20]=&quot;Lovibond&quot;;[.R28];[.R29])" office:value-type="string" office:string-value="Color (L)" calcext:value-type="string">
            <office:annotation draw:style-name="gr39" draw:text-style-name="P2" svg:width="5.542cm" svg:height="8.496cm" svg:x="17.363cm" svg:y="2.023cm" draw:caption-point-x="-0.407cm" draw:caption-point-y="0.738cm">
              <dc:date>2021-02-12T00:00:00</dc:date>
              <text:p text:style-name="P1"><text:span text:style-name="T1">======</text:span></text:p>
              <text:p text:style-name="P1"><text:span text:style-name="T1">ID#AAAAH1AC7lU</text:span></text:p>
              <text:p text:style-name="P1"><text:span text:style-name="T1">martin.brungard <text:s text:c="3"/>(2021-02-12 10:36:59)</text:span></text:p>
              <text:p text:style-name="P1"><text:span text:style-name="T1">Set the Malt Color rating system (EBC or Lovibond) setting in the drop-down box at the bottom of this sheet. <text:s/>Enter the Malt Color for each grain. <text:s/></text:span></text:p>
              <text:p text:style-name="P1"><text:span text:style-name="T1"/></text:p>
              <text:p text:style-name="P1"><text:span text:style-name="T1">The cells below turn Red if the color rating is high and the Grain Type is not set to Roast malt. <text:s/>The cells turn Red if the color rating is low and Roast Malt is selected. <text:s/></text:span></text:p>
              <text:p text:style-name="P1"><text:span text:style-name="T1"/></text:p>
              <text:p text:style-name="P1"><text:span text:style-name="T1">Roasted malts typically have color ratings above 400 EBC (150L) and most other grains have less color.</text:span></text:p>
            </office:annotation>
            <text:p>Color (L)</text:p>
          </table:table-cell>
          <table:table-cell table:style-name="ce139" office:value-type="string" calcext:value-type="string">
            <office:annotation draw:style-name="gr10" draw:text-style-name="P2" svg:width="2.771cm" svg:height="4.941cm" svg:x="20.134cm" svg:y="2.742cm" draw:caption-point-x="-0.407cm" draw:caption-point-y="0.019cm">
              <dc:date>2021-02-12T00:00:00</dc:date>
              <text:p text:style-name="P1"><text:span text:style-name="T1">======</text:span></text:p>
              <text:p text:style-name="P1"><text:span text:style-name="T1">ID#AAAAH1AC7nU</text:span></text:p>
              <text:p text:style-name="P1"><text:span text:style-name="T1">martin.brungard <text:s text:c="3"/>(2021-02-12 10:36:59)</text:span></text:p>
              <text:p text:style-name="P1"><text:span text:style-name="T1">This provides a check on the grain quantities entered and the relative amount of each grain.</text:span></text:p>
            </office:annotation>
            <text:p>Percentage of <text:s text:c="8"/>Grain Bill</text:p>
          </table:table-cell>
          <table:table-cell table:style-name="ce186"/>
          <table:table-cell table:style-name="ce199"/>
          <table:table-cell table:style-name="ce206"/>
          <table:table-cell table:style-name="ce212"/>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0"/>
          <table:table-cell table:style-name="ce213" office:value-type="float" office:value="4" calcext:value-type="float">
            <text:p>4</text:p>
          </table:table-cell>
          <table:table-cell table:style-name="ce213" office:value-type="string" calcext:value-type="string">
            <text:p>Acid Malt</text:p>
          </table:table-cell>
          <table:table-cell table:style-name="ce83" table:number-columns-repeated="9"/>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2 Row Pale Malt</text:p>
          </table:table-cell>
          <table:table-cell table:style-name="ce151" table:content-validation-name="val5" office:value-type="string" calcext:value-type="string">
            <text:p>Base Malt</text:p>
          </table:table-cell>
          <table:table-cell table:style-name="ce160" office:value-type="float" office:value="10" calcext:value-type="float">
            <text:p>10.0</text:p>
          </table:table-cell>
          <table:table-cell table:style-name="ce160" office:value-type="float" office:value="0" calcext:value-type="float">
            <text:p>0.0</text:p>
          </table:table-cell>
          <table:table-cell table:style-name="ce171" office:value-type="float" office:value="1.7" calcext:value-type="float">
            <office:annotation draw:style-name="gr27" draw:text-style-name="P2" svg:width="5.542cm" svg:height="6.916cm" svg:x="17.363cm" svg:y="3.342cm" draw:caption-point-x="-0.407cm" draw:caption-point-y="0.372cm">
              <dc:date>2021-02-12T00:00:00</dc:date>
              <text:p text:style-name="P1"><text:span text:style-name="T1">======</text:span></text:p>
              <text:p text:style-name="P1"><text:span text:style-name="T1">ID#AAAAH1AC7os</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1.7</text:p>
          </table:table-cell>
          <table:table-cell table:style-name="ce176" table:formula="of:=IFERROR(100*(N([.C6])+(N([.D6])/[.$V$35]))/[.$C$18];0)" office:value-type="float" office:value="100" calcext:value-type="float">
            <text:p>100.0</text:p>
          </table:table-cell>
          <table:table-cell table:style-name="ce187"/>
          <table:table-cell table:style-name="ce200" table:formula="of:=((N([.C6])+(N([.D6])/[.$V$35]))*[.$U$35]*IF([.B$20]=&quot;Lovibond&quot;;N([.E6]);(0.375*N([.E6]))+0.561))/([$'4. Water Adjustment'.$V$17]*[.$X$35])" office:value-type="float" office:value="3.4" calcext:value-type="float">
            <text:p>3.4</text:p>
          </table:table-cell>
          <table:table-cell table:style-name="ce207" table:formula="of:=HLOOKUP(N([.J6]);aciditytable;2;0)" office:value-type="float" office:value="4.76" calcext:value-type="float">
            <text:p>4.8</text:p>
          </table:table-cell>
          <table:table-cell table:style-name="ce212" table:formula="of:=IFERROR(INDEX([.$P$2:.$P$5]; MATCH([.B6];[.$Q$2:.$Q$5];0));1)" office:value-type="float" office:value="1" calcext:value-type="float">
            <text:p>1</text:p>
          </table:table-cell>
          <table:table-cell table:style-name="ce131" table:formula="of:=(N([.C6])+(N([.D6])/[.$V$35]))*[.$U$35]*((0.28*[.R6]))" office:value-type="float" office:value="4.76" calcext:value-type="float">
            <text:p>4.76</text:p>
          </table:table-cell>
          <table:table-cell table:style-name="ce131" table:formula="of:=(N([.C6])+(N([.D6])/[.$V$35]))*[.$U$35]*((0.21*[.R6])+2.5)" office:value-type="float" office:value="28.57" calcext:value-type="float">
            <text:p>28.57</text:p>
          </table:table-cell>
          <table:table-cell table:style-name="ce131" table:formula="of:=((N([.C6])+(N([.D6])/[.$V$35]))*[.$U$35]*38)" office:value-type="float" office:value="380" calcext:value-type="float">
            <text:p>380.00</text:p>
          </table:table-cell>
          <table:table-cell table:style-name="ce131" table:formula="of:=((N([.C6])+(N([.D6])/[.$V$35]))*[.$U$35]*95)" office:value-type="float" office:value="950" calcext:value-type="float">
            <text:p>950.00</text:p>
          </table:table-cell>
          <table:table-cell table:style-name="ce218" table:formula="of:=IF([.$J6]=1;[.$I6];0)" office:value-type="float" office:value="4.76" calcext:value-type="float">
            <text:p>4.8</text:p>
          </table:table-cell>
          <table:table-cell table:style-name="ce213" table:formula="of:=IF([.$J6]=2;[.$I6];0)" office:value-type="float" office:value="0" calcext:value-type="float">
            <text:p>0</text:p>
          </table:table-cell>
          <table:table-cell table:style-name="ce213" table:formula="of:=IF([.$J6]=3;[.$I6];0)" office:value-type="float" office:value="0" calcext:value-type="float">
            <text:p>0</text:p>
          </table:table-cell>
          <table:table-cell table:style-name="ce83" table:formula="of:=IF([.$B$20]=&quot;lovibond&quot;;N([.E6]);(0.375*N([.E6]))+0.561)" office:value-type="float" office:value="1.7" calcext:value-type="float">
            <text:p>1.7</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Munich</text:p>
          </table:table-cell>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7" calcext:value-type="float">
            <office:annotation draw:style-name="gr27" draw:text-style-name="P2" svg:width="5.542cm" svg:height="6.916cm" svg:x="17.363cm" svg:y="3.871cm" draw:caption-point-x="-0.407cm" draw:caption-point-y="0.372cm">
              <dc:date>2021-02-12T00:00:00</dc:date>
              <text:p text:style-name="P1"><text:span text:style-name="T1">======</text:span></text:p>
              <text:p text:style-name="P1"><text:span text:style-name="T1">ID#AAAAH1AC7jA</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7</text:p>
          </table:table-cell>
          <table:table-cell table:style-name="ce176" table:formula="of:=IFERROR(100*(N([.C7])+(N([.D7])/[.$V$35]))/[.$C$18];0)" office:value-type="float" office:value="0" calcext:value-type="float">
            <text:p>0.0</text:p>
          </table:table-cell>
          <table:table-cell table:style-name="ce187"/>
          <table:table-cell table:style-name="ce200" table:formula="of:=((N([.C7])+(N([.D7])/[.$V$35]))*[.$U$35]*IF([.B$20]=&quot;lovibond&quot;;N([.E7]);(0.375*N([.E7]))+0.561))/([$'4. Water Adjustment'.$V$17]*[.$X$35])" office:value-type="float" office:value="0" calcext:value-type="float">
            <text:p>0.0</text:p>
          </table:table-cell>
          <table:table-cell table:style-name="ce207" table:formula="of:=HLOOKUP([.J7];aciditytable;3;0)" office:value-type="float" office:value="0" calcext:value-type="float">
            <text:p>0.0</text:p>
          </table:table-cell>
          <table:table-cell table:style-name="ce212" table:formula="of:=IFERROR(INDEX([.$P$2:.$P$5]; MATCH([.B7];[.$Q$2:.$Q$5];0));1)" office:value-type="float" office:value="1" calcext:value-type="float">
            <text:p>1</text:p>
          </table:table-cell>
          <table:table-cell table:style-name="ce131" table:formula="of:=(N([.C7])+(N([.D7])/[.$V$35]))*[.$U$35]*((0.28*[.R7]))" office:value-type="float" office:value="0" calcext:value-type="float">
            <text:p>0.00</text:p>
          </table:table-cell>
          <table:table-cell table:style-name="ce131" table:formula="of:=(N([.C7])+(N([.D7])/[.$V$35]))*[.$U$35]*((0.21*[.R7])+2.5)" office:value-type="float" office:value="0" calcext:value-type="float">
            <text:p>0.00</text:p>
          </table:table-cell>
          <table:table-cell table:style-name="ce131" table:formula="of:=((N([.C7])+(N([.D7])/[.$V$35]))*[.$U$35]*38)" office:value-type="float" office:value="0" calcext:value-type="float">
            <text:p>0.00</text:p>
          </table:table-cell>
          <table:table-cell table:style-name="ce131" table:formula="of:=((N([.C7])+(N([.D7])/[.$V$35]))*[.$U$35]*95)" office:value-type="float" office:value="0" calcext:value-type="float">
            <text:p>0.00</text:p>
          </table:table-cell>
          <table:table-cell table:style-name="ce218" table:formula="of:=IF([.$J7]=1;[.$I7];0)" office:value-type="float" office:value="0" calcext:value-type="float">
            <text:p>0.0</text:p>
          </table:table-cell>
          <table:table-cell table:style-name="ce213" table:formula="of:=IF([.$J7]=2;[.$I7];0)" office:value-type="float" office:value="0" calcext:value-type="float">
            <text:p>0</text:p>
          </table:table-cell>
          <table:table-cell table:style-name="ce213" table:formula="of:=IF([.$J7]=3;[.$I7];0)" office:value-type="float" office:value="0" calcext:value-type="float">
            <text:p>0</text:p>
          </table:table-cell>
          <table:table-cell table:style-name="ce83" table:formula="of:=IF([.$B$20]=&quot;lovibond&quot;;N([.E7]);(0.375*N([.E7]))+0.561)" office:value-type="float" office:value="7" calcext:value-type="float">
            <text:p>7</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Crystal 40L</text:p>
          </table:table-cell>
          <table:table-cell table:style-name="ce151" table:content-validation-name="val5" office:value-type="string" calcext:value-type="string">
            <text:p>Crystal Malt</text:p>
          </table:table-cell>
          <table:table-cell table:number-columns-repeated="2" table:style-name="ce160" office:value-type="float" office:value="0" calcext:value-type="float">
            <text:p>0.0</text:p>
          </table:table-cell>
          <table:table-cell table:style-name="ce171" office:value-type="float" office:value="40" calcext:value-type="float">
            <office:annotation draw:style-name="gr27" draw:text-style-name="P2" svg:width="5.542cm" svg:height="6.916cm" svg:x="17.363cm" svg:y="4.4cm" draw:caption-point-x="-0.407cm" draw:caption-point-y="0.372cm">
              <dc:date>2021-02-12T00:00:00</dc:date>
              <text:p text:style-name="P1"><text:span text:style-name="T1">======</text:span></text:p>
              <text:p text:style-name="P1"><text:span text:style-name="T1">ID#AAAAH1AC7m0</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40</text:p>
          </table:table-cell>
          <table:table-cell table:style-name="ce176" table:formula="of:=IFERROR(100*(N([.C8])+(N([.D8])/[.$V$35]))/[.$C$18];0)" office:value-type="float" office:value="0" calcext:value-type="float">
            <text:p>0.0</text:p>
          </table:table-cell>
          <table:table-cell table:style-name="ce187"/>
          <table:table-cell table:style-name="ce200" table:formula="of:=((N([.C8])+(N([.D8])/[.$V$35]))*[.$U$35]*IF([.B$20]=&quot;lovibond&quot;;N([.E8]);(0.375*N([.E8]))+0.561))/([$'4. Water Adjustment'.$V$17]*[.$X$35])" office:value-type="float" office:value="0" calcext:value-type="float">
            <text:p>0.0</text:p>
          </table:table-cell>
          <table:table-cell table:style-name="ce207" table:formula="of:=HLOOKUP([.J8];aciditytable;4;0)" office:value-type="float" office:value="0" calcext:value-type="float">
            <text:p>0.0</text:p>
          </table:table-cell>
          <table:table-cell table:style-name="ce212" table:formula="of:=IFERROR(INDEX([.$P$2:.$P$5]; MATCH([.B8];[.$Q$2:.$Q$5];0));1)" office:value-type="float" office:value="2" calcext:value-type="float">
            <text:p>2</text:p>
          </table:table-cell>
          <table:table-cell table:style-name="ce131" table:formula="of:=(N([.C8])+(N([.D8])/[.$V$35]))*[.$U$35]*((0.28*[.R8]))" office:value-type="float" office:value="0" calcext:value-type="float">
            <text:p>0.00</text:p>
          </table:table-cell>
          <table:table-cell table:style-name="ce131" table:formula="of:=(N([.C8])+(N([.D8])/[.$V$35]))*[.$U$35]*((0.21*[.R8])+2.5)" office:value-type="float" office:value="0" calcext:value-type="float">
            <text:p>0.00</text:p>
          </table:table-cell>
          <table:table-cell table:style-name="ce131" table:formula="of:=((N([.C8])+(N([.D8])/[.$V$35]))*[.$U$35]*38)" office:value-type="float" office:value="0" calcext:value-type="float">
            <text:p>0.00</text:p>
          </table:table-cell>
          <table:table-cell table:style-name="ce131" table:formula="of:=((N([.C8])+(N([.D8])/[.$V$35]))*[.$U$35]*95)" office:value-type="float" office:value="0" calcext:value-type="float">
            <text:p>0.00</text:p>
          </table:table-cell>
          <table:table-cell table:style-name="ce213" table:formula="of:=IF([.$J8]=1;[.$I8];0)" office:value-type="float" office:value="0" calcext:value-type="float">
            <text:p>0</text:p>
          </table:table-cell>
          <table:table-cell table:style-name="ce218" table:formula="of:=IF([.$J8]=2;[.$I8];0)" office:value-type="float" office:value="0" calcext:value-type="float">
            <text:p>0.0</text:p>
          </table:table-cell>
          <table:table-cell table:style-name="ce213" table:formula="of:=IF([.$J8]=3;[.$I8];0)" office:value-type="float" office:value="0" calcext:value-type="float">
            <text:p>0</text:p>
          </table:table-cell>
          <table:table-cell table:style-name="ce83" table:formula="of:=IF([.$B$20]=&quot;lovibond&quot;;N([.E8]);(0.375*N([.E8]))+0.561)" office:value-type="float" office:value="40" calcext:value-type="float">
            <text:p>4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Special B</text:p>
          </table:table-cell>
          <table:table-cell table:style-name="ce151" table:content-validation-name="val5" office:value-type="string" calcext:value-type="string">
            <text:p>Crystal Malt</text:p>
          </table:table-cell>
          <table:table-cell table:number-columns-repeated="2" table:style-name="ce160" office:value-type="float" office:value="0" calcext:value-type="float">
            <text:p>0.0</text:p>
          </table:table-cell>
          <table:table-cell table:style-name="ce171" office:value-type="float" office:value="120" calcext:value-type="float">
            <office:annotation draw:style-name="gr27" draw:text-style-name="P2" svg:width="5.542cm" svg:height="6.916cm" svg:x="17.363cm" svg:y="4.929cm" draw:caption-point-x="-0.407cm" draw:caption-point-y="0.372cm">
              <dc:date>2021-02-12T00:00:00</dc:date>
              <text:p text:style-name="P1"><text:span text:style-name="T1">======</text:span></text:p>
              <text:p text:style-name="P1"><text:span text:style-name="T1">ID#AAAAH1AC7nc</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120</text:p>
          </table:table-cell>
          <table:table-cell table:style-name="ce176" table:formula="of:=IFERROR(100*(N([.C9])+(N([.D9])/[.$V$35]))/[.$C$18];0)" office:value-type="float" office:value="0" calcext:value-type="float">
            <text:p>0.0</text:p>
          </table:table-cell>
          <table:table-cell table:style-name="ce187"/>
          <table:table-cell table:style-name="ce200" table:formula="of:=((N([.C9])+(N([.D9])/[.$V$35]))*[.$U$35]*IF([.B$20]=&quot;lovibond&quot;;N([.E9]);(0.375*N([.E9]))+0.561))/([$'4. Water Adjustment'.$V$17]*[.$X$35])" office:value-type="float" office:value="0" calcext:value-type="float">
            <text:p>0.0</text:p>
          </table:table-cell>
          <table:table-cell table:style-name="ce207" table:formula="of:=HLOOKUP([.J9];aciditytable;5;0)" office:value-type="float" office:value="0" calcext:value-type="float">
            <text:p>0.0</text:p>
          </table:table-cell>
          <table:table-cell table:style-name="ce212" table:formula="of:=IFERROR(INDEX([.$P$2:.$P$5]; MATCH([.B9];[.$Q$2:.$Q$5];0));1)" office:value-type="float" office:value="2" calcext:value-type="float">
            <text:p>2</text:p>
          </table:table-cell>
          <table:table-cell table:style-name="ce131" table:formula="of:=(N([.C9])+(N([.D9])/[.$V$35]))*[.$U$35]*((0.28*[.R9]))" office:value-type="float" office:value="0" calcext:value-type="float">
            <text:p>0.00</text:p>
          </table:table-cell>
          <table:table-cell table:style-name="ce131" table:formula="of:=(N([.C9])+(N([.D9])/[.$V$35]))*[.$U$35]*((0.21*[.R9])+2.5)" office:value-type="float" office:value="0" calcext:value-type="float">
            <text:p>0.00</text:p>
          </table:table-cell>
          <table:table-cell table:style-name="ce131" table:formula="of:=((N([.C9])+(N([.D9])/[.$V$35]))*[.$U$35]*38)" office:value-type="float" office:value="0" calcext:value-type="float">
            <text:p>0.00</text:p>
          </table:table-cell>
          <table:table-cell table:style-name="ce131" table:formula="of:=((N([.C9])+(N([.D9])/[.$V$35]))*[.$U$35]*95)" office:value-type="float" office:value="0" calcext:value-type="float">
            <text:p>0.00</text:p>
          </table:table-cell>
          <table:table-cell table:style-name="ce213" table:formula="of:=IF([.$J9]=1;[.$I9];0)" office:value-type="float" office:value="0" calcext:value-type="float">
            <text:p>0</text:p>
          </table:table-cell>
          <table:table-cell table:style-name="ce218" table:formula="of:=IF([.$J9]=2;[.$I9];0)" office:value-type="float" office:value="0" calcext:value-type="float">
            <text:p>0.0</text:p>
          </table:table-cell>
          <table:table-cell table:style-name="ce213" table:formula="of:=IF([.$J9]=3;[.$I9];0)" office:value-type="float" office:value="0" calcext:value-type="float">
            <text:p>0</text:p>
          </table:table-cell>
          <table:table-cell table:style-name="ce83" table:formula="of:=IF([.$B$20]=&quot;lovibond&quot;;N([.E9]);(0.375*N([.E9]))+0.561)" office:value-type="float" office:value="120" calcext:value-type="float">
            <text:p>12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Carafa</text:p>
          </table:table-cell>
          <table:table-cell table:style-name="ce151" table:content-validation-name="val5" office:value-type="string" calcext:value-type="string">
            <text:p>Roast Malt</text:p>
          </table:table-cell>
          <table:table-cell table:number-columns-repeated="2" table:style-name="ce160" office:value-type="float" office:value="0" calcext:value-type="float">
            <text:p>0.0</text:p>
          </table:table-cell>
          <table:table-cell table:style-name="ce171" office:value-type="float" office:value="400" calcext:value-type="float">
            <office:annotation draw:style-name="gr27" draw:text-style-name="P2" svg:width="5.542cm" svg:height="6.916cm" svg:x="17.363cm" svg:y="5.459cm" draw:caption-point-x="-0.407cm" draw:caption-point-y="0.371cm">
              <dc:date>2021-02-12T00:00:00</dc:date>
              <text:p text:style-name="P1"><text:span text:style-name="T1">======</text:span></text:p>
              <text:p text:style-name="P1"><text:span text:style-name="T1">ID#AAAAH1AC7lo</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400</text:p>
          </table:table-cell>
          <table:table-cell table:style-name="ce176" table:formula="of:=IFERROR(100*(N([.C10])+(N([.D10])/[.$V$35]))/[.$C$18];0)" office:value-type="float" office:value="0" calcext:value-type="float">
            <text:p>0.0</text:p>
          </table:table-cell>
          <table:table-cell table:style-name="ce187"/>
          <table:table-cell table:style-name="ce200" table:formula="of:=((N([.C10])+(N([.D10])/[.$V$35]))*[.$U$35]*IF([.B$20]=&quot;lovibond&quot;;N([.E10]);(0.375*N([.E10]))+0.561))/([$'4. Water Adjustment'.$V$17]*[.$X$35])" office:value-type="float" office:value="0" calcext:value-type="float">
            <text:p>0.0</text:p>
          </table:table-cell>
          <table:table-cell table:style-name="ce207" table:formula="of:=HLOOKUP([.J10];aciditytable;6;0)" office:value-type="float" office:value="0" calcext:value-type="float">
            <text:p>0.0</text:p>
          </table:table-cell>
          <table:table-cell table:style-name="ce212" table:formula="of:=IFERROR(INDEX([.$P$2:.$P$5]; MATCH([.B10];[.$Q$2:.$Q$5];0));1)" office:value-type="float" office:value="3" calcext:value-type="float">
            <text:p>3</text:p>
          </table:table-cell>
          <table:table-cell table:style-name="ce131" table:formula="of:=(N([.C10])+(N([.D10])/[.$V$35]))*[.$U$35]*((0.28*[.R10]))" office:value-type="float" office:value="0" calcext:value-type="float">
            <text:p>0.00</text:p>
          </table:table-cell>
          <table:table-cell table:style-name="ce131" table:formula="of:=(N([.C10])+(N([.D10])/[.$V$35]))*[.$U$35]*((0.21*[.R10])+2.5)" office:value-type="float" office:value="0" calcext:value-type="float">
            <text:p>0.00</text:p>
          </table:table-cell>
          <table:table-cell table:style-name="ce131" table:formula="of:=((N([.C10])+(N([.D10])/[.$V$35]))*[.$U$35]*38)" office:value-type="float" office:value="0" calcext:value-type="float">
            <text:p>0.00</text:p>
          </table:table-cell>
          <table:table-cell table:style-name="ce131" table:formula="of:=((N([.C10])+(N([.D10])/[.$V$35]))*[.$U$35]*95)" office:value-type="float" office:value="0" calcext:value-type="float">
            <text:p>0.00</text:p>
          </table:table-cell>
          <table:table-cell table:style-name="ce213" table:formula="of:=IF([.$J10]=1;[.$I10];0)" office:value-type="float" office:value="0" calcext:value-type="float">
            <text:p>0</text:p>
          </table:table-cell>
          <table:table-cell table:style-name="ce213" table:formula="of:=IF([.$J10]=2;[.$I10];0)" office:value-type="float" office:value="0" calcext:value-type="float">
            <text:p>0</text:p>
          </table:table-cell>
          <table:table-cell table:style-name="ce218" table:formula="of:=IF([.$J10]=3;[.$I10];0)" office:value-type="float" office:value="0" calcext:value-type="float">
            <text:p>0.0</text:p>
          </table:table-cell>
          <table:table-cell table:style-name="ce83" table:formula="of:=IF([.$B$20]=&quot;lovibond&quot;;N([.E10]);(0.375*N([.E10]))+0.561)" office:value-type="float" office:value="400" calcext:value-type="float">
            <text:p>40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Chocolate</text:p>
          </table:table-cell>
          <table:table-cell table:style-name="ce151" table:content-validation-name="val5" office:value-type="string" calcext:value-type="string">
            <text:p>Roast Malt</text:p>
          </table:table-cell>
          <table:table-cell table:number-columns-repeated="2" table:style-name="ce160" office:value-type="float" office:value="0" calcext:value-type="float">
            <text:p>0.0</text:p>
          </table:table-cell>
          <table:table-cell table:style-name="ce171" office:value-type="float" office:value="300" calcext:value-type="float">
            <office:annotation draw:style-name="gr27" draw:text-style-name="P2" svg:width="5.542cm" svg:height="6.916cm" svg:x="17.363cm" svg:y="5.988cm" draw:caption-point-x="-0.407cm" draw:caption-point-y="0.372cm">
              <dc:date>2021-02-12T00:00:00</dc:date>
              <text:p text:style-name="P1"><text:span text:style-name="T1">======</text:span></text:p>
              <text:p text:style-name="P1"><text:span text:style-name="T1">ID#AAAAH1AC7mA</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300</text:p>
          </table:table-cell>
          <table:table-cell table:style-name="ce176" table:formula="of:=IFERROR(100*(N([.C11])+(N([.D11])/[.$V$35]))/[.$C$18];0)" office:value-type="float" office:value="0" calcext:value-type="float">
            <text:p>0.0</text:p>
          </table:table-cell>
          <table:table-cell table:style-name="ce187"/>
          <table:table-cell table:style-name="ce200" table:formula="of:=((N([.C11])+(N([.D11])/[.$V$35]))*[.$U$35]*IF([.B$20]=&quot;lovibond&quot;;N([.E11]);(0.375*N([.E11]))+0.561))/([$'4. Water Adjustment'.$V$17]*[.$X$35])" office:value-type="float" office:value="0" calcext:value-type="float">
            <text:p>0.0</text:p>
          </table:table-cell>
          <table:table-cell table:style-name="ce207" table:formula="of:=HLOOKUP([.J11];aciditytable;7;0)" office:value-type="float" office:value="0" calcext:value-type="float">
            <text:p>0.0</text:p>
          </table:table-cell>
          <table:table-cell table:style-name="ce212" table:formula="of:=IFERROR(INDEX([.$P$2:.$P$5]; MATCH([.B11];[.$Q$2:.$Q$5];0));1)" office:value-type="float" office:value="3" calcext:value-type="float">
            <text:p>3</text:p>
          </table:table-cell>
          <table:table-cell table:style-name="ce131" table:formula="of:=(N([.C11])+(N([.D11])/[.$V$35]))*[.$U$35]*((0.28*[.R11]))" office:value-type="float" office:value="0" calcext:value-type="float">
            <text:p>0.00</text:p>
          </table:table-cell>
          <table:table-cell table:style-name="ce131" table:formula="of:=(N([.C11])+(N([.D11])/[.$V$35]))*[.$U$35]*((0.21*[.R11])+2.5)" office:value-type="float" office:value="0" calcext:value-type="float">
            <text:p>0.00</text:p>
          </table:table-cell>
          <table:table-cell table:style-name="ce131" table:formula="of:=((N([.C11])+(N([.D11])/[.$V$35]))*[.$U$35]*38)" office:value-type="float" office:value="0" calcext:value-type="float">
            <text:p>0.00</text:p>
          </table:table-cell>
          <table:table-cell table:style-name="ce131" table:formula="of:=((N([.C11])+(N([.D11])/[.$V$35]))*[.$U$35]*95)" office:value-type="float" office:value="0" calcext:value-type="float">
            <text:p>0.00</text:p>
          </table:table-cell>
          <table:table-cell table:style-name="ce213" table:formula="of:=IF([.$J11]=1;[.$I11];0)" office:value-type="float" office:value="0" calcext:value-type="float">
            <text:p>0</text:p>
          </table:table-cell>
          <table:table-cell table:style-name="ce213" table:formula="of:=IF([.$J11]=2;[.$I11];0)" office:value-type="float" office:value="0" calcext:value-type="float">
            <text:p>0</text:p>
          </table:table-cell>
          <table:table-cell table:style-name="ce218" table:formula="of:=IF([.$J11]=3;[.$I11];0)" office:value-type="float" office:value="0" calcext:value-type="float">
            <text:p>0.0</text:p>
          </table:table-cell>
          <table:table-cell table:style-name="ce83" table:formula="of:=IF([.$B$20]=&quot;lovibond&quot;;N([.E11]);(0.375*N([.E11]))+0.561)" office:value-type="float" office:value="300" calcext:value-type="float">
            <text:p>30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Acid Malt</text:p>
          </table:table-cell>
          <table:table-cell table:style-name="ce151" table:content-validation-name="val5" office:value-type="string" calcext:value-type="string">
            <text:p>Acid Malt</text:p>
          </table:table-cell>
          <table:table-cell table:number-columns-repeated="2" table:style-name="ce160" office:value-type="float" office:value="0" calcext:value-type="float">
            <text:p>0.0</text:p>
          </table:table-cell>
          <table:table-cell table:style-name="ce171" office:value-type="float" office:value="2" calcext:value-type="float">
            <office:annotation draw:style-name="gr27" draw:text-style-name="P2" svg:width="5.542cm" svg:height="6.916cm" svg:x="17.363cm" svg:y="6.517cm" draw:caption-point-x="-0.407cm" draw:caption-point-y="0.372cm">
              <dc:date>2021-02-12T00:00:00</dc:date>
              <text:p text:style-name="P1"><text:span text:style-name="T1">======</text:span></text:p>
              <text:p text:style-name="P1"><text:span text:style-name="T1">ID#AAAAH1AC7po</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2</text:p>
          </table:table-cell>
          <table:table-cell table:style-name="ce176" table:formula="of:=IFERROR(100*(N([.C12])+(N([.D12])/[.$V$35]))/[.$C$18];0)" office:value-type="float" office:value="0" calcext:value-type="float">
            <text:p>0.0</text:p>
          </table:table-cell>
          <table:table-cell table:style-name="ce187"/>
          <table:table-cell table:style-name="ce200" table:formula="of:=((N([.C12])+(N([.D12])/[.$V$35]))*[.$U$35]*IF([.B$20]=&quot;lovibond&quot;;N([.E12]);(0.375*N([.E12]))+0.561))/([$'4. Water Adjustment'.$V$17]*[.$X$35])" office:value-type="float" office:value="0" calcext:value-type="float">
            <text:p>0.0</text:p>
          </table:table-cell>
          <table:table-cell table:style-name="ce207" table:formula="of:=HLOOKUP([.J12];aciditytable;8;0)" office:value-type="float" office:value="0" calcext:value-type="float">
            <text:p>0.0</text:p>
          </table:table-cell>
          <table:table-cell table:style-name="ce212" table:formula="of:=IFERROR(INDEX([.$P$2:.$P$5]; MATCH([.B12];[.$Q$2:.$Q$5];0));1)" office:value-type="float" office:value="4" calcext:value-type="float">
            <text:p>4</text:p>
          </table:table-cell>
          <table:table-cell table:style-name="ce131" table:formula="of:=(N([.C12])+(N([.D12])/[.$V$35]))*[.$U$35]*((0.28*[.R12]))" office:value-type="float" office:value="0" calcext:value-type="float">
            <text:p>0.00</text:p>
          </table:table-cell>
          <table:table-cell table:style-name="ce131" table:formula="of:=(N([.C12])+(N([.D12])/[.$V$35]))*[.$U$35]*((0.21*[.R12])+2.5)" office:value-type="float" office:value="0" calcext:value-type="float">
            <text:p>0.00</text:p>
          </table:table-cell>
          <table:table-cell table:style-name="ce131" table:formula="of:=((N([.C12])+(N([.D12])/[.$V$35]))*[.$U$35]*38)" office:value-type="float" office:value="0" calcext:value-type="float">
            <text:p>0.00</text:p>
          </table:table-cell>
          <table:table-cell table:style-name="ce131" table:formula="of:=((N([.C12])+(N([.D12])/[.$V$35]))*[.$U$35]*95)" office:value-type="float" office:value="0" calcext:value-type="float">
            <text:p>0.00</text:p>
          </table:table-cell>
          <table:table-cell table:style-name="ce213" table:formula="of:=IF([.$J12]=1;[.$I12];0)" office:value-type="float" office:value="0" calcext:value-type="float">
            <text:p>0</text:p>
          </table:table-cell>
          <table:table-cell table:style-name="ce213" table:formula="of:=IF([.$J12]=2;[.$I12];0)" office:value-type="float" office:value="0" calcext:value-type="float">
            <text:p>0</text:p>
          </table:table-cell>
          <table:table-cell table:style-name="ce213" table:formula="of:=IF([.$J12]=3;[.$I12];0)" office:value-type="float" office:value="0" calcext:value-type="float">
            <text:p>0</text:p>
          </table:table-cell>
          <table:table-cell table:style-name="ce83" table:formula="of:=IF([.$B$20]=&quot;lovibond&quot;;N([.E12]);(0.375*N([.E12]))+0.561)" office:value-type="float" office:value="2" calcext:value-type="float">
            <text:p>2</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0" calcext:value-type="float">
            <office:annotation draw:style-name="gr27" draw:text-style-name="P2" svg:width="5.542cm" svg:height="6.916cm" svg:x="17.363cm" svg:y="7.046cm" draw:caption-point-x="-0.407cm" draw:caption-point-y="0.372cm">
              <dc:date>2021-02-12T00:00:00</dc:date>
              <text:p text:style-name="P1"><text:span text:style-name="T1">======</text:span></text:p>
              <text:p text:style-name="P1"><text:span text:style-name="T1">ID#AAAAH1AC7jk</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0</text:p>
          </table:table-cell>
          <table:table-cell table:style-name="ce176" table:formula="of:=IFERROR(100*(N([.C13])+(N([.D13])/[.$V$35]))/[.$C$18];0)" office:value-type="float" office:value="0" calcext:value-type="float">
            <text:p>0.0</text:p>
          </table:table-cell>
          <table:table-cell table:style-name="ce187"/>
          <table:table-cell table:style-name="ce200" table:formula="of:=((N([.C13])+(N([.D13])/[.$V$35]))*[.$U$35]*IF([.B$20]=&quot;lovibond&quot;;N([.E13]);(0.375*N([.E13]))+0.561))/([$'4. Water Adjustment'.$V$17]*[.$X$35])" office:value-type="float" office:value="0" calcext:value-type="float">
            <text:p>0.0</text:p>
          </table:table-cell>
          <table:table-cell table:style-name="ce207" table:formula="of:=HLOOKUP([.J13];aciditytable;9;0)" office:value-type="float" office:value="0" calcext:value-type="float">
            <text:p>0.0</text:p>
          </table:table-cell>
          <table:table-cell table:style-name="ce212" table:formula="of:=IFERROR(INDEX([.$P$2:.$P$5]; MATCH([.B13];[.$Q$2:.$Q$5];0));1)" office:value-type="float" office:value="1" calcext:value-type="float">
            <text:p>1</text:p>
          </table:table-cell>
          <table:table-cell table:style-name="ce131" table:formula="of:=(N([.C13])+(N([.D13])/[.$V$35]))*[.$U$35]*((0.28*[.R13]))" office:value-type="float" office:value="0" calcext:value-type="float">
            <text:p>0.00</text:p>
          </table:table-cell>
          <table:table-cell table:style-name="ce131" table:formula="of:=(N([.C13])+(N([.D13])/[.$V$35]))*[.$U$35]*((0.21*[.R13])+2.5)" office:value-type="float" office:value="0" calcext:value-type="float">
            <text:p>0.00</text:p>
          </table:table-cell>
          <table:table-cell table:style-name="ce131" table:formula="of:=((N([.C13])+(N([.D13])/[.$V$35]))*[.$U$35]*38)" office:value-type="float" office:value="0" calcext:value-type="float">
            <text:p>0.00</text:p>
          </table:table-cell>
          <table:table-cell table:style-name="ce131" table:formula="of:=((N([.C13])+(N([.D13])/[.$V$35]))*[.$U$35]*95)" office:value-type="float" office:value="0" calcext:value-type="float">
            <text:p>0.00</text:p>
          </table:table-cell>
          <table:table-cell table:style-name="ce218" table:formula="of:=IF([.$J13]=1;[.$I13];0)" office:value-type="float" office:value="0" calcext:value-type="float">
            <text:p>0.0</text:p>
          </table:table-cell>
          <table:table-cell table:style-name="ce213" table:formula="of:=IF([.$J13]=2;[.$I13];0)" office:value-type="float" office:value="0" calcext:value-type="float">
            <text:p>0</text:p>
          </table:table-cell>
          <table:table-cell table:style-name="ce213" table:formula="of:=IF([.$J13]=3;[.$I13];0)" office:value-type="float" office:value="0" calcext:value-type="float">
            <text:p>0</text:p>
          </table:table-cell>
          <table:table-cell table:style-name="ce83" table:formula="of:=IF([.$B$20]=&quot;lovibond&quot;;N([.E13]);(0.375*N([.E13]))+0.561)" office:value-type="float" office:value="0" calcext:value-type="float">
            <text:p>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0" calcext:value-type="float">
            <office:annotation draw:style-name="gr27" draw:text-style-name="P2" svg:width="5.542cm" svg:height="6.916cm" svg:x="17.363cm" svg:y="7.76cm" draw:caption-point-x="-0.407cm" draw:caption-point-y="0.187cm">
              <dc:date>2021-02-12T00:00:00</dc:date>
              <text:p text:style-name="P1"><text:span text:style-name="T1">======</text:span></text:p>
              <text:p text:style-name="P1"><text:span text:style-name="T1">ID#AAAAH1AC7ls</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0</text:p>
          </table:table-cell>
          <table:table-cell table:style-name="ce176" table:formula="of:=IFERROR(100*(N([.C14])+(N([.D14])/[.$V$35]))/[.$C$18];0)" office:value-type="float" office:value="0" calcext:value-type="float">
            <text:p>0.0</text:p>
          </table:table-cell>
          <table:table-cell table:style-name="ce187"/>
          <table:table-cell table:style-name="ce200" table:formula="of:=((N([.C14])+(N([.D14])/[.$V$35]))*[.$U$35]*IF([.B$20]=&quot;lovibond&quot;;N([.E14]);(0.375*N([.E14]))+0.561))/([$'4. Water Adjustment'.$V$17]*[.$X$35])" office:value-type="float" office:value="0" calcext:value-type="float">
            <text:p>0.0</text:p>
          </table:table-cell>
          <table:table-cell table:style-name="ce207" table:formula="of:=HLOOKUP([.J14];aciditytable;10;0)" office:value-type="float" office:value="0" calcext:value-type="float">
            <text:p>0.0</text:p>
          </table:table-cell>
          <table:table-cell table:style-name="ce212" table:formula="of:=IFERROR(INDEX([.$P$2:.$P$5]; MATCH([.B14];[.$Q$2:.$Q$5];0));1)" office:value-type="float" office:value="1" calcext:value-type="float">
            <text:p>1</text:p>
          </table:table-cell>
          <table:table-cell table:style-name="ce131" table:formula="of:=(N([.C14])+(N([.D14])/[.$V$35]))*[.$U$35]*((0.28*[.R14]))" office:value-type="float" office:value="0" calcext:value-type="float">
            <text:p>0.00</text:p>
          </table:table-cell>
          <table:table-cell table:style-name="ce131" table:formula="of:=(N([.C14])+(N([.D14])/[.$V$35]))*[.$U$35]*((0.21*[.R14])+2.5)" office:value-type="float" office:value="0" calcext:value-type="float">
            <text:p>0.00</text:p>
          </table:table-cell>
          <table:table-cell table:style-name="ce131" table:formula="of:=((N([.C14])+(N([.D14])/[.$V$35]))*[.$U$35]*38)" office:value-type="float" office:value="0" calcext:value-type="float">
            <text:p>0.00</text:p>
          </table:table-cell>
          <table:table-cell table:style-name="ce131" table:formula="of:=((N([.C14])+(N([.D14])/[.$V$35]))*[.$U$35]*95)" office:value-type="float" office:value="0" calcext:value-type="float">
            <text:p>0.00</text:p>
          </table:table-cell>
          <table:table-cell table:style-name="ce218" table:formula="of:=IF([.$J14]=1;[.$I14];0)" office:value-type="float" office:value="0" calcext:value-type="float">
            <text:p>0.0</text:p>
          </table:table-cell>
          <table:table-cell table:style-name="ce213" table:formula="of:=IF([.$J14]=2;[.$I14];0)" office:value-type="float" office:value="0" calcext:value-type="float">
            <text:p>0</text:p>
          </table:table-cell>
          <table:table-cell table:style-name="ce213" table:formula="of:=IF([.$J14]=3;[.$I14];0)" office:value-type="float" office:value="0" calcext:value-type="float">
            <text:p>0</text:p>
          </table:table-cell>
          <table:table-cell table:style-name="ce83" table:formula="of:=IF([.$B$20]=&quot;lovibond&quot;;N([.E14]);(0.375*N([.E14]))+0.561)" office:value-type="float" office:value="0" calcext:value-type="float">
            <text:p>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0" calcext:value-type="float">
            <office:annotation draw:style-name="gr27" draw:text-style-name="P2" svg:width="5.542cm" svg:height="6.916cm" svg:x="17.363cm" svg:y="8.289cm" draw:caption-point-x="-0.407cm" draw:caption-point-y="0.187cm">
              <dc:date>2021-02-12T00:00:00</dc:date>
              <text:p text:style-name="P1"><text:span text:style-name="T1">======</text:span></text:p>
              <text:p text:style-name="P1"><text:span text:style-name="T1">ID#AAAAH1AC7pU</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0</text:p>
          </table:table-cell>
          <table:table-cell table:style-name="ce176" table:formula="of:=IFERROR(100*(N([.C15])+(N([.D15])/[.$V$35]))/[.$C$18];0)" office:value-type="float" office:value="0" calcext:value-type="float">
            <text:p>0.0</text:p>
          </table:table-cell>
          <table:table-cell table:style-name="ce187"/>
          <table:table-cell table:style-name="ce200" table:formula="of:=((N([.C15])+(N([.D15])/[.$V$35]))*[.$U$35]*IF([.B$20]=&quot;lovibond&quot;;N([.E15]);(0.375*N([.E15]))+0.561))/([$'4. Water Adjustment'.$V$17]*[.$X$35])" office:value-type="float" office:value="0" calcext:value-type="float">
            <text:p>0.0</text:p>
          </table:table-cell>
          <table:table-cell table:style-name="ce207" table:formula="of:=HLOOKUP([.J15];aciditytable;11;0)" office:value-type="float" office:value="0" calcext:value-type="float">
            <text:p>0.0</text:p>
          </table:table-cell>
          <table:table-cell table:style-name="ce212" table:formula="of:=IFERROR(INDEX([.$P$2:.$P$5]; MATCH([.B15];[.$Q$2:.$Q$5];0));1)" office:value-type="float" office:value="1" calcext:value-type="float">
            <text:p>1</text:p>
          </table:table-cell>
          <table:table-cell table:style-name="ce131" table:formula="of:=(N([.C15])+(N([.D15])/[.$V$35]))*[.$U$35]*((0.28*[.R15]))" office:value-type="float" office:value="0" calcext:value-type="float">
            <text:p>0.00</text:p>
          </table:table-cell>
          <table:table-cell table:style-name="ce131" table:formula="of:=(N([.C15])+(N([.D15])/[.$V$35]))*[.$U$35]*((0.21*[.R15])+2.5)" office:value-type="float" office:value="0" calcext:value-type="float">
            <text:p>0.00</text:p>
          </table:table-cell>
          <table:table-cell table:style-name="ce131" table:formula="of:=((N([.C15])+(N([.D15])/[.$V$35]))*[.$U$35]*38)" office:value-type="float" office:value="0" calcext:value-type="float">
            <text:p>0.00</text:p>
          </table:table-cell>
          <table:table-cell table:style-name="ce131" table:formula="of:=((N([.C15])+(N([.D15])/[.$V$35]))*[.$U$35]*95)" office:value-type="float" office:value="0" calcext:value-type="float">
            <text:p>0.00</text:p>
          </table:table-cell>
          <table:table-cell table:style-name="ce218" table:formula="of:=IF([.$J15]=1;[.$I15];0)" office:value-type="float" office:value="0" calcext:value-type="float">
            <text:p>0.0</text:p>
          </table:table-cell>
          <table:table-cell table:style-name="ce213" table:formula="of:=IF([.$J15]=2;[.$I15];0)" office:value-type="float" office:value="0" calcext:value-type="float">
            <text:p>0</text:p>
          </table:table-cell>
          <table:table-cell table:style-name="ce213" table:formula="of:=IF([.$J15]=3;[.$I15];0)" office:value-type="float" office:value="0" calcext:value-type="float">
            <text:p>0</text:p>
          </table:table-cell>
          <table:table-cell table:style-name="ce83" table:formula="of:=IF([.$B$20]=&quot;lovibond&quot;;N([.E15]);(0.375*N([.E15]))+0.561)" office:value-type="float" office:value="0" calcext:value-type="float">
            <text:p>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Enter grain names above to help </text:p>
          </table:table-cell>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0" calcext:value-type="float">
            <office:annotation draw:style-name="gr27" draw:text-style-name="P2" svg:width="5.542cm" svg:height="6.916cm" svg:x="17.363cm" svg:y="8.819cm" draw:caption-point-x="-0.407cm" draw:caption-point-y="0.186cm">
              <dc:date>2021-02-12T00:00:00</dc:date>
              <text:p text:style-name="P1"><text:span text:style-name="T1">======</text:span></text:p>
              <text:p text:style-name="P1"><text:span text:style-name="T1">ID#AAAAH1AC7ic</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0</text:p>
          </table:table-cell>
          <table:table-cell table:style-name="ce176" table:formula="of:=IFERROR(100*(N([.C16])+(N([.D16])/[.$V$35]))/[.$C$18];0)" office:value-type="float" office:value="0" calcext:value-type="float">
            <text:p>0.0</text:p>
          </table:table-cell>
          <table:table-cell table:style-name="ce187"/>
          <table:table-cell table:style-name="ce200" table:formula="of:=((N([.C16])+(N([.D16])/[.$V$35]))*[.$U$35]*IF([.B$20]=&quot;lovibond&quot;;N([.E16]);(0.375*N([.E16]))+0.561))/([$'4. Water Adjustment'.$V$17]*[.$X$35])" office:value-type="float" office:value="0" calcext:value-type="float">
            <text:p>0.0</text:p>
          </table:table-cell>
          <table:table-cell table:style-name="ce207" table:formula="of:=HLOOKUP([.J16];aciditytable;12;0)" office:value-type="float" office:value="0" calcext:value-type="float">
            <text:p>0.0</text:p>
          </table:table-cell>
          <table:table-cell table:style-name="ce212" table:formula="of:=IFERROR(INDEX([.$P$2:.$P$5]; MATCH([.B16];[.$Q$2:.$Q$5];0));1)" office:value-type="float" office:value="1" calcext:value-type="float">
            <text:p>1</text:p>
          </table:table-cell>
          <table:table-cell table:style-name="ce131" table:formula="of:=(N([.C16])+(N([.D16])/[.$V$35]))*[.$U$35]*((0.28*[.R16]))" office:value-type="float" office:value="0" calcext:value-type="float">
            <text:p>0.00</text:p>
          </table:table-cell>
          <table:table-cell table:style-name="ce131" table:formula="of:=(N([.C16])+(N([.D16])/[.$V$35]))*[.$U$35]*((0.21*[.R16])+2.5)" office:value-type="float" office:value="0" calcext:value-type="float">
            <text:p>0.00</text:p>
          </table:table-cell>
          <table:table-cell table:style-name="ce131" table:formula="of:=((N([.C16])+(N([.D16])/[.$V$35]))*[.$U$35]*38)" office:value-type="float" office:value="0" calcext:value-type="float">
            <text:p>0.00</text:p>
          </table:table-cell>
          <table:table-cell table:style-name="ce131" table:formula="of:=((N([.C16])+(N([.D16])/[.$V$35]))*[.$U$35]*95)" office:value-type="float" office:value="0" calcext:value-type="float">
            <text:p>0.00</text:p>
          </table:table-cell>
          <table:table-cell table:style-name="ce218" table:formula="of:=IF([.$J16]=1;[.$I16];0)" office:value-type="float" office:value="0" calcext:value-type="float">
            <text:p>0.0</text:p>
          </table:table-cell>
          <table:table-cell table:style-name="ce213" table:formula="of:=IF([.$J16]=2;[.$I16];0)" office:value-type="float" office:value="0" calcext:value-type="float">
            <text:p>0</text:p>
          </table:table-cell>
          <table:table-cell table:style-name="ce213" table:formula="of:=IF([.$J16]=3;[.$I16];0)" office:value-type="float" office:value="0" calcext:value-type="float">
            <text:p>0</text:p>
          </table:table-cell>
          <table:table-cell table:style-name="ce83" table:formula="of:=IF([.$B$20]=&quot;lovibond&quot;;N([.E16]);(0.375*N([.E16]))+0.561)" office:value-type="float" office:value="0" calcext:value-type="float">
            <text:p>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0" office:value-type="string" calcext:value-type="string">
            <text:p>verify that all the grist is entered</text:p>
          </table:table-cell>
          <table:table-cell table:style-name="ce151" table:content-validation-name="val5" office:value-type="string" calcext:value-type="string">
            <text:p>Base Malt</text:p>
          </table:table-cell>
          <table:table-cell table:number-columns-repeated="2" table:style-name="ce160" office:value-type="float" office:value="0" calcext:value-type="float">
            <text:p>0.0</text:p>
          </table:table-cell>
          <table:table-cell table:style-name="ce171" office:value-type="float" office:value="0" calcext:value-type="float">
            <office:annotation draw:style-name="gr27" draw:text-style-name="P2" svg:width="5.542cm" svg:height="6.916cm" svg:x="17.363cm" svg:y="9.348cm" draw:caption-point-x="-0.407cm" draw:caption-point-y="0.187cm">
              <dc:date>2021-02-12T00:00:00</dc:date>
              <text:p text:style-name="P1"><text:span text:style-name="T1">======</text:span></text:p>
              <text:p text:style-name="P1"><text:span text:style-name="T1">ID#AAAAH1AC7is</text:span></text:p>
              <text:p text:style-name="P1"><text:span text:style-name="T1">martin.brungard <text:s text:c="3"/>(2021-02-12 10:36:59)</text:span></text:p>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1"/></text:p>
              <text:p text:style-name="P1"><text:span text:style-name="T1">This cell also changes color based on the grain type selected to help the brewer know what the setting is.</text:span></text:p>
            </office:annotation>
            <text:p>0</text:p>
          </table:table-cell>
          <table:table-cell table:style-name="ce176" table:formula="of:=IFERROR(100*(N([.C17])+(N([.D17])/[.$V$35]))/[.$C$18];0)" office:value-type="float" office:value="0" calcext:value-type="float">
            <text:p>0.0</text:p>
          </table:table-cell>
          <table:table-cell table:style-name="ce187"/>
          <table:table-cell table:style-name="ce200" table:formula="of:=((N([.C17])+(N([.D17])/[.$V$35]))*[.$U$35]*IF([.B$20]=&quot;lovibond&quot;;N([.E17]);(0.375*N([.E17]))+0.561))/([$'4. Water Adjustment'.$V$17]*[.$X$35])" office:value-type="float" office:value="0" calcext:value-type="float">
            <text:p>0.0</text:p>
          </table:table-cell>
          <table:table-cell table:style-name="ce207" table:formula="of:=HLOOKUP([.J17];aciditytable;13;0)" office:value-type="float" office:value="0" calcext:value-type="float">
            <text:p>0.0</text:p>
          </table:table-cell>
          <table:table-cell table:style-name="ce212" table:formula="of:=IFERROR(INDEX([.$P$2:.$P$5]; MATCH([.B17];[.$Q$2:.$Q$5];0));1)" office:value-type="float" office:value="1" calcext:value-type="float">
            <text:p>1</text:p>
          </table:table-cell>
          <table:table-cell table:style-name="ce131" table:formula="of:=(N([.C17])+(N([.D17])/[.$V$35]))*[.$U$35]*((0.28*[.R17]))" office:value-type="float" office:value="0" calcext:value-type="float">
            <text:p>0.00</text:p>
          </table:table-cell>
          <table:table-cell table:style-name="ce131" table:formula="of:=(N([.C17])+(N([.D17])/[.$V$35]))*[.$U$35]*((0.21*[.R17])+2.5)" office:value-type="float" office:value="0" calcext:value-type="float">
            <text:p>0.00</text:p>
          </table:table-cell>
          <table:table-cell table:style-name="ce131" table:formula="of:=((N([.C17])+(N([.D17])/[.$V$35]))*[.$U$35]*38)" office:value-type="float" office:value="0" calcext:value-type="float">
            <text:p>0.00</text:p>
          </table:table-cell>
          <table:table-cell table:style-name="ce131" table:formula="of:=((N([.C17])+(N([.D17])/[.$V$35]))*[.$U$35]*95)" office:value-type="float" office:value="0" calcext:value-type="float">
            <text:p>0.00</text:p>
          </table:table-cell>
          <table:table-cell table:style-name="ce218" table:formula="of:=IF([.$J17]=1;[.$I17];0)" office:value-type="float" office:value="0" calcext:value-type="float">
            <text:p>0.0</text:p>
          </table:table-cell>
          <table:table-cell table:style-name="ce213" table:formula="of:=IF([.$J17]=2;[.$I17];0)" office:value-type="float" office:value="0" calcext:value-type="float">
            <text:p>0</text:p>
          </table:table-cell>
          <table:table-cell table:style-name="ce213" table:formula="of:=IF([.$J17]=3;[.$I17];0)" office:value-type="float" office:value="0" calcext:value-type="float">
            <text:p>0</text:p>
          </table:table-cell>
          <table:table-cell table:style-name="ce83" table:formula="of:=IF([.$B$20]=&quot;lovibond&quot;;N([.E17]);(0.375*N([.E17]))+0.561)" office:value-type="float" office:value="0" calcext:value-type="float">
            <text:p>0</text:p>
          </table:table-cell>
          <table:table-cell table:style-name="ce83" table:number-columns-repeated="8"/>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1"/>
          <table:table-cell table:style-name="ce152" table:formula="of:=[.Q35]" office:value-type="string" office:string-value="Total Grist Weight (lbs)" calcext:value-type="string">
            <text:p>Total Grist Weight (lbs)</text:p>
          </table:table-cell>
          <table:table-cell table:style-name="ce161" table:formula="of:=SUM([.C6:.C17])+SUM([.D6:.D17])/[.$V$35]" office:value-type="float" office:value="10" calcext:value-type="float">
            <text:p>10.0</text:p>
          </table:table-cell>
          <table:table-cell table:style-name="ce168"/>
          <table:table-cell table:style-name="ce172" office:value-type="string" calcext:value-type="string">
            <text:p>Est. Beer Color (EBC)</text:p>
          </table:table-cell>
          <table:table-cell table:style-name="ce177" table:formula="of:=1.97*[.F19]" office:value-type="float" office:value="6.8054670222878" calcext:value-type="float">
            <office:annotation draw:style-name="gr40" draw:text-style-name="P2" svg:width="2.771cm" svg:height="9.681cm" svg:x="20.134cm" svg:y="7.965cm" draw:caption-point-x="-0.407cm" draw:caption-point-y="2.099cm">
              <dc:date>2021-02-12T00:00:00</dc:date>
              <text:p text:style-name="P1"><text:span text:style-name="T1">======</text:span></text:p>
              <text:p text:style-name="P1"><text:span text:style-name="T1">ID#AAAAH1AC7mU</text:span></text:p>
              <text:p text:style-name="P1"><text:span text:style-name="T1">martin.brungard <text:s text:c="3"/>(2021-02-12 10:36:59)</text:span></text:p>
              <text:p text:style-name="P1"><text:span text:style-name="T1">Beer Color is calculated using the Morey formula. EBC color is estimated as 1.97 times the SRM color.</text:span></text:p>
              <text:p text:style-name="P1"><text:span text:style-name="T1"/></text:p>
              <text:p text:style-name="P1"><text:span text:style-name="T1">Total Batch Volume affects color calculation. <text:s/>Set Total Batch Volume on Water Adjustment sheet.</text:span></text:p>
            </office:annotation>
            <text:p>6.8</text:p>
          </table:table-cell>
          <table:table-cell table:style-name="ce188"/>
          <table:table-cell table:style-name="ce201"/>
          <table:table-cell table:style-name="ce202" table:formula="of:=IF(SUM([.H6:.H17])&gt;167;167;SUM([.H6:.H17]))" office:value-type="float" office:value="3.4" calcext:value-type="float">
            <text:p>3.4</text:p>
          </table:table-cell>
          <table:table-cell table:style-name="ce213"/>
          <table:table-cell table:style-name="ce210" table:number-columns-repeated="4"/>
          <table:table-cell table:style-name="ce218" table:formula="of:=SUM([.O6:.O17])" office:value-type="float" office:value="4.76" calcext:value-type="float">
            <text:p>4.8</text:p>
          </table:table-cell>
          <table:table-cell table:style-name="ce213" table:formula="of:=SUM([.P6:.P17])" office:value-type="float" office:value="0" calcext:value-type="float">
            <text:p>0</text:p>
          </table:table-cell>
          <table:table-cell table:style-name="ce213" table:formula="of:=SUM([.Q6:.Q17])" office:value-type="float" office:value="0" calcext:value-type="float">
            <text:p>0</text:p>
          </table:table-cell>
          <table:table-cell table:style-name="ce83" table:number-columns-repeated="9"/>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89"/>
          <table:table-cell table:style-name="ce90" table:formula="of:=[.T35]" office:value-type="string" office:string-value="Water to Grist Ratio (Qts/Lb)" calcext:value-type="string">
            <office:annotation draw:style-name="gr41" draw:text-style-name="P2" svg:width="11.338cm" svg:height="3.916cm" svg:x="8.796cm" svg:y="11.377cm" draw:caption-point-x="-0.407cm" draw:caption-point-y="-0.784cm">
              <dc:date>2021-02-12T00:00:00</dc:date>
              <text:p text:style-name="P1"><text:span text:style-name="T1">======</text:span></text:p>
              <text:p text:style-name="P1"><text:span text:style-name="T1">ID#AAAAH1AC7jQ</text:span></text:p>
              <text:p text:style-name="P1"><text:span text:style-name="T1">martin.brungard <text:s text:c="3"/>(2021-02-12 10:36:59)</text:span></text:p>
              <text:p text:style-name="P1"><text:span text:style-name="T1">This ratio typically falls between 1 and 2 Qts / Lb or 2 to 4 L / Kg. <text:s/></text:span></text:p>
              <text:p text:style-name="P1"><text:span text:style-name="T1"/></text:p>
              <text:p text:style-name="P1"><text:span text:style-name="T1">Mash Water Volume is input on Water Adjustment sheet. This Ratio is not accurate until the proper mash water volume has been input on that sheet.</text:span></text:p>
            </office:annotation>
            <text:p>Water to Grist Ratio (Qts/Lb)</text:p>
          </table:table-cell>
          <table:table-cell table:style-name="ce162" table:formula="of:=[$'4. Water Adjustment'.$T$17]*[.$W$35]/[.C18]" office:value-type="float" office:value="1.5" calcext:value-type="float">
            <text:p>1.50</text:p>
          </table:table-cell>
          <table:table-cell table:style-name="ce168"/>
          <table:table-cell table:style-name="ce172" office:value-type="string" calcext:value-type="string">
            <text:p>Est. Beer Color (SRM)</text:p>
          </table:table-cell>
          <table:table-cell table:style-name="ce177" table:formula="of:=1.49228*[.I18]^0.6859" office:value-type="float" office:value="3.45455178796335" calcext:value-type="float">
            <office:annotation draw:style-name="gr7" draw:text-style-name="P2" svg:width="2.771cm" svg:height="8.101cm" svg:x="20.134cm" svg:y="9.285cm" draw:caption-point-x="-0.407cm" draw:caption-point-y="1.308cm">
              <dc:date>2021-02-12T00:00:00</dc:date>
              <text:p text:style-name="P1"><text:span text:style-name="T1">======</text:span></text:p>
              <text:p text:style-name="P1"><text:span text:style-name="T1">ID#AAAAH1AC7mo</text:span></text:p>
              <text:p text:style-name="P1"><text:span text:style-name="T1">Martin Brungard <text:s text:c="3"/>(2021-02-12 10:36:59)</text:span></text:p>
              <text:p text:style-name="P1"><text:span text:style-name="T1">Beer Color is calculated using the Morey formula.</text:span></text:p>
              <text:p text:style-name="P1"><text:span text:style-name="T1"/></text:p>
              <text:p text:style-name="P1"><text:span text:style-name="T1">Total Batch Volume affects color calculation. <text:s/>Set Total Batch Volume on Water Adjustment sheet.</text:span></text:p>
            </office:annotation>
            <text:p>3.5</text:p>
          </table:table-cell>
          <table:table-cell table:style-name="ce188"/>
          <table:table-cell table:style-name="ce201"/>
          <table:table-cell table:style-name="ce83"/>
          <table:table-cell table:style-name="ce213"/>
          <table:table-cell table:style-name="ce83" table:number-columns-repeated="16"/>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2" office:value-type="string" calcext:value-type="string">
            <office:annotation draw:style-name="gr21" draw:text-style-name="P2" svg:width="11.283cm" svg:height="2.857cm" svg:x="6.08cm" svg:y="11.906cm" draw:caption-point-x="-0.407cm" draw:caption-point-y="-0.784cm">
              <dc:date>2021-02-12T00:00:00</dc:date>
              <text:p text:style-name="P1"><text:span text:style-name="T1">======</text:span></text:p>
              <text:p text:style-name="P1"><text:span text:style-name="T1">ID#AAAAH1AC7jM</text:span></text:p>
              <text:p text:style-name="P1"><text:span text:style-name="T1">martin.brungard <text:s text:c="3"/>(2021-02-12 10:36:59)</text:span></text:p>
              <text:p text:style-name="P1"><text:span text:style-name="T1">Set the malt color rating system used for the malts here. <text:s/>The selections are: Lovibond or EBC</text:span></text:p>
            </office:annotation>
            <text:p>Malt Color Setting</text:p>
          </table:table-cell>
          <table:table-cell table:style-name="ce153" table:content-validation-name="val6" office:value-type="string" calcext:value-type="string">
            <office:annotation draw:style-name="gr21" draw:text-style-name="P2" svg:width="11.338cm" svg:height="2.857cm" svg:x="8.796cm" svg:y="11.906cm" draw:caption-point-x="-0.407cm" draw:caption-point-y="-0.784cm">
              <dc:date>2021-02-12T00:00:00</dc:date>
              <text:p text:style-name="P1"><text:span text:style-name="T1">======</text:span></text:p>
              <text:p text:style-name="P1"><text:span text:style-name="T1">ID#AAAAH1AC7pI</text:span></text:p>
              <text:p text:style-name="P1"><text:span text:style-name="T1">martin.brungard <text:s text:c="3"/>(2021-02-12 10:36:59)</text:span></text:p>
              <text:p text:style-name="P1"><text:span text:style-name="T1">Click on cell and a selection box will appear, displaying EBC or Lovibond units.</text:span></text:p>
            </office:annotation>
            <text:p>Lovibond</text:p>
          </table:table-cell>
          <table:table-cell table:style-name="ce163" table:number-columns-spanned="3" table:number-rows-spanned="1"/>
          <table:covered-table-cell table:number-columns-repeated="2" table:style-name="ce23"/>
          <table:table-cell table:style-name="ce178"/>
          <table:table-cell table:style-name="ce189"/>
          <table:table-cell table:style-name="ce202"/>
          <table:table-cell table:style-name="ce201"/>
          <table:table-cell table:style-name="ce213"/>
          <table:table-cell table:style-name="ce83" table:number-columns-repeated="16"/>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2" office:value-type="string" calcext:value-type="string">
            <office:annotation draw:style-name="gr42" draw:text-style-name="P2" svg:width="11.283cm" svg:height="2.858cm" svg:x="6.08cm" svg:y="12.435cm" draw:caption-point-x="-0.407cm" draw:caption-point-y="-0.784cm">
              <dc:date>2021-02-12T00:00:00</dc:date>
              <text:p text:style-name="P1"><text:span text:style-name="T1">======</text:span></text:p>
              <text:p text:style-name="P1"><text:span text:style-name="T1">ID#AAAAH1AC7ko</text:span></text:p>
              <text:p text:style-name="P1"><text:span text:style-name="T1">martin.brungard <text:s text:c="3"/>(2021-02-12 10:36:59)</text:span></text:p>
              <text:p text:style-name="P1"><text:span text:style-name="T1">Typically set to the Adjusted Water setting, but can be used to quickly see what the affect on the mash would be if the Existing water were used.</text:span></text:p>
            </office:annotation>
            <text:p>Water used for Mash</text:p>
          </table:table-cell>
          <table:table-cell table:style-name="ce154" table:content-validation-name="val7" office:value-type="string" calcext:value-type="string">
            <office:annotation draw:style-name="gr42" draw:text-style-name="P2" svg:width="11.338cm" svg:height="2.858cm" svg:x="8.796cm" svg:y="12.435cm" draw:caption-point-x="-0.407cm" draw:caption-point-y="-0.784cm">
              <dc:date>2021-02-12T00:00:00</dc:date>
              <text:p text:style-name="P1"><text:span text:style-name="T1">======</text:span></text:p>
              <text:p text:style-name="P1"><text:span text:style-name="T1">ID#AAAAH1AC7o0</text:span></text:p>
              <text:p text:style-name="P1"><text:span text:style-name="T1">martin.brungard <text:s text:c="3"/>(2021-02-12 10:36:59)</text:span></text:p>
              <text:p text:style-name="P1"><text:span text:style-name="T1">Click on cell and a selection box will appear displaying Adjusted or Existing water.</text:span></text:p>
            </office:annotation>
            <text:p>Adjusted Water</text:p>
          </table:table-cell>
          <table:table-cell table:style-name="ce164" table:number-columns-spanned="3" table:number-rows-spanned="1"/>
          <table:covered-table-cell table:number-columns-repeated="2"/>
          <table:table-cell table:style-name="ce179"/>
          <table:table-cell table:style-name="ce189"/>
          <table:table-cell table:style-name="ce202"/>
          <table:table-cell table:style-name="ce201" table:formula="of:=OR([.J6]=4;[.J7]=4;[.J8]=4;[.J9]=4;[.J10]=4;[.J11]=4;[.J12]=4;[.J13]=4;[.J14]=4;[.J15]=4;[.J16]=4;[.J17]=4)" office:value-type="float" office:value="1" calcext:value-type="float">
            <text:p>1</text:p>
          </table:table-cell>
          <table:table-cell table:style-name="ce213"/>
          <table:table-cell table:style-name="ce83" table:number-columns-repeated="4"/>
          <table:table-cell table:style-name="ce83" office:value-type="string" calcext:value-type="string">
            <text:p>Yes</text:p>
          </table:table-cell>
          <table:table-cell table:style-name="ce83" table:number-columns-repeated="11"/>
          <table:table-cell table:style-name="ce53" table:number-columns-repeated="4"/>
          <table:table-cell table:style-name="ce83" table:number-columns-repeated="8"/>
          <table:table-cell table:style-name="ce31" table:number-columns-repeated="6"/>
          <table:table-cell table:number-columns-repeated="20"/>
        </table:table-row>
        <table:table-row table:style-name="ro103">
          <table:table-cell table:style-name="ce143" table:formula="of:=IF([.B21]=&quot;existing water&quot;;&quot;Unadjusted Existing Water is selected&quot;;&quot;&quot;)">
            <text:p/>
          </table:table-cell>
          <table:table-cell table:style-name="ce155"/>
          <table:table-cell table:style-name="ce165"/>
          <table:table-cell table:style-name="ce169"/>
          <table:table-cell table:style-name="ce173" table:number-columns-repeated="2"/>
          <table:table-cell table:style-name="ce190"/>
          <table:table-cell table:style-name="ce202"/>
          <table:table-cell table:style-name="ce201"/>
          <table:table-cell table:style-name="ce213"/>
          <table:table-cell table:style-name="ce83" table:number-columns-repeated="4"/>
          <table:table-cell table:style-name="ce83" office:value-type="string" calcext:value-type="string">
            <text:p>No</text:p>
          </table:table-cell>
          <table:table-cell table:style-name="ce83" table:number-columns-repeated="11"/>
          <table:table-cell table:style-name="ce53" table:number-columns-repeated="4"/>
          <table:table-cell table:style-name="ce83" table:number-columns-repeated="8"/>
          <table:table-cell table:style-name="ce31" table:number-columns-repeated="6"/>
          <table:table-cell table:number-columns-repeated="20"/>
        </table:table-row>
        <table:table-row table:style-name="ro3">
          <table:table-cell table:style-name="ce144" office:value-type="string" calcext:value-type="string" table:number-columns-spanned="6" table:number-rows-spanned="1">
            <text:p>Mash pH Result</text:p>
          </table:table-cell>
          <table:covered-table-cell table:number-columns-repeated="4" table:style-name="ce21"/>
          <table:covered-table-cell table:style-name="ce19"/>
          <table:table-cell table:style-name="ce191"/>
          <table:table-cell table:style-name="ce203"/>
          <table:table-cell table:style-name="ce208"/>
          <table:table-cell table:style-name="ce213"/>
          <table:table-cell table:style-name="ce83" table:number-columns-repeated="16"/>
          <table:table-cell table:style-name="ce53" table:number-columns-repeated="4"/>
          <table:table-cell table:style-name="ce83" table:number-columns-repeated="14"/>
          <table:table-cell table:number-columns-repeated="20"/>
        </table:table-row>
        <table:table-row table:style-name="ro103">
          <table:table-cell table:style-name="ce145"/>
          <table:table-cell table:style-name="ce156"/>
          <table:table-cell table:style-name="ce31" table:number-columns-repeated="2"/>
          <table:table-cell table:style-name="ce174" office:value-type="string" calcext:value-type="string">
            <text:p>Estimated Room-Temperature Mash pH</text:p>
          </table:table-cell>
          <table:table-cell table:style-name="ce180" table:formula="of:=IFERROR(IF(5.76-0.17*[.I26]&lt;0;0.1;5.76-0.17*[.I26]);5)" office:value-type="float" office:value="5" calcext:value-type="float">
            <office:annotation draw:style-name="gr43" draw:text-style-name="P2" svg:width="2.771cm" svg:height="14.421cm" svg:x="20.134cm" svg:y="10.94cm" draw:caption-point-x="-0.407cm" draw:caption-point-y="2.669cm">
              <dc:date>2021-02-12T00:00:00</dc:date>
              <text:p text:style-name="P1"><text:span text:style-name="T1">======</text:span></text:p>
              <text:p text:style-name="P1"><text:span text:style-name="T1">ID#AAAAH1AC7o4</text:span></text:p>
              <text:p text:style-name="P1"><text:span text:style-name="T1">martin.brungard <text:s text:c="3"/>(2021-02-12 10:36:59)</text:span></text:p>
              <text:p text:style-name="P1"><text:span text:style-name="T1">This mash pH estimate is for the early stage of mashing (say less than 20 minutes after mashing in). <text:s/>The mash pH typically rises a tenth or two as the mashing duration increases.</text:span></text:p>
              <text:p text:style-name="P1"><text:span text:style-name="T1"/></text:p>
              <text:p text:style-name="P1"><text:span text:style-name="T1">The acceptable pH range is 5.2 to 5.8 when measured at room temperature. (Recommended range is 5.3 to 5.5)</text:span></text:p>
              <text:p text:style-name="P1"><text:span text:style-name="T1"/></text:p>
              <text:p text:style-name="P1"><text:span text:style-name="T1">The optimum mash pH range is reportedly 5.4 to 5.6 (Malting and Brewing Science, 1981)</text:span></text:p>
            </office:annotation>
            <text:p>5.00</text:p>
          </table:table-cell>
          <table:table-cell table:style-name="ce192"/>
          <table:table-cell table:style-name="ce83"/>
          <table:table-cell table:style-name="ce207" table:formula="of:=IF([.B21]=&quot;existing water&quot;;[.O28];[.O29])" office:value-type="string" office:string-value="" calcext:value-type="error">
            <text:p>Err:522</text:p>
          </table:table-cell>
          <table:table-cell table:style-name="ce214"/>
          <table:table-cell table:style-name="ce215" table:formula="of:=IF(OR([.$J6]=4;[.$J7]=4;[.$J8]=4;[.$J9]=4;[.$J10]=4;[.$J11]=4;[.$J12]=4;[.$J13]=4;[.$J14]=4;[.$J15]=4;[.$J16]=4;[.$J17]=4);93*(IF([.$J6]=4;[.$N6];0)+IF([.$J7]=4;[.$N7];0)+IF([.$J8]=4;[.$N8];0)+IF([.$J9]=4;[.$N9];0)+IF([.$J10]=4;[.$N10];0)+IF([.$J11]=4;[.$N11];0)+IF([.$J12]=4;[.$N12];0)+IF([.$J13]=4;[.$N13];0)+IF([.$J14]=4;[.$N14];0)+IF([.$J15]=4;[.$N15];0)+IF([.$J16]=4;[.$N16];0)+IF([.$J17]=4;[.$N17];0));0)" office:value-type="float" office:value="0" calcext:value-type="float">
            <text:p>0</text:p>
          </table:table-cell>
          <table:table-cell table:style-name="ce83" table:number-columns-repeated="15"/>
          <table:table-cell table:style-name="ce53" table:number-columns-repeated="4"/>
          <table:table-cell table:style-name="ce83" table:number-columns-repeated="14"/>
          <table:table-cell table:number-columns-repeated="20"/>
        </table:table-row>
        <table:table-row table:style-name="ro103">
          <table:table-cell table:style-name="ce146"/>
          <table:table-cell table:style-name="ce31" table:number-columns-repeated="4"/>
          <table:table-cell table:style-name="ce181" table:formula="of:=IF([.F24]&lt;5.15;&quot;More Mash Water Alkalinity is Needed&quot;;IF([.F24]&gt;5.75;&quot;Less Mash Water Alkalinity is Needed&quot;;&quot;&quot;))" office:value-type="string" office:string-value="More Mash Water Alkalinity is Needed" calcext:value-type="string">
            <text:p>More Mash Water Alkalinity is Needed</text:p>
          </table:table-cell>
          <table:table-cell table:style-name="ce155"/>
          <table:table-cell table:style-name="ce83"/>
          <table:table-cell table:style-name="ce207" table:formula="of:=SUM([.I6:.I17])" office:value-type="float" office:value="4.76" calcext:value-type="float">
            <text:p>4.8</text:p>
          </table:table-cell>
          <table:table-cell table:style-name="ce214" table:formula="of:=IF(OR([.L35]=1;[.L35]=3);[.C19];[.C19]*0.4792)" office:value-type="float" office:value="1.5" calcext:value-type="float">
            <text:p>1.50</text:p>
          </table:table-cell>
          <table:table-cell table:style-name="ce83" table:number-columns-repeated="16"/>
          <table:table-cell table:style-name="ce53" table:number-columns-repeated="4"/>
          <table:table-cell table:style-name="ce83" table:number-columns-repeated="14"/>
          <table:table-cell table:number-columns-repeated="20"/>
        </table:table-row>
        <table:table-row table:style-name="ro103">
          <table:table-cell table:style-name="ce147" table:content-validation-name="val4"/>
          <table:table-cell table:style-name="ce157" office:value-type="string" calcext:value-type="string" table:number-columns-spanned="1" table:number-rows-spanned="3">
            <text:p>Mash pH Guidance</text:p>
          </table:table-cell>
          <table:table-cell table:style-name="ce166" office:value-type="string" calcext:value-type="string" table:number-columns-spanned="4" table:number-rows-spanned="1">
            <text:p>Suggested mash pH range for lighter colored beers is 5.3 to 5.4</text:p>
          </table:table-cell>
          <table:covered-table-cell table:number-columns-repeated="2" table:style-name="ce23"/>
          <table:covered-table-cell table:style-name="ce30"/>
          <table:table-cell table:style-name="ce190"/>
          <table:table-cell table:style-name="ce201"/>
          <table:table-cell table:style-name="ce209" table:formula="of:=([.I25]-([.I24]*[.J25]/1.5))/([.$N$35]*[$'4. Water Adjustment'.$T$17])" office:value-type="string" office:string-value="" calcext:value-type="error">
            <text:p>Err:522</text:p>
          </table:table-cell>
          <table:table-cell table:style-name="ce210"/>
          <table:table-cell table:style-name="ce83" table:number-columns-repeated="16"/>
          <table:table-cell table:style-name="ce53" table:number-columns-repeated="4"/>
          <table:table-cell table:style-name="ce83" table:number-columns-repeated="14"/>
          <table:table-cell table:number-columns-repeated="20"/>
        </table:table-row>
        <table:table-row table:style-name="ro103">
          <table:table-cell table:style-name="ce31"/>
          <table:covered-table-cell table:style-name="ce28"/>
          <table:table-cell table:style-name="ce167" office:value-type="string" calcext:value-type="string" table:number-columns-spanned="4" table:number-rows-spanned="1">
            <text:p>Suggested mash pH range for darker colored beers is 5.4 to 5.6</text:p>
          </table:table-cell>
          <table:covered-table-cell table:number-columns-repeated="2"/>
          <table:covered-table-cell table:style-name="ce28"/>
          <table:table-cell table:style-name="ce190"/>
          <table:table-cell table:style-name="ce201"/>
          <table:table-cell table:style-name="ce83" table:number-columns-repeated="18"/>
          <table:table-cell table:style-name="ce53" table:number-columns-repeated="4"/>
          <table:table-cell table:style-name="ce83" table:number-columns-repeated="14"/>
          <table:table-cell table:number-columns-repeated="20"/>
        </table:table-row>
        <table:table-row table:style-name="ro103">
          <table:table-cell table:style-name="ce51" office:value-type="string" calcext:value-type="string">
            <text:p>Bru'n Water v. 1.25</text:p>
          </table:table-cell>
          <table:covered-table-cell table:style-name="ce28"/>
          <table:table-cell table:style-name="ce88" office:value-type="string" calcext:value-type="string" table:number-columns-spanned="4" table:number-rows-spanned="1">
            <text:p>Tart or crisp beer styles may benefit from a mash pH range of 5.2 to 5.3</text:p>
          </table:table-cell>
          <table:covered-table-cell table:number-columns-repeated="2" table:style-name="ce20"/>
          <table:covered-table-cell table:style-name="ce29"/>
          <table:table-cell table:style-name="ce190"/>
          <table:table-cell table:style-name="ce201"/>
          <table:table-cell table:style-name="ce83" table:number-columns-repeated="4"/>
          <table:table-cell table:style-name="ce96" office:value-type="float" office:value="1" calcext:value-type="float">
            <text:p>1</text:p>
          </table:table-cell>
          <table:table-cell table:style-name="ce96" office:value-type="string" calcext:value-type="string">
            <text:p>Existing Water</text:p>
          </table:table-cell>
          <table:table-cell table:style-name="ce96" table:formula="of:=([$'4. Water Adjustment'.V8]/50)*([.$N$35]*[$'4. Water Adjustment'.$T$17])" office:value-type="float" office:value="0" calcext:value-type="float">
            <text:p>0</text:p>
          </table:table-cell>
          <table:table-cell table:style-name="ce83" office:value-type="float" office:value="1" calcext:value-type="float">
            <text:p>1</text:p>
          </table:table-cell>
          <table:table-cell table:style-name="ce83" office:value-type="string" calcext:value-type="string">
            <text:p>Lovibond</text:p>
          </table:table-cell>
          <table:table-cell table:style-name="ce83" office:value-type="string" calcext:value-type="string">
            <text:p>Color (L)</text:p>
          </table:table-cell>
          <table:table-cell table:style-name="ce83" table:number-columns-repeated="8"/>
          <table:table-cell table:style-name="ce53" table:number-columns-repeated="4"/>
          <table:table-cell table:style-name="ce83" table:number-columns-repeated="14"/>
          <table:table-cell table:number-columns-repeated="20"/>
        </table:table-row>
        <table:table-row table:style-name="ro4">
          <table:table-cell table:style-name="ce93" office:value-type="string" calcext:value-type="string" table:number-columns-spanned="6" table:number-rows-spanned="1">
            <text:p>Copyright © 2020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5"/>
          <table:table-cell table:style-name="ce193"/>
          <table:table-cell table:style-name="ce126" table:number-columns-repeated="2"/>
          <table:table-cell table:style-name="ce83"/>
          <table:table-cell table:style-name="ce216"/>
          <table:table-cell table:style-name="ce83"/>
          <table:table-cell table:style-name="ce96" office:value-type="float" office:value="2" calcext:value-type="float">
            <text:p>2</text:p>
          </table:table-cell>
          <table:table-cell table:style-name="ce96" office:value-type="string" calcext:value-type="string">
            <text:p>Adjusted Water</text:p>
          </table:table-cell>
          <table:table-cell table:style-name="ce96" table:formula="of:=([$'4. Water Adjustment'.U16]/50)*([.$N$35]*[$'4. Water Adjustment'.$T$17])" office:value-type="string" office:string-value="" calcext:value-type="error">
            <text:p>Err:522</text:p>
          </table:table-cell>
          <table:table-cell table:style-name="ce83" office:value-type="float" office:value="2" calcext:value-type="float">
            <text:p>2</text:p>
          </table:table-cell>
          <table:table-cell table:style-name="ce83" office:value-type="string" calcext:value-type="string">
            <text:p>EBC</text:p>
          </table:table-cell>
          <table:table-cell table:style-name="ce83" office:value-type="string" calcext:value-type="string">
            <text:p>Color (EBC)</text:p>
          </table:table-cell>
          <table:table-cell table:style-name="ce83" table:number-columns-repeated="8"/>
          <table:table-cell table:style-name="ce53" table:number-columns-repeated="4"/>
          <table:table-cell table:style-name="ce83" table:number-columns-repeated="14"/>
          <table:table-cell table:number-columns-repeated="20"/>
        </table:table-row>
        <table:table-row table:style-name="ro49">
          <table:table-cell table:style-name="ce148" office:value-type="string" calcext:value-type="string" table:number-columns-spanned="6" table:number-rows-spanned="1">
            <text:p>If the sheet does not show comments or red corner marks, select the REVIEW tab in the Excel program menu and click the SHOW ALL COMMENTS button twice.</text:p>
          </table:table-cell>
          <table:covered-table-cell table:number-columns-repeated="5"/>
          <table:table-cell table:style-name="ce194"/>
          <table:table-cell table:style-name="ce83"/>
          <table:table-cell table:style-name="ce210" table:number-columns-repeated="2"/>
          <table:table-cell table:style-name="ce83" table:number-columns-repeated="16"/>
          <table:table-cell table:style-name="ce53" table:number-columns-repeated="4"/>
          <table:table-cell table:style-name="ce83" table:number-columns-repeated="14"/>
          <table:table-cell table:number-columns-repeated="20"/>
        </table:table-row>
        <table:table-row table:style-name="ro103">
          <table:table-cell table:style-name="ce31" table:number-columns-repeated="5"/>
          <table:table-cell table:style-name="ce53" table:number-columns-repeated="2"/>
          <table:table-cell table:style-name="ce83" table:number-columns-repeated="2"/>
          <table:table-cell table:style-name="ce210"/>
          <table:table-cell table:style-name="ce83"/>
          <table:table-cell table:style-name="ce96" office:value-type="float" office:value="1" calcext:value-type="float">
            <text:p>1</text:p>
          </table:table-cell>
          <table:table-cell table:style-name="ce96" office:value-type="string" calcext:value-type="string">
            <text:p>Gallons</text:p>
          </table:table-cell>
          <table:table-cell table:style-name="ce96" office:value-type="float" office:value="3.785" calcext:value-type="float">
            <text:p>3.785</text:p>
          </table:table-cell>
          <table:table-cell table:style-name="ce96" office:value-type="string" calcext:value-type="string">
            <text:p>Quantity (lb)</text:p>
          </table:table-cell>
          <table:table-cell table:style-name="ce96" office:value-type="string" calcext:value-type="string">
            <text:p>Quantity (oz)</text:p>
          </table:table-cell>
          <table:table-cell table:style-name="ce96" office:value-type="string" calcext:value-type="string">
            <text:p>Total Grist Weight (lbs)</text:p>
          </table:table-cell>
          <table:table-cell table:style-name="ce96" office:value-type="string" calcext:value-type="string">
            <text:p>Mash Water Volume (gallons)---&gt;</text:p>
          </table:table-cell>
          <table:table-cell table:style-name="ce96" office:value-type="string" calcext:value-type="string">
            <text:p>Batch Water Volume (gallons) ---&gt;</text:p>
          </table:table-cell>
          <table:table-cell table:style-name="ce96" office:value-type="string" calcext:value-type="string">
            <text:p>Water to Grist Ratio (Qts/Lb)</text:p>
          </table:table-cell>
          <table:table-cell table:style-name="ce96" office:value-type="float" office:value="1" calcext:value-type="float">
            <text:p>1</text:p>
          </table:table-cell>
          <table:table-cell table:style-name="ce96" office:value-type="float" office:value="16" calcext:value-type="float">
            <text:p>16</text:p>
          </table:table-cell>
          <table:table-cell table:style-name="ce96" office:value-type="float" office:value="4" calcext:value-type="float">
            <text:p>4</text:p>
          </table:table-cell>
          <table:table-cell table:style-name="ce96" office:value-type="float" office:value="1" calcext:value-type="float">
            <text:p>1</text:p>
          </table:table-cell>
          <table:table-cell table:style-name="ce83" table:number-columns-repeated="2"/>
          <table:table-cell table:style-name="ce53" table:number-columns-repeated="4"/>
          <table:table-cell table:style-name="ce83" table:number-columns-repeated="14"/>
          <table:table-cell table:number-columns-repeated="20"/>
        </table:table-row>
        <table:table-row table:style-name="ro103">
          <table:table-cell table:style-name="ce53" table:number-columns-repeated="7"/>
          <table:table-cell table:style-name="ce83" table:number-columns-repeated="4"/>
          <table:table-cell table:style-name="ce96" office:value-type="float" office:value="2" calcext:value-type="float">
            <text:p>2</text:p>
          </table:table-cell>
          <table:table-cell table:style-name="ce96" office:value-type="string" calcext:value-type="string">
            <text:p>Liters</text:p>
          </table:table-cell>
          <table:table-cell table:style-name="ce96" office:value-type="float" office:value="1" calcext:value-type="float">
            <text:p>1</text:p>
          </table:table-cell>
          <table:table-cell table:style-name="ce219" office:value-type="string" calcext:value-type="string">
            <text:p>Quantity (kg)</text:p>
          </table:table-cell>
          <table:table-cell table:style-name="ce219" office:value-type="string" calcext:value-type="string">
            <text:p>Quantity (g)</text:p>
          </table:table-cell>
          <table:table-cell table:style-name="ce219" office:value-type="string" calcext:value-type="string">
            <text:p>Total Grist Weight (kg)</text:p>
          </table:table-cell>
          <table:table-cell table:style-name="ce96" office:value-type="string" calcext:value-type="string">
            <text:p>Mash Water Volume (Liters)---&gt;</text:p>
          </table:table-cell>
          <table:table-cell table:style-name="ce96" office:value-type="string" calcext:value-type="string">
            <text:p>Batch Water Volume (Liters)---&gt;</text:p>
          </table:table-cell>
          <table:table-cell table:style-name="ce96" office:value-type="string" calcext:value-type="string">
            <text:p>Water to Grist Ratio (L/Kg)</text:p>
          </table:table-cell>
          <table:table-cell table:style-name="ce96" office:value-type="float" office:value="2.205" calcext:value-type="float">
            <text:p>2.205</text:p>
          </table:table-cell>
          <table:table-cell table:style-name="ce96" office:value-type="float" office:value="1000" calcext:value-type="float">
            <text:p>1000</text:p>
          </table:table-cell>
          <table:table-cell table:style-name="ce96" office:value-type="float" office:value="1" calcext:value-type="float">
            <text:p>1</text:p>
          </table:table-cell>
          <table:table-cell table:style-name="ce96" office:value-type="float" office:value="0.2642008" calcext:value-type="float">
            <text:p>0.2642008</text:p>
          </table:table-cell>
          <table:table-cell table:style-name="ce83" table:number-columns-repeated="2"/>
          <table:table-cell table:style-name="ce53" table:number-columns-repeated="4"/>
          <table:table-cell table:style-name="ce83" table:number-columns-repeated="14"/>
          <table:table-cell table:number-columns-repeated="20"/>
        </table:table-row>
        <table:table-row table:style-name="ro103">
          <table:table-cell table:style-name="ce53" table:number-columns-repeated="7"/>
          <table:table-cell table:style-name="ce83" table:number-columns-repeated="4"/>
          <table:table-cell table:style-name="ce96" office:value-type="float" office:value="3" calcext:value-type="float">
            <text:p>3</text:p>
          </table:table-cell>
          <table:table-cell table:style-name="ce96" office:value-type="string" calcext:value-type="string">
            <text:p>Barrels</text:p>
          </table:table-cell>
          <table:table-cell table:style-name="ce96" office:value-type="float" office:value="117.335" calcext:value-type="float">
            <text:p>117.335</text:p>
          </table:table-cell>
          <table:table-cell table:style-name="ce96" office:value-type="string" calcext:value-type="string">
            <text:p>Quantity (lb)</text:p>
          </table:table-cell>
          <table:table-cell table:style-name="ce96" office:value-type="string" calcext:value-type="string">
            <text:p>Quantity (oz)</text:p>
          </table:table-cell>
          <table:table-cell table:style-name="ce96" office:value-type="string" calcext:value-type="string">
            <text:p>Total Grist Weight (lbs)</text:p>
          </table:table-cell>
          <table:table-cell table:style-name="ce96" office:value-type="string" calcext:value-type="string">
            <text:p>Mash Water Volume (Barrels)---&gt;</text:p>
          </table:table-cell>
          <table:table-cell table:style-name="ce96" office:value-type="string" calcext:value-type="string">
            <text:p>Batch Water Volume (Barrels)---&gt;</text:p>
          </table:table-cell>
          <table:table-cell table:style-name="ce96" office:value-type="string" calcext:value-type="string">
            <text:p>Water to Grist Ratio (Qts/Lb)</text:p>
          </table:table-cell>
          <table:table-cell table:style-name="ce96" office:value-type="float" office:value="1" calcext:value-type="float">
            <text:p>1</text:p>
          </table:table-cell>
          <table:table-cell table:style-name="ce96" office:value-type="float" office:value="16" calcext:value-type="float">
            <text:p>16</text:p>
          </table:table-cell>
          <table:table-cell table:style-name="ce96" office:value-type="float" office:value="124" calcext:value-type="float">
            <text:p>124</text:p>
          </table:table-cell>
          <table:table-cell table:style-name="ce96" office:value-type="float" office:value="31" calcext:value-type="float">
            <text:p>31</text:p>
          </table:table-cell>
          <table:table-cell table:style-name="ce83" table:number-columns-repeated="2"/>
          <table:table-cell table:style-name="ce53" table:number-columns-repeated="4"/>
          <table:table-cell table:style-name="ce83" table:number-columns-repeated="14"/>
          <table:table-cell table:number-columns-repeated="20"/>
        </table:table-row>
        <table:table-row table:style-name="ro103">
          <table:table-cell table:style-name="ce53" table:number-columns-repeated="7"/>
          <table:table-cell table:style-name="ce83" table:number-columns-repeated="4"/>
          <table:table-cell table:style-name="ce96" office:value-type="float" office:value="4" calcext:value-type="float">
            <text:p>4</text:p>
          </table:table-cell>
          <table:table-cell table:style-name="ce96" office:value-type="string" calcext:value-type="string">
            <text:p>Hectoliters</text:p>
          </table:table-cell>
          <table:table-cell table:style-name="ce96" office:value-type="float" office:value="100" calcext:value-type="float">
            <text:p>100</text:p>
          </table:table-cell>
          <table:table-cell table:style-name="ce96" office:value-type="string" calcext:value-type="string">
            <text:p>Quantity (kg)</text:p>
          </table:table-cell>
          <table:table-cell table:style-name="ce96" office:value-type="string" calcext:value-type="string">
            <text:p>Quantity (g)</text:p>
          </table:table-cell>
          <table:table-cell table:style-name="ce96" office:value-type="string" calcext:value-type="string">
            <text:p>Total Grist Weight (kg)</text:p>
          </table:table-cell>
          <table:table-cell table:style-name="ce96" office:value-type="string" calcext:value-type="string">
            <text:p>Mash Water Volume (Hectoliters)---&gt;</text:p>
          </table:table-cell>
          <table:table-cell table:style-name="ce96" office:value-type="string" calcext:value-type="string">
            <text:p>Batch Water Volume (Hectoliters)---&gt;</text:p>
          </table:table-cell>
          <table:table-cell table:style-name="ce96" office:value-type="string" calcext:value-type="string">
            <text:p>Water to Grist Ratio (L/Kg)</text:p>
          </table:table-cell>
          <table:table-cell table:style-name="ce96" office:value-type="float" office:value="2.205" calcext:value-type="float">
            <text:p>2.205</text:p>
          </table:table-cell>
          <table:table-cell table:style-name="ce96" office:value-type="float" office:value="1000" calcext:value-type="float">
            <text:p>1000</text:p>
          </table:table-cell>
          <table:table-cell table:style-name="ce96" office:value-type="float" office:value="100" calcext:value-type="float">
            <text:p>100</text:p>
          </table:table-cell>
          <table:table-cell table:style-name="ce96" table:formula="of:=100/3.785" office:value-type="float" office:value="26.42007926" calcext:value-type="float">
            <text:p>26.42007926</text:p>
          </table:table-cell>
          <table:table-cell table:style-name="ce83" table:number-columns-repeated="2"/>
          <table:table-cell table:style-name="ce53" table:number-columns-repeated="4"/>
          <table:table-cell table:style-name="ce83" table:number-columns-repeated="14"/>
          <table:table-cell table:number-columns-repeated="20"/>
        </table:table-row>
        <table:table-row table:style-name="ro103">
          <table:table-cell table:style-name="ce53" table:number-columns-repeated="7"/>
          <table:table-cell table:style-name="ce83" table:number-columns-repeated="4"/>
          <table:table-cell table:style-name="ce217" table:formula="of:=VLOOKUP([$'1. Water Report Input'.$H$7];mashvaritable;1;0)" office:value-type="float" office:value="1" calcext:value-type="float">
            <text:p>1</text:p>
          </table:table-cell>
          <table:table-cell table:style-name="ce130" table:formula="of:=VLOOKUP([$'1. Water Report Input'.$H$7];mashvaritable;2;0)" office:value-type="string" office:string-value="Gallons" calcext:value-type="string">
            <text:p>Gallons</text:p>
          </table:table-cell>
          <table:table-cell table:style-name="ce129" table:formula="of:=VLOOKUP([$'1. Water Report Input'.$H$7];mashvaritable;3;0)" office:value-type="float" office:value="3.785" calcext:value-type="float">
            <text:p>3.79</text:p>
          </table:table-cell>
          <table:table-cell table:style-name="ce129" table:formula="of:=VLOOKUP([$'1. Water Report Input'.$H$7];mashvaritable;4;0)" office:value-type="string" office:string-value="Quantity (lb)" calcext:value-type="string">
            <text:p>Quantity (lb)</text:p>
          </table:table-cell>
          <table:table-cell table:style-name="ce129" table:formula="of:=VLOOKUP([$'1. Water Report Input'.$H$7];mashvaritable;5;0)" office:value-type="string" office:string-value="Quantity (oz)" calcext:value-type="string">
            <text:p>Quantity (oz)</text:p>
          </table:table-cell>
          <table:table-cell table:style-name="ce217" table:formula="of:=VLOOKUP([$'1. Water Report Input'.$H$7];mashvaritable;6;0)" office:value-type="string" office:string-value="Total Grist Weight (lbs)" calcext:value-type="string">
            <text:p>Total Grist Weight (lbs)</text:p>
          </table:table-cell>
          <table:table-cell table:style-name="ce130" table:formula="of:=VLOOKUP([$'1. Water Report Input'.$H$7];mashvaritable;7;0)" office:value-type="string" office:string-value="Mash Water Volume (gallons)---&gt;" calcext:value-type="string">
            <text:p>Mash Water Volume (gallons)---&gt;</text:p>
          </table:table-cell>
          <table:table-cell table:style-name="ce129" table:formula="of:=VLOOKUP([$'1. Water Report Input'.$H$7];mashvaritable;8;0)" office:value-type="string" office:string-value="Batch Water Volume (gallons) ---&gt;" calcext:value-type="string">
            <text:p>Batch Water Volume (gallons) ---&gt;</text:p>
          </table:table-cell>
          <table:table-cell table:style-name="ce129" table:formula="of:=VLOOKUP([$'1. Water Report Input'.$H$7];mashvaritable;9;0)" office:value-type="string" office:string-value="Water to Grist Ratio (Qts/Lb)" calcext:value-type="string">
            <text:p>Water to Grist Ratio (Qts/Lb)</text:p>
          </table:table-cell>
          <table:table-cell table:style-name="ce129" table:formula="of:=VLOOKUP([$'1. Water Report Input'.$H$7];mashvaritable;10;0)" office:value-type="float" office:value="1" calcext:value-type="float">
            <text:p>1.00</text:p>
          </table:table-cell>
          <table:table-cell table:style-name="ce217" table:formula="of:=VLOOKUP([$'1. Water Report Input'.$H$7];mashvaritable;11;0)" office:value-type="float" office:value="16" calcext:value-type="float">
            <text:p>16</text:p>
          </table:table-cell>
          <table:table-cell table:style-name="ce129" table:formula="of:=VLOOKUP([$'1. Water Report Input'.$H$7];mashvaritable;12;0)" office:value-type="float" office:value="4" calcext:value-type="float">
            <text:p>4.00</text:p>
          </table:table-cell>
          <table:table-cell table:style-name="ce96" table:formula="of:=VLOOKUP([$'1. Water Report Input'.$H$7];mashvaritable;13;0)" office:value-type="float" office:value="1" calcext:value-type="float">
            <text:p>1</text:p>
          </table:table-cell>
          <table:table-cell table:style-name="ce83" table:number-columns-repeated="2"/>
          <table:table-cell table:style-name="ce53" table:number-columns-repeated="4"/>
          <table:table-cell table:style-name="ce83" table:number-columns-repeated="14"/>
          <table:table-cell table:number-columns-repeated="20"/>
        </table:table-row>
        <table:table-row table:style-name="ro103">
          <table:table-cell table:style-name="ce53" table:number-columns-repeated="7"/>
          <table:table-cell table:style-name="ce83" table:number-columns-repeated="4"/>
          <table:table-cell table:style-name="ce96" table:number-columns-repeated="12"/>
          <table:table-cell table:style-name="ce83" table:number-columns-repeated="3"/>
          <table:table-cell table:style-name="ce53" table:number-columns-repeated="4"/>
          <table:table-cell table:style-name="ce83" table:number-columns-repeated="14"/>
          <table:table-cell table:number-columns-repeated="20"/>
        </table:table-row>
        <table:table-row table:style-name="ro103" table:number-rows-repeated="11">
          <table:table-cell table:style-name="ce53" table:number-columns-repeated="7"/>
          <table:table-cell table:style-name="ce83" table:number-columns-repeated="19"/>
          <table:table-cell table:style-name="ce53" table:number-columns-repeated="4"/>
          <table:table-cell table:style-name="ce83" table:number-columns-repeated="14"/>
          <table:table-cell table:number-columns-repeated="20"/>
        </table:table-row>
        <table:table-row table:style-name="ro102" table:number-rows-repeated="2">
          <table:table-cell table:style-name="ce53" table:number-columns-repeated="7"/>
          <table:table-cell table:style-name="ce83" table:number-columns-repeated="19"/>
          <table:table-cell table:style-name="ce53" table:number-columns-repeated="4"/>
          <table:table-cell table:style-name="ce83" table:number-columns-repeated="14"/>
          <table:table-cell table:number-columns-repeated="20"/>
        </table:table-row>
        <table:table-row table:style-name="ro102" table:number-rows-repeated="19">
          <table:table-cell table:style-name="ce53" table:number-columns-repeated="7"/>
          <table:table-cell table:style-name="ce83" table:number-columns-repeated="19"/>
          <table:table-cell table:style-name="ce53" table:number-columns-repeated="18"/>
          <table:table-cell table:number-columns-repeated="20"/>
        </table:table-row>
        <table:table-row table:style-name="ro102" table:number-rows-repeated="932">
          <table:table-cell table:style-name="ce31" table:number-columns-repeated="5"/>
          <table:table-cell table:style-name="ce53" table:number-columns-repeated="2"/>
          <table:table-cell table:style-name="ce83" table:number-columns-repeated="19"/>
          <table:table-cell table:style-name="ce53"/>
          <table:table-cell table:style-name="ce31" table:number-columns-repeated="17"/>
          <table:table-cell table:number-columns-repeated="20"/>
        </table:table-row>
        <table:table-row table:style-name="ro103" table:number-rows-repeated="1047575">
          <table:table-cell table:number-columns-repeated="64"/>
        </table:table-row>
        <table:table-row table:style-name="ro103">
          <table:table-cell table:number-columns-repeated="64"/>
        </table:table-row>
        <calcext:conditional-formats>
          <calcext:conditional-format calcext:target-range-address="'3. Grain Bill Input'.F24:'3. Grain Bill Input'.G24">
            <calcext:condition calcext:apply-style-name="ConditionalStyle_4" calcext:value="between(5.25,5.55)" calcext:base-cell-address="'3. Grain Bill Input'.F24"/>
          </calcext:conditional-format>
          <calcext:conditional-format calcext:target-range-address="'3. Grain Bill Input'.F24:'3. Grain Bill Input'.G24">
            <calcext:condition calcext:apply-style-name="ConditionalStyle_1" calcext:value="between(5.15,5.75)" calcext:base-cell-address="'3. Grain Bill Input'.F24"/>
          </calcext:conditional-format>
          <calcext:conditional-format calcext:target-range-address="'3. Grain Bill Input'.F24:'3. Grain Bill Input'.G24">
            <calcext:condition calcext:apply-style-name="ConditionalStyle_6" calcext:value="between(1,14)" calcext:base-cell-address="'3. Grain Bill Input'.F24"/>
          </calcext:conditional-format>
          <calcext:conditional-format calcext:target-range-address="'3. Grain Bill Input'.E6:'3. Grain Bill Input'.E17">
            <calcext:condition calcext:apply-style-name="ConditionalStyle_6" calcext:value="formula-is(IF([.$B$20]=2;AND([.J6]=3;[.E6]&lt;478);AND([.J6]=3;[.E6]&lt;180)))" calcext:base-cell-address="'3. Grain Bill Input'.E6"/>
          </calcext:conditional-format>
          <calcext:conditional-format calcext:target-range-address="'3. Grain Bill Input'.E6:'3. Grain Bill Input'.E17">
            <calcext:condition calcext:apply-style-name="ConditionalStyle_6" calcext:value="formula-is(IF([.$B$20]=2;AND([.J6]&lt;&gt;3;[.E6]&gt;478);AND([.J6]&lt;&gt;3;[.E6]&gt;180)))" calcext:base-cell-address="'3. Grain Bill Input'.E6"/>
          </calcext:conditional-format>
          <calcext:conditional-format calcext:target-range-address="'3. Grain Bill Input'.A6:'3. Grain Bill Input'.A17">
            <calcext:condition calcext:apply-style-name="ConditionalStyle_7" calcext:value="formula-is([.J6]=4)" calcext:base-cell-address="'3. Grain Bill Input'.A6"/>
          </calcext:conditional-format>
          <calcext:conditional-format calcext:target-range-address="'3. Grain Bill Input'.A6:'3. Grain Bill Input'.A17">
            <calcext:condition calcext:apply-style-name="ConditionalStyle_8" calcext:value="formula-is([.J6]=3)" calcext:base-cell-address="'3. Grain Bill Input'.A6"/>
          </calcext:conditional-format>
          <calcext:conditional-format calcext:target-range-address="'3. Grain Bill Input'.A6:'3. Grain Bill Input'.A17">
            <calcext:condition calcext:apply-style-name="ConditionalStyle_9" calcext:value="formula-is([.J6]=2)" calcext:base-cell-address="'3. Grain Bill Input'.A6"/>
          </calcext:conditional-format>
          <calcext:conditional-format calcext:target-range-address="'3. Grain Bill Input'.B21:'3. Grain Bill Input'.B21">
            <calcext:condition calcext:apply-style-name="ConditionalStyle_6" calcext:value="formula-is([.B21]=&quot;existing water&quot;)" calcext:base-cell-address="'3. Grain Bill Input'.B21"/>
          </calcext:conditional-format>
        </calcext:conditional-formats>
      </table:table>
      <table:table table:name="4. Water Adjustment" table:style-name="ta5">
        <table:table-column table:style-name="co20" table:default-cell-style-name="Default"/>
        <table:table-column table:style-name="co21" table:default-cell-style-name="Default"/>
        <table:table-column table:style-name="co22" table:number-columns-repeated="6" table:default-cell-style-name="Default"/>
        <table:table-column table:style-name="co2" table:number-columns-repeated="6" table:default-cell-style-name="Default"/>
        <table:table-column table:style-name="co8" table:number-columns-repeated="3" table:default-cell-style-name="Default"/>
        <table:table-column table:style-name="co23" table:default-cell-style-name="Default"/>
        <table:table-column table:style-name="co8" table:default-cell-style-name="Default"/>
        <table:table-column table:style-name="co8" table:visibility="collapse" table:number-columns-repeated="33" table:default-cell-style-name="Default"/>
        <table:table-column table:style-name="co8" table:default-cell-style-name="Default"/>
        <table:table-column table:style-name="co24" table:number-columns-repeated="3" table:default-cell-style-name="Default"/>
        <table:table-column table:style-name="co1" table:number-columns-repeated="8" table:default-cell-style-name="Default"/>
        <table:table-row table:style-name="ro41">
          <table:table-cell table:style-name="ce1" office:value-type="string" calcext:value-type="string" table:number-columns-spanned="2" table:number-rows-spanned="1">
            <text:p>Bru'n Water</text:p>
          </table:table-cell>
          <table:covered-table-cell table:style-name="ce19"/>
          <table:table-cell table:style-name="ce149" office:value-type="string" calcext:value-type="string" table:number-columns-spanned="9" table:number-rows-spanned="1">
            <text:p><text:a xlink:href="https://sites.google.com/site/brunwater/home/files" xlink:type="simple">Link to Bru'n Water website for updates and to donate</text:a></text:p>
          </table:table-cell>
          <table:covered-table-cell table:number-columns-repeated="8"/>
          <table:table-cell table:style-name="ce360" table:number-columns-repeated="3"/>
          <table:table-cell table:style-name="ce248" table:number-columns-repeated="2"/>
          <table:table-cell table:style-name="ce123" table:number-columns-repeated="3"/>
          <table:table-cell table:style-name="ce96" table:number-columns-repeated="33"/>
          <table:table-cell table:style-name="ce123" table:number-columns-repeated="4"/>
          <table:table-cell table:number-columns-repeated="8"/>
        </table:table-row>
        <table:table-row table:style-name="ro116">
          <table:table-cell table:style-name="ce222" office:value-type="string" calcext:value-type="string">
            <text:p><text:span text:style-name="T377">Enter data into </text:span><text:span text:style-name="T378">Light Blue</text:span><text:span text:style-name="T379"> cells, </text:span><text:span text:style-name="T380">Yellow</text:span><text:span text:style-name="T379"> cells display calculated results, </text:span><text:span text:style-name="T381">Pink</text:span><text:span text:style-name="T379"> cells contain selection boxes</text:span></text:p>
          </table:table-cell>
          <table:table-cell table:style-name="ce150" table:number-columns-repeated="9"/>
          <table:table-cell table:style-name="ce351"/>
          <table:table-cell table:style-name="ce248"/>
          <table:table-cell table:style-name="ce367" table:number-columns-repeated="4"/>
          <table:table-cell table:style-name="ce399" table:number-columns-repeated="3"/>
          <table:table-cell table:style-name="ce404"/>
          <table:table-cell table:style-name="ce96" table:number-columns-repeated="32"/>
          <table:table-cell table:style-name="ce123" table:number-columns-repeated="4"/>
          <table:table-cell table:number-columns-repeated="8"/>
        </table:table-row>
        <table:table-row table:style-name="ro114">
          <table:table-cell table:style-name="ce223" office:value-type="string" calcext:value-type="string" table:number-columns-spanned="5" table:number-rows-spanned="1">
            <office:annotation draw:style-name="gr44" draw:text-style-name="P2" svg:width="7.982cm" svg:height="2.937cm" svg:x="5.381cm" svg:y="2.725cm" draw:caption-point-x="7.575cm" draw:caption-point-y="-1.128cm">
              <dc:date>2021-02-12T00:00:00</dc:date>
              <text:p text:style-name="P1"><text:span text:style-name="T1">======</text:span></text:p>
              <text:p text:style-name="P1"><text:span text:style-name="T1">ID#AAAAH1AC7jY</text:span></text:p>
              <text:p text:style-name="P1"><text:span text:style-name="T1">martin.brungard <text:s text:c="3"/>(2021-02-12 10:36:59)</text:span></text:p>
              <text:p text:style-name="P1"><text:span text:style-name="T1">Use this calculator to amend your water to produce a desired water profile.</text:span></text:p>
            </office:annotation>
            <text:p><text:span text:style-name="T390">Water Profile Adjustment Calculator           </text:span><text:span text:style-name="T391">             </text:span><text:span text:style-name="T392">   </text:span></text:p>
          </table:table-cell>
          <table:covered-table-cell table:number-columns-repeated="4" table:style-name="ce20"/>
          <table:table-cell table:style-name="ce300" office:value-type="string" calcext:value-type="string" table:number-columns-spanned="8" table:number-rows-spanned="1">
            <text:p>Hover cursor over cells w/ red corner marks to display helpful information</text:p>
          </table:table-cell>
          <table:covered-table-cell table:number-columns-repeated="7"/>
          <table:table-cell table:style-name="ce367"/>
          <table:table-cell table:style-name="ce248" table:number-columns-repeated="2"/>
          <table:table-cell table:style-name="ce123" table:number-columns-repeated="3"/>
          <table:table-cell table:style-name="ce96" table:number-columns-repeated="2"/>
          <table:table-cell table:style-name="ce121" office:value-type="string" calcext:value-type="string">
            <text:p>hco3</text:p>
          </table:table-cell>
          <table:table-cell table:style-name="ce121" office:value-type="string" calcext:value-type="string">
            <text:p>so4</text:p>
          </table:table-cell>
          <table:table-cell table:style-name="ce121" office:value-type="string" calcext:value-type="string">
            <text:p>cl</text:p>
          </table:table-cell>
          <table:table-cell table:style-name="ce96" table:number-columns-repeated="8"/>
          <table:table-cell table:style-name="ce121" table:number-columns-repeated="3"/>
          <table:table-cell table:style-name="ce96" table:number-columns-repeated="17"/>
          <table:table-cell table:style-name="ce123" table:number-columns-repeated="4"/>
          <table:table-cell table:number-columns-repeated="8"/>
        </table:table-row>
        <table:table-row table:style-name="ro107">
          <table:table-cell table:style-name="ce224" office:value-type="string" calcext:value-type="string" table:number-columns-spanned="2" table:number-rows-spanned="1">
            <office:annotation draw:style-name="gr7" draw:text-style-name="P2" svg:width="7.982cm" svg:height="8.101cm" svg:x="5.381cm" svg:y="1.4cm" draw:caption-point-x="2.029cm" draw:caption-point-y="1.07cm">
              <dc:date>2021-02-12T00:00:00</dc:date>
              <text:p text:style-name="P1"><text:span text:style-name="T1">======</text:span></text:p>
              <text:p text:style-name="P1"><text:span text:style-name="T1">ID#AAAAH1AC7oU</text:span></text:p>
              <text:p text:style-name="P1"><text:span text:style-name="T1">Martin Brungard <text:s text:c="3"/>(2021-02-12 10:36:59)</text:span></text:p>
              <text:p text:style-name="P1"><text:span text:style-name="T1">This is the water profile desired to brew the beer. <text:s/>To Enter Custom Profiles, scroll to the bottom of this sheet and enter values in the Table below.</text:span></text:p>
              <text:p text:style-name="P1"><text:span text:style-name="T1"/></text:p>
              <text:p text:style-name="P1"><text:span text:style-name="T1">NOTE: USE A BOILED PROFILE IF CONSIDERING A HISTORIC WATER PROFILE. <text:s/>The "Boiled" water profiles included here, represent the new water profile that results for a water that was boiled to remove temporary hardness and alkalinity. <text:s/>Where the "original" water profile might have been more suited for darker beers, the "boiled" profile may be more suitable for lighter colored beers. <text:s/>Boiling and decanting water off the chalky sediment was one of the first water treatment methods used by brewers. The "Boiled" profiles are more likely to produce acceptable pH results.</text:span></text:p>
            </office:annotation>
            <text:p>Desired Water Profile</text:p>
          </table:table-cell>
          <table:covered-table-cell table:style-name="ce19"/>
          <table:table-cell table:style-name="ce771" office:value-type="string" calcext:value-type="string">
            <office:annotation draw:style-name="gr13" draw:text-style-name="P2" svg:width="7.394cm" svg:height="8.891cm" svg:x="9.666cm" svg:y="1.587cm" draw:caption-point-x="-0.407cm" draw:caption-point-y="0.883cm">
              <dc:date>2021-02-12T00:00:00</dc:date>
              <text:p text:style-name="P1"><text:span text:style-name="T1">======</text:span></text:p>
              <text:p text:style-name="P1"><text:span text:style-name="T1">ID#AAAAH1AC7lE</text:span></text:p>
              <text:p text:style-name="P1"><text:span text:style-name="T1">martin.brungard <text:s text:c="3"/>(2021-02-12 10:36:59)</text:span></text:p>
              <text:p text:style-name="P1"><text:span text:style-name="T1">Calcium content should typically fall in the range of 40 to 100 ppm. <text:s/>Less than 40 ppm calcium content can be used in lager brewing, but the low calcium content may not produce desirable precipitation of trub and oxalates from wort. High oxalates may lead to beerstone formation. <text:s/>Calcium aids in yeast floculation and beer clarification, but is not needed for yeast health.</text:span></text:p>
              <text:p text:style-name="P1"><text:span text:style-name="T1"/></text:p>
              <text:p text:style-name="P1"><text:span text:style-name="T1">Calcium should not typically exceed 100 ppm unless it has to be added to provide a desirable anion like sulfate to the water.</text:span></text:p>
              <text:p text:style-name="P1"><text:span text:style-name="T1"/></text:p>
              <text:p text:style-name="P1"><text:span text:style-name="T1">If calcium content will be less than 40 ppm, adding the sparging water addition to the mash may elevate the mash calcium content above 40 ppm. Use the Add Sparging Water mineral additions to the Mash tool below.</text:span></text:p>
            </office:annotation>
            <text:p>Calcium <text:s text:c="5"/>(ppm)</text:p>
          </table:table-cell>
          <table:table-cell table:style-name="ce771" office:value-type="string" calcext:value-type="string">
            <office:annotation draw:style-name="gr45" draw:text-style-name="P2" svg:width="7.395cm" svg:height="6.521cm" svg:x="11.514cm" svg:y="2.772cm" draw:caption-point-x="-0.407cm" draw:caption-point-y="-0.302cm">
              <dc:date>2021-02-12T00:00:00</dc:date>
              <text:p text:style-name="P1"><text:span text:style-name="T1">======</text:span></text:p>
              <text:p text:style-name="P1"><text:span text:style-name="T1">ID#AAAAH1AC7oQ</text:span></text:p>
              <text:p text:style-name="P1"><text:span text:style-name="T1">martin.brungard <text:s text:c="3"/>(2021-02-12 10:36:59)</text:span></text:p>
              <text:p text:style-name="P1"><text:span text:style-name="T1">Magnesium is a yeast nutrient, but may be astringent at concentrations over 40 ppm. <text:s/>Preferred range is 0 to 30 ppm. <text:s text:c="2"/></text:span></text:p>
              <text:p text:style-name="P1"><text:span text:style-name="T1"/></text:p>
              <text:p text:style-name="P1"><text:span text:style-name="T1">Malts typically provide sufficient magnesium to wort to provide for proper yeast health and flocculation. <text:s/></text:span></text:p>
              <text:p text:style-name="P1"><text:span text:style-name="T1"/></text:p>
              <text:p text:style-name="P1"><text:span text:style-name="T1">Add magnesium when its bitter and sour taste is desirable in beer, such as Bitter or Pale Ales. <text:s/>There is no need to add magnesium for other beer styles, even if the water profiles below indicate to.</text:span></text:p>
            </office:annotation>
            <text:p>Magnesium (ppm)</text:p>
          </table:table-cell>
          <table:table-cell table:style-name="ce771" office:value-type="string" calcext:value-type="string">
            <office:annotation draw:style-name="gr46" draw:text-style-name="P2" svg:width="7.225cm" svg:height="3.756cm" svg:x="13.363cm" svg:y="2.99cm" draw:caption-point-x="-0.407cm" draw:caption-point-y="-0.52cm">
              <dc:date>2021-02-12T00:00:00</dc:date>
              <text:p text:style-name="P1"><text:span text:style-name="T1">======</text:span></text:p>
              <text:p text:style-name="P1"><text:span text:style-name="T1">ID#AAAAH1AC7lw</text:span></text:p>
              <text:p text:style-name="P1"><text:span text:style-name="T1">martin.brungard <text:s text:c="3"/>(2021-02-12 10:36:59)</text:span></text:p>
              <text:p text:style-name="P1"><text:span text:style-name="T1">Sodium accentuates beer flavor and roundness at moderate concentrations. <text:s/>Preferred range is 0 to 150 ppm, but should be less than 100 ppm if sulfate content is high. <text:s/>Keeping sodium below 50 ppm is desirable for most beers.</text:span></text:p>
            </office:annotation>
            <text:p>Sodium <text:s text:c="7"/>(ppm)</text:p>
          </table:table-cell>
          <table:table-cell table:style-name="ce771" office:value-type="string" calcext:value-type="string">
            <office:annotation draw:style-name="gr26" draw:text-style-name="P2" svg:width="7.056cm" svg:height="3.361cm" svg:x="15.211cm" svg:y="3.188cm" draw:caption-point-x="-0.407cm" draw:caption-point-y="-0.718cm">
              <dc:date>2021-02-12T00:00:00</dc:date>
              <text:p text:style-name="P1"><text:span text:style-name="T1">======</text:span></text:p>
              <text:p text:style-name="P1"><text:span text:style-name="T1">ID#AAAAH1AC7iM</text:span></text:p>
              <text:p text:style-name="P1"><text:span text:style-name="T1">martin.brungard <text:s text:c="3"/>(2021-02-12 10:36:59)</text:span></text:p>
              <text:p text:style-name="P1"><text:span text:style-name="T1">Sulfate provides a sharper, dryer, fuller edge to highly hopped beers. <text:s/>The preferred range is 0 to 350 ppm, but the concentration should not exceed 150 ppm unless the beer is highly hopped.</text:span></text:p>
            </office:annotation>
            <text:p>Sulfate <text:s text:c="7"/>(ppm)</text:p>
          </table:table-cell>
          <table:table-cell table:style-name="ce771" office:value-type="string" calcext:value-type="string">
            <office:annotation draw:style-name="gr26" draw:text-style-name="P2" svg:width="6.886cm" svg:height="3.361cm" svg:x="17.06cm" svg:y="3.188cm" draw:caption-point-x="-0.407cm" draw:caption-point-y="-0.718cm">
              <dc:date>2021-02-12T00:00:00</dc:date>
              <text:p text:style-name="P1"><text:span text:style-name="T1">======</text:span></text:p>
              <text:p text:style-name="P1"><text:span text:style-name="T1">ID#AAAAH1AC7jE</text:span></text:p>
              <text:p text:style-name="P1"><text:span text:style-name="T1">martin.brungard <text:s text:c="3"/>(2021-02-12 10:36:59)</text:span></text:p>
              <text:p text:style-name="P1"><text:span text:style-name="T1">Chloride accentuates fullness and sweetness. <text:s/>The preferred range is 10 to 100 ppm, but the upper limit should be reduced to avoid harshness if the water has high sulfate concentration.</text:span></text:p>
            </office:annotation>
            <text:p>Chloride <text:s text:c="5"/>(ppm)</text:p>
          </table:table-cell>
          <table:table-cell table:style-name="ce771" office:value-type="string" calcext:value-type="string">
            <office:annotation draw:style-name="gr46" draw:text-style-name="P2" svg:width="6.716cm" svg:height="3.756cm" svg:x="18.909cm" svg:y="2.99cm" draw:caption-point-x="-0.407cm" draw:caption-point-y="-0.52cm">
              <dc:date>2021-02-12T00:00:00</dc:date>
              <text:p text:style-name="P1"><text:span text:style-name="T1">======</text:span></text:p>
              <text:p text:style-name="P1"><text:span text:style-name="T1">ID#AAAAH1AC7pA</text:span></text:p>
              <text:p text:style-name="P1"><text:span text:style-name="T1">martin.brungard <text:s text:c="3"/>(2021-02-12 10:36:59)</text:span></text:p>
              <text:p text:style-name="P1"><text:span text:style-name="T1">Bicarbonate is an alkaline buffer that limits pH reduction during mashing. <text:s/>It is generally undesirable in beer, but is needed to balance the acidity of dark malts and crystal malts used in some beers.</text:span></text:p>
            </office:annotation>
            <text:p>Bicarbonate (ppm)</text:p>
          </table:table-cell>
          <table:table-cell table:style-name="ce771" office:value-type="string" calcext:value-type="string" table:number-columns-spanned="3" table:number-rows-spanned="1">
            <text:p>Approximate Color Descriptors for Water Profiles</text:p>
          </table:table-cell>
          <table:covered-table-cell table:style-name="ce21"/>
          <table:covered-table-cell table:style-name="ce19"/>
          <table:table-cell table:style-name="ce361"/>
          <table:table-cell table:style-name="ce368" table:number-columns-repeated="2"/>
          <table:table-cell table:style-name="ce248" table:number-columns-repeated="2"/>
          <table:table-cell table:style-name="ce123" table:number-columns-repeated="3"/>
          <table:table-cell table:style-name="ce96" office:value-type="float" office:value="1" calcext:value-type="float">
            <text:p>1</text:p>
          </table:table-cell>
          <table:table-cell table:style-name="ce108" office:value-type="string" calcext:value-type="string">
            <text:p>%</text:p>
          </table:table-cell>
          <table:table-cell table:style-name="ce122" table:formula="of:=IF([.AF11]=9;(N([.B29])/[.V14])*(-182.85/0.8254);-(((N([.B29])/[.V14])*([.D29]/100)*(((VLOOKUP([.AF11];acidtable;7;0))*[.V49]*61)/(VLOOKUP([.AF11];acidtable;6;0))))))" office:value-type="float" office:value="-0" calcext:value-type="float">
            <text:p>0.0</text:p>
          </table:table-cell>
          <table:table-cell table:style-name="ce122" table:formula="of:=IF([.AF11]=9;([.B29]/[.V14])*(88.57);-[.V4]*96/122)" office:value-type="float" office:value="0" calcext:value-type="float">
            <text:p>0.0</text:p>
          </table:table-cell>
          <table:table-cell table:style-name="ce122" table:formula="of:=IF([.AF11]=9;([.B29]/[.V14])*(64);-[.V4]*35.5/61)" office:value-type="float" office:value="0" calcext:value-type="float">
            <text:p>0.0</text:p>
          </table:table-cell>
          <table:table-cell table:style-name="ce96" table:number-columns-repeated="7"/>
          <table:table-cell table:style-name="ce108"/>
          <table:table-cell table:style-name="ce122" table:number-columns-repeated="3"/>
          <table:table-cell table:style-name="ce96" table:number-columns-repeated="17"/>
          <table:table-cell table:style-name="ce123" table:number-columns-repeated="4"/>
          <table:table-cell table:number-columns-repeated="8"/>
        </table:table-row>
        <table:table-row table:style-name="ro110">
          <table:table-cell table:style-name="ce729" table:content-validation-name="val8" office:value-type="string" calcext:value-type="string" table:number-columns-spanned="2" table:number-rows-spanned="1">
            <office:annotation draw:style-name="gr24" draw:text-style-name="P2" svg:width="7.982cm" svg:height="2.751cm" svg:x="5.381cm" svg:y="4.075cm" draw:caption-point-x="2.029cm" draw:caption-point-y="-0.838cm">
              <dc:date>2021-02-12T00:00:00</dc:date>
              <text:p text:style-name="P1"><text:span text:style-name="T1">======</text:span></text:p>
              <text:p text:style-name="P1"><text:span text:style-name="T1">ID#AAAAH1AC7jU</text:span></text:p>
              <text:p text:style-name="P1"><text:span text:style-name="T1">Martin Brungard <text:s text:c="3"/>(2021-02-12 10:36:59)</text:span></text:p>
              <text:p text:style-name="P1"><text:span text:style-name="T1">To change the concentrations in this profile, scroll down this page to the table below and alter the concentrations there.</text:span></text:p>
            </office:annotation>
            <text:p>Yellow Dry</text:p>
          </table:table-cell>
          <table:covered-table-cell table:style-name="ce19"/>
          <table:table-cell table:style-name="ce268" table:formula="of:=VLOOKUP([.$AF$10];profiles;3;0)" office:value-type="float" office:value="50" calcext:value-type="float">
            <text:p>50</text:p>
          </table:table-cell>
          <table:table-cell table:style-name="ce268" table:formula="of:=VLOOKUP([.$AF$10];profiles;4;0)" office:value-type="float" office:value="10" calcext:value-type="float">
            <text:p>10</text:p>
          </table:table-cell>
          <table:table-cell table:style-name="ce268" table:formula="of:=VLOOKUP([.$AF$10];profiles;5;0)" office:value-type="float" office:value="5" calcext:value-type="float">
            <text:p>5</text:p>
          </table:table-cell>
          <table:table-cell table:style-name="ce268" table:formula="of:=VLOOKUP([.$AF$10];profiles;6;0)" office:value-type="float" office:value="105" calcext:value-type="float">
            <text:p>105</text:p>
          </table:table-cell>
          <table:table-cell table:style-name="ce268" table:formula="of:=VLOOKUP([.$AF$10];profiles;7;0)" office:value-type="float" office:value="45" calcext:value-type="float">
            <text:p>45</text:p>
          </table:table-cell>
          <table:table-cell table:style-name="ce268" table:formula="of:=VLOOKUP([.$AF$10];profiles;8;0)" office:value-type="float" office:value="0" calcext:value-type="float">
            <text:p>0</text:p>
          </table:table-cell>
          <table:table-cell table:style-name="ce319" office:value-type="string" calcext:value-type="string" table:number-columns-spanned="3" table:number-rows-spanned="1">
            <text:p>Yellow: under 6 SRM</text:p>
          </table:table-cell>
          <table:covered-table-cell table:style-name="ce23"/>
          <table:covered-table-cell table:style-name="ce30"/>
          <table:table-cell table:style-name="ce362" table:number-columns-repeated="3"/>
          <table:table-cell table:style-name="ce248" table:number-columns-repeated="2"/>
          <table:table-cell table:style-name="ce123" table:number-columns-repeated="3"/>
          <table:table-cell table:style-name="ce96" office:value-type="float" office:value="2" calcext:value-type="float">
            <text:p>2</text:p>
          </table:table-cell>
          <table:table-cell table:style-name="ce108" office:value-type="string" calcext:value-type="string">
            <text:p>N</text:p>
          </table:table-cell>
          <table:table-cell table:style-name="ce122" table:formula="of:=IF([.AF11]=9;(N([.B29])/[.V14])*(-182.85/0.8254);-(N([.B29])/[.V14])*N([.D29])*61)" office:value-type="float" office:value="-0" calcext:value-type="float">
            <text:p>0.0</text:p>
          </table:table-cell>
          <table:table-cell table:style-name="ce122" table:formula="of:=IF([.AF11]=9;(N([.B29])/[.V14])*(88.57);-[.V5]*96/122)" office:value-type="float" office:value="0" calcext:value-type="float">
            <text:p>0.0</text:p>
          </table:table-cell>
          <table:table-cell table:style-name="ce122" table:formula="of:=IF([.AF11]=9;(N([.B29])/[.V14])*(64);-[.V5]*35.5/61)" office:value-type="float" office:value="0" calcext:value-type="float">
            <text:p>0.0</text:p>
          </table:table-cell>
          <table:table-cell table:style-name="ce96" table:number-columns-repeated="7"/>
          <table:table-cell table:style-name="ce108"/>
          <table:table-cell table:style-name="ce122" table:number-columns-repeated="3"/>
          <table:table-cell table:style-name="ce96" table:number-columns-repeated="17"/>
          <table:table-cell table:style-name="ce123" table:number-columns-repeated="4"/>
          <table:table-cell table:number-columns-repeated="8"/>
        </table:table-row>
        <table:table-row table:style-name="ro110">
          <table:table-cell table:style-name="ce226" office:value-type="string" calcext:value-type="string" table:number-columns-spanned="2" table:number-rows-spanned="1">
            <office:annotation draw:style-name="gr24" draw:text-style-name="P2" svg:width="7.982cm" svg:height="2.751cm" svg:x="5.381cm" svg:y="4.657cm" draw:caption-point-x="2.029cm" draw:caption-point-y="-0.837cm">
              <dc:date>2021-02-12T00:00:00</dc:date>
              <text:p text:style-name="P1"><text:span text:style-name="T1">======</text:span></text:p>
              <text:p text:style-name="P1"><text:span text:style-name="T1">ID#AAAAH1AC7ms</text:span></text:p>
              <text:p text:style-name="P1"><text:span text:style-name="T1">Martin Brungard <text:s text:c="3"/>(2021-02-12 10:36:59)</text:span></text:p>
              <text:p text:style-name="P1"><text:span text:style-name="T1">This water profile is entered on the Water Report Input sheet.</text:span></text:p>
            </office:annotation>
            <text:p>Existing Water Profile</text:p>
          </table:table-cell>
          <table:covered-table-cell table:style-name="ce19"/>
          <table:table-cell table:style-name="ce269" table:formula="of:=[$'1. Water Report Input'.$B$6]" office:value-type="float" office:value="0" calcext:value-type="float">
            <text:p>0</text:p>
          </table:table-cell>
          <table:table-cell table:style-name="ce269" table:formula="of:=[$'1. Water Report Input'.$B$7]" office:value-type="float" office:value="0" calcext:value-type="float">
            <text:p>0</text:p>
          </table:table-cell>
          <table:table-cell table:style-name="ce269" table:formula="of:=[$'1. Water Report Input'.$B$8]" office:value-type="float" office:value="0" calcext:value-type="float">
            <text:p>0</text:p>
          </table:table-cell>
          <table:table-cell table:style-name="ce269" table:formula="of:=[$'1. Water Report Input'.$C$8]" office:value-type="float" office:value="0" calcext:value-type="float">
            <text:p>0</text:p>
          </table:table-cell>
          <table:table-cell table:style-name="ce269" table:formula="of:=[$'1. Water Report Input'.$C$9]" office:value-type="float" office:value="0" calcext:value-type="float">
            <text:p>0</text:p>
          </table:table-cell>
          <table:table-cell table:style-name="ce269" table:formula="of:=[$'1. Water Report Input'.$B$15]*61/50" office:value-type="float" office:value="0" calcext:value-type="float">
            <office:annotation draw:style-name="gr46" draw:text-style-name="P2" svg:width="6.716cm" svg:height="3.756cm" svg:x="18.909cm" svg:y="4.155cm" draw:caption-point-x="-0.407cm" draw:caption-point-y="-0.335cm">
              <dc:date>2021-02-12T00:00:00</dc:date>
              <text:p text:style-name="P1"><text:span text:style-name="T1">======</text:span></text:p>
              <text:p text:style-name="P1"><text:span text:style-name="T1">ID#AAAAH1AC7l0</text:span></text:p>
              <text:p text:style-name="P1"><text:span text:style-name="T1">martin.brungard <text:s text:c="3"/>(2021-02-12 10:36:59)</text:span></text:p>
              <text:p text:style-name="P1"><text:span text:style-name="T1">The Bicarbonate concentration shown here includes the contribution of Carbonate. <text:s/>Therefore, this value may differ somewhat from the Bicarbonate concentration that was originally input on the Water Report Input sheet.</text:span></text:p>
            </office:annotation>
            <text:p>0</text:p>
          </table:table-cell>
          <table:table-cell table:style-name="ce320" office:value-type="string" calcext:value-type="string" table:number-columns-spanned="3" table:number-rows-spanned="1">
            <text:p>Amber: 7 to 17 SRM</text:p>
          </table:table-cell>
          <table:covered-table-cell table:style-name="ce22"/>
          <table:covered-table-cell table:style-name="ce28"/>
          <table:table-cell table:style-name="ce362" table:number-columns-repeated="3"/>
          <table:table-cell table:style-name="ce248" table:number-columns-repeated="2"/>
          <table:table-cell table:style-name="ce123" table:number-columns-repeated="3"/>
          <table:table-cell table:style-name="ce96" office:value-type="float" office:value="3" calcext:value-type="float">
            <text:p>3</text:p>
          </table:table-cell>
          <table:table-cell table:style-name="ce108" office:value-type="string" calcext:value-type="string">
            <text:p>M</text:p>
          </table:table-cell>
          <table:table-cell table:style-name="ce122" table:formula="of:=IF([.AF11]=9;(N([.B29])/[.V14])*(-182.85/0.8254);-(N([.B29])/[.V14])*N([.D29])*[.V49]*61)" office:value-type="float" office:value="-0" calcext:value-type="float">
            <text:p>0.0</text:p>
          </table:table-cell>
          <table:table-cell table:style-name="ce122" table:formula="of:=IF([.AF11]=9;(N([.B29])/[.V14])*(88.57);-[.V6]*96/122)" office:value-type="float" office:value="0" calcext:value-type="float">
            <text:p>0.0</text:p>
          </table:table-cell>
          <table:table-cell table:style-name="ce122" table:formula="of:=IF([.AF11]=9;(N([.B29])/[.V14])*(64);-[.V6]*35.5/61)" office:value-type="float" office:value="0" calcext:value-type="float">
            <text:p>0.0</text:p>
          </table:table-cell>
          <table:table-cell table:style-name="ce96" table:number-columns-repeated="3"/>
          <table:table-cell table:style-name="ce96" table:formula="of:=IF(AND([.$AF$11]&gt;=6;[.$AF$11]&lt;=8);&quot;(gram/gal)&quot;;&quot;(mL/gal)&quot;)" office:value-type="string" office:string-value="(mL/gal)" calcext:value-type="string">
            <text:p>(mL/gal)</text:p>
          </table:table-cell>
          <table:table-cell table:style-name="ce96" table:number-columns-repeated="3"/>
          <table:table-cell table:style-name="ce108"/>
          <table:table-cell table:style-name="ce122" table:number-columns-repeated="3"/>
          <table:table-cell table:style-name="ce96" table:number-columns-repeated="17"/>
          <table:table-cell table:style-name="ce123" table:number-columns-repeated="4"/>
          <table:table-cell table:number-columns-repeated="8"/>
        </table:table-row>
        <table:table-row table:style-name="ro110">
          <table:table-cell table:style-name="ce226" office:value-type="string" calcext:value-type="string" table:number-columns-spanned="2" table:number-rows-spanned="1">
            <office:annotation draw:style-name="gr24" draw:text-style-name="P2" svg:width="7.982cm" svg:height="2.751cm" svg:x="5.381cm" svg:y="5.239cm" draw:caption-point-x="2.029cm" draw:caption-point-y="-0.837cm">
              <dc:date>2021-02-12T00:00:00</dc:date>
              <text:p text:style-name="P1"><text:span text:style-name="T1">======</text:span></text:p>
              <text:p text:style-name="P1"><text:span text:style-name="T1">ID#AAAAH1AC7pE</text:span></text:p>
              <text:p text:style-name="P1"><text:span text:style-name="T1">Martin Brungard <text:s text:c="3"/>(2021-02-12 10:36:59)</text:span></text:p>
              <text:p text:style-name="P1"><text:span text:style-name="T1">Water used to dilute the Existing water profile. Select below.</text:span></text:p>
            </office:annotation>
            <text:p>Dilution Water Profile</text:p>
          </table:table-cell>
          <table:covered-table-cell table:style-name="ce19"/>
          <table:table-cell table:style-name="ce270" table:number-columns-repeated="5"/>
          <table:table-cell table:style-name="ce304"/>
          <table:table-cell table:style-name="ce321" office:value-type="string" calcext:value-type="string" table:number-columns-spanned="3" table:number-rows-spanned="1">
            <text:p>Brown: 18 to 30 SRM</text:p>
          </table:table-cell>
          <table:covered-table-cell table:style-name="ce22"/>
          <table:covered-table-cell table:style-name="ce28"/>
          <table:table-cell table:style-name="ce362" table:number-columns-repeated="3"/>
          <table:table-cell table:style-name="ce248" table:number-columns-repeated="2"/>
          <table:table-cell table:style-name="ce123" table:number-columns-repeated="3"/>
          <table:table-cell table:style-name="ce96" office:value-type="float" office:value="4" calcext:value-type="float">
            <text:p>4</text:p>
          </table:table-cell>
          <table:table-cell table:style-name="ce109" office:value-type="string" calcext:value-type="string">
            <text:p>Solid</text:p>
          </table:table-cell>
          <table:table-cell table:style-name="ce122" table:formula="of:=IF([.AF11]=9;(N([.B29])/[.V14])*(-182.85/0.8254);-((N([.B29])*1000/[.V14])*61*[.V49])/[.Y35])" office:value-type="float" office:value="-0" calcext:value-type="float">
            <text:p>0.0</text:p>
          </table:table-cell>
          <table:table-cell table:style-name="ce96" table:formula="of:=IF([.AF11]=9;(N([.B29])/[.V14])*(88.57);0)" office:value-type="float" office:value="0" calcext:value-type="float">
            <text:p>0</text:p>
          </table:table-cell>
          <table:table-cell table:style-name="ce96" table:formula="of:=IF([.AF11]=9;(N([.B29])/[.V14])*(64);0)" office:value-type="float" office:value="0" calcext:value-type="float">
            <text:p>0</text:p>
          </table:table-cell>
          <table:table-cell table:style-name="ce96" table:number-columns-repeated="3"/>
          <table:table-cell table:style-name="ce96" table:formula="of:=IF(AND([.$AF$11]&gt;=6;[.$AF$11]&lt;=8);&quot;(gram/L)&quot;;&quot;(mL/L)&quot;)" office:value-type="string" office:string-value="(mL/L)" calcext:value-type="string">
            <text:p>(mL/L)</text:p>
          </table:table-cell>
          <table:table-cell table:style-name="ce96" table:number-columns-repeated="3"/>
          <table:table-cell table:style-name="ce109"/>
          <table:table-cell table:style-name="ce122"/>
          <table:table-cell table:style-name="ce96" table:number-columns-repeated="19"/>
          <table:table-cell table:style-name="ce123" table:number-columns-repeated="4"/>
          <table:table-cell table:number-columns-repeated="8"/>
        </table:table-row>
        <table:table-row table:style-name="ro110">
          <table:table-cell table:style-name="ce729" table:content-validation-name="val9" office:value-type="string" calcext:value-type="string" table:number-columns-spanned="2" table:number-rows-spanned="1">
            <office:annotation draw:style-name="gr24" draw:text-style-name="P2" svg:width="7.982cm" svg:height="2.751cm" svg:x="5.381cm" svg:y="5.821cm" draw:caption-point-x="2.029cm" draw:caption-point-y="-0.837cm">
              <dc:date>2021-02-12T00:00:00</dc:date>
              <text:p text:style-name="P1"><text:span text:style-name="T1">======</text:span></text:p>
              <text:p text:style-name="P1"><text:span text:style-name="T1">ID#AAAAH1AC7oY</text:span></text:p>
              <text:p text:style-name="P1"><text:span text:style-name="T1">Martin Brungard <text:s text:c="3"/>(2021-02-12 10:36:59)</text:span></text:p>
              <text:p text:style-name="P1"><text:span text:style-name="T1">To change the names or concentrations of your Diluted water profiles, scroll down this page to the table below and alter the concentrations there.</text:span></text:p>
            </office:annotation>
            <text:p>RO Water</text:p>
          </table:table-cell>
          <table:covered-table-cell table:style-name="ce19"/>
          <table:table-cell table:style-name="ce271" table:formula="of:=VLOOKUP([.$AG$10];dilution;3;0)" office:value-type="float" office:value="1" calcext:value-type="float">
            <text:p>1</text:p>
          </table:table-cell>
          <table:table-cell table:style-name="ce271" table:formula="of:=VLOOKUP([.$AG$10];dilution;4;0)" office:value-type="float" office:value="0" calcext:value-type="float">
            <text:p>0</text:p>
          </table:table-cell>
          <table:table-cell table:style-name="ce271" table:formula="of:=VLOOKUP([.$AG$10];dilution;5;0)" office:value-type="float" office:value="8" calcext:value-type="float">
            <text:p>8</text:p>
          </table:table-cell>
          <table:table-cell table:style-name="ce271" table:formula="of:=VLOOKUP([.$AG$10];dilution;6;0)" office:value-type="float" office:value="1" calcext:value-type="float">
            <text:p>1</text:p>
          </table:table-cell>
          <table:table-cell table:style-name="ce271" table:formula="of:=VLOOKUP([.$AG$10];dilution;7;0)" office:value-type="float" office:value="4" calcext:value-type="float">
            <text:p>4</text:p>
          </table:table-cell>
          <table:table-cell table:style-name="ce271" table:formula="of:=VLOOKUP([.$AG$10];dilution;8;0)" office:value-type="float" office:value="16" calcext:value-type="float">
            <text:p>16</text:p>
          </table:table-cell>
          <table:table-cell table:style-name="ce322" office:value-type="string" calcext:value-type="string" table:number-columns-spanned="3" table:number-rows-spanned="1">
            <text:p>Black: over 31 SRM</text:p>
          </table:table-cell>
          <table:covered-table-cell table:style-name="ce20"/>
          <table:covered-table-cell table:style-name="ce29"/>
          <table:table-cell table:style-name="ce362" table:number-columns-repeated="3"/>
          <table:table-cell table:style-name="ce248" table:number-columns-repeated="2"/>
          <table:table-cell table:style-name="ce123" table:number-columns-repeated="3"/>
          <table:table-cell table:style-name="ce96"/>
          <table:table-cell table:style-name="ce130" table:formula="of:=VLOOKUP([.$AF$12];strengthtable;2;0)" office:value-type="string" office:string-value="%" calcext:value-type="string">
            <text:p>%</text:p>
          </table:table-cell>
          <table:table-cell table:style-name="ce132" table:formula="of:=(([.H6]*(50/61)*(1+(2*10^-2.33)))-(([.$C$6]*0.7143)+([.$D$6]*0.5879)))" office:value-type="float" office:value="0" calcext:value-type="float">
            <text:p>0</text:p>
          </table:table-cell>
          <table:table-cell table:style-name="ce96" table:number-columns-repeated="9"/>
          <table:table-cell table:style-name="ce130"/>
          <table:table-cell table:style-name="ce96" table:number-columns-repeated="20"/>
          <table:table-cell table:style-name="ce123" table:number-columns-repeated="4"/>
          <table:table-cell table:number-columns-repeated="8"/>
        </table:table-row>
        <table:table-row table:style-name="ro110">
          <table:table-cell table:style-name="ce227" office:value-type="string" calcext:value-type="string">
            <office:annotation draw:style-name="gr47" draw:text-style-name="P2" svg:width="7.982cm" svg:height="6.588cm" svg:x="5.381cm" svg:y="6.403cm" draw:caption-point-x="-0.407cm" draw:caption-point-y="-0.837cm">
              <dc:date>2021-02-12T00:00:00</dc:date>
              <text:p text:style-name="P1"><text:span text:style-name="T1">======</text:span></text:p>
              <text:p text:style-name="P1"><text:span text:style-name="T1">ID#AAAAH1AC7no</text:span></text:p>
              <text:p text:style-name="P1"><text:span text:style-name="T1">Martin Brungard <text:s text:c="3"/>(2021-02-12 10:36:59)</text:span></text:p>
              <text:p text:style-name="P1"><text:span text:style-name="T1">When the Existing Water's ion concentrations are too high for Desired Water Profile, select the type of dilution water you are using (RO or Distilled) and increase the dilution percentage until the excessive ion concentrations are sufficiently reduced. <text:s/></text:span></text:p>
              <text:p text:style-name="P1"><text:span text:style-name="T1"/></text:p>
              <text:p text:style-name="P1"><text:span text:style-name="T1">Enter values between 0 and 100.</text:span></text:p>
              <text:p text:style-name="P1"><text:span text:style-name="T1"/></text:p>
              <text:p text:style-name="P1"><text:span text:style-name="T1">Zero dilution means that no Distilled or RO water is mixed with the existing water and 100 percent dilution means the water is all Distilled or RO water.</text:span></text:p>
            </office:annotation>
            <text:p>Percent Dilution Water</text:p>
          </table:table-cell>
          <table:table-cell table:style-name="ce249" office:value-type="float" office:value="0" calcext:value-type="float">
            <office:annotation draw:style-name="gr24" draw:text-style-name="P2" svg:width="7.394cm" svg:height="2.751cm" svg:x="7.817cm" svg:y="6.403cm" draw:caption-point-x="-0.407cm" draw:caption-point-y="-0.837cm">
              <dc:date>2021-02-12T00:00:00</dc:date>
              <text:p text:style-name="P1"><text:span text:style-name="T1">======</text:span></text:p>
              <text:p text:style-name="P1"><text:span text:style-name="T1">ID#AAAAH1AC7j8</text:span></text:p>
              <text:p text:style-name="P1"><text:span text:style-name="T1">Martin Brungard <text:s text:c="3"/>(2021-02-12 10:36:59)</text:span></text:p>
              <text:p text:style-name="P1"><text:span text:style-name="T1">Enter values between 0 and 100</text:span></text:p>
            </office:annotation>
            <text:p>0</text:p>
          </table:table-cell>
          <table:table-cell table:style-name="ce268" table:formula="of:=(N([.B9])/100)*[.W14]" office:value-type="float" office:value="0" calcext:value-type="float">
            <text:p>0</text:p>
          </table:table-cell>
          <table:table-cell table:style-name="ce289" table:formula="of:=[.X14]" office:value-type="string" office:string-value="oz/gal" calcext:value-type="string">
            <office:annotation draw:style-name="gr24" draw:text-style-name="P2" svg:width="7.395cm" svg:height="2.751cm" svg:x="11.514cm" svg:y="6.403cm" draw:caption-point-x="-0.407cm" draw:caption-point-y="-0.837cm">
              <dc:date>2021-02-12T00:00:00</dc:date>
              <text:p text:style-name="P1"><text:span text:style-name="T1">======</text:span></text:p>
              <text:p text:style-name="P1"><text:span text:style-name="T1">ID#AAAAH1AC7js</text:span></text:p>
              <text:p text:style-name="P1"><text:span text:style-name="T1">martin.brungard <text:s text:c="3"/>(2021-02-12 10:36:59)</text:span></text:p>
              <text:p text:style-name="P1"><text:span text:style-name="T1">Quantity of dilution water used to make the diluted volume of water</text:span></text:p>
            </office:annotation>
            <text:p>oz/gal</text:p>
          </table:table-cell>
          <table:table-cell table:style-name="ce268" table:formula="of:=(N([.B9])/100)*[.Y14]" office:value-type="float" office:value="0" calcext:value-type="float">
            <text:p>0</text:p>
          </table:table-cell>
          <table:table-cell table:style-name="ce289" table:formula="of:=[.Z14]" office:value-type="string" office:string-value="pt/gal" calcext:value-type="string">
            <office:annotation draw:style-name="gr24" draw:text-style-name="P2" svg:width="7.056cm" svg:height="2.751cm" svg:x="15.211cm" svg:y="6.403cm" draw:caption-point-x="-0.407cm" draw:caption-point-y="-0.837cm">
              <dc:date>2021-02-12T00:00:00</dc:date>
              <text:p text:style-name="P1"><text:span text:style-name="T1">======</text:span></text:p>
              <text:p text:style-name="P1"><text:span text:style-name="T1">ID#AAAAH1AC7iw</text:span></text:p>
              <text:p text:style-name="P1"><text:span text:style-name="T1">martin.brungard <text:s text:c="3"/>(2021-02-12 10:36:59)</text:span></text:p>
              <text:p text:style-name="P1"><text:span text:style-name="T1">Quantity of dilution water used to make the diluted volume of water</text:span></text:p>
            </office:annotation>
            <text:p>pt/gal</text:p>
          </table:table-cell>
          <table:table-cell table:style-name="ce303" office:value-type="string" calcext:value-type="string">
            <text:p>&lt; These conversions are provided for your convenience</text:p>
          </table:table-cell>
          <table:table-cell table:style-name="ce305"/>
          <table:table-cell table:style-name="ce323" table:number-columns-repeated="2"/>
          <table:table-cell table:style-name="ce352"/>
          <table:table-cell table:style-name="ce362" table:number-columns-repeated="3"/>
          <table:table-cell table:style-name="ce387" table:number-columns-spanned="2" table:number-rows-spanned="2"/>
          <table:covered-table-cell/>
          <table:table-cell table:style-name="ce123" table:number-columns-repeated="3"/>
          <table:table-cell table:style-name="ce96" table:number-columns-repeated="33"/>
          <table:table-cell table:style-name="ce123" table:number-columns-repeated="4"/>
          <table:table-cell table:number-columns-repeated="8"/>
        </table:table-row>
        <table:table-row table:style-name="ro110">
          <table:table-cell table:style-name="ce226" office:value-type="string" calcext:value-type="string" table:number-columns-spanned="2" table:number-rows-spanned="1">
            <office:annotation draw:style-name="gr44" draw:text-style-name="P2" svg:width="7.982cm" svg:height="2.937cm" svg:x="5.381cm" svg:y="6.985cm" draw:caption-point-x="2.029cm" draw:caption-point-y="-0.837cm">
              <dc:date>2021-02-12T00:00:00</dc:date>
              <text:p text:style-name="P1"><text:span text:style-name="T1">======</text:span></text:p>
              <text:p text:style-name="P1"><text:span text:style-name="T1">ID#AAAAH1AC7mM</text:span></text:p>
              <text:p text:style-name="P1"><text:span text:style-name="T1">martin.brungard <text:s text:c="3"/>(2021-02-12 10:36:59)</text:span></text:p>
              <text:p text:style-name="P1"><text:span text:style-name="T1">This is the resulting profile of the Existing Water diluted with the proposed percentage of Dilution Water.</text:span></text:p>
            </office:annotation>
            <text:p>Diluted Water Profile</text:p>
          </table:table-cell>
          <table:covered-table-cell table:style-name="ce19"/>
          <table:table-cell table:style-name="ce268" table:formula="of:=([.C8]*(N([.$B$9])/100)+([.C6]*(1-(N([.$B$9])/100))))" office:value-type="float" office:value="0" calcext:value-type="float">
            <text:p>0</text:p>
          </table:table-cell>
          <table:table-cell table:style-name="ce268" table:formula="of:=([.D8]*(N([.$B$9])/100)+([.D6]*(1-(N([.$B$9])/100))))" office:value-type="float" office:value="0" calcext:value-type="float">
            <text:p>0</text:p>
          </table:table-cell>
          <table:table-cell table:style-name="ce268" table:formula="of:=([.E8]*(N([.$B$9])/100)+([.E6]*(1-(N([.$B$9])/100))))" office:value-type="float" office:value="0" calcext:value-type="float">
            <text:p>0</text:p>
          </table:table-cell>
          <table:table-cell table:style-name="ce268" table:formula="of:=([.F8]*(N([.$B$9])/100)+([.F6]*(1-(N([.$B$9])/100))))" office:value-type="float" office:value="0" calcext:value-type="float">
            <text:p>0</text:p>
          </table:table-cell>
          <table:table-cell table:style-name="ce268" table:formula="of:=([.G8]*(N([.$B$9])/100)+([.G6]*(1-(N([.$B$9])/100))))" office:value-type="float" office:value="0" calcext:value-type="float">
            <text:p>0</text:p>
          </table:table-cell>
          <table:table-cell table:style-name="ce268" table:formula="of:=([.H8]*(N([.$B$9])/100)+([.H6]*(1-(N([.$B$9])/100))))" office:value-type="float" office:value="0" calcext:value-type="float">
            <text:p>0</text:p>
          </table:table-cell>
          <table:table-cell table:style-name="ce324"/>
          <table:table-cell table:style-name="ce323"/>
          <table:table-cell table:style-name="ce353"/>
          <table:table-cell table:style-name="ce362" table:number-columns-repeated="3"/>
          <table:covered-table-cell table:number-columns-repeated="2"/>
          <table:table-cell table:style-name="ce123" table:number-columns-repeated="3"/>
          <table:table-cell table:style-name="ce96" office:value-type="float" office:value="1" calcext:value-type="float">
            <text:p>1</text:p>
          </table:table-cell>
          <table:table-cell table:style-name="ce96" office:value-type="string" calcext:value-type="string">
            <text:p>Gallons</text:p>
          </table:table-cell>
          <table:table-cell table:style-name="ce96" office:value-type="float" office:value="3.785" calcext:value-type="float">
            <text:p>3.785</text:p>
          </table:table-cell>
          <table:table-cell table:style-name="ce96" office:value-type="float" office:value="128" calcext:value-type="float">
            <text:p>128</text:p>
          </table:table-cell>
          <table:table-cell table:style-name="ce96" office:value-type="string" calcext:value-type="string">
            <text:p>oz/gal</text:p>
          </table:table-cell>
          <table:table-cell table:style-name="ce96" office:value-type="float" office:value="8" calcext:value-type="float">
            <text:p>8</text:p>
          </table:table-cell>
          <table:table-cell table:style-name="ce96" office:value-type="string" calcext:value-type="string">
            <text:p>pt/gal</text:p>
          </table:table-cell>
          <table:table-cell table:style-name="ce96" office:value-type="string" calcext:value-type="string">
            <text:p>Addition <text:s text:c="2"/>(gram/gal)</text:p>
          </table:table-cell>
          <table:table-cell table:style-name="ce96" table:formula="of:=[.AB6]" office:value-type="string" office:string-value="(mL/gal)" calcext:value-type="string">
            <text:p>(mL/gal)</text:p>
          </table:table-cell>
          <table:table-cell table:style-name="ce96" office:value-type="string" calcext:value-type="string">
            <text:p>Water Volume <text:s text:c="2"/>(gal)</text:p>
          </table:table-cell>
          <table:table-cell table:style-name="ce96" table:number-columns-repeated="2"/>
          <table:table-cell table:style-name="ce96" table:number-matrix-columns-spanned="1" table:number-matrix-rows-spanned="1" table:formula="of:=INDEX([.$A$38:.$A$103]; MATCH([.$A$5];[.$B$38:.$B$103];0))" office:value-type="float" office:value="52" calcext:value-type="float">
            <text:p>52</text:p>
          </table:table-cell>
          <table:table-cell table:style-name="ce96" table:number-matrix-columns-spanned="1" table:number-matrix-rows-spanned="1" table:formula="of:=INDEX([.$A$108:.$A$109]; MATCH([.$A$8];[.$B$108:.$B$109];0))" office:value-type="float" office:value="2" calcext:value-type="float">
            <text:p>2</text:p>
          </table:table-cell>
          <table:table-cell table:style-name="ce96" table:number-columns-repeated="19"/>
          <table:table-cell table:style-name="ce123" table:number-columns-repeated="4"/>
          <table:table-cell table:number-columns-repeated="8"/>
        </table:table-row>
        <table:table-row table:style-name="ro110">
          <table:table-cell table:style-name="ce228" office:value-type="string" calcext:value-type="string" table:number-columns-spanned="2" table:number-rows-spanned="1">
            <office:annotation draw:style-name="gr45" draw:text-style-name="P2" svg:width="7.982cm" svg:height="6.521cm" svg:x="5.381cm" svg:y="7.019cm" draw:caption-point-x="2.029cm" draw:caption-point-y="-0.289cm">
              <dc:date>2021-02-12T00:00:00</dc:date>
              <text:p text:style-name="P1"><text:span text:style-name="T1">======</text:span></text:p>
              <text:p text:style-name="P1"><text:span text:style-name="T1">ID#AAAAH1AC7qU</text:span></text:p>
              <text:p text:style-name="P1"><text:span text:style-name="T1">Martin Brungard <text:s text:c="3"/>(2021-02-12 10:36:59)</text:span></text:p>
              <text:p text:style-name="P1"><text:span text:style-name="T1">If any Target Water Adjustments are negative, the cell shading may be RED. <text:s/>Dilution of the existing water may be necessary to reduce that ion concentration to create the Desired Water Profile. <text:s/>If the adjustment is less than about 20 ppm, it may be feasible to ignore the need to dilute to correct the value(s). The cells do not turn RED until the needed adjustment is greater than -20 ppm.</text:span></text:p>
              <text:p text:style-name="P1"><text:span text:style-name="T1"/></text:p>
              <text:p text:style-name="P1"><text:span text:style-name="T1">Since excess bicarbonate can be corrected with acid addition, the bicarbonate cell does NOT turn RED to signal the need for dilution.</text:span></text:p>
            </office:annotation>
            <text:p>Target Finished Water Adjustment (ppm)</text:p>
          </table:table-cell>
          <table:covered-table-cell table:style-name="ce28"/>
          <table:table-cell table:style-name="ce272" table:formula="of:=[.C5]-[.C10]" office:value-type="float" office:value="50" calcext:value-type="float">
            <text:p>50</text:p>
          </table:table-cell>
          <table:table-cell table:style-name="ce272" table:formula="of:=[.D5]-[.D10]" office:value-type="float" office:value="10" calcext:value-type="float">
            <text:p>10</text:p>
          </table:table-cell>
          <table:table-cell table:style-name="ce272" table:formula="of:=[.E5]-[.E10]" office:value-type="float" office:value="5" calcext:value-type="float">
            <text:p>5</text:p>
          </table:table-cell>
          <table:table-cell table:style-name="ce272" table:formula="of:=[.F5]-[.F10]" office:value-type="float" office:value="105" calcext:value-type="float">
            <text:p>105</text:p>
          </table:table-cell>
          <table:table-cell table:style-name="ce272" table:formula="of:=[.G5]-[.G10]" office:value-type="float" office:value="45" calcext:value-type="float">
            <text:p>45</text:p>
          </table:table-cell>
          <table:table-cell table:style-name="ce272" table:formula="of:=[.H5]-[.H10]" office:value-type="float" office:value="0" calcext:value-type="float">
            <text:p>0</text:p>
          </table:table-cell>
          <table:table-cell table:style-name="ce324"/>
          <table:table-cell table:style-name="ce323"/>
          <table:table-cell table:style-name="ce353"/>
          <table:table-cell table:style-name="ce362" table:number-columns-repeated="3"/>
          <table:table-cell table:style-name="ce388" table:number-columns-spanned="1" table:number-rows-spanned="2"/>
          <table:table-cell table:style-name="ce396" table:number-columns-spanned="1" table:number-rows-spanned="2"/>
          <table:table-cell table:style-name="ce123" table:number-columns-repeated="3"/>
          <table:table-cell table:style-name="ce96" office:value-type="float" office:value="2" calcext:value-type="float">
            <text:p>2</text:p>
          </table:table-cell>
          <table:table-cell table:style-name="ce96" office:value-type="string" calcext:value-type="string">
            <text:p>Liters</text:p>
          </table:table-cell>
          <table:table-cell table:style-name="ce96" office:value-type="float" office:value="1" calcext:value-type="float">
            <text:p>1</text:p>
          </table:table-cell>
          <table:table-cell table:style-name="ce96" office:value-type="float" office:value="1000" calcext:value-type="float">
            <text:p>1000</text:p>
          </table:table-cell>
          <table:table-cell table:style-name="ce96" office:value-type="string" calcext:value-type="string">
            <text:p>mL/L</text:p>
          </table:table-cell>
          <table:table-cell table:style-name="ce96" office:value-type="float" office:value="100" calcext:value-type="float">
            <text:p>100</text:p>
          </table:table-cell>
          <table:table-cell table:style-name="ce96" office:value-type="string" calcext:value-type="string">
            <text:p>L/HL</text:p>
          </table:table-cell>
          <table:table-cell table:style-name="ce96" office:value-type="string" calcext:value-type="string">
            <text:p>Addition <text:s text:c="2"/>(gram/L)</text:p>
          </table:table-cell>
          <table:table-cell table:style-name="ce96" table:formula="of:=[.AB7]" office:value-type="string" office:string-value="(mL/L)" calcext:value-type="string">
            <text:p>(mL/L)</text:p>
          </table:table-cell>
          <table:table-cell table:style-name="ce96" office:value-type="string" calcext:value-type="string">
            <text:p>Water Volume <text:s text:c="2"/>(L)</text:p>
          </table:table-cell>
          <table:table-cell table:style-name="ce96" table:number-columns-repeated="2"/>
          <table:table-cell table:style-name="ce96" table:number-matrix-columns-spanned="1" table:number-matrix-rows-spanned="1" table:formula="of:=INDEX([.$T$26:.$T$34]; MATCH([.$A$29];[.$U$26:.$U$34];0))" office:value-type="float" office:value="3" calcext:value-type="float">
            <text:p>3</text:p>
          </table:table-cell>
          <table:table-cell table:style-name="ce96" table:number-columns-repeated="20"/>
          <table:table-cell table:style-name="ce123" table:number-columns-repeated="4"/>
          <table:table-cell table:number-columns-repeated="8"/>
        </table:table-row>
        <table:table-row table:style-name="ro110">
          <table:table-cell table:style-name="ce229" office:value-type="string" calcext:value-type="string" table:number-columns-spanned="2" table:number-rows-spanned="1">
            <office:annotation draw:style-name="gr48" draw:text-style-name="P2" svg:width="7.982cm" svg:height="3.889cm" svg:x="5.381cm" svg:y="8.149cm" draw:caption-point-x="2.029cm" draw:caption-point-y="-0.837cm">
              <dc:date>2021-02-12T00:00:00</dc:date>
              <text:p text:style-name="P1"><text:span text:style-name="T1">======</text:span></text:p>
              <text:p text:style-name="P1"><text:span text:style-name="T1">ID#AAAAH1AC7lg</text:span></text:p>
              <text:p text:style-name="P1"><text:span text:style-name="T1">Martin Brungard <text:s text:c="3"/>(2021-02-12 10:36:59)</text:span></text:p>
              <text:p text:style-name="P1"><text:span text:style-name="T1">Adjust mineral additions (in Table below) until Actual Finished Water Adjustments are near the Target Finished Water Adjustment values. <text:s/>The cell color will change to GREEN when the Actual and Target values are within 5 ppm to provide the brewer with a quick visual indicator.</text:span></text:p>
            </office:annotation>
            <text:p>Actual Finished Water Adjustment (ppm)</text:p>
          </table:table-cell>
          <table:covered-table-cell/>
          <table:table-cell table:style-name="ce272" table:formula="of:=[.AB41]" office:value-type="float" office:value="0" calcext:value-type="float">
            <text:p>0</text:p>
          </table:table-cell>
          <table:table-cell table:style-name="ce272" table:formula="of:=[.AB42]" office:value-type="float" office:value="0" calcext:value-type="float">
            <text:p>0</text:p>
          </table:table-cell>
          <table:table-cell table:style-name="ce272" table:formula="of:=[.AB43]" office:value-type="float" office:value="0" calcext:value-type="float">
            <office:annotation draw:style-name="gr48" draw:text-style-name="P2" svg:width="7.225cm" svg:height="3.889cm" svg:x="13.363cm" svg:y="8.149cm" draw:caption-point-x="-0.407cm" draw:caption-point-y="-0.837cm">
              <dc:date>2021-02-12T00:00:00</dc:date>
              <text:p text:style-name="P1"><text:span text:style-name="T1">======</text:span></text:p>
              <text:p text:style-name="P1"><text:span text:style-name="T1">ID#AAAAH1AC7mI</text:span></text:p>
              <text:p text:style-name="P1"><text:span text:style-name="T1">Martin.Brungard <text:s text:c="3"/>(2021-02-12 10:36:59)</text:span></text:p>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0</text:p>
          </table:table-cell>
          <table:table-cell table:style-name="ce272" table:formula="of:=[.AB44]" office:value-type="float" office:value="0" calcext:value-type="float">
            <office:annotation draw:style-name="gr49" draw:text-style-name="P2" svg:width="7.056cm" svg:height="4.151cm" svg:x="15.211cm" svg:y="8.018cm" draw:caption-point-x="-0.407cm" draw:caption-point-y="-0.706cm">
              <dc:date>2021-02-12T00:00:00</dc:date>
              <text:p text:style-name="P1"><text:span text:style-name="T1">======</text:span></text:p>
              <text:p text:style-name="P1"><text:span text:style-name="T1">ID#AAAAH1AC7nA</text:span></text:p>
              <text:p text:style-name="P1"><text:span text:style-name="T1">Martin.Brungard <text:s text:c="3"/>(2021-02-12 10:36:59)</text:span></text:p>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0</text:p>
          </table:table-cell>
          <table:table-cell table:style-name="ce272" table:formula="of:=[.AB45]" office:value-type="float" office:value="0" calcext:value-type="float">
            <office:annotation draw:style-name="gr49" draw:text-style-name="P2" svg:width="6.886cm" svg:height="4.151cm" svg:x="17.06cm" svg:y="8.018cm" draw:caption-point-x="-0.407cm" draw:caption-point-y="-0.706cm">
              <dc:date>2021-02-12T00:00:00</dc:date>
              <text:p text:style-name="P1"><text:span text:style-name="T1">======</text:span></text:p>
              <text:p text:style-name="P1"><text:span text:style-name="T1">ID#AAAAH1AC7ns</text:span></text:p>
              <text:p text:style-name="P1"><text:span text:style-name="T1">Martin.Brungard <text:s text:c="3"/>(2021-02-12 10:36:59)</text:span></text:p>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0</text:p>
          </table:table-cell>
          <table:table-cell table:style-name="ce272" table:formula="of:=[.AB46]" office:value-type="string" office:string-value="" calcext:value-type="error">
            <text:p>Err:522</text:p>
          </table:table-cell>
          <table:table-cell table:style-name="ce324"/>
          <table:table-cell table:style-name="ce323"/>
          <table:table-cell table:style-name="ce353"/>
          <table:table-cell table:style-name="ce248" table:number-columns-repeated="2"/>
          <table:table-cell table:style-name="ce18"/>
          <table:covered-table-cell table:number-columns-repeated="2"/>
          <table:table-cell table:style-name="ce123" table:number-columns-repeated="3"/>
          <table:table-cell table:style-name="ce96" table:number-columns-repeated="12"/>
          <table:table-cell table:style-name="ce96" table:number-matrix-columns-spanned="1" table:number-matrix-rows-spanned="1" table:formula="of:=INDEX([.$T$4:.$T$7]; MATCH([.$E$29];[.$U$4:.$U$7];0))" office:value-type="float" office:value="1" calcext:value-type="float">
            <text:p>1</text:p>
          </table:table-cell>
          <table:table-cell table:style-name="ce96" table:number-columns-repeated="20"/>
          <table:table-cell table:style-name="ce123" table:number-columns-repeated="4"/>
          <table:table-cell table:number-columns-repeated="8"/>
        </table:table-row>
        <table:table-row table:style-name="ro110">
          <table:table-cell table:style-name="ce226" office:value-type="string" calcext:value-type="string" table:number-columns-spanned="2" table:number-rows-spanned="1">
            <office:annotation draw:style-name="gr50" draw:text-style-name="P2" svg:width="7.982cm" svg:height="4.26cm" svg:x="5.381cm" svg:y="8.731cm" draw:caption-point-x="2.029cm" draw:caption-point-y="-0.837cm">
              <dc:date>2021-02-12T00:00:00</dc:date>
              <text:p text:style-name="P1"><text:span text:style-name="T1">======</text:span></text:p>
              <text:p text:style-name="P1"><text:span text:style-name="T1">ID#AAAAH1AC7kU</text:span></text:p>
              <text:p text:style-name="P1"><text:span text:style-name="T1">martin.brungard <text:s text:c="3"/>(2021-02-12 10:36:59)</text:span></text:p>
              <text:p text:style-name="P1"><text:span text:style-name="T1">This is the water profile that results from the mineral additions to the Existing or Diluted Water Profiles for the MASHING water. <text:s/>This is the water profile in the MASH and it may not reflect the final concentrations in the kettle. Upgrade to the Supporter's version to show concentrations in the KETTLE.</text:span></text:p>
            </office:annotation>
            <text:p>Mashing Water Profile</text:p>
          </table:table-cell>
          <table:covered-table-cell table:style-name="ce19"/>
          <table:table-cell table:style-name="ce269" table:formula="of:=[.C10]+[.AB41]" office:value-type="float" office:value="0" calcext:value-type="float">
            <office:annotation draw:style-name="gr51" draw:text-style-name="P2" svg:width="7.394cm" svg:height="7.706cm" svg:x="9.666cm" svg:y="8.172cm" draw:caption-point-x="-0.407cm" draw:caption-point-y="-0.278cm">
              <dc:date>2021-02-12T00:00:00</dc:date>
              <text:p text:style-name="P1"><text:span text:style-name="T1">======</text:span></text:p>
              <text:p text:style-name="P1"><text:span text:style-name="T1">ID#AAAAH1AC7ks</text:span></text:p>
              <text:p text:style-name="P1"><text:span text:style-name="T1">martin.brungard <text:s text:c="3"/>(2021-02-12 10:36:59)</text:span></text:p>
              <text:p text:style-name="P1"><text:span text:style-name="T1">At least 40 ppm calcium is recommended for oxalate (beerstone) reduction to occur in the mash. This cell turns GREEN when the calcium content IN THE MASH is greater than 40 ppm. </text:span></text:p>
              <text:p text:style-name="P1"><text:span text:style-name="T1"/></text:p>
              <text:p text:style-name="P1"><text:span text:style-name="T1">Lager brewers that want to keep their water mineralization low, can boost calcium content in the mash and rely on sparging water addition to dilute the overall calcium content in the kettle. </text:span></text:p>
              <text:p text:style-name="P1"><text:span text:style-name="T1"/></text:p>
              <text:p text:style-name="P1"><text:span text:style-name="T1">The calcium content in the mash does affect the mash pH. More calcium will drive the mash pH lower, although acid addition is a better way to lower mash pH.</text:span></text:p>
            </office:annotation>
            <text:p>0</text:p>
          </table:table-cell>
          <table:table-cell table:style-name="ce269" table:formula="of:=[.D10]+[.AB42]" office:value-type="float" office:value="0" calcext:value-type="float">
            <office:annotation draw:style-name="gr50" draw:text-style-name="P2" svg:width="7.395cm" svg:height="4.26cm" svg:x="11.514cm" svg:y="8.731cm" draw:caption-point-x="-0.407cm" draw:caption-point-y="-0.837cm">
              <dc:date>2021-02-12T00:00:00</dc:date>
              <text:p text:style-name="P1"><text:span text:style-name="T1">======</text:span></text:p>
              <text:p text:style-name="P1"><text:span text:style-name="T1">ID#AAAAH1AC7i0</text:span></text:p>
              <text:p text:style-name="P1"><text:span text:style-name="T1">martin.brungard <text:s text:c="3"/>(2021-02-12 10:36:59)</text:span></text:p>
              <text:p text:style-name="P1"><text:span text:style-name="T1">The magnesium content in the mash does affect the mash pH. More magnesium will drive the mash pH lower, although acid addition is a better way to lower mash pH.</text:span></text:p>
            </office:annotation>
            <text:p>0</text:p>
          </table:table-cell>
          <table:table-cell table:style-name="ce269" table:formula="of:=[.E10]+[.AB43]" office:value-type="float" office:value="0" calcext:value-type="float">
            <office:annotation draw:style-name="gr10" draw:text-style-name="P2" svg:width="7.225cm" svg:height="4.941cm" svg:x="13.363cm" svg:y="8.391cm" draw:caption-point-x="-0.407cm" draw:caption-point-y="-0.497cm">
              <dc:date>2021-02-12T00:00:00</dc:date>
              <text:p text:style-name="P1"><text:span text:style-name="T1">======</text:span></text:p>
              <text:p text:style-name="P1"><text:span text:style-name="T1">ID#AAAAH1AC7iA</text:span></text:p>
              <text:p text:style-name="P1"><text:span text:style-name="T1">martin.brungard <text:s text:c="3"/>(2021-02-12 10:36:59)</text:span></text:p>
              <text:p text:style-name="P1"><text:span text:style-name="T1">There is no need for sodium in the mash. However, Baking Soda is an effective way to add alkalinity to the mash. High sodium content in the mash is OK when using Baking Soda since it will be diluted with the sparging water addition. Although high sodium content in the mash is OK, be sure that the sodium content is acceptably low in the Finished Water Profile.</text:span></text:p>
            </office:annotation>
            <text:p>0</text:p>
          </table:table-cell>
          <table:table-cell table:style-name="ce269" table:formula="of:=[.F10]+[.AB44]" office:value-type="float" office:value="0" calcext:value-type="float">
            <office:annotation draw:style-name="gr50" draw:text-style-name="P2" svg:width="7.056cm" svg:height="4.26cm" svg:x="15.211cm" svg:y="8.731cm" draw:caption-point-x="-0.407cm" draw:caption-point-y="-0.837cm">
              <dc:date>2021-02-12T00:00:00</dc:date>
              <text:p text:style-name="P1"><text:span text:style-name="T1">======</text:span></text:p>
              <text:p text:style-name="P1"><text:span text:style-name="T1">ID#AAAAH1AC7j4</text:span></text:p>
              <text:p text:style-name="P1"><text:span text:style-name="T1">martin.brungard <text:s text:c="3"/>(2021-02-12 10:36:59)</text:span></text:p>
              <text:p text:style-name="P1"><text:span text:style-name="T1">There is no need for sulfate in the mash. Any sulfate level should be acceptable in the mash, as long as the level in the Finished Water Profile is at the desired level.</text:span></text:p>
            </office:annotation>
            <text:p>0</text:p>
          </table:table-cell>
          <table:table-cell table:style-name="ce269" table:formula="of:=N([.G10])+[.AB45]" office:value-type="float" office:value="0" calcext:value-type="float">
            <office:annotation draw:style-name="gr50" draw:text-style-name="P2" svg:width="6.886cm" svg:height="4.26cm" svg:x="17.06cm" svg:y="8.731cm" draw:caption-point-x="-0.407cm" draw:caption-point-y="-0.837cm">
              <dc:date>2021-02-12T00:00:00</dc:date>
              <text:p text:style-name="P1"><text:span text:style-name="T1">======</text:span></text:p>
              <text:p text:style-name="P1"><text:span text:style-name="T1">ID#AAAAH1AC7pY</text:span></text:p>
              <text:p text:style-name="P1"><text:span text:style-name="T1">martin.brungard <text:s text:c="3"/>(2021-02-12 10:36:59)</text:span></text:p>
              <text:p text:style-name="P1"><text:span text:style-name="T1">There is no need for chloride in the mash. Any chloride level should be acceptable in the mash, as long as the level in the Finished Water Profile is at the desired level.</text:span></text:p>
            </office:annotation>
            <text:p>0</text:p>
          </table:table-cell>
          <table:table-cell table:style-name="ce269" table:formula="of:=[.H10]+[.AB46]" office:value-type="string" office:string-value="" calcext:value-type="error">
            <office:annotation draw:style-name="gr12" draw:text-style-name="P2" svg:width="6.716cm" svg:height="5.731cm" svg:x="18.909cm" svg:y="8.578cm" draw:caption-point-x="-0.407cm" draw:caption-point-y="-0.684cm">
              <dc:date>2021-02-12T00:00:00</dc:date>
              <text:p text:style-name="P1"><text:span text:style-name="T1">======</text:span></text:p>
              <text:p text:style-name="P1"><text:span text:style-name="T1">ID#AAAAH1AC7jI</text:span></text:p>
              <text:p text:style-name="P1"><text:span text:style-name="T1">martin.brungard <text:s text:c="3"/>(2021-02-12 10:36:59)</text:span></text:p>
              <text:p text:style-name="P1"><text:span text:style-name="T1">Bicarbonate does not have an ideal range. <text:s/>It is needed only to the extent required to produce an appropriate mash pH.</text:span></text:p>
              <text:p text:style-name="P1"><text:span text:style-name="T1"/></text:p>
              <text:p text:style-name="P1"><text:span text:style-name="T1">The Target Bicarbonate Adjustment (in the Desired Water Profile above) should be considered an initial guess for the proper Bicarbonate content. <text:s/>Adjust the Bicarbonate level as needed to produce an acceptable mash pH.</text:span></text:p>
            </office:annotation>
            <text:p>Err:522</text:p>
          </table:table-cell>
          <table:table-cell table:style-name="ce325"/>
          <table:table-cell table:style-name="ce323"/>
          <table:table-cell table:style-name="ce353"/>
          <table:table-cell table:style-name="ce248" table:number-columns-repeated="2"/>
          <table:table-cell table:style-name="ce18" table:number-columns-repeated="2"/>
          <table:table-cell table:style-name="ce397"/>
          <table:table-cell table:style-name="ce123" table:number-columns-repeated="3"/>
          <table:table-cell table:style-name="ce96" table:number-columns-repeated="33"/>
          <table:table-cell table:style-name="ce123" table:number-columns-repeated="4"/>
          <table:table-cell table:number-columns-repeated="8"/>
        </table:table-row>
        <table:table-row table:style-name="ro110">
          <table:table-cell table:style-name="ce230" table:number-columns-repeated="2"/>
          <table:table-cell table:style-name="ce273" table:number-columns-repeated="6"/>
          <table:table-cell table:style-name="ce326" table:number-columns-repeated="2"/>
          <table:table-cell table:style-name="ce354" table:number-columns-repeated="3"/>
          <table:table-cell table:style-name="ce326"/>
          <table:table-cell table:style-name="ce248"/>
          <table:table-cell table:style-name="ce31"/>
          <table:table-cell table:style-name="ce123" table:number-columns-repeated="3"/>
          <table:table-cell table:style-name="ce129" table:formula="of:=VLOOKUP([$'1. Water Report Input'.$H$7];watervaritable;1;0)" office:value-type="float" office:value="1" calcext:value-type="float">
            <text:p>1.00</text:p>
          </table:table-cell>
          <table:table-cell table:style-name="ce130" table:formula="of:=VLOOKUP([$'1. Water Report Input'.$H$7];watervaritable;2;0)" office:value-type="string" office:string-value="Gallons" calcext:value-type="string">
            <text:p>Gallons</text:p>
          </table:table-cell>
          <table:table-cell table:style-name="ce129" table:formula="of:=VLOOKUP([$'1. Water Report Input'.$H$7];watervaritable;3;0)" office:value-type="float" office:value="3.785" calcext:value-type="float">
            <text:p>3.79</text:p>
          </table:table-cell>
          <table:table-cell table:style-name="ce129" table:formula="of:=VLOOKUP([$'1. Water Report Input'.$H$7];watervaritable;4;0)" office:value-type="float" office:value="128" calcext:value-type="float">
            <text:p>128.00</text:p>
          </table:table-cell>
          <table:table-cell table:style-name="ce130" table:formula="of:=VLOOKUP([$'1. Water Report Input'.$H$7];watervaritable;5;0)" office:value-type="string" office:string-value="oz/gal" calcext:value-type="string">
            <text:p>oz/gal</text:p>
          </table:table-cell>
          <table:table-cell table:style-name="ce129" table:formula="of:=VLOOKUP([$'1. Water Report Input'.$H$7];watervaritable;6;0)" office:value-type="float" office:value="8" calcext:value-type="float">
            <text:p>8.00</text:p>
          </table:table-cell>
          <table:table-cell table:style-name="ce130" table:formula="of:=VLOOKUP([$'1. Water Report Input'.$H$7];watervaritable;7;0)" office:value-type="string" office:string-value="pt/gal" calcext:value-type="string">
            <text:p>pt/gal</text:p>
          </table:table-cell>
          <table:table-cell table:style-name="ce130" table:formula="of:=VLOOKUP([$'1. Water Report Input'.$H$7];watervaritable;8;0)" office:value-type="string" office:string-value="Addition   (gram/gal)" calcext:value-type="string">
            <text:p>Addition <text:s text:c="2"/>(gram/gal)</text:p>
          </table:table-cell>
          <table:table-cell table:style-name="ce130" table:formula="of:=VLOOKUP([$'1. Water Report Input'.$H$7];watervaritable;9;0)" office:value-type="string" office:string-value="(mL/gal)" calcext:value-type="string">
            <text:p>(mL/gal)</text:p>
          </table:table-cell>
          <table:table-cell table:style-name="ce130" table:formula="of:=VLOOKUP([$'1. Water Report Input'.$H$7];watervaritable;10;0)" office:value-type="string" office:string-value="Water Volume   (gal)" calcext:value-type="string">
            <text:p>Water Volume <text:s text:c="2"/>(gal)</text:p>
          </table:table-cell>
          <table:table-cell table:style-name="ce129"/>
          <table:table-cell table:style-name="ce96" table:number-columns-repeated="4"/>
          <table:table-cell table:style-name="ce129"/>
          <table:table-cell table:style-name="ce130"/>
          <table:table-cell table:style-name="ce129" table:number-columns-repeated="2"/>
          <table:table-cell table:style-name="ce130"/>
          <table:table-cell table:style-name="ce129"/>
          <table:table-cell table:style-name="ce130" table:number-columns-repeated="4"/>
          <table:table-cell table:style-name="ce129"/>
          <table:table-cell table:style-name="ce96" table:number-columns-repeated="7"/>
          <table:table-cell table:style-name="ce123" table:number-columns-repeated="4"/>
          <table:table-cell table:number-columns-repeated="8"/>
        </table:table-row>
        <table:table-row table:style-name="ro107">
          <table:table-cell table:style-name="ce231"/>
          <table:table-cell table:style-name="ce250"/>
          <table:table-cell table:style-name="ce274" table:number-columns-repeated="5"/>
          <table:table-cell table:style-name="ce306"/>
          <table:table-cell table:style-name="ce327" office:value-type="string" calcext:value-type="string" table:number-columns-spanned="4" table:number-rows-spanned="1">
            <office:annotation draw:style-name="gr52" draw:text-style-name="P2" svg:width="6.717cm" svg:height="4.074cm" svg:x="20.588cm" svg:y="10.081cm" draw:caption-point-x="4.63cm" draw:caption-point-y="-1.023cm">
              <dc:date>2021-02-12T00:00:00</dc:date>
              <text:p text:style-name="P1"><text:span text:style-name="T1">======</text:span></text:p>
              <text:p text:style-name="P1"><text:span text:style-name="T1">ID#AAAAH1AC7kY</text:span></text:p>
              <text:p text:style-name="P1"><text:span text:style-name="T1">martin.brungard <text:s text:c="3"/>(2021-02-12 10:36:59)</text:span></text:p>
              <text:p text:style-name="P1"><text:span text:style-name="T1">Note that the Total Water Additions may not equal the Total Batch Volume due to losses such as grain absorption, kettle deadspace, tun deadspace, evaporation, etc.</text:span></text:p>
            </office:annotation>
            <text:p>Total Water Additions</text:p>
          </table:table-cell>
          <table:covered-table-cell table:number-columns-repeated="2" table:style-name="ce340"/>
          <table:covered-table-cell table:style-name="ce363"/>
          <table:table-cell table:style-name="ce369" office:value-type="string" calcext:value-type="string" table:number-columns-spanned="2" table:number-rows-spanned="2">
            <office:annotation draw:style-name="gr52" draw:text-style-name="P2" svg:width="6.891cm" svg:height="4.074cm" svg:x="27.305cm" svg:y="10.081cm" draw:caption-point-x="1.272cm" draw:caption-point-y="-1.023cm">
              <dc:date>2021-02-12T00:00:00</dc:date>
              <text:p text:style-name="P1"><text:span text:style-name="T1">======</text:span></text:p>
              <text:p text:style-name="P1"><text:span text:style-name="T1">ID#AAAAH1AC7kI</text:span></text:p>
              <text:p text:style-name="P1"><text:span text:style-name="T1">martin.brungard <text:s text:c="3"/>(2021-02-12 10:36:59)</text:span></text:p>
              <text:p text:style-name="P1"><text:span text:style-name="T1">Enter the intended post boil volume of the batch. <text:s/>This is used to estimate the Beer Color on the Grain Bill Input sheet.</text:span></text:p>
            </office:annotation>
            <text:p>Total Batch Volume</text:p>
          </table:table-cell>
          <table:covered-table-cell table:style-name="ce381"/>
          <table:table-cell table:style-name="ce389" table:number-columns-spanned="1" table:number-rows-spanned="2"/>
          <table:table-cell table:style-name="ce398" table:number-columns-spanned="1" table:number-rows-spanned="2"/>
          <table:table-cell table:style-name="ce123" table:number-columns-repeated="3"/>
          <table:table-cell table:style-name="ce96" table:number-columns-repeated="33"/>
          <table:table-cell table:style-name="ce123" table:number-columns-repeated="4"/>
          <table:table-cell table:number-columns-repeated="8"/>
        </table:table-row>
        <table:table-row table:style-name="ro107">
          <table:table-cell table:style-name="ce232" office:value-type="string" calcext:value-type="string">
            <office:annotation draw:style-name="gr48" draw:text-style-name="P2" svg:width="7.982cm" svg:height="3.889cm" svg:x="5.381cm" svg:y="10.848cm" draw:caption-point-x="-0.407cm" draw:caption-point-y="-1.022cm">
              <dc:date>2021-02-12T00:00:00</dc:date>
              <text:p text:style-name="P1"><text:span text:style-name="T1">======</text:span></text:p>
              <text:p text:style-name="P1"><text:span text:style-name="T1">ID#AAAAH1AC7nE</text:span></text:p>
              <text:p text:style-name="P1"><text:span text:style-name="T1">martin.brungard <text:s text:c="3"/>(2021-02-12 10:36:59)</text:span></text:p>
              <text:p text:style-name="P1"><text:span text:style-name="T1">This mash pH estimate is for the early stage of mashing (say less than 20 minutes after mashing in). <text:s/>The mash pH may vary a tenth or two as the mashing continues. Initial mash pH over 5.4 tends to fall during the mash and initial mash pH under 5.4 tends to rise during the mash.</text:span></text:p>
            </office:annotation>
            <text:p>Estimated Mash pH</text:p>
          </table:table-cell>
          <table:table-cell table:style-name="ce251" table:formula="of:=[$'3. Grain Bill Input'.F24]" office:value-type="float" office:value="5" calcext:value-type="float">
            <office:annotation draw:style-name="gr53" draw:text-style-name="P2" svg:width="7.394cm" svg:height="6.126cm" svg:x="7.817cm" svg:y="9.73cm" draw:caption-point-x="-0.407cm" draw:caption-point-y="0.096cm">
              <dc:date>2021-02-12T00:00:00</dc:date>
              <text:p text:style-name="P1"><text:span text:style-name="T1">======</text:span></text:p>
              <text:p text:style-name="P1"><text:span text:style-name="T1">ID#AAAAH1AC7nw</text:span></text:p>
              <text:p text:style-name="P1"><text:span text:style-name="T1">martin.brungard <text:s text:c="3"/>(2021-02-12 10:36:59)</text:span></text:p>
              <text:p text:style-name="P1"><text:span text:style-name="T1">This pH value is taken from the Grain Bill Input sheet and is provided to allow the Brewer to see the effect of their water adjustments on the Estimated Mash pH without moving back and forth to the Grain Bill Input sheet. <text:s/>This pH estimate is NOT correct until the User enters the proper grain and water information for the mash on the Grain Bill Input sheet, <text:s text:c="2"/>This cell turns RED if the mash pH is out of the recommended range and ORANGE if the pH is at the range limits.</text:span></text:p>
            </office:annotation>
            <text:p>5.00</text:p>
          </table:table-cell>
          <table:table-cell table:style-name="ce275" office:value-type="string" calcext:value-type="string" table:number-columns-spanned="6" table:number-rows-spanned="1">
            <text:p><text:span text:style-name="T399">This pH value is NOT VALID until the grain information is properly entered for the beer on the </text:span><text:span text:style-name="T400">Grain Bill Input</text:span><text:span text:style-name="T401"> sheet.  </text:span></text:p>
          </table:table-cell>
          <table:covered-table-cell table:number-columns-repeated="4" table:style-name="ce21"/>
          <table:covered-table-cell table:style-name="ce307"/>
          <table:table-cell table:style-name="ce328" office:value-type="string" calcext:value-type="string" table:number-columns-spanned="2" table:number-rows-spanned="1">
            <office:annotation draw:style-name="gr54" draw:text-style-name="P2" svg:width="6.717cm" svg:height="5.053cm" svg:x="20.588cm" svg:y="10.848cm" draw:caption-point-x="1.272cm" draw:caption-point-y="-1.022cm">
              <dc:date>2021-02-12T00:00:00</dc:date>
              <text:p text:style-name="P1"><text:span text:style-name="T1">======</text:span></text:p>
              <text:p text:style-name="P1"><text:span text:style-name="T1">ID#AAAAH1AC7kE</text:span></text:p>
              <text:p text:style-name="P1"><text:span text:style-name="T1">martin.brungard <text:s text:c="3"/>(2021-02-12 10:36:59)</text:span></text:p>
              <text:p text:style-name="P1"><text:span text:style-name="T1">Enter the total volume of water to be used for mashing. <text:s/>This quantity is important for assessing the Acidity of the mash.</text:span></text:p>
              <text:p text:style-name="P1"><text:span text:style-name="T1"/></text:p>
              <text:p text:style-name="P1"><text:span text:style-name="T1">Include ALL Foundation Water or water under the Mash Tun's false bottom and water in recirculating piping and hoses in this volume.</text:span></text:p>
            </office:annotation>
            <text:p>Mash <text:s/></text:p>
          </table:table-cell>
          <table:covered-table-cell table:style-name="ce845"/>
          <table:table-cell table:style-name="ce328" office:value-type="string" calcext:value-type="string" table:number-columns-spanned="2" table:number-rows-spanned="1">
            <office:annotation draw:style-name="gr51" draw:text-style-name="P2" svg:width="6.775cm" svg:height="7.706cm" svg:x="23.946cm" svg:y="10.104cm" draw:caption-point-x="1.272cm" draw:caption-point-y="-0.278cm">
              <dc:date>2021-02-12T00:00:00</dc:date>
              <text:p text:style-name="P1"><text:span text:style-name="T1">======</text:span></text:p>
              <text:p text:style-name="P1"><text:span text:style-name="T1">ID#AAAAH1AC7oc</text:span></text:p>
              <text:p text:style-name="P1"><text:span text:style-name="T1">martin.brungard <text:s text:c="3"/>(2021-02-12 10:36:59)</text:span></text:p>
              <text:p text:style-name="P1"><text:span text:style-name="T1">Enter the total volume of sparge water to be created. <text:s/>Do not subtract any water volume that is unused or trapped in a deadspace.</text:span></text:p>
              <text:p text:style-name="P1"><text:span text:style-name="T1"/></text:p>
              <text:p text:style-name="P1"><text:span text:style-name="T1">If using No-Sparge brewing methods, set sparging volume to zero.</text:span></text:p>
              <text:p text:style-name="P1"><text:span text:style-name="T1"/></text:p>
              <text:p text:style-name="P1"><text:span text:style-name="T1">If your boil kettle produces evaporation loss of more than about 10 percent of the beginning volume, you can consider entering a smaller than actual volume for the sparging water to help reduce the added mineral quantity to your water and avoid excessive mineralization in the wort.</text:span></text:p>
            </office:annotation>
            <text:p>Sparge <text:s/></text:p>
          </table:table-cell>
          <table:covered-table-cell table:style-name="ce845"/>
          <table:covered-table-cell table:style-name="ce370"/>
          <table:covered-table-cell table:style-name="ce845"/>
          <table:covered-table-cell table:style-name="ce390"/>
          <table:covered-table-cell/>
          <table:table-cell table:style-name="ce123" table:number-columns-repeated="3"/>
          <table:table-cell table:style-name="ce96"/>
          <table:table-cell table:style-name="ce132" table:formula="of:=[.V16]-(([.$C$13]*0.7143)+([.$D$13]*0.5879))" office:value-type="string" office:string-value="" calcext:value-type="error">
            <text:p>Err:522</text:p>
          </table:table-cell>
          <table:table-cell table:style-name="ce132" table:formula="of:=[.$H$13]*(50/61)*(1+(2*10^-4))" office:value-type="string" office:string-value="" calcext:value-type="error">
            <text:p>Err:522</text:p>
          </table:table-cell>
          <table:table-cell table:style-name="ce96" table:number-columns-repeated="30"/>
          <table:table-cell table:style-name="ce123" table:number-columns-repeated="4"/>
          <table:table-cell table:number-columns-repeated="8"/>
        </table:table-row>
        <table:table-row table:style-name="ro1">
          <table:table-cell table:style-name="ce233" office:value-type="string" calcext:value-type="string">
            <text:p>Water Additions</text:p>
          </table:table-cell>
          <table:table-cell table:style-name="ce252"/>
          <table:table-cell table:style-name="ce276" table:number-columns-repeated="6"/>
          <table:table-cell table:style-name="ce329" table:formula="of:=[.AC14]" office:value-type="string" office:string-value="Water Volume   (gal)" calcext:value-type="string">
            <text:p>Water Volume <text:s text:c="2"/>(gal)</text:p>
          </table:table-cell>
          <table:table-cell table:style-name="ce342" office:value-type="float" office:value="3.75" calcext:value-type="float">
            <text:p>3.75</text:p>
          </table:table-cell>
          <table:table-cell table:style-name="ce329" table:formula="of:=[.AC14]" office:value-type="string" office:string-value="Water Volume   (gal)" calcext:value-type="string">
            <text:p>Water Volume <text:s text:c="2"/>(gal)</text:p>
          </table:table-cell>
          <table:table-cell table:style-name="ce342" office:value-type="float" office:value="4" calcext:value-type="float">
            <text:p>4.00</text:p>
          </table:table-cell>
          <table:table-cell table:style-name="ce329" table:formula="of:=[.AC14]" office:value-type="string" office:string-value="Water Volume   (gal)" calcext:value-type="string">
            <text:p>Water Volume <text:s text:c="2"/>(gal)</text:p>
          </table:table-cell>
          <table:table-cell table:style-name="ce342" office:value-type="float" office:value="5" calcext:value-type="float">
            <text:p>5.00</text:p>
          </table:table-cell>
          <table:table-cell table:style-name="ce248" table:number-columns-repeated="2"/>
          <table:table-cell table:style-name="ce123" table:number-columns-repeated="3"/>
          <table:table-cell table:style-name="ce96" table:formula="of:=IF(N([.J17])=0;0.00001;N([.J17]))" office:value-type="float" office:value="3.75" calcext:value-type="float">
            <text:p>3.75</text:p>
          </table:table-cell>
          <table:table-cell table:style-name="ce96" table:formula="of:=IF(N([.L17])=0;0.00001;N([.L17]))" office:value-type="float" office:value="4" calcext:value-type="float">
            <text:p>4</text:p>
          </table:table-cell>
          <table:table-cell table:style-name="ce96" table:formula="of:=IF(N([.N17])=0;0.00001;N([.N17]))" office:value-type="float" office:value="5" calcext:value-type="float">
            <text:p>5</text:p>
          </table:table-cell>
          <table:table-cell table:style-name="ce96" table:formula="of:=[$'3. Grain Bill Input'.I21]" office:value-type="float" office:value="1" calcext:value-type="float">
            <text:p>1</text:p>
          </table:table-cell>
          <table:table-cell table:style-name="ce96" table:number-columns-repeated="29"/>
          <table:table-cell table:style-name="ce123" table:number-columns-repeated="4"/>
          <table:table-cell table:number-columns-repeated="8"/>
        </table:table-row>
        <table:table-row table:style-name="ro115">
          <table:table-cell table:style-name="ce234" office:value-type="string" calcext:value-type="string">
            <office:annotation draw:style-name="gr24" draw:text-style-name="P2" svg:width="7.982cm" svg:height="2.751cm" svg:x="5.381cm" svg:y="13.15cm" draw:caption-point-x="-0.407cm" draw:caption-point-y="-1.208cm">
              <dc:date>2021-02-12T00:00:00</dc:date>
              <text:p text:style-name="P1"><text:span text:style-name="T1">======</text:span></text:p>
              <text:p text:style-name="P1"><text:span text:style-name="T1">ID#AAAAH1AC7l4</text:span></text:p>
              <text:p text:style-name="P1"><text:span text:style-name="T1">martin.brungard <text:s text:c="3"/>(2021-02-12 10:36:59)</text:span></text:p>
              <text:p text:style-name="P1"><text:span text:style-name="T1">Add food-grade minerals to adjust ion content of water</text:span></text:p>
            </office:annotation>
            <text:p>Minerals </text:p>
          </table:table-cell>
          <table:table-cell table:style-name="ce253" table:formula="of:=[.AA14]" office:value-type="string" office:string-value="Addition   (gram/gal)" calcext:value-type="string">
            <office:annotation draw:style-name="gr25" draw:text-style-name="P2" svg:width="7.394cm" svg:height="7.311cm" svg:x="7.817cm" svg:y="12.206cm" draw:caption-point-x="-0.407cm" draw:caption-point-y="-0.264cm">
              <dc:date>2021-02-12T00:00:00</dc:date>
              <text:p text:style-name="P1"><text:span text:style-name="T1">======</text:span></text:p>
              <text:p text:style-name="P1"><text:span text:style-name="T1">ID#AAAAH1AC7lM</text:span></text:p>
              <text:p text:style-name="P1"><text:span text:style-name="T1">martin.brungard <text:s text:c="3"/>(2021-02-12 10:36:59)</text:span></text:p>
              <text:p text:style-name="P1"><text:span text:style-name="T1">Grams of mineral added to each unit quantity of water.</text:span></text:p>
              <text:p text:style-name="P1"><text:span text:style-name="T1"/></text:p>
              <text:p text:style-name="P1"><text:span text:style-name="T1">The ADDITION cells will turn RED if too much of a mineral is added and the Actual Water Adjustment of an ion that the mineral contains differs from the Target Water Adjustment by more than 10 ppm. <text:s/>MORE THAN ONE MINERAL CELL MAY TURN RED WHEN AN ION BECOMES EXCESSIVE.</text:span></text:p>
              <text:p text:style-name="P1"><text:span text:style-name="T1"/></text:p>
              <text:p text:style-name="P1"><text:span text:style-name="T1">Reduce the mineral addition amount for any mineral that shows a RED cell. <text:s/>It is OK to ignore the warning if the brewer thinks the level will not be excessive.</text:span></text:p>
            </office:annotation>
            <text:p>Addition <text:s text:c="2"/>(gram/gal)</text:p>
          </table:table-cell>
          <table:table-cell table:style-name="ce277" office:value-type="string" calcext:value-type="string">
            <text:p>Calcium <text:s text:c="5"/>(ppm)</text:p>
          </table:table-cell>
          <table:table-cell table:style-name="ce277" office:value-type="string" calcext:value-type="string">
            <text:p>Magnesium (ppm)</text:p>
          </table:table-cell>
          <table:table-cell table:style-name="ce277" office:value-type="string" calcext:value-type="string">
            <text:p>Sodium <text:s text:c="7"/>(ppm)</text:p>
          </table:table-cell>
          <table:table-cell table:style-name="ce277" office:value-type="string" calcext:value-type="string">
            <text:p>Sulfate <text:s text:c="7"/>(ppm)</text:p>
          </table:table-cell>
          <table:table-cell table:style-name="ce277" office:value-type="string" calcext:value-type="string">
            <text:p>Chloride <text:s text:c="5"/>(ppm)</text:p>
          </table:table-cell>
          <table:table-cell table:style-name="ce308" office:value-type="string" calcext:value-type="string">
            <text:p>Bicarbonate (ppm)</text:p>
          </table:table-cell>
          <table:table-cell table:style-name="ce330" office:value-type="string" calcext:value-type="string" table:number-columns-spanned="2" table:number-rows-spanned="1">
            <text:p>Total Mineral Additions (grams)</text:p>
          </table:table-cell>
          <table:covered-table-cell table:style-name="ce343"/>
          <table:table-cell table:style-name="ce330" office:value-type="string" calcext:value-type="string" table:number-columns-spanned="2" table:number-rows-spanned="1">
            <text:p>Total Mineral Additions (grams)</text:p>
          </table:table-cell>
          <table:covered-table-cell table:style-name="ce343"/>
          <table:table-cell table:style-name="ce371"/>
          <table:table-cell table:style-name="ce18" table:number-columns-repeated="2"/>
          <table:table-cell table:style-name="ce123" table:number-columns-repeated="4"/>
          <table:table-cell table:style-name="ce96" table:number-columns-repeated="33"/>
          <table:table-cell table:style-name="ce123" table:number-columns-repeated="4"/>
          <table:table-cell table:number-columns-repeated="8"/>
        </table:table-row>
        <table:table-row table:style-name="ro110">
          <table:table-cell table:style-name="ce235" office:value-type="string" calcext:value-type="string">
            <office:annotation draw:style-name="gr55" draw:text-style-name="P2" svg:width="7.982cm" svg:height="4.546cm" svg:x="5.381cm" svg:y="13.417cm" draw:caption-point-x="-0.407cm" draw:caption-point-y="-0.522cm">
              <dc:date>2021-02-12T00:00:00</dc:date>
              <text:p text:style-name="P1"><text:span text:style-name="T1">======</text:span></text:p>
              <text:p text:style-name="P1"><text:span text:style-name="T1">ID#AAAAH1AC7kw</text:span></text:p>
              <text:p text:style-name="P1"><text:span text:style-name="T1">Martin Brungard <text:s text:c="3"/>(2021-02-12 10:36:59)</text:span></text:p>
              <text:p text:style-name="P1"><text:span text:style-name="T1">Gypsum is highly soluble and well suited for enhancing bitterness and dryness perception to finished beer.</text:span></text:p>
              <text:p text:style-name="P1"><text:span text:style-name="T1"/></text:p>
              <text:p text:style-name="P1"><text:span text:style-name="T1">Adds Calcium and Sulfate to water. The calculation assumes the mineral is in the dihydrate (x 2H2O) form. This is the most common form.</text:span></text:p>
            </office:annotation>
            <text:p><text:span text:style-name="T393">Gypsum (CaSO</text:span><text:span text:style-name="T394">4</text:span><text:span text:style-name="T395"> x 2H</text:span><text:span text:style-name="T394">2</text:span><text:span text:style-name="T395">O) </text:span></text:p>
          </table:table-cell>
          <table:table-cell table:style-name="ce254" office:value-type="float" office:value="0" calcext:value-type="float">
            <text:p>0.00</text:p>
          </table:table-cell>
          <table:table-cell table:style-name="ce278" table:formula="of:=61.5*(3.785/[.V14])*N([.B19])" office:value-type="float" office:value="0" calcext:value-type="float">
            <text:p>0.0</text:p>
          </table:table-cell>
          <table:table-cell table:style-name="ce290" table:number-columns-repeated="2"/>
          <table:table-cell table:style-name="ce278" table:formula="of:=147.43*(3.785/[.V14])*N([.B19])" office:value-type="float" office:value="0" calcext:value-type="float">
            <text:p>0.0</text:p>
          </table:table-cell>
          <table:table-cell table:style-name="ce290"/>
          <table:table-cell table:style-name="ce309"/>
          <table:table-cell table:style-name="ce331" table:formula="of:=N([.B19])*[.$T$17]" office:value-type="float" office:value="0" calcext:value-type="float" table:number-columns-spanned="2" table:number-rows-spanned="1">
            <text:p>0.0</text:p>
          </table:table-cell>
          <table:covered-table-cell table:style-name="ce344"/>
          <table:table-cell table:style-name="ce331" table:formula="of:=N([.B19])*[.U17]" office:value-type="float" office:value="0" calcext:value-type="float" table:number-columns-spanned="2" table:number-rows-spanned="1">
            <text:p>0.0</text:p>
          </table:table-cell>
          <table:covered-table-cell table:style-name="ce344"/>
          <table:table-cell table:style-name="ce248" table:number-columns-repeated="2"/>
          <table:table-cell table:style-name="ce391" table:number-columns-repeated="2"/>
          <table:table-cell table:style-name="ce400" table:number-columns-repeated="2"/>
          <table:table-cell table:style-name="ce123"/>
          <table:table-cell table:style-name="ce96" table:number-columns-repeated="33"/>
          <table:table-cell table:style-name="ce123" table:number-columns-repeated="4"/>
          <table:table-cell table:number-columns-repeated="8"/>
        </table:table-row>
        <table:table-row table:style-name="ro110">
          <table:table-cell table:style-name="ce236" office:value-type="string" calcext:value-type="string">
            <office:annotation draw:style-name="gr53" draw:text-style-name="P2" svg:width="7.982cm" svg:height="6.126cm" svg:x="5.381cm" svg:y="13.923cm" draw:caption-point-x="-0.407cm" draw:caption-point-y="-0.446cm">
              <dc:date>2021-02-12T00:00:00</dc:date>
              <text:p text:style-name="P1"><text:span text:style-name="T1">======</text:span></text:p>
              <text:p text:style-name="P1"><text:span text:style-name="T1">ID#AAAAH1AC7kA</text:span></text:p>
              <text:p text:style-name="P1"><text:span text:style-name="T1">martin.brungard <text:s text:c="3"/>(2021-02-12 10:36:59)</text:span></text:p>
              <text:p text:style-name="P1"><text:span text:style-name="T1">CaCl is highly soluble and effective at adding calcium without adding sulfate. <text:s/>This calculation assumes that the Anhydrous form of this mineral are used in brewing.</text:span></text:p>
              <text:p text:style-name="P1"><text:span text:style-name="T1"/></text:p>
              <text:p text:style-name="P1"><text:span text:style-name="T1">To assure that your CaCl is Anhydrous, Bake your CaCl at 375F to 400F (190C to 205C) for about an hour to help assure it is converted to the Anhydrous form. Keep the mineral in an air-tight container to avoid moisture from the air. </text:span></text:p>
              <text:p text:style-name="P1"><text:span text:style-name="T1"/></text:p>
              <text:p text:style-name="P1"><text:span text:style-name="T1">Adds Calcium and Chloride to water.</text:span></text:p>
            </office:annotation>
            <text:p><text:span text:style-name="T387">Calcium Chloride (CaCl</text:span><text:span text:style-name="T396">2</text:span><text:span text:style-name="T397">) </text:span></text:p>
          </table:table-cell>
          <table:table-cell table:style-name="ce255" office:value-type="float" office:value="0" calcext:value-type="float">
            <text:p>0.00</text:p>
          </table:table-cell>
          <table:table-cell table:style-name="ce279" table:formula="of:=95.4*(3.785/[.V14])*N([.B20])" office:value-type="float" office:value="0" calcext:value-type="float">
            <text:p>0.0</text:p>
          </table:table-cell>
          <table:table-cell table:style-name="ce280" table:number-columns-repeated="3"/>
          <table:table-cell table:style-name="ce279" table:formula="of:=168.79*(3.785/[.V14])*N([.B20])" office:value-type="float" office:value="0" calcext:value-type="float">
            <text:p>0.0</text:p>
          </table:table-cell>
          <table:table-cell table:style-name="ce310"/>
          <table:table-cell table:style-name="ce332" table:formula="of:=N([.B20])*[.$T$17]" office:value-type="float" office:value="0" calcext:value-type="float" table:number-columns-spanned="2" table:number-rows-spanned="1">
            <text:p>0.0</text:p>
          </table:table-cell>
          <table:covered-table-cell table:style-name="ce307"/>
          <table:table-cell table:style-name="ce333" table:formula="of:=N([.B20])*[.U17]" office:value-type="float" office:value="0" calcext:value-type="float" table:number-columns-spanned="2" table:number-rows-spanned="1">
            <text:p>0.0</text:p>
          </table:table-cell>
          <table:covered-table-cell table:style-name="ce845"/>
          <table:table-cell table:style-name="ce372"/>
          <table:table-cell table:style-name="ce368" table:number-columns-repeated="3"/>
          <table:table-cell table:style-name="ce400" table:number-columns-repeated="2"/>
          <table:table-cell table:style-name="ce123"/>
          <table:table-cell table:style-name="ce96" table:number-columns-repeated="33"/>
          <table:table-cell table:style-name="ce123" table:number-columns-repeated="4"/>
          <table:table-cell table:number-columns-repeated="8"/>
        </table:table-row>
        <table:table-row table:style-name="ro110">
          <table:table-cell table:style-name="ce237" office:value-type="string" calcext:value-type="string">
            <office:annotation draw:style-name="gr56" draw:text-style-name="P2" svg:width="7.982cm" svg:height="4.18cm" svg:x="5.381cm" svg:y="14.896cm" draw:caption-point-x="-0.407cm" draw:caption-point-y="-0.837cm">
              <dc:date>2021-02-12T00:00:00</dc:date>
              <text:p text:style-name="P1"><text:span text:style-name="T1">======</text:span></text:p>
              <text:p text:style-name="P1"><text:span text:style-name="T1">ID#AAAAH1AC7lk</text:span></text:p>
              <text:p text:style-name="P1"><text:span text:style-name="T1">Martin Brungard <text:s text:c="3"/>(2021-02-12 10:36:59)</text:span></text:p>
              <text:p text:style-name="P1"><text:span text:style-name="T1">Use Epsom Salt sparingly to keep Mg content below 30 ppm for most beers.</text:span></text:p>
              <text:p text:style-name="P1"><text:span text:style-name="T1"/></text:p>
              <text:p text:style-name="P1"><text:span text:style-name="T1">Adds Magnesium and Sulfate to water. The calculation assumes the Heptahydrate (x 7H2O) form. This is the most common form.</text:span></text:p>
            </office:annotation>
            <text:p><text:span text:style-name="T393">Epsom Salt (MgSO</text:span><text:span text:style-name="T394">4 </text:span><text:span text:style-name="T395">x 7H</text:span><text:span text:style-name="T394">2</text:span><text:span text:style-name="T395">O)</text:span></text:p>
          </table:table-cell>
          <table:table-cell table:style-name="ce255" office:value-type="float" office:value="0" calcext:value-type="float">
            <text:p>0.00</text:p>
          </table:table-cell>
          <table:table-cell table:style-name="ce280"/>
          <table:table-cell table:style-name="ce279" table:formula="of:=26.05*(3.785/[.V14])*N([.B21])" office:value-type="float" office:value="0" calcext:value-type="float">
            <text:p>0.0</text:p>
          </table:table-cell>
          <table:table-cell table:style-name="ce280"/>
          <table:table-cell table:style-name="ce279" table:formula="of:=102.96*(3.785/[.V14])*N([.B21])" office:value-type="float" office:value="0" calcext:value-type="float">
            <text:p>0.0</text:p>
          </table:table-cell>
          <table:table-cell table:style-name="ce280"/>
          <table:table-cell table:style-name="ce310"/>
          <table:table-cell table:style-name="ce332" table:formula="of:=N([.B21])*[.$T$17]" office:value-type="float" office:value="0" calcext:value-type="float" table:number-columns-spanned="2" table:number-rows-spanned="1">
            <text:p>0.0</text:p>
          </table:table-cell>
          <table:covered-table-cell table:style-name="ce307"/>
          <table:table-cell table:style-name="ce332" table:formula="of:=N([.B21])*[.U$17]" office:value-type="float" office:value="0" calcext:value-type="float" table:number-columns-spanned="2" table:number-rows-spanned="1">
            <text:p>0.0</text:p>
          </table:table-cell>
          <table:covered-table-cell table:style-name="ce307"/>
          <table:table-cell table:style-name="ce373"/>
          <table:table-cell table:style-name="ce368" table:number-columns-repeated="3"/>
          <table:table-cell table:style-name="ce401"/>
          <table:table-cell table:style-name="ce385"/>
          <table:table-cell table:style-name="ce123"/>
          <table:table-cell table:style-name="ce96" table:number-columns-repeated="3"/>
          <table:table-cell table:style-name="ce96" office:value-type="string" calcext:value-type="string">
            <text:p>Yes</text:p>
          </table:table-cell>
          <table:table-cell table:style-name="ce96" table:number-columns-repeated="29"/>
          <table:table-cell table:style-name="ce123" table:number-columns-repeated="4"/>
          <table:table-cell table:number-columns-repeated="8"/>
        </table:table-row>
        <table:table-row table:style-name="ro110">
          <table:table-cell table:style-name="ce237" office:value-type="string" calcext:value-type="string">
            <office:annotation draw:style-name="gr56" draw:text-style-name="P2" svg:width="7.982cm" svg:height="4.18cm" svg:x="5.381cm" svg:y="15.478cm" draw:caption-point-x="-0.407cm" draw:caption-point-y="-0.837cm">
              <dc:date>2021-02-12T00:00:00</dc:date>
              <text:p text:style-name="P1"><text:span text:style-name="T1">======</text:span></text:p>
              <text:p text:style-name="P1"><text:span text:style-name="T1">ID#AAAAH1AC7jg</text:span></text:p>
              <text:p text:style-name="P1"><text:span text:style-name="T1">Martin Brungard <text:s text:c="3"/>(2021-02-12 10:36:59)</text:span></text:p>
              <text:p text:style-name="P1"><text:span text:style-name="T1">MgCl2 is not commonly used for water adjustments, but it can be useful for creating some water profiles.</text:span></text:p>
              <text:p text:style-name="P1"><text:span text:style-name="T1"/></text:p>
              <text:p text:style-name="P1"><text:span text:style-name="T1">Adds Magnesium and Chloride to water. MgCl2 is assumed to be available in its hexahydrate (x 6H2O) form</text:span></text:p>
            </office:annotation>
            <text:p><text:span text:style-name="T393">Magnesium Chloride (MgCl</text:span><text:span text:style-name="T394">2</text:span><text:span text:style-name="T395"> x 6H</text:span><text:span text:style-name="T394">2</text:span><text:span text:style-name="T395">O)</text:span></text:p>
          </table:table-cell>
          <table:table-cell table:style-name="ce255" office:value-type="float" office:value="0" calcext:value-type="float">
            <text:p>0.00</text:p>
          </table:table-cell>
          <table:table-cell table:style-name="ce280"/>
          <table:table-cell table:style-name="ce279" table:formula="of:=31.57*(3.785/[.V14])*N([.B22])" office:value-type="float" office:value="0" calcext:value-type="float">
            <text:p>0.0</text:p>
          </table:table-cell>
          <table:table-cell table:style-name="ce292"/>
          <table:table-cell table:style-name="ce280"/>
          <table:table-cell table:style-name="ce279" table:formula="of:=92.12*(3.785/[.V14])*N([.B22])" office:value-type="float" office:value="0" calcext:value-type="float">
            <text:p>0.0</text:p>
          </table:table-cell>
          <table:table-cell table:style-name="ce310"/>
          <table:table-cell table:style-name="ce332" table:formula="of:=N([.B22])*[.$T$17]" office:value-type="float" office:value="0" calcext:value-type="float" table:number-columns-spanned="2" table:number-rows-spanned="1">
            <text:p>0.0</text:p>
          </table:table-cell>
          <table:covered-table-cell table:style-name="ce307"/>
          <table:table-cell table:style-name="ce332" table:formula="of:=N([.B22])*[.U$17]" office:value-type="float" office:value="0" calcext:value-type="float" table:number-columns-spanned="2" table:number-rows-spanned="1">
            <text:p>0.0</text:p>
          </table:table-cell>
          <table:covered-table-cell table:style-name="ce307"/>
          <table:table-cell table:style-name="ce374"/>
          <table:table-cell table:style-name="ce368" table:number-columns-repeated="3"/>
          <table:table-cell table:style-name="ce380"/>
          <table:table-cell table:style-name="ce403"/>
          <table:table-cell table:style-name="ce123"/>
          <table:table-cell table:style-name="ce96" table:number-columns-repeated="3"/>
          <table:table-cell table:style-name="ce96" office:value-type="string" calcext:value-type="string">
            <text:p>No</text:p>
          </table:table-cell>
          <table:table-cell table:style-name="ce96" table:number-columns-repeated="29"/>
          <table:table-cell table:style-name="ce123" table:number-columns-repeated="4"/>
          <table:table-cell table:number-columns-repeated="8"/>
        </table:table-row>
        <table:table-row table:style-name="ro110">
          <table:table-cell table:style-name="ce238" office:value-type="string" calcext:value-type="string">
            <office:annotation draw:style-name="gr56" draw:text-style-name="P2" svg:width="7.982cm" svg:height="4.18cm" svg:x="5.381cm" svg:y="16.06cm" draw:caption-point-x="-0.407cm" draw:caption-point-y="-0.837cm">
              <dc:date>2021-02-12T00:00:00</dc:date>
              <text:p text:style-name="P1"><text:span text:style-name="T1">======</text:span></text:p>
              <text:p text:style-name="P1"><text:span text:style-name="T1">ID#AAAAH1AC7ps</text:span></text:p>
              <text:p text:style-name="P1"><text:span text:style-name="T1">Martin Brungard <text:s text:c="3"/>(2021-02-12 10:36:59)</text:span></text:p>
              <text:p text:style-name="P1"><text:span text:style-name="T1">Non-iodized table salt is preferred. <text:s/>Keep sodium content below 150 ppm in most beers.</text:span></text:p>
              <text:p text:style-name="P1"><text:span text:style-name="T1"/></text:p>
              <text:p text:style-name="P1"><text:span text:style-name="T1">Adds Sodium and Chloride to water. Canning salt exists only in the Anhydrous form.</text:span></text:p>
            </office:annotation>
            <text:p>Canning Salt (NaCl)</text:p>
          </table:table-cell>
          <table:table-cell table:style-name="ce255" office:value-type="float" office:value="0" calcext:value-type="float">
            <text:p>0.00</text:p>
          </table:table-cell>
          <table:table-cell table:style-name="ce280"/>
          <table:table-cell table:style-name="ce291"/>
          <table:table-cell table:style-name="ce279" table:formula="of:=103.94*(3.785/[.V14])*N([.B23])" office:value-type="float" office:value="0" calcext:value-type="float">
            <text:p>0.0</text:p>
          </table:table-cell>
          <table:table-cell table:style-name="ce280"/>
          <table:table-cell table:style-name="ce279" table:formula="of:=160.26*(3.785/[.V14])*N([.B23])" office:value-type="float" office:value="0" calcext:value-type="float">
            <text:p>0.0</text:p>
          </table:table-cell>
          <table:table-cell table:style-name="ce311"/>
          <table:table-cell table:style-name="ce333" table:formula="of:=N([.B23])*[.$T$17]" office:value-type="float" office:value="0" calcext:value-type="float" table:number-columns-spanned="2" table:number-rows-spanned="1">
            <text:p>0.0</text:p>
          </table:table-cell>
          <table:covered-table-cell table:style-name="ce845"/>
          <table:table-cell table:style-name="ce333" table:formula="of:=N([.B23])*[.U$17]" office:value-type="float" office:value="0" calcext:value-type="float" table:number-columns-spanned="2" table:number-rows-spanned="1">
            <text:p>0.0</text:p>
          </table:table-cell>
          <table:covered-table-cell table:style-name="ce845"/>
          <table:table-cell table:style-name="ce248"/>
          <table:table-cell table:style-name="ce18" table:number-columns-repeated="3"/>
          <table:table-cell table:style-name="ce123" table:number-columns-repeated="3"/>
          <table:table-cell table:style-name="ce405"/>
          <table:table-cell table:style-name="ce96" table:number-columns-repeated="32"/>
          <table:table-cell table:style-name="ce123" table:number-columns-repeated="4"/>
          <table:table-cell table:number-columns-repeated="8"/>
        </table:table-row>
        <table:table-row table:style-name="ro110">
          <table:table-cell table:style-name="ce237" office:value-type="string" calcext:value-type="string">
            <office:annotation draw:style-name="gr13" draw:text-style-name="P2" svg:width="7.982cm" svg:height="8.891cm" svg:x="5.381cm" svg:y="15.822cm" draw:caption-point-x="-0.407cm" draw:caption-point-y="-0.017cm">
              <dc:date>2021-02-12T00:00:00</dc:date>
              <text:p text:style-name="P1"><text:span text:style-name="T1">======</text:span></text:p>
              <text:p text:style-name="P1"><text:span text:style-name="T1">ID#AAAAH1AC7m4</text:span></text:p>
              <text:p text:style-name="P1"><text:span text:style-name="T1">Martin Brungard <text:s text:c="3"/>(2021-02-12 10:36:59)</text:span></text:p>
              <text:p text:style-name="P1"><text:span text:style-name="T1">Baking Soda is effective at adding alkalinity, but limit its use to keep the sodium content below 150 ppm. <text:s/>Be aware that since Baking Soda is only added to the mashing water, the sodium content in the kettle is likely to be less than shown here for the Mashing Water Profile. <text:s/>The Supporter's version reports the Finished Water Profile in the Kettle that more accurately presents the ending sodium content for the beer.</text:span></text:p>
              <text:p text:style-name="P1"><text:span text:style-name="T1"/></text:p>
              <text:p text:style-name="P1"><text:span text:style-name="T1">Baking Soda should not be added to water if acid is also added since they counter each other. <text:s text:c="2"/>In the Supporter's version, the bicarbonate cells will turn RED if Pickling Lime and an acid are input. That warning helps avoid adding too much mineralization.</text:span></text:p>
              <text:p text:style-name="P1"><text:span text:style-name="T1"/></text:p>
              <text:p text:style-name="P1"><text:span text:style-name="T1">Adds Sodium and Bicarbonate to water. Baking soda is only available in its Anhydrous form.</text:span></text:p>
            </office:annotation>
            <text:p><text:span text:style-name="T387">Baking Soda (NaHCO</text:span><text:span text:style-name="T396">3</text:span><text:span text:style-name="T397">)</text:span></text:p>
          </table:table-cell>
          <table:table-cell table:style-name="ce255" office:value-type="float" office:value="0" calcext:value-type="float">
            <text:p>0.00</text:p>
          </table:table-cell>
          <table:table-cell table:style-name="ce280"/>
          <table:table-cell table:style-name="ce292"/>
          <table:table-cell table:style-name="ce279" table:formula="of:=72.31*(3.785/[.V14])*N([.B24])" office:value-type="float" office:value="0" calcext:value-type="float">
            <text:p>0.0</text:p>
          </table:table-cell>
          <table:table-cell table:style-name="ce280"/>
          <table:table-cell table:style-name="ce292"/>
          <table:table-cell table:style-name="ce312" table:formula="of:=191.88*(3.785/[.V14])*N([.B24])" office:value-type="float" office:value="0" calcext:value-type="float">
            <office:annotation draw:style-name="gr46" draw:text-style-name="P2" svg:width="6.716cm" svg:height="3.756cm" svg:x="18.909cm" svg:y="16.272cm" draw:caption-point-x="-0.407cm" draw:caption-point-y="-0.467cm">
              <dc:date>2021-02-12T00:00:00</dc:date>
              <text:p text:style-name="P1"><text:span text:style-name="T1">======</text:span></text:p>
              <text:p text:style-name="P1"><text:span text:style-name="T1">ID#AAAAH1AC7mc</text:span></text:p>
              <text:p text:style-name="P1"><text:span text:style-name="T1">martin.brungard <text:s text:c="3"/>(2021-02-12 10:36:59)</text:span></text:p>
              <text:p text:style-name="P1"><text:span text:style-name="T1">If both an acid and alkali are input on this sheet in the Supporter's version, the bicarbonate cells turn Red to alert the User that both acid and alkaline additions have been input. This warning helps avoid adding too much mineralization.</text:span></text:p>
            </office:annotation>
            <text:p>0.0</text:p>
          </table:table-cell>
          <table:table-cell table:style-name="ce332" table:formula="of:=N([.B24])*[.T$17]" office:value-type="float" office:value="0" calcext:value-type="float" table:number-columns-spanned="2" table:number-rows-spanned="1">
            <text:p>0.0</text:p>
          </table:table-cell>
          <table:covered-table-cell table:style-name="ce307"/>
          <table:table-cell table:style-name="ce355" office:value-type="string" calcext:value-type="string" table:number-columns-spanned="2" table:number-rows-spanned="1">
            <office:annotation draw:style-name="gr57" draw:text-style-name="P2" svg:width="6.775cm" svg:height="3.016cm" svg:x="23.946cm" svg:y="16.642cm" draw:caption-point-x="1.272cm" draw:caption-point-y="-0.837cm">
              <dc:date>2021-02-12T00:00:00</dc:date>
              <text:p text:style-name="P1"><text:span text:style-name="T1">======</text:span></text:p>
              <text:p text:style-name="P1"><text:span text:style-name="T1">ID#AAAAH1AC7qE</text:span></text:p>
              <text:p text:style-name="P1"><text:span text:style-name="T1">martin.brungard <text:s text:c="3"/>(2021-02-12 10:36:59)</text:span></text:p>
              <text:p text:style-name="P1"><text:span text:style-name="T1">Do not add Alkalinity producing minerals to the sparge water.</text:span></text:p>
            </office:annotation>
            <text:p>Not Recommended</text:p>
          </table:table-cell>
          <table:covered-table-cell table:style-name="ce307"/>
          <table:table-cell table:style-name="ce375"/>
          <table:table-cell table:style-name="ce18" table:number-columns-repeated="3"/>
          <table:table-cell table:style-name="ce123" table:number-columns-repeated="3"/>
          <table:table-cell table:style-name="ce96" table:number-columns-repeated="21"/>
          <table:table-cell table:style-name="ce108" table:number-columns-repeated="10"/>
          <table:table-cell table:style-name="ce83" table:number-columns-repeated="2"/>
          <table:table-cell table:style-name="ce53" table:number-columns-repeated="3"/>
          <table:table-cell table:style-name="ce123"/>
          <table:table-cell table:number-columns-repeated="8"/>
        </table:table-row>
        <table:table-row table:style-name="ro110">
          <table:table-cell table:style-name="ce238" office:value-type="string" calcext:value-type="string">
            <office:annotation draw:style-name="gr58" draw:text-style-name="P2" svg:width="7.982cm" svg:height="9.049cm" svg:x="5.381cm" svg:y="17.224cm" draw:caption-point-x="-0.407cm" draw:caption-point-y="-0.837cm">
              <dc:date>2021-02-12T00:00:00</dc:date>
              <text:p text:style-name="P1"><text:span text:style-name="T1">======</text:span></text:p>
              <text:p text:style-name="P1"><text:span text:style-name="T1">ID#AAAAH1AC7kM</text:span></text:p>
              <text:p text:style-name="P1"><text:span text:style-name="T1">Martin Brungard <text:s text:c="3"/>(2021-02-12 10:36:59)</text:span></text:p>
              <text:p text:style-name="P1"><text:span text:style-name="T1">Chalk has limited solubility (about 50 mg/L) in water and wort making it less suitable for adding alkalinity. <text:s/>DO NOT USE CHALK FOR BREWING UNLESS IT HAS BEEN FULLY PRE-DISSOLVED INTO WATER WITH CO2. </text:span></text:p>
              <text:p text:style-name="P1"><text:span text:style-name="T1"/></text:p>
              <text:p text:style-name="P1"><text:span text:style-name="T1">Chalk should not be added to water if acid is also added since they counter each other. <text:s text:c="2"/>In the Supporter's version, the bicarbonate cells will turn RED if Pickling Lime and an acid are input. That warning helps avoid adding too much mineralization.</text:span></text:p>
              <text:p text:style-name="P1"><text:span text:style-name="T1"/></text:p>
              <text:p text:style-name="P1"><text:span text:style-name="T1">Adds Calcium and Bicarbonate to water. <text:s/>The carbonate content is converted to an equivalent bicarbonate content for use in the program.</text:span></text:p>
            </office:annotation>
            <text:p><text:span text:style-name="T387">Chalk (CaCO</text:span><text:span text:style-name="T396">3</text:span><text:span text:style-name="T397">)</text:span></text:p>
          </table:table-cell>
          <table:table-cell table:style-name="ce256" office:value-type="float" office:value="0" calcext:value-type="float">
            <text:p>0.00</text:p>
          </table:table-cell>
          <table:table-cell table:style-name="ce281" table:formula="of:=105.8*(3.785/[.V14])*N([.B25])" office:value-type="float" office:value="0" calcext:value-type="float">
            <text:p>0.0</text:p>
          </table:table-cell>
          <table:table-cell table:style-name="ce291" table:number-columns-repeated="4"/>
          <table:table-cell table:style-name="ce313" table:formula="of:=322.27*(3.785/[.V14])*N([.B25])" office:value-type="float" office:value="0" calcext:value-type="float">
            <office:annotation draw:style-name="gr10" draw:text-style-name="P2" svg:width="6.716cm" svg:height="4.941cm" svg:x="18.909cm" svg:y="16.844cm" draw:caption-point-x="-0.407cm" draw:caption-point-y="-0.457cm">
              <dc:date>2021-02-12T00:00:00</dc:date>
              <text:p text:style-name="P1"><text:span text:style-name="T1">======</text:span></text:p>
              <text:p text:style-name="P1"><text:span text:style-name="T1">ID#AAAAH1AC7l8</text:span></text:p>
              <text:p text:style-name="P1"><text:span text:style-name="T1">martin.brungard <text:s text:c="3"/>(2021-02-12 10:36:59)</text:span></text:p>
              <text:p text:style-name="P1"><text:span text:style-name="T1">This is an equivalent bicarbonate concentration.</text:span></text:p>
              <text:p text:style-name="P1"><text:span text:style-name="T1"/></text:p>
              <text:p text:style-name="P1"><text:span text:style-name="T1">If both an acid and alkali are input on this sheet in the Supporter's version, the bicarbonate cells turn Red to alert the User that both acid and alkaline additions have been input. This warning helps avoid adding too much mineralization.</text:span></text:p>
            </office:annotation>
            <text:p>0.0</text:p>
          </table:table-cell>
          <table:table-cell table:style-name="ce332" table:formula="of:=N([.B25])*[.T$17]" office:value-type="float" office:value="0" calcext:value-type="float" table:number-columns-spanned="2" table:number-rows-spanned="1">
            <text:p>0.0</text:p>
          </table:table-cell>
          <table:covered-table-cell table:style-name="ce307"/>
          <table:table-cell table:style-name="ce355" office:value-type="string" calcext:value-type="string" table:number-columns-spanned="2" table:number-rows-spanned="1">
            <office:annotation draw:style-name="gr57" draw:text-style-name="P2" svg:width="6.775cm" svg:height="3.016cm" svg:x="23.946cm" svg:y="17.224cm" draw:caption-point-x="1.272cm" draw:caption-point-y="-0.837cm">
              <dc:date>2021-02-12T00:00:00</dc:date>
              <text:p text:style-name="P1"><text:span text:style-name="T1">======</text:span></text:p>
              <text:p text:style-name="P1"><text:span text:style-name="T1">ID#AAAAH1AC7lA</text:span></text:p>
              <text:p text:style-name="P1"><text:span text:style-name="T1">martin.brungard <text:s text:c="3"/>(2021-02-12 10:36:59)</text:span></text:p>
              <text:p text:style-name="P1"><text:span text:style-name="T1">Do not add Alkalinity producing minerals to the sparge water.</text:span></text:p>
            </office:annotation>
            <text:p>Not Recommended</text:p>
          </table:table-cell>
          <table:covered-table-cell table:style-name="ce307"/>
          <table:table-cell table:style-name="ce376"/>
          <table:table-cell table:style-name="ce368" table:number-columns-repeated="3"/>
          <table:table-cell table:style-name="ce402"/>
          <table:table-cell table:style-name="ce123"/>
          <table:table-cell table:style-name="ce385"/>
          <table:table-cell table:style-name="ce96"/>
          <table:table-cell table:style-name="ce108" office:value-type="string" calcext:value-type="string">
            <text:p>acid</text:p>
          </table:table-cell>
          <table:table-cell table:style-name="ce108" office:value-type="string" calcext:value-type="string">
            <text:p>pK1</text:p>
          </table:table-cell>
          <table:table-cell table:style-name="ce108" office:value-type="string" calcext:value-type="string">
            <text:p>pK2</text:p>
          </table:table-cell>
          <table:table-cell table:style-name="ce108" office:value-type="string" calcext:value-type="string">
            <text:p>pK3</text:p>
          </table:table-cell>
          <table:table-cell table:style-name="ce108" office:value-type="string" calcext:value-type="string">
            <text:p>Mol. Wt.</text:p>
          </table:table-cell>
          <table:table-cell table:style-name="ce108" office:value-type="string" calcext:value-type="string">
            <text:p>SG</text:p>
          </table:table-cell>
          <table:table-cell table:style-name="ce108" office:value-type="string" calcext:value-type="string">
            <text:p>n</text:p>
          </table:table-cell>
          <table:table-cell table:style-name="ce108" office:value-type="string" calcext:value-type="string">
            <text:p>ml/mg</text:p>
          </table:table-cell>
          <table:table-cell table:style-name="ce108" office:value-type="string" calcext:value-type="string">
            <text:p>gm/tsp</text:p>
          </table:table-cell>
          <table:table-cell table:style-name="ce108" office:value-type="string" calcext:value-type="string">
            <text:p>dose</text:p>
          </table:table-cell>
          <table:table-cell table:style-name="ce83" table:number-columns-repeated="6"/>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0">
          <table:table-cell table:style-name="ce239" office:value-type="string" calcext:value-type="string">
            <office:annotation draw:style-name="gr59" draw:text-style-name="P2" svg:width="7.982cm" svg:height="11.298cm" svg:x="5.381cm" svg:y="17.806cm" draw:caption-point-x="-0.407cm" draw:caption-point-y="-0.837cm">
              <dc:date>2021-02-12T00:00:00</dc:date>
              <text:p text:style-name="P1"><text:span text:style-name="T1">======</text:span></text:p>
              <text:p text:style-name="P1"><text:span text:style-name="T1">ID#AAAAH1AC7h8</text:span></text:p>
              <text:p text:style-name="P1"><text:span text:style-name="T1">Martin Brungard <text:s text:c="3"/>(2021-02-12 10:36:59)</text:span></text:p>
              <text:p text:style-name="P1"><text:span text:style-name="T1">Pickling Lime (aka Slaked Lime) is highly effective at adding alkalinity to water and wort and increasing pH. <text:s/>This is a strong caustic and must be handled carefully.</text:span></text:p>
              <text:p text:style-name="P1"><text:span text:style-name="T1"/></text:p>
              <text:p text:style-name="P1"><text:span text:style-name="T1">ADD PICKLING LIME IN THE MASH ONLY. <text:s/>DO NOT ADD TO WATER ALONE SINCE THE pH MAY INCREASE TOO HIGH.</text:span></text:p>
              <text:p text:style-name="P1"><text:span text:style-name="T1"/></text:p>
              <text:p text:style-name="P1"><text:span text:style-name="T1">Pickling Lime should not be added to water if acid is also added since they counter each other. <text:s/>In the Supporter's version, the bicarbonate cells will turn RED if Pickling Lime and an acid are input. That warning helps avoid adding too much mineralization.</text:span></text:p>
              <text:p text:style-name="P1"><text:span text:style-name="T1"/></text:p>
              <text:p text:style-name="P1"><text:span text:style-name="T1">Adds Calcium and Hydroxide to water. <text:s/>The hydroxide content is converted to an equivalent bicarbonate content for use in the program.</text:span></text:p>
            </office:annotation>
            <text:p><text:span text:style-name="T387">Pickling Lime (Ca(OH)</text:span><text:span text:style-name="T396">2</text:span><text:span text:style-name="T397">)</text:span></text:p>
          </table:table-cell>
          <table:table-cell table:style-name="ce257" office:value-type="float" office:value="0" calcext:value-type="float">
            <text:p>0.00</text:p>
          </table:table-cell>
          <table:table-cell table:style-name="ce282" table:formula="of:=142.93*(3.785/[.V14])*N([.B26])" office:value-type="float" office:value="0" calcext:value-type="float">
            <text:p>0.0</text:p>
          </table:table-cell>
          <table:table-cell table:style-name="ce293" table:number-columns-repeated="4"/>
          <table:table-cell table:style-name="ce314" table:formula="of:=434.75*(3.785/[.V14])*N([.B26])" office:value-type="float" office:value="0" calcext:value-type="float">
            <office:annotation draw:style-name="gr60" draw:text-style-name="P2" svg:width="6.716cm" svg:height="6.086cm" svg:x="18.909cm" svg:y="17.806cm" draw:caption-point-x="-0.407cm" draw:caption-point-y="-0.837cm">
              <dc:date>2021-02-12T00:00:00</dc:date>
              <text:p text:style-name="P1"><text:span text:style-name="T1">======</text:span></text:p>
              <text:p text:style-name="P1"><text:span text:style-name="T1">ID#AAAAH1AC7mY</text:span></text:p>
              <text:p text:style-name="P1"><text:span text:style-name="T1">martin.brungard <text:s text:c="3"/>(2021-02-12 10:36:59)</text:span></text:p>
              <text:p text:style-name="P1"><text:span text:style-name="T1">This is an equivalent bicarbonate concentration.</text:span></text:p>
              <text:p text:style-name="P1"><text:span text:style-name="T1"/></text:p>
              <text:p text:style-name="P1"><text:span text:style-name="T1">If both an acid and alkali are input on this sheet in the Supporter's version, the bicarbonate cells turn Red to alert the User that both acid and alkaline additions have been input. This warning helps avoid adding too much mineralization.</text:span></text:p>
            </office:annotation>
            <text:p>0.0</text:p>
          </table:table-cell>
          <table:table-cell table:style-name="ce334" table:formula="of:=N([.B26])*[.T$17]" office:value-type="float" office:value="0" calcext:value-type="float" table:number-columns-spanned="2" table:number-rows-spanned="1">
            <text:p>0.0</text:p>
          </table:table-cell>
          <table:covered-table-cell table:style-name="ce343"/>
          <table:table-cell table:style-name="ce356" office:value-type="string" calcext:value-type="string" table:number-columns-spanned="2" table:number-rows-spanned="1">
            <office:annotation draw:style-name="gr57" draw:text-style-name="P2" svg:width="6.775cm" svg:height="3.016cm" svg:x="23.946cm" svg:y="17.806cm" draw:caption-point-x="1.272cm" draw:caption-point-y="-0.837cm">
              <dc:date>2021-02-12T00:00:00</dc:date>
              <text:p text:style-name="P1"><text:span text:style-name="T1">======</text:span></text:p>
              <text:p text:style-name="P1"><text:span text:style-name="T1">ID#AAAAH1AC7lY</text:span></text:p>
              <text:p text:style-name="P1"><text:span text:style-name="T1">martin.brungard <text:s text:c="3"/>(2021-02-12 10:36:59)</text:span></text:p>
              <text:p text:style-name="P1"><text:span text:style-name="T1">Do not add Alkalinity producing minerals to the sparge water.</text:span></text:p>
            </office:annotation>
            <text:p>Not Recommended</text:p>
          </table:table-cell>
          <table:covered-table-cell table:style-name="ce343"/>
          <table:table-cell table:style-name="ce376"/>
          <table:table-cell table:style-name="ce382" table:number-columns-repeated="3"/>
          <table:table-cell table:style-name="ce123" table:number-columns-repeated="2"/>
          <table:table-cell table:style-name="ce403"/>
          <table:table-cell table:style-name="ce96" office:value-type="float" office:value="1" calcext:value-type="float">
            <text:p>1</text:p>
          </table:table-cell>
          <table:table-cell table:style-name="ce108" office:value-type="string" calcext:value-type="string">
            <text:p>Acetic</text:p>
          </table:table-cell>
          <table:table-cell table:style-name="ce109" office:value-type="float" office:value="4.75" calcext:value-type="float">
            <text:p>4.75</text:p>
          </table:table-cell>
          <table:table-cell table:number-columns-repeated="2" table:style-name="ce109" office:value-type="float" office:value="20" calcext:value-type="float">
            <text:p>20.00</text:p>
          </table:table-cell>
          <table:table-cell table:style-name="ce109" office:value-type="float" office:value="60.05" calcext:value-type="float">
            <text:p>60.05</text:p>
          </table:table-cell>
          <table:table-cell table:style-name="ce109" table:formula="of:=1000*((-7.575*10^(-10)*([.$D$29]^4))+(7.01*10^(-8)*([.$D$29]^3))+(-9.254*10^(-6)*([.$D$29]^2))+(1.575*10^(-3)*[.$D$29])+0.9979)" office:value-type="float" office:value="1067.181288" calcext:value-type="float">
            <text:p>1067.18</text:p>
          </table:table-cell>
          <table:table-cell table:style-name="ce108" office:value-type="float" office:value="1" calcext:value-type="float">
            <text:p>1</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Acetic Acid Required =</text:p>
          </table:table-cell>
          <table:table-cell table:style-name="ce109" office:value-type="string" calcext:value-type="string">
            <text:p>Total Acid Addition (ml)</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Acetate added to water</text:p>
          </table:table-cell>
          <table:table-cell table:style-name="ce109" office:value-type="float" office:value="59" calcext:value-type="float">
            <text:p>59.00</text:p>
          </table:table-cell>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2">
          <table:table-cell table:style-name="ce240" office:value-type="string" calcext:value-type="string">
            <office:annotation draw:style-name="gr26" draw:text-style-name="P2" svg:width="7.982cm" svg:height="3.361cm" svg:x="5.381cm" svg:y="18.388cm" draw:caption-point-x="-0.407cm" draw:caption-point-y="-0.837cm">
              <dc:date>2021-02-12T00:00:00</dc:date>
              <text:p text:style-name="P1"><text:span text:style-name="T1">======</text:span></text:p>
              <text:p text:style-name="P1"><text:span text:style-name="T1">ID#AAAAH1AC7nM</text:span></text:p>
              <text:p text:style-name="P1"><text:span text:style-name="T1">martin.brungard <text:s text:c="3"/>(2021-02-12 10:36:59)</text:span></text:p>
              <text:p text:style-name="P1"><text:span text:style-name="T1">Add acid to mash to reduce bicarbonate concentration. <text:s/>Use Food-Grade acid when available. Laboratory-Reagent grade acid may be an acceptable alternative when food-grade acid is unavailable.</text:span></text:p>
            </office:annotation>
            <text:p>Acids</text:p>
          </table:table-cell>
          <table:table-cell table:style-name="ce258" office:value-type="string" calcext:value-type="string">
            <text:p>Addition</text:p>
          </table:table-cell>
          <table:table-cell table:style-name="ce283" table:number-columns-spanned="3" table:number-rows-spanned="1"/>
          <table:covered-table-cell table:style-name="ce294"/>
          <table:covered-table-cell table:style-name="ce298"/>
          <table:table-cell table:style-name="ce301" office:value-type="string" calcext:value-type="string">
            <text:p>Sulfate <text:s text:c="7"/>(ppm)</text:p>
          </table:table-cell>
          <table:table-cell table:style-name="ce301" office:value-type="string" calcext:value-type="string">
            <text:p>Chloride <text:s text:c="5"/>(ppm)</text:p>
          </table:table-cell>
          <table:table-cell table:style-name="ce315" office:value-type="string" calcext:value-type="string">
            <text:p>Bicarbonate (ppm)</text:p>
          </table:table-cell>
          <table:table-cell table:style-name="ce335" table:number-columns-spanned="2" table:number-rows-spanned="1"/>
          <table:covered-table-cell table:style-name="ce345"/>
          <table:table-cell table:style-name="ce357" table:number-columns-spanned="2" table:number-rows-spanned="1"/>
          <table:covered-table-cell table:style-name="ce364"/>
          <table:table-cell table:style-name="ce248"/>
          <table:table-cell table:style-name="ce382" table:number-columns-repeated="3"/>
          <table:table-cell table:style-name="ce123" table:number-columns-repeated="3"/>
          <table:table-cell table:style-name="ce96" office:value-type="float" office:value="2" calcext:value-type="float">
            <text:p>2</text:p>
          </table:table-cell>
          <table:table-cell table:style-name="ce108" office:value-type="string" calcext:value-type="string">
            <text:p>Hydrochloric</text:p>
          </table:table-cell>
          <table:table-cell table:style-name="ce109" office:value-type="float" office:value="-7" calcext:value-type="float">
            <text:p>-7.00</text:p>
          </table:table-cell>
          <table:table-cell table:number-columns-repeated="2" table:style-name="ce109" office:value-type="float" office:value="20" calcext:value-type="float">
            <text:p>20.00</text:p>
          </table:table-cell>
          <table:table-cell table:style-name="ce109" office:value-type="float" office:value="36.46" calcext:value-type="float">
            <text:p>36.46</text:p>
          </table:table-cell>
          <table:table-cell table:style-name="ce109" table:formula="of:=1000*((-3.1666*10^(-7)*([.$D$29]^3))+(1.8499*10^(-5)*([.$D$29]^2))+(4.7666*10^(-3)*[.$D$29])+0.998)" office:value-type="float" office:value="1344.922132" calcext:value-type="float">
            <text:p>1344.92</text:p>
          </table:table-cell>
          <table:table-cell table:style-name="ce108" office:value-type="float" office:value="1" calcext:value-type="float">
            <text:p>1</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Hydrochloric Acid Required =</text:p>
          </table:table-cell>
          <table:table-cell table:style-name="ce109" office:value-type="string" calcext:value-type="string">
            <text:p>Total Acid Addition (ml)</text:p>
          </table:table-cell>
          <table:table-cell table:style-name="ce131" table:formula="of:=VLOOKUP([.$AF$12];strengthtable;3;0)" office:value-type="float" office:value="-0" calcext:value-type="float">
            <text:p>0.00</text:p>
          </table:table-cell>
          <table:table-cell table:style-name="ce131"/>
          <table:table-cell table:style-name="ce132"/>
          <table:table-cell table:style-name="ce109"/>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01">
          <table:table-cell table:style-name="ce241" office:value-type="string" calcext:value-type="string">
            <text:p>Mash</text:p>
          </table:table-cell>
          <table:table-cell table:style-name="ce259" table:formula="of:=[.AB14]" office:value-type="string" office:string-value="(mL/gal)" calcext:value-type="string">
            <text:p>(mL/gal)</text:p>
          </table:table-cell>
          <table:table-cell table:style-name="ce284" office:value-type="string" calcext:value-type="string" table:number-columns-spanned="5" table:number-rows-spanned="1">
            <text:p><text:span text:style-name="T402">  Mash </text:span><text:span text:style-name="T389">Acid Strength parameters are entered </text:span><text:span text:style-name="T388">below</text:span></text:p>
          </table:table-cell>
          <table:covered-table-cell table:number-columns-repeated="4" table:style-name="ce295"/>
          <table:table-cell table:style-name="ce316" table:formula="of:=[.AF35]" office:value-type="string" office:string-value="Total Acid Addition (ml)" calcext:value-type="string" table:number-columns-spanned="4" table:number-rows-spanned="1">
            <text:p>Total Acid Addition (ml)</text:p>
          </table:table-cell>
          <table:covered-table-cell table:number-columns-repeated="3" table:style-name="ce295"/>
          <table:table-cell table:style-name="ce365"/>
          <table:table-cell table:style-name="ce377"/>
          <table:table-cell table:style-name="ce383" table:number-columns-repeated="3"/>
          <table:table-cell table:style-name="ce123" table:number-columns-repeated="3"/>
          <table:table-cell table:style-name="ce96" office:value-type="float" office:value="3" calcext:value-type="float">
            <text:p>3</text:p>
          </table:table-cell>
          <table:table-cell table:style-name="ce108" office:value-type="string" calcext:value-type="string">
            <text:p>Lactic</text:p>
          </table:table-cell>
          <table:table-cell table:style-name="ce109" office:value-type="float" office:value="3.86" calcext:value-type="float">
            <text:p>3.86</text:p>
          </table:table-cell>
          <table:table-cell table:number-columns-repeated="2" table:style-name="ce109" office:value-type="float" office:value="20" calcext:value-type="float">
            <text:p>20.00</text:p>
          </table:table-cell>
          <table:table-cell table:style-name="ce109" office:value-type="float" office:value="90.08" calcext:value-type="float">
            <text:p>90.08</text:p>
          </table:table-cell>
          <table:table-cell table:style-name="ce109" table:formula="of:=1000*((-5.311*10^(-8)*([.$D$29]^3))+(5.1587*10^(-6)*([.$D$29]^2))+(2.32499*10^(-3)*[.$D$29])+0.9986)" office:value-type="float" office:value="1206.955115" calcext:value-type="float">
            <text:p>1206.96</text:p>
          </table:table-cell>
          <table:table-cell table:style-name="ce108" office:value-type="float" office:value="1" calcext:value-type="float">
            <text:p>1</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Lactic Acid Required =</text:p>
          </table:table-cell>
          <table:table-cell table:style-name="ce109" office:value-type="string" calcext:value-type="string">
            <text:p>Total Acid Addition (ml)</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Lactate added to water</text:p>
          </table:table-cell>
          <table:table-cell table:style-name="ce109" office:value-type="float" office:value="89" calcext:value-type="float">
            <text:p>89.00</text:p>
          </table:table-cell>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0">
          <table:table-cell table:style-name="ce242" table:content-validation-name="val10" office:value-type="string" calcext:value-type="string">
            <office:annotation draw:style-name="gr61" draw:text-style-name="P2" svg:width="7.982cm" svg:height="8.017cm" svg:x="5.381cm" svg:y="19.817cm" draw:caption-point-x="-0.407cm" draw:caption-point-y="-0.837cm">
              <dc:date>2021-02-12T00:00:00</dc:date>
              <text:p text:style-name="P1"><text:span text:style-name="T1">======</text:span></text:p>
              <text:p text:style-name="P1"><text:span text:style-name="T1">ID#AAAAH1AC7j0</text:span></text:p>
              <text:p text:style-name="P1"><text:span text:style-name="T1">Martin Brungard <text:s text:c="3"/>(2021-02-12 10:36:59)</text:span></text:p>
              <text:p text:style-name="P1"><text:span text:style-name="T1">Select acid type from drop-down box. Also set the Strength parameters, to the right.</text:span></text:p>
              <text:p text:style-name="P1"><text:span text:style-name="T1"/></text:p>
              <text:p text:style-name="P1"><text:span text:style-name="T1">The Supporter's version includes the ability to include two acids in the mash and two in the sparge.</text:span></text:p>
            </office:annotation>
            <text:p>Lactic</text:p>
          </table:table-cell>
          <table:table-cell table:style-name="ce260" office:value-type="float" office:value="0" calcext:value-type="float">
            <text:p>0.00</text:p>
          </table:table-cell>
          <table:table-cell table:style-name="ce285" office:value-type="string" calcext:value-type="string">
            <text:p>Strength</text:p>
          </table:table-cell>
          <table:table-cell table:style-name="ce296" office:value-type="float" office:value="88" calcext:value-type="float">
            <office:annotation draw:style-name="gr61" draw:text-style-name="P2" svg:width="7.395cm" svg:height="8.017cm" svg:x="11.514cm" svg:y="19.817cm" draw:caption-point-x="-0.407cm" draw:caption-point-y="-0.837cm">
              <dc:date>2021-02-12T00:00:00</dc:date>
              <text:p text:style-name="P1"><text:span text:style-name="T1">======</text:span></text:p>
              <text:p text:style-name="P1"><text:span text:style-name="T1">ID#AAAAH1AC7pQ</text:span></text:p>
              <text:p text:style-name="P1"><text:span text:style-name="T1">Martin Brungard <text:s text:c="3"/>(2021-02-12 10:36:59)</text:span></text:p>
              <text:p text:style-name="P1"><text:span text:style-name="T1">Enter the numeric strength value that is reported for your acid. </text:span></text:p>
              <text:p text:style-name="P1"><text:span text:style-name="T1"/></text:p>
              <text:p text:style-name="P1"><text:span text:style-name="T1">Acid strength reported as Percent should be enter as a whole number. Example: 88% acid should be entered as 88 and not as 0.88</text:span></text:p>
            </office:annotation>
            <text:p>88.0</text:p>
          </table:table-cell>
          <table:table-cell table:style-name="ce299" table:content-validation-name="val11" office:value-type="string" calcext:value-type="string">
            <office:annotation draw:style-name="gr62" draw:text-style-name="P2" svg:width="7.225cm" svg:height="6.456cm" svg:x="13.363cm" svg:y="19.817cm" draw:caption-point-x="-0.407cm" draw:caption-point-y="-0.837cm">
              <dc:date>2021-02-12T00:00:00</dc:date>
              <text:p text:style-name="P1"><text:span text:style-name="T1">======</text:span></text:p>
              <text:p text:style-name="P1"><text:span text:style-name="T1">ID#AAAAH1AC7iE</text:span></text:p>
              <text:p text:style-name="P1"><text:span text:style-name="T1">Martin Brungard <text:s text:c="3"/>(2021-02-12 10:36:59)</text:span></text:p>
              <text:p text:style-name="P1"><text:span text:style-name="T1">Click cell to display drop-down box with acid strength parameters: percentage, normality, molarity, and solid.</text:span></text:p>
            </office:annotation>
            <text:p>%</text:p>
          </table:table-cell>
          <table:table-cell table:style-name="ce302" table:formula="of:=IF([.AF11]=9;[.W4];IF([.AF11]=5;VLOOKUP([.AF$12];strengthtable;4;0);0))" office:value-type="float" office:value="0" calcext:value-type="float">
            <text:p>0.0</text:p>
          </table:table-cell>
          <table:table-cell table:style-name="ce302" table:formula="of:=IF([.AF11]=9;[.X4];IF([.AF11]=2;VLOOKUP([.AF$12];strengthtable;5;0);0))" office:value-type="float" office:value="0" calcext:value-type="float">
            <text:p>0.0</text:p>
          </table:table-cell>
          <table:table-cell table:style-name="ce317" table:formula="of:=VLOOKUP([.$AF$12];strengthtable;3;0)" office:value-type="float" office:value="-0" calcext:value-type="float">
            <office:annotation draw:style-name="gr61" draw:text-style-name="P2" svg:width="6.716cm" svg:height="8.017cm" svg:x="18.909cm" svg:y="19.817cm" draw:caption-point-x="-0.407cm" draw:caption-point-y="-0.837cm">
              <dc:date>2021-02-12T00:00:00</dc:date>
              <text:p text:style-name="P1"><text:span text:style-name="T1">======</text:span></text:p>
              <text:p text:style-name="P1"><text:span text:style-name="T1">ID#AAAAH1AC7oE</text:span></text:p>
              <text:p text:style-name="P1"><text:span text:style-name="T1">martin.brungard <text:s text:c="3"/>(2021-02-12 10:36:59)</text:span></text:p>
              <text:p text:style-name="P1"><text:span text:style-name="T1">This is an equivalent concentration of neutralized bicarbonate. This is shown as a negative value.</text:span></text:p>
              <text:p text:style-name="P1"><text:span text:style-name="T1"/></text:p>
              <text:p text:style-name="P1"><text:span text:style-name="T1">If both an acid and alkali are input on this sheet in the Supporter's version, the bicarbonate cells turn Red to alert the User that both acid and alkaline additions have been input. This warning helps avoid adding too much mineralization.</text:span></text:p>
            </office:annotation>
            <text:p>0.0</text:p>
          </table:table-cell>
          <table:table-cell table:style-name="ce336" table:formula="of:=N([.B29])*[.T$17]" office:value-type="float" office:value="0" calcext:value-type="float" table:number-columns-spanned="2" table:number-rows-spanned="1">
            <text:p>0.0</text:p>
          </table:table-cell>
          <table:covered-table-cell table:style-name="ce346"/>
          <table:table-cell table:style-name="ce358" table:number-columns-spanned="2" table:number-rows-spanned="1"/>
          <table:covered-table-cell table:style-name="ce346"/>
          <table:table-cell table:style-name="ce378"/>
          <table:table-cell table:style-name="ce384" table:number-columns-repeated="3"/>
          <table:table-cell table:style-name="ce123" table:number-columns-repeated="3"/>
          <table:table-cell table:style-name="ce96" office:value-type="float" office:value="4" calcext:value-type="float">
            <text:p>4</text:p>
          </table:table-cell>
          <table:table-cell table:style-name="ce108" office:value-type="string" calcext:value-type="string">
            <text:p>Phosphoric</text:p>
          </table:table-cell>
          <table:table-cell table:style-name="ce109" office:value-type="float" office:value="2.12" calcext:value-type="float">
            <text:p>2.12</text:p>
          </table:table-cell>
          <table:table-cell table:style-name="ce109" office:value-type="float" office:value="7.2" calcext:value-type="float">
            <text:p>7.20</text:p>
          </table:table-cell>
          <table:table-cell table:style-name="ce109" office:value-type="float" office:value="12.44" calcext:value-type="float">
            <text:p>12.44</text:p>
          </table:table-cell>
          <table:table-cell table:style-name="ce109" office:value-type="float" office:value="98" calcext:value-type="float">
            <text:p>98.00</text:p>
          </table:table-cell>
          <table:table-cell table:style-name="ce109" table:formula="of:=1000*((-8.333*10^(-10)*([.$D$29]^4))+(2.6448*10^(-7)*([.$D$29]^3))+(1.4442*10^(-5)*([.$D$29]^2))+(5.4705*10^(-3)*[.$D$29])+0.9958)" office:value-type="float" office:value="1719.305948" calcext:value-type="float">
            <text:p>1719.31</text:p>
          </table:table-cell>
          <table:table-cell table:style-name="ce108" office:value-type="float" office:value="1" calcext:value-type="float">
            <text:p>1</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Phosphoric Acid Required =</text:p>
          </table:table-cell>
          <table:table-cell table:style-name="ce109" office:value-type="string" calcext:value-type="string">
            <text:p>Total Acid Addition (ml)</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Phosphate added to water</text:p>
          </table:table-cell>
          <table:table-cell table:style-name="ce109" office:value-type="float" office:value="95" calcext:value-type="float">
            <text:p>95.00</text:p>
          </table:table-cell>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0">
          <table:table-cell table:style-name="ce243" office:value-type="string" calcext:value-type="string">
            <text:p>Sparge</text:p>
          </table:table-cell>
          <table:table-cell table:style-name="ce261"/>
          <table:table-cell table:style-name="ce286" office:value-type="string" calcext:value-type="string" table:number-columns-spanned="7" table:number-rows-spanned="1">
            <text:p><text:span text:style-name="T403">  </text:span><text:span text:style-name="T404">Sparge </text:span><text:span text:style-name="T383">Acid Strength parameters are entered on the </text:span><text:span text:style-name="T384">Sparge Acidication</text:span><text:span text:style-name="T383"> sheet</text:span></text:p>
          </table:table-cell>
          <table:covered-table-cell table:number-columns-repeated="6" table:style-name="ce21"/>
          <table:table-cell table:style-name="ce347" table:formula="of:=[$'2. Sparge Acidification'.L50]" office:value-type="string" office:string-value="Total Acid Addition (ml)" calcext:value-type="string" table:number-columns-spanned="3" table:number-rows-spanned="1">
            <text:p>Total Acid Addition (ml)</text:p>
          </table:table-cell>
          <table:covered-table-cell table:style-name="ce21"/>
          <table:covered-table-cell table:style-name="ce307"/>
          <table:table-cell table:style-name="ce379"/>
          <table:table-cell table:style-name="ce385"/>
          <table:table-cell table:style-name="ce123" table:number-columns-repeated="5"/>
          <table:table-cell table:style-name="ce96" office:value-type="float" office:value="5" calcext:value-type="float">
            <text:p>5</text:p>
          </table:table-cell>
          <table:table-cell table:style-name="ce108" office:value-type="string" calcext:value-type="string">
            <text:p>Sulfuric</text:p>
          </table:table-cell>
          <table:table-cell table:style-name="ce109" office:value-type="float" office:value="-1" calcext:value-type="float">
            <text:p>-1.00</text:p>
          </table:table-cell>
          <table:table-cell table:style-name="ce109" office:value-type="float" office:value="1.92" calcext:value-type="float">
            <text:p>1.92</text:p>
          </table:table-cell>
          <table:table-cell table:style-name="ce109" office:value-type="float" office:value="20" calcext:value-type="float">
            <text:p>20.00</text:p>
          </table:table-cell>
          <table:table-cell table:style-name="ce109" office:value-type="float" office:value="98.07" calcext:value-type="float">
            <text:p>98.07</text:p>
          </table:table-cell>
          <table:table-cell table:style-name="ce109" table:formula="of:=1000*((-2.0911*10^(-8)*([.$D$29]^4))+(3.4312*10^(-6)*([.$D$29]^3))+(-1.3954*10^(-4)*([.$D$29]^2))+(9.0885*10^(-3)*[.$D$29])+0.9947)" office:value-type="float" office:value="1798.133999" calcext:value-type="float">
            <text:p>1798.13</text:p>
          </table:table-cell>
          <table:table-cell table:style-name="ce108" office:value-type="float" office:value="2" calcext:value-type="float">
            <text:p>2</text:p>
          </table:table-cell>
          <table:table-cell table:style-name="ce109" office:value-type="string" calcext:value-type="string">
            <text:p>(ml)</text:p>
          </table:table-cell>
          <table:table-cell table:style-name="ce109" office:value-type="string" calcext:value-type="string">
            <text:p>(tsp)</text:p>
          </table:table-cell>
          <table:table-cell table:style-name="ce109" office:value-type="string" calcext:value-type="string">
            <text:p>Addition <text:s text:c="7"/>(mL/gal)</text:p>
          </table:table-cell>
          <table:table-cell table:style-name="ce109" office:value-type="string" calcext:value-type="string">
            <text:p>Sulfuric Acid Required =</text:p>
          </table:table-cell>
          <table:table-cell table:style-name="ce109" office:value-type="string" calcext:value-type="string">
            <text:p>Total Acid Addition (ml)</text:p>
          </table:table-cell>
          <table:table-cell table:style-name="ce131" table:formula="of:=VLOOKUP([.$AF$12];strengthtable;3;0)" office:value-type="float" office:value="-0" calcext:value-type="float">
            <text:p>0.00</text:p>
          </table:table-cell>
          <table:table-cell table:style-name="ce131"/>
          <table:table-cell table:style-name="ce132"/>
          <table:table-cell table:style-name="ce109"/>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0">
          <table:table-cell table:style-name="ce244" table:formula="of:=[$'2. Sparge Acidification'.B50]" office:value-type="string" office:string-value="Phosphoric" calcext:value-type="string">
            <office:annotation draw:style-name="gr63" draw:text-style-name="P2" svg:width="7.982cm" svg:height="8.943cm" svg:x="5.381cm" svg:y="20.981cm" draw:caption-point-x="-0.407cm" draw:caption-point-y="-0.837cm">
              <dc:date>2021-02-12T00:00:00</dc:date>
              <text:p text:style-name="P1"><text:span text:style-name="T1">======</text:span></text:p>
              <text:p text:style-name="P1"><text:span text:style-name="T1">ID#AAAAH1AC7mg</text:span></text:p>
              <text:p text:style-name="P1"><text:span text:style-name="T1">Martin Brungard <text:s text:c="3"/>(2021-02-12 10:36:59)</text:span></text:p>
              <text:p text:style-name="P1"><text:span text:style-name="T1">This acid selection is made on the Sparge Acidification sheet</text:span></text:p>
              <text:p text:style-name="P1"><text:span text:style-name="T1"/></text:p>
              <text:p text:style-name="P1"><text:span text:style-name="T1">The Supporter's version includes the ability to include two acids in the mash and two in the sparge.</text:span></text:p>
            </office:annotation>
            <text:p>Phosphoric</text:p>
          </table:table-cell>
          <table:table-cell table:style-name="ce262"/>
          <table:table-cell table:style-name="ce287" office:value-type="string" calcext:value-type="string">
            <text:p>Strength</text:p>
          </table:table-cell>
          <table:table-cell table:style-name="ce297" table:formula="of:=[$'2. Sparge Acidification'.B9]" office:value-type="float" office:value="1" calcext:value-type="float">
            <text:p>1.0</text:p>
          </table:table-cell>
          <table:table-cell table:style-name="ce297" table:formula="of:=[$'2. Sparge Acidification'.B57]" office:value-type="string" office:string-value="%" calcext:value-type="string">
            <text:p>%</text:p>
          </table:table-cell>
          <table:table-cell table:style-name="ce282" table:formula="of:=[$'2. Sparge Acidification'.F15]" office:value-type="float" office:value="0" calcext:value-type="float">
            <text:p>0.0</text:p>
          </table:table-cell>
          <table:table-cell table:style-name="ce282" table:formula="of:=[$'2. Sparge Acidification'.F16]" office:value-type="float" office:value="0" calcext:value-type="float">
            <text:p>0.0</text:p>
          </table:table-cell>
          <table:table-cell table:style-name="ce297"/>
          <table:table-cell table:style-name="ce337" table:number-columns-spanned="2" table:number-rows-spanned="1"/>
          <table:covered-table-cell table:style-name="ce348"/>
          <table:table-cell table:style-name="ce334" table:formula="of:=IF([$'2. Sparge Acidification'.B$7]=1;[$'4. Water Adjustment'.U$17]*[$'2. Sparge Acidification'.B$12];[$'2. Sparge Acidification'.B$12])" office:value-type="float" office:value="1.44429180223575" calcext:value-type="float" table:number-columns-spanned="2" table:number-rows-spanned="1">
            <office:annotation draw:style-name="gr64" draw:text-style-name="P2" svg:width="6.775cm" svg:height="6.853cm" svg:x="23.946cm" svg:y="20.981cm" draw:caption-point-x="1.272cm" draw:caption-point-y="-0.837cm">
              <dc:date>2021-02-12T00:00:00</dc:date>
              <text:p text:style-name="P1"><text:span text:style-name="T1">======</text:span></text:p>
              <text:p text:style-name="P1"><text:span text:style-name="T1">ID#AAAAH1AC7h4</text:span></text:p>
              <text:p text:style-name="P1"><text:span text:style-name="T1">martin.brungard <text:s text:c="3"/>(2021-02-12 10:36:59)</text:span></text:p>
              <text:p text:style-name="P1"><text:span text:style-name="T1">If the Water Volume input on the Sparge Acidification sheet is 1 unit, the acid amount from that sheet is multiplied by the sparge water volume that was input on the Water Adjustment sheet. If the water volume on the Sparge Adjustment sheet is not 1 unit, the acid amount from the Sparge Adjustment sheet is shown here.</text:span></text:p>
            </office:annotation>
            <text:p>1.4</text:p>
          </table:table-cell>
          <table:covered-table-cell table:style-name="ce343"/>
          <table:table-cell table:style-name="ce378"/>
          <table:table-cell table:style-name="ce384" table:number-columns-repeated="3"/>
          <table:table-cell table:style-name="ce123" table:number-columns-repeated="3"/>
          <table:table-cell table:style-name="ce96" office:value-type="float" office:value="6" calcext:value-type="float">
            <text:p>6</text:p>
          </table:table-cell>
          <table:table-cell table:style-name="ce108" office:value-type="string" calcext:value-type="string">
            <text:p>Citric</text:p>
          </table:table-cell>
          <table:table-cell table:style-name="ce109" office:value-type="float" office:value="3.14" calcext:value-type="float">
            <text:p>3.14</text:p>
          </table:table-cell>
          <table:table-cell table:style-name="ce109" office:value-type="float" office:value="4.77" calcext:value-type="float">
            <text:p>4.77</text:p>
          </table:table-cell>
          <table:table-cell table:style-name="ce109" office:value-type="float" office:value="6.39" calcext:value-type="float">
            <text:p>6.39</text:p>
          </table:table-cell>
          <table:table-cell table:style-name="ce109" office:value-type="float" office:value="192.13" calcext:value-type="float">
            <text:p>192.13</text:p>
          </table:table-cell>
          <table:table-cell table:style-name="ce109" office:value-type="float" office:value="1480" calcext:value-type="float">
            <text:p>1480.00</text:p>
          </table:table-cell>
          <table:table-cell table:style-name="ce108" office:value-type="float" office:value="1" calcext:value-type="float">
            <text:p>1</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Citric Acid Required =</text:p>
          </table:table-cell>
          <table:table-cell table:style-name="ce109" office:value-type="string" calcext:value-type="string">
            <text:p>Total Acid Addition (gram)</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Citrate added to water</text:p>
          </table:table-cell>
          <table:table-cell table:style-name="ce109" office:value-type="float" office:value="189" calcext:value-type="float">
            <text:p>189.00</text:p>
          </table:table-cell>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0">
          <table:table-cell table:style-name="ce245" office:value-type="string" calcext:value-type="string">
            <text:p>Bru'n Water v 1.25</text:p>
          </table:table-cell>
          <table:table-cell table:style-name="ce248" table:number-columns-repeated="6"/>
          <table:table-cell table:style-name="ce318"/>
          <table:table-cell table:style-name="ce248" table:number-columns-repeated="4"/>
          <table:table-cell table:style-name="ce379"/>
          <table:table-cell table:style-name="ce385"/>
          <table:table-cell table:style-name="ce123" table:number-columns-repeated="5"/>
          <table:table-cell table:style-name="ce96" office:value-type="float" office:value="7" calcext:value-type="float">
            <text:p>7</text:p>
          </table:table-cell>
          <table:table-cell table:style-name="ce108" office:value-type="string" calcext:value-type="string">
            <text:p>Tartaric</text:p>
          </table:table-cell>
          <table:table-cell table:style-name="ce109" office:value-type="float" office:value="2.98" calcext:value-type="float">
            <text:p>2.98</text:p>
          </table:table-cell>
          <table:table-cell table:style-name="ce109" office:value-type="float" office:value="4.34" calcext:value-type="float">
            <text:p>4.34</text:p>
          </table:table-cell>
          <table:table-cell table:style-name="ce109" office:value-type="float" office:value="20" calcext:value-type="float">
            <text:p>20.00</text:p>
          </table:table-cell>
          <table:table-cell table:style-name="ce109" office:value-type="float" office:value="150.09" calcext:value-type="float">
            <text:p>150.09</text:p>
          </table:table-cell>
          <table:table-cell table:style-name="ce109" office:value-type="float" office:value="1000" calcext:value-type="float">
            <text:p>1000.00</text:p>
          </table:table-cell>
          <table:table-cell table:style-name="ce108" office:value-type="float" office:value="1" calcext:value-type="float">
            <text:p>1</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Tartaric Acid Required =</text:p>
          </table:table-cell>
          <table:table-cell table:style-name="ce109" office:value-type="string" calcext:value-type="string">
            <text:p>Total Acid Addition (gram)</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Tartarate added to water</text:p>
          </table:table-cell>
          <table:table-cell table:style-name="ce109" office:value-type="float" office:value="148" calcext:value-type="float">
            <text:p>148.00</text:p>
          </table:table-cell>
          <table:table-cell table:style-name="ce96" table:number-columns-repeated="4"/>
          <table:table-cell table:style-name="ce108"/>
          <table:table-cell table:style-name="ce109" table:number-columns-repeated="5"/>
          <table:table-cell table:style-name="ce108"/>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29">
          <table:table-cell table:style-name="ce246" office:value-type="string" calcext:value-type="string" table:number-columns-spanned="12" table:number-rows-spanned="1">
            <text:p><text:span text:style-name="T385">Most mineral additions should be added to both the mash water and sparge water.  DO NOT add alkalinity producing minerals such as chalk, baking soda, or pickling lime to sparge water since that counteracts the desired sparge water acidification.  Either reserve those minerals from the sparge water and add directly to the kettle, or delete them and substitute other calcium or sodium containing minerals to make up for their contributions.  Do not use the acid amount calculated for Mash Adjustment from this sheet for the Sparge Water adjustment.  Use the acid amount calculated on the Sparge Acidification sheet for Sparge Water.  </text:span><text:span text:style-name="T398">For best result, add acids prior to heating the water since heating can drive off a portion of the alkalinity that the acid addition was calculated to remove.</text:span></text:p>
          </table:table-cell>
          <table:covered-table-cell table:number-columns-repeated="11"/>
          <table:table-cell table:style-name="ce378"/>
          <table:table-cell table:style-name="ce386" table:number-columns-spanned="3" table:number-rows-spanned="1"/>
          <table:covered-table-cell table:number-columns-repeated="2"/>
          <table:table-cell table:style-name="ce123" table:number-columns-repeated="3"/>
          <table:table-cell table:style-name="ce96" office:value-type="float" office:value="8" calcext:value-type="float">
            <text:p>8</text:p>
          </table:table-cell>
          <table:table-cell table:style-name="ce108" office:value-type="string" calcext:value-type="string">
            <text:p>Malic</text:p>
          </table:table-cell>
          <table:table-cell table:style-name="ce109" office:value-type="float" office:value="3.4" calcext:value-type="float">
            <text:p>3.40</text:p>
          </table:table-cell>
          <table:table-cell table:style-name="ce109" office:value-type="float" office:value="5.2" calcext:value-type="float">
            <text:p>5.20</text:p>
          </table:table-cell>
          <table:table-cell table:style-name="ce109" office:value-type="float" office:value="20" calcext:value-type="float">
            <text:p>20.00</text:p>
          </table:table-cell>
          <table:table-cell table:style-name="ce109" office:value-type="float" office:value="134.09" calcext:value-type="float">
            <text:p>134.09</text:p>
          </table:table-cell>
          <table:table-cell table:style-name="ce109" office:value-type="float" office:value="1609" calcext:value-type="float">
            <text:p>1609.00</text:p>
          </table:table-cell>
          <table:table-cell table:style-name="ce108" office:value-type="float" office:value="1" calcext:value-type="float">
            <text:p>1</text:p>
          </table:table-cell>
          <table:table-cell table:style-name="ce109" office:value-type="string" calcext:value-type="string">
            <text:p>(grams)</text:p>
          </table:table-cell>
          <table:table-cell table:style-name="ce109" office:value-type="string" calcext:value-type="string">
            <text:p>(kg)</text:p>
          </table:table-cell>
          <table:table-cell table:style-name="ce109" office:value-type="string" calcext:value-type="string">
            <text:p>Addition <text:s text:c="7"/>(gram/gal)</text:p>
          </table:table-cell>
          <table:table-cell table:style-name="ce109" office:value-type="string" calcext:value-type="string">
            <text:p>Malic Acid Required =</text:p>
          </table:table-cell>
          <table:table-cell table:style-name="ce109" office:value-type="string" calcext:value-type="string">
            <text:p>Total Acid Addition (gram)</text:p>
          </table:table-cell>
          <table:table-cell table:style-name="ce131" table:formula="of:=VLOOKUP([.$AF$12];strengthtable;3;0)" office:value-type="float" office:value="-0" calcext:value-type="float">
            <text:p>0.00</text:p>
          </table:table-cell>
          <table:table-cell table:style-name="ce131"/>
          <table:table-cell table:style-name="ce132" office:value-type="string" calcext:value-type="string">
            <text:p>(ppm) Malate added to water</text:p>
          </table:table-cell>
          <table:table-cell table:style-name="ce109" office:value-type="float" office:value="132" calcext:value-type="float">
            <text:p>132.00</text:p>
          </table:table-cell>
          <table:table-cell table:style-name="ce96" table:number-columns-repeated="4"/>
          <table:table-cell table:style-name="ce108" table:number-columns-repeated="7"/>
          <table:table-cell table:style-name="ce109" table:number-columns-repeated="5"/>
          <table:table-cell table:style-name="ce413" table:number-columns-repeated="2"/>
          <table:table-cell table:style-name="ce415"/>
          <table:table-cell table:style-name="ce414"/>
          <table:table-cell table:number-columns-repeated="8"/>
        </table:table-row>
        <table:table-row table:style-name="ro112">
          <table:table-cell table:style-name="ce93" office:value-type="string" calcext:value-type="string" table:number-columns-spanned="12" table:number-rows-spanned="1">
            <text:p><text:span text:style-name="T374">Copyright © 2020 </text:span><text:span text:style-name="T375">Martin Brungard</text:span><text:span text:style-name="T376">. All rights reserved. Reproduction in whole or in part in any form or medium without the express written permission of Martin Brungard, is prohibited.  Any transfer or exchange of this program via any method to anyone other than the original licensee is prohibited.  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span></text:p>
          </table:table-cell>
          <table:covered-table-cell table:number-columns-repeated="11"/>
          <table:table-cell table:style-name="ce380"/>
          <table:table-cell table:style-name="ce385"/>
          <table:table-cell table:style-name="ce123" table:number-columns-repeated="5"/>
          <table:table-cell table:style-name="ce96"/>
          <table:table-cell table:style-name="ce108" table:number-columns-repeated="7"/>
          <table:table-cell table:style-name="ce109" table:number-columns-repeated="5"/>
          <table:table-cell table:style-name="ce131" table:number-columns-repeated="2"/>
          <table:table-cell table:style-name="ce132"/>
          <table:table-cell table:style-name="ce109"/>
          <table:table-cell table:style-name="ce96" table:number-columns-repeated="4"/>
          <table:table-cell table:style-name="ce109" table:number-columns-repeated="12"/>
          <table:table-cell table:style-name="ce414" table:number-columns-repeated="4"/>
          <table:table-cell table:number-columns-repeated="8"/>
        </table:table-row>
        <table:table-row table:style-name="ro100">
          <table:table-cell table:style-name="ce247" office:value-type="string" calcext:value-type="string" table:number-columns-spanned="12" table:number-rows-spanned="1">
            <text:p>Input Custom Water Profiles at the bottom of the Table below</text:p>
          </table:table-cell>
          <table:covered-table-cell table:number-columns-repeated="11"/>
          <table:table-cell table:style-name="ce378"/>
          <table:table-cell table:style-name="ce386" table:number-columns-spanned="3" table:number-rows-spanned="1"/>
          <table:covered-table-cell table:number-columns-repeated="2"/>
          <table:table-cell table:style-name="ce123" table:number-columns-repeated="3"/>
          <table:table-cell table:style-name="ce406" table:formula="of:=VLOOKUP([.$AF$11];acidtable;1;0)" office:value-type="float" office:value="3" calcext:value-type="float">
            <text:p>3</text:p>
          </table:table-cell>
          <table:table-cell table:style-name="ce109" table:formula="of:=VLOOKUP([.$AF$11];acidtable;2;0)" office:value-type="string" office:string-value="Lactic" calcext:value-type="string">
            <text:p>Lactic</text:p>
          </table:table-cell>
          <table:table-cell table:style-name="ce109" table:formula="of:=VLOOKUP([.$AF$11];acidtable;3;0)" office:value-type="float" office:value="3.86" calcext:value-type="float">
            <text:p>3.86</text:p>
          </table:table-cell>
          <table:table-cell table:style-name="ce109" table:formula="of:=VLOOKUP([.$AF$11];acidtable;4;0)" office:value-type="float" office:value="20" calcext:value-type="float">
            <text:p>20.00</text:p>
          </table:table-cell>
          <table:table-cell table:style-name="ce109" table:formula="of:=VLOOKUP([.$AF$11];acidtable;5;0)" office:value-type="float" office:value="20" calcext:value-type="float">
            <text:p>20.00</text:p>
          </table:table-cell>
          <table:table-cell table:style-name="ce109" table:formula="of:=VLOOKUP([.$AF$11];acidtable;6;0)" office:value-type="float" office:value="90.08" calcext:value-type="float">
            <text:p>90.08</text:p>
          </table:table-cell>
          <table:table-cell table:style-name="ce109" table:formula="of:=VLOOKUP([.$AF$11];acidtable;7;0)" office:value-type="float" office:value="1206.955115" calcext:value-type="float">
            <text:p>1206.96</text:p>
          </table:table-cell>
          <table:table-cell table:style-name="ce109" table:formula="of:=VLOOKUP([.$AF$11];acidtable;8;0)" office:value-type="float" office:value="1" calcext:value-type="float">
            <text:p>1.00</text:p>
          </table:table-cell>
          <table:table-cell table:style-name="ce109" table:formula="of:=VLOOKUP([.$AF$11];acidtable;9;0)" office:value-type="string" office:string-value="(ml)" calcext:value-type="string">
            <text:p>(ml)</text:p>
          </table:table-cell>
          <table:table-cell table:style-name="ce109" table:formula="of:=VLOOKUP([.$AF$11];acidtable;10;0)" office:value-type="string" office:string-value="(tsp)" calcext:value-type="string">
            <text:p>(tsp)</text:p>
          </table:table-cell>
          <table:table-cell table:style-name="ce109" table:formula="of:=VLOOKUP([.$AF$11];acidtable;11;0)" office:value-type="string" office:string-value="Addition        (mL/gal)" calcext:value-type="string">
            <text:p>Addition <text:s text:c="7"/>(mL/gal)</text:p>
          </table:table-cell>
          <table:table-cell table:style-name="ce109" table:formula="of:=VLOOKUP([.$AF$11];acidtable;12;0)" office:value-type="string" office:string-value="Lactic Acid Required =" calcext:value-type="string">
            <text:p>Lactic Acid Required =</text:p>
          </table:table-cell>
          <table:table-cell table:style-name="ce109" table:formula="of:=VLOOKUP([.$AF$11];acidtable;13;0)" office:value-type="string" office:string-value="Total Acid Addition (ml)" calcext:value-type="string">
            <text:p>Total Acid Addition (ml)</text:p>
          </table:table-cell>
          <table:table-cell table:style-name="ce109" table:formula="of:=VLOOKUP([.$AF$11];acidtable;14;0)" office:value-type="float" office:value="-0" calcext:value-type="float">
            <text:p>0.00</text:p>
          </table:table-cell>
          <table:table-cell table:style-name="ce109" table:formula="of:=VLOOKUP([.$AF$11];acidtable;15;0)" office:value-type="float" office:value="0" calcext:value-type="float">
            <text:p/>
          </table:table-cell>
          <table:table-cell table:style-name="ce109" table:formula="of:=VLOOKUP([.$AF$11];acidtable;16;0)" office:value-type="string" office:string-value="(ppm) Lactate added to water" calcext:value-type="string">
            <text:p>(ppm) Lactate added to water</text:p>
          </table:table-cell>
          <table:table-cell table:style-name="ce109" table:formula="of:=VLOOKUP([.$AF$11];acidtable;17;0)" office:value-type="float" office:value="89" calcext:value-type="float">
            <text:p>89.00</text:p>
          </table:table-cell>
          <table:table-cell table:style-name="ce96" table:number-columns-repeated="16"/>
          <table:table-cell table:style-name="ce123" table:number-columns-repeated="4"/>
          <table:table-cell table:number-columns-repeated="8"/>
        </table:table-row>
        <table:table-row table:style-name="ro110">
          <table:table-cell table:style-name="ce247" office:value-type="string" calcext:value-type="string" table:number-columns-spanned="12" table:number-rows-spanned="1">
            <text:p>All Water Profiles are User customizable </text:p>
          </table:table-cell>
          <table:covered-table-cell table:number-columns-repeated="11"/>
          <table:table-cell table:style-name="ce123" table:number-columns-repeated="7"/>
          <table:table-cell table:style-name="ce96" table:number-columns-repeated="21"/>
          <table:table-cell table:style-name="ce109" table:number-columns-repeated="7"/>
          <table:table-cell table:style-name="ce96" table:number-columns-repeated="5"/>
          <table:table-cell table:style-name="ce123" table:number-columns-repeated="4"/>
          <table:table-cell table:number-columns-repeated="8"/>
        </table:table-row>
        <table:table-row table:style-name="ro99">
          <table:table-cell table:style-name="ce248"/>
          <table:table-cell table:style-name="ce767" office:value-type="string" calcext:value-type="string">
            <text:p>Water Profile</text:p>
          </table:table-cell>
          <table:table-cell table:style-name="ce767" office:value-type="string" calcext:value-type="string">
            <text:p>Calcium <text:s text:c="5"/>(ppm)</text:p>
          </table:table-cell>
          <table:table-cell table:style-name="ce767" office:value-type="string" calcext:value-type="string">
            <text:p>Magnesium (ppm)</text:p>
          </table:table-cell>
          <table:table-cell table:style-name="ce767" office:value-type="string" calcext:value-type="string">
            <text:p>Sodium <text:s text:c="7"/>(ppm)</text:p>
          </table:table-cell>
          <table:table-cell table:style-name="ce767" office:value-type="string" calcext:value-type="string">
            <text:p>Sulfate <text:s text:c="7"/>(ppm)</text:p>
          </table:table-cell>
          <table:table-cell table:style-name="ce767" office:value-type="string" calcext:value-type="string">
            <text:p>Chloride <text:s text:c="5"/>(ppm)</text:p>
          </table:table-cell>
          <table:table-cell table:style-name="ce767" office:value-type="string" calcext:value-type="string">
            <text:p>Bicarbonate (ppm)</text:p>
          </table:table-cell>
          <table:table-cell table:style-name="ce767" office:value-type="string" calcext:value-type="string">
            <text:p>Cations (meq/L)</text:p>
          </table:table-cell>
          <table:table-cell table:style-name="ce767" office:value-type="string" calcext:value-type="string">
            <text:p>Anions (meq/L)</text:p>
          </table:table-cell>
          <table:table-cell table:style-name="ce359" office:value-type="string" calcext:value-type="string">
            <text:p>Total Hardness</text:p>
          </table:table-cell>
          <table:table-cell table:style-name="ce767" office:value-type="string" calcext:value-type="string">
            <text:p>Alkalinity</text:p>
          </table:table-cell>
          <table:table-cell table:style-name="ce767" office:value-type="string" calcext:value-type="string">
            <text:p>RA</text:p>
          </table:table-cell>
          <table:table-cell table:style-name="ce767" office:value-type="string" calcext:value-type="string">
            <text:p><text:span text:style-name="T387">SO</text:span><text:span text:style-name="T396">4</text:span><text:span text:style-name="T397">/Cl Ratio</text:span></text:p>
          </table:table-cell>
          <table:table-cell table:style-name="ce767" office:value-type="string" calcext:value-type="string" table:number-columns-spanned="5" table:number-rows-spanned="1">
            <text:p>Comments</text:p>
          </table:table-cell>
          <table:covered-table-cell table:number-columns-repeated="3" table:style-name="ce21"/>
          <table:covered-table-cell table:style-name="ce19"/>
          <table:table-cell table:style-name="ce96" table:number-columns-repeated="33"/>
          <table:table-cell table:style-name="ce123" table:number-columns-repeated="4"/>
          <table:table-cell table:number-columns-repeated="8"/>
        </table:table-row>
        <table:table-row table:style-name="ro108">
          <table:table-cell table:style-name="ce248" office:value-type="float" office:value="1" calcext:value-type="float">
            <text:p>1</text:p>
          </table:table-cell>
          <table:table-cell table:style-name="ce264" office:value-type="string" calcext:value-type="string">
            <text:p>Burton</text:p>
          </table:table-cell>
          <table:table-cell table:style-name="ce288" office:value-type="float" office:value="275" calcext:value-type="float">
            <text:p>275</text:p>
          </table:table-cell>
          <table:table-cell table:style-name="ce288" office:value-type="float" office:value="40" calcext:value-type="float">
            <text:p>40</text:p>
          </table:table-cell>
          <table:table-cell table:style-name="ce288" office:value-type="float" office:value="25" calcext:value-type="float">
            <text:p>25</text:p>
          </table:table-cell>
          <table:table-cell table:style-name="ce288" office:value-type="float" office:value="610" calcext:value-type="float">
            <text:p>610</text:p>
          </table:table-cell>
          <table:table-cell table:style-name="ce288" office:value-type="float" office:value="35" calcext:value-type="float">
            <text:p>35</text:p>
          </table:table-cell>
          <table:table-cell table:style-name="ce288" office:value-type="float" office:value="270" calcext:value-type="float">
            <text:p>270</text:p>
          </table:table-cell>
          <table:table-cell table:style-name="ce338" table:formula="of:=([.C38]/20.05)+([.D38]/12.15)+([.E38]/23)" office:value-type="float" office:value="18.09484831489" calcext:value-type="float">
            <text:p>18.1</text:p>
          </table:table-cell>
          <table:table-cell table:style-name="ce349" table:formula="of:=([.H38]/61)+([.F38]/48)+([.G38]/35.45)" office:value-type="float" office:value="18.1218689064102" calcext:value-type="float">
            <text:p>18.1</text:p>
          </table:table-cell>
          <table:table-cell table:style-name="ce268" table:formula="of:=(([.C38]/20)+([.D38]/12.15))*50" office:value-type="float" office:value="852.109053497942" calcext:value-type="float">
            <text:p>852</text:p>
          </table:table-cell>
          <table:table-cell table:style-name="ce366" table:formula="of:=[.H38]*(50/61)*(1+(2*10^-4))" office:value-type="float" office:value="221.355737704918" calcext:value-type="float">
            <text:p>221</text:p>
          </table:table-cell>
          <table:table-cell table:style-name="ce268" table:formula="of:=([.L38]-(([.C38]*0.7143)+([.D38]*0.5879)))" office:value-type="float" office:value="1.40723770491803" calcext:value-type="float">
            <text:p>1</text:p>
          </table:table-cell>
          <table:table-cell table:style-name="ce279" table:formula="of:=IF([.G38]&lt;=0;0;[.F38]/[.G38])" office:value-type="float" office:value="17.4285714285714" calcext:value-type="float">
            <text:p>17.4</text:p>
          </table:table-cell>
          <table:table-cell table:style-name="ce392" office:value-type="string" calcext:value-type="string" table:number-columns-spanned="5" table:number-rows-spanned="1">
            <text:p>from UK Env Agency records</text:p>
          </table:table-cell>
          <table:covered-table-cell table:number-columns-repeated="3" table:style-name="ce21"/>
          <table:covered-table-cell table:style-name="ce19"/>
          <table:table-cell table:style-name="ce96" table:number-columns-repeated="33"/>
          <table:table-cell table:style-name="ce123" table:number-columns-repeated="4"/>
          <table:table-cell table:number-columns-repeated="8"/>
        </table:table-row>
        <table:table-row table:style-name="ro108">
          <table:table-cell table:style-name="ce248" office:value-type="float" office:value="2" calcext:value-type="float">
            <text:p>2</text:p>
          </table:table-cell>
          <table:table-cell table:style-name="ce264" office:value-type="string" calcext:value-type="string">
            <text:p>Dortmund</text:p>
          </table:table-cell>
          <table:table-cell table:style-name="ce288" office:value-type="float" office:value="230" calcext:value-type="float">
            <text:p>230</text:p>
          </table:table-cell>
          <table:table-cell table:style-name="ce288" office:value-type="float" office:value="15" calcext:value-type="float">
            <text:p>15</text:p>
          </table:table-cell>
          <table:table-cell table:style-name="ce288" office:value-type="float" office:value="40" calcext:value-type="float">
            <text:p>40</text:p>
          </table:table-cell>
          <table:table-cell table:style-name="ce288" office:value-type="float" office:value="330" calcext:value-type="float">
            <text:p>330</text:p>
          </table:table-cell>
          <table:table-cell table:style-name="ce288" office:value-type="float" office:value="130" calcext:value-type="float">
            <text:p>130</text:p>
          </table:table-cell>
          <table:table-cell table:style-name="ce288" office:value-type="float" office:value="235" calcext:value-type="float">
            <text:p>235</text:p>
          </table:table-cell>
          <table:table-cell table:style-name="ce338" table:formula="of:=([.C39]/20.05)+([.D39]/12.15)+([.E39]/23)" office:value-type="float" office:value="14.4450200317778" calcext:value-type="float">
            <text:p>14.4</text:p>
          </table:table-cell>
          <table:table-cell table:style-name="ce349" table:formula="of:=([.H39]/61)+([.F39]/48)+([.G39]/35.45)" office:value-type="float" office:value="14.3945958288053" calcext:value-type="float">
            <text:p>14.4</text:p>
          </table:table-cell>
          <table:table-cell table:style-name="ce268" table:formula="of:=(([.C39]/20)+([.D39]/12.15))*50" office:value-type="float" office:value="636.728395061728" calcext:value-type="float">
            <text:p>637</text:p>
          </table:table-cell>
          <table:table-cell table:style-name="ce366" table:formula="of:=[.H39]*(50/61)*(1+(2*10^-4))" office:value-type="float" office:value="192.661475409836" calcext:value-type="float">
            <text:p>193</text:p>
          </table:table-cell>
          <table:table-cell table:style-name="ce268" table:formula="of:=([.L39]-(([.C39]*0.7143)+([.D39]*0.5879)))" office:value-type="float" office:value="19.553975409836" calcext:value-type="float">
            <text:p>20</text:p>
          </table:table-cell>
          <table:table-cell table:style-name="ce279" table:formula="of:=IF([.G39]&lt;=0;0;[.F39]/[.G39])" office:value-type="float" office:value="2.53846153846154" calcext:value-type="float">
            <text:p>2.5</text:p>
          </table:table-cell>
          <table:table-cell table:style-name="ce392" table:number-columns-spanned="5" table:number-rows-spanned="1"/>
          <table:covered-table-cell table:number-columns-repeated="3" table:style-name="ce21"/>
          <table:covered-table-cell table:style-name="ce19"/>
          <table:table-cell table:style-name="ce96" table:number-columns-repeated="33"/>
          <table:table-cell table:style-name="ce123" table:number-columns-repeated="4"/>
          <table:table-cell table:number-columns-repeated="8"/>
        </table:table-row>
        <table:table-row table:style-name="ro108">
          <table:table-cell table:style-name="ce248" office:value-type="float" office:value="3" calcext:value-type="float">
            <text:p>3</text:p>
          </table:table-cell>
          <table:table-cell table:style-name="ce264" office:value-type="string" calcext:value-type="string">
            <text:p>Dublin</text:p>
          </table:table-cell>
          <table:table-cell table:style-name="ce288" office:value-type="float" office:value="120" calcext:value-type="float">
            <text:p>120</text:p>
          </table:table-cell>
          <table:table-cell table:style-name="ce288" office:value-type="float" office:value="4" calcext:value-type="float">
            <text:p>4</text:p>
          </table:table-cell>
          <table:table-cell table:style-name="ce288" office:value-type="float" office:value="12" calcext:value-type="float">
            <text:p>12</text:p>
          </table:table-cell>
          <table:table-cell table:style-name="ce288" office:value-type="float" office:value="55" calcext:value-type="float">
            <text:p>55</text:p>
          </table:table-cell>
          <table:table-cell table:style-name="ce288" office:value-type="float" office:value="19" calcext:value-type="float">
            <text:p>19</text:p>
          </table:table-cell>
          <table:table-cell table:style-name="ce288" office:value-type="float" office:value="315" calcext:value-type="float">
            <text:p>315</text:p>
          </table:table-cell>
          <table:table-cell table:style-name="ce338" table:formula="of:=([.C40]/20.05)+([.D40]/12.15)+([.E40]/23)" office:value-type="float" office:value="6.83599464391446" calcext:value-type="float">
            <text:p>6.8</text:p>
          </table:table-cell>
          <table:table-cell table:style-name="ce349" table:formula="of:=([.H40]/61)+([.F40]/48)+([.G40]/35.45)" office:value-type="float" office:value="6.84573390906919" calcext:value-type="float">
            <text:p>6.8</text:p>
          </table:table-cell>
          <table:table-cell table:style-name="ce268" table:formula="of:=(([.C40]/20)+([.D40]/12.15))*50" office:value-type="float" office:value="316.460905349794" calcext:value-type="float">
            <text:p>316</text:p>
          </table:table-cell>
          <table:table-cell table:style-name="ce366" table:formula="of:=[.H40]*(50/61)*(1+(2*10^-4))" office:value-type="float" office:value="258.248360655738" calcext:value-type="float">
            <text:p>258</text:p>
          </table:table-cell>
          <table:table-cell table:style-name="ce268" table:formula="of:=([.L40]-(([.C40]*0.7143)+([.D40]*0.5879)))" office:value-type="float" office:value="170.180760655738" calcext:value-type="float">
            <text:p>170</text:p>
          </table:table-cell>
          <table:table-cell table:style-name="ce279" table:formula="of:=IF([.G40]&lt;=0;0;[.F40]/[.G40])" office:value-type="float" office:value="2.89473684210526" calcext:value-type="float">
            <text:p>2.9</text:p>
          </table:table-cell>
          <table:table-cell table:style-name="ce392" office:value-type="string" calcext:value-type="string" table:number-columns-spanned="5" table:number-rows-spanned="1">
            <text:p>from north and west Dublin</text:p>
          </table:table-cell>
          <table:covered-table-cell table:number-columns-repeated="3" table:style-name="ce21"/>
          <table:covered-table-cell table:style-name="ce19"/>
          <table:table-cell table:style-name="ce96" table:number-columns-repeated="2"/>
          <table:table-cell table:style-name="ce96" office:value-type="float" office:value="5.4" calcext:value-type="float">
            <text:p>5.4</text:p>
          </table:table-cell>
          <table:table-cell table:style-name="ce96" table:number-columns-repeated="30"/>
          <table:table-cell table:style-name="ce123" table:number-columns-repeated="4"/>
          <table:table-cell table:number-columns-repeated="8"/>
        </table:table-row>
        <table:table-row table:style-name="ro108">
          <table:table-cell table:style-name="ce248" office:value-type="float" office:value="4" calcext:value-type="float">
            <text:p>4</text:p>
          </table:table-cell>
          <table:table-cell table:style-name="ce264" office:value-type="string" calcext:value-type="string">
            <text:p>Dublin (boiled)</text:p>
          </table:table-cell>
          <table:table-cell table:style-name="ce288" office:value-type="float" office:value="43" calcext:value-type="float">
            <text:p>43</text:p>
          </table:table-cell>
          <table:table-cell table:style-name="ce288" office:value-type="float" office:value="4" calcext:value-type="float">
            <text:p>4</text:p>
          </table:table-cell>
          <table:table-cell table:style-name="ce288" office:value-type="float" office:value="12" calcext:value-type="float">
            <text:p>12</text:p>
          </table:table-cell>
          <table:table-cell table:style-name="ce288" office:value-type="float" office:value="55" calcext:value-type="float">
            <text:p>55</text:p>
          </table:table-cell>
          <table:table-cell table:style-name="ce288" office:value-type="float" office:value="19" calcext:value-type="float">
            <text:p>19</text:p>
          </table:table-cell>
          <table:table-cell table:style-name="ce288" office:value-type="float" office:value="80" calcext:value-type="float">
            <text:p>80</text:p>
          </table:table-cell>
          <table:table-cell table:style-name="ce338" table:formula="of:=([.C41]/20.05)+([.D41]/12.15)+([.E41]/23)" office:value-type="float" office:value="2.99559564142069" calcext:value-type="float">
            <text:p>3.0</text:p>
          </table:table-cell>
          <table:table-cell table:style-name="ce349" table:formula="of:=([.H41]/61)+([.F41]/48)+([.G41]/35.45)" office:value-type="float" office:value="2.99327489267575" calcext:value-type="float">
            <text:p>3.0</text:p>
          </table:table-cell>
          <table:table-cell table:style-name="ce268" table:formula="of:=(([.C41]/20)+([.D41]/12.15))*50" office:value-type="float" office:value="123.960905349794" calcext:value-type="float">
            <text:p>124</text:p>
          </table:table-cell>
          <table:table-cell table:style-name="ce366" table:formula="of:=[.H41]*(50/61)*(1+(2*10^-4))" office:value-type="float" office:value="65.5868852459016" calcext:value-type="float">
            <text:p>66</text:p>
          </table:table-cell>
          <table:table-cell table:style-name="ce268" table:formula="of:=([.L41]-(([.C41]*0.7143)+([.D41]*0.5879)))" office:value-type="float" office:value="32.5203852459016" calcext:value-type="float">
            <text:p>33</text:p>
          </table:table-cell>
          <table:table-cell table:style-name="ce279" table:formula="of:=IF([.G41]&lt;=0;0;[.F41]/[.G41])" office:value-type="float" office:value="2.89473684210526" calcext:value-type="float">
            <text:p>2.9</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96"/>
          <table:table-cell table:style-name="ce121" office:value-type="string" calcext:value-type="string">
            <text:p>r1d=</text:p>
          </table:table-cell>
          <table:table-cell table:style-name="ce409" table:formula="of:=10^([.V40]-[.V35])" office:value-type="float" office:value="34.6736850452532" calcext:value-type="float">
            <text:p>34.67369</text:p>
          </table:table-cell>
          <table:table-cell table:style-name="ce122" table:formula="of:=(N([.$I$19])+N([.$K$19]))/([.$T$17]+[.$U$17])*61.5*3.785/[.$V$14]" office:value-type="float" office:value="0" calcext:value-type="float">
            <text:p>0.0</text:p>
          </table:table-cell>
          <table:table-cell table:style-name="ce122" table:formula="of:=(N([.$I$19])+N([.$K$19]))/([.$T$17]+[.$U$17])*147.43*3.785/[.$V$14]" office:value-type="float" office:value="0" calcext:value-type="float">
            <text:p>0.0</text:p>
          </table:table-cell>
          <table:table-cell table:style-name="ce122" table:formula="of:=[.W41]+[.W45]+[.W46]+[.W47]" office:value-type="float" office:value="0" calcext:value-type="float">
            <text:p>0.0</text:p>
          </table:table-cell>
          <table:table-cell table:style-name="ce122" table:formula="of:=(N([.$I$19]))/([.$T$17])*61.5*3.785/[.$V$14]" office:value-type="float" office:value="0" calcext:value-type="float">
            <text:p>0.0</text:p>
          </table:table-cell>
          <table:table-cell table:style-name="ce122" table:formula="of:=(N([.$I$19]))/([.$T$17])*147.43*3.785/[.$V$14]" office:value-type="float" office:value="0" calcext:value-type="float">
            <text:p>0.0</text:p>
          </table:table-cell>
          <table:table-cell table:style-name="ce122" table:formula="of:=[.Z41]+[.Z45]+[.Z46]+[.Z47]" office:value-type="float" office:value="0" calcext:value-type="float">
            <text:p>0.0</text:p>
          </table:table-cell>
          <table:table-cell table:style-name="ce96" office:value-type="string" calcext:value-type="string">
            <text:p>ca</text:p>
          </table:table-cell>
          <table:table-cell table:style-name="ce96" table:number-columns-repeated="2"/>
          <table:table-cell table:style-name="ce121" office:value-type="string" calcext:value-type="string">
            <text:p>r1d=</text:p>
          </table:table-cell>
          <table:table-cell table:style-name="ce409" table:formula="of:=10^([.V40]-[.AP34])" office:value-type="float" office:value="251188.6432" calcext:value-type="float">
            <text:p>251188.64320</text:p>
          </table:table-cell>
          <table:table-cell table:style-name="ce96" table:number-columns-repeated="19"/>
          <table:table-cell table:style-name="ce123" table:number-columns-repeated="4"/>
          <table:table-cell table:number-columns-repeated="8"/>
        </table:table-row>
        <table:table-row table:style-name="ro108">
          <table:table-cell table:style-name="ce248" office:value-type="float" office:value="5" calcext:value-type="float">
            <text:p>5</text:p>
          </table:table-cell>
          <table:table-cell table:style-name="ce264" office:value-type="string" calcext:value-type="string">
            <text:p>Edinburgh</text:p>
          </table:table-cell>
          <table:table-cell table:style-name="ce288" office:value-type="float" office:value="100" calcext:value-type="float">
            <text:p>100</text:p>
          </table:table-cell>
          <table:table-cell table:style-name="ce288" office:value-type="float" office:value="20" calcext:value-type="float">
            <text:p>20</text:p>
          </table:table-cell>
          <table:table-cell table:style-name="ce288" office:value-type="float" office:value="55" calcext:value-type="float">
            <text:p>55</text:p>
          </table:table-cell>
          <table:table-cell table:style-name="ce288" office:value-type="float" office:value="140" calcext:value-type="float">
            <text:p>140</text:p>
          </table:table-cell>
          <table:table-cell table:style-name="ce288" office:value-type="float" office:value="50" calcext:value-type="float">
            <text:p>50</text:p>
          </table:table-cell>
          <table:table-cell table:style-name="ce288" office:value-type="float" office:value="285" calcext:value-type="float">
            <text:p>285</text:p>
          </table:table-cell>
          <table:table-cell table:style-name="ce338" table:formula="of:=([.C42]/20.05)+([.D42]/12.15)+([.E42]/23)" office:value-type="float" office:value="9.02492605487534" calcext:value-type="float">
            <text:p>9.0</text:p>
          </table:table-cell>
          <table:table-cell table:style-name="ce349" table:formula="of:=([.H42]/61)+([.F42]/48)+([.G42]/35.45)" office:value-type="float" office:value="8.99923504975067" calcext:value-type="float">
            <text:p>9.0</text:p>
          </table:table-cell>
          <table:table-cell table:style-name="ce268" table:formula="of:=(([.C42]/20)+([.D42]/12.15))*50" office:value-type="float" office:value="332.304526748971" calcext:value-type="float">
            <text:p>332</text:p>
          </table:table-cell>
          <table:table-cell table:style-name="ce366" table:formula="of:=[.H42]*(50/61)*(1+(2*10^-4))" office:value-type="float" office:value="233.653278688525" calcext:value-type="float">
            <text:p>234</text:p>
          </table:table-cell>
          <table:table-cell table:style-name="ce268" table:formula="of:=([.L42]-(([.C42]*0.7143)+([.D42]*0.5879)))" office:value-type="float" office:value="150.465278688525" calcext:value-type="float">
            <text:p>150</text:p>
          </table:table-cell>
          <table:table-cell table:style-name="ce279" table:formula="of:=IF([.G42]&lt;=0;0;[.F42]/[.G42])" office:value-type="float" office:value="2.8" calcext:value-type="float">
            <text:p>2.8</text:p>
          </table:table-cell>
          <table:table-cell table:style-name="ce392" office:value-type="string" calcext:value-type="string" table:number-columns-spanned="5" table:number-rows-spanned="1">
            <text:p>from Edinburgh water company</text:p>
          </table:table-cell>
          <table:covered-table-cell table:number-columns-repeated="3" table:style-name="ce21"/>
          <table:covered-table-cell table:style-name="ce19"/>
          <table:table-cell table:style-name="ce407"/>
          <table:table-cell table:style-name="ce121" office:value-type="string" calcext:value-type="string">
            <text:p>r2d=</text:p>
          </table:table-cell>
          <table:table-cell table:style-name="ce133" table:formula="of:=10^([.V40]-[.W35])" office:value-type="float" office:value="2.51188643150958E-015" calcext:value-type="float">
            <text:p>0.000000</text:p>
          </table:table-cell>
          <table:table-cell table:style-name="ce122" table:formula="of:=(N([.$I$21])+N([.$K$21]))/([.$T$17]+[.$U$17])*26.05*3.785/[.$V$14]" office:value-type="float" office:value="0" calcext:value-type="float">
            <text:p>0.0</text:p>
          </table:table-cell>
          <table:table-cell table:style-name="ce122" table:formula="of:=(N([.$I$21])+N([.$K$21]))/([.$T$17]+[.$U$17])*102.96*3.785/[.$V$14]" office:value-type="float" office:value="0" calcext:value-type="float">
            <text:p>0.0</text:p>
          </table:table-cell>
          <table:table-cell table:style-name="ce122" table:formula="of:=[.W42]+[.W48]" office:value-type="float" office:value="0" calcext:value-type="float">
            <text:p>0.0</text:p>
          </table:table-cell>
          <table:table-cell table:style-name="ce122" table:formula="of:=(N([.$I$21]))/([.$T$17])*26.05*3.785/[.$V$14]" office:value-type="float" office:value="0" calcext:value-type="float">
            <text:p>0.0</text:p>
          </table:table-cell>
          <table:table-cell table:style-name="ce122" table:formula="of:=(N([.$I$21]))/([.$T$17])*102.96*3.785/[.$V$14]" office:value-type="float" office:value="0" calcext:value-type="float">
            <text:p>0.0</text:p>
          </table:table-cell>
          <table:table-cell table:style-name="ce122" table:formula="of:=[.Z42]+[.Z48]" office:value-type="float" office:value="0" calcext:value-type="float">
            <text:p>0.0</text:p>
          </table:table-cell>
          <table:table-cell table:style-name="ce96" office:value-type="string" calcext:value-type="string">
            <text:p>mg</text:p>
          </table:table-cell>
          <table:table-cell table:style-name="ce96" table:number-columns-repeated="2"/>
          <table:table-cell table:style-name="ce121" office:value-type="string" calcext:value-type="string">
            <text:p>r2d=</text:p>
          </table:table-cell>
          <table:table-cell table:style-name="ce133" table:formula="of:=10^([.V40]-[.AQ34])" office:value-type="float" office:value="251188.6432" calcext:value-type="float">
            <text:p>251188.643200</text:p>
          </table:table-cell>
          <table:table-cell table:style-name="ce96" table:number-columns-repeated="19"/>
          <table:table-cell table:style-name="ce123" table:number-columns-repeated="4"/>
          <table:table-cell table:number-columns-repeated="8"/>
        </table:table-row>
        <table:table-row table:style-name="ro108">
          <table:table-cell table:style-name="ce248" office:value-type="float" office:value="6" calcext:value-type="float">
            <text:p>6</text:p>
          </table:table-cell>
          <table:table-cell table:style-name="ce264" office:value-type="string" calcext:value-type="string">
            <text:p>Edinburgh (boiled)</text:p>
          </table:table-cell>
          <table:table-cell table:style-name="ce288" office:value-type="float" office:value="33" calcext:value-type="float">
            <text:p>33</text:p>
          </table:table-cell>
          <table:table-cell table:style-name="ce288" office:value-type="float" office:value="20" calcext:value-type="float">
            <text:p>20</text:p>
          </table:table-cell>
          <table:table-cell table:style-name="ce288" office:value-type="float" office:value="55" calcext:value-type="float">
            <text:p>55</text:p>
          </table:table-cell>
          <table:table-cell table:style-name="ce288" office:value-type="float" office:value="140" calcext:value-type="float">
            <text:p>140</text:p>
          </table:table-cell>
          <table:table-cell table:style-name="ce288" office:value-type="float" office:value="50" calcext:value-type="float">
            <text:p>50</text:p>
          </table:table-cell>
          <table:table-cell table:style-name="ce288" office:value-type="float" office:value="80" calcext:value-type="float">
            <text:p>80</text:p>
          </table:table-cell>
          <table:table-cell table:style-name="ce338" table:formula="of:=([.C43]/20.05)+([.D43]/12.15)+([.E43]/23)" office:value-type="float" office:value="5.68328016958855" calcext:value-type="float">
            <text:p>5.7</text:p>
          </table:table-cell>
          <table:table-cell table:style-name="ce349" table:formula="of:=([.H43]/61)+([.F43]/48)+([.G43]/35.45)" office:value-type="float" office:value="5.63857931204575" calcext:value-type="float">
            <text:p>5.6</text:p>
          </table:table-cell>
          <table:table-cell table:style-name="ce268" table:formula="of:=(([.C43]/20)+([.D43]/12.15))*50" office:value-type="float" office:value="164.804526748971" calcext:value-type="float">
            <text:p>165</text:p>
          </table:table-cell>
          <table:table-cell table:style-name="ce366" table:formula="of:=[.H43]*(50/61)*(1+(2*10^-4))" office:value-type="float" office:value="65.5868852459016" calcext:value-type="float">
            <text:p>66</text:p>
          </table:table-cell>
          <table:table-cell table:style-name="ce268" table:formula="of:=([.L43]-(([.C43]*0.7143)+([.D43]*0.5879)))" office:value-type="float" office:value="30.2569852459016" calcext:value-type="float">
            <text:p>30</text:p>
          </table:table-cell>
          <table:table-cell table:style-name="ce279" table:formula="of:=IF([.G43]&lt;=0;0;[.F43]/[.G43])" office:value-type="float" office:value="2.8" calcext:value-type="float">
            <text:p>2.8</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121" office:value-type="string" calcext:value-type="string">
            <text:p>r3d=</text:p>
          </table:table-cell>
          <table:table-cell table:style-name="ce133" table:formula="of:=10^([.V40]-[.X35])" office:value-type="float" office:value="2.51188643150958E-015" calcext:value-type="float">
            <text:p>0.000000</text:p>
          </table:table-cell>
          <table:table-cell table:style-name="ce122" table:formula="of:=(N([.$I$23])+N([.$K$23]))/([.$T$17]+[.$U$17])*103.94*3.785/[.$V$14]" office:value-type="float" office:value="0" calcext:value-type="float">
            <text:p>0.0</text:p>
          </table:table-cell>
          <table:table-cell table:style-name="ce122" table:formula="of:=(N([.$I$23])+N([.$K$23]))/([.$T$17]+[.$U$17])*160.26*3.785/[.$V$14]" office:value-type="float" office:value="0" calcext:value-type="float">
            <text:p>0.0</text:p>
          </table:table-cell>
          <table:table-cell table:style-name="ce122" table:formula="of:=[.W43]+[.W44]" office:value-type="float" office:value="0" calcext:value-type="float">
            <text:p>0.0</text:p>
          </table:table-cell>
          <table:table-cell table:style-name="ce122" table:formula="of:=(N([.$I$23]))/([.$T$17])*103.94*3.785/[.$V$14]" office:value-type="float" office:value="0" calcext:value-type="float">
            <text:p>0.0</text:p>
          </table:table-cell>
          <table:table-cell table:style-name="ce122" table:formula="of:=(N([.$I$23]))/([.$T$17])*160.26*3.785/[.$V$14]" office:value-type="float" office:value="0" calcext:value-type="float">
            <text:p>0.0</text:p>
          </table:table-cell>
          <table:table-cell table:style-name="ce122" table:formula="of:=[.Z43]+[.Z44]" office:value-type="float" office:value="0" calcext:value-type="float">
            <text:p>0.0</text:p>
          </table:table-cell>
          <table:table-cell table:style-name="ce96" office:value-type="string" calcext:value-type="string">
            <text:p>na</text:p>
          </table:table-cell>
          <table:table-cell table:style-name="ce96" table:number-columns-repeated="2"/>
          <table:table-cell table:style-name="ce121" office:value-type="string" calcext:value-type="string">
            <text:p>r3d=</text:p>
          </table:table-cell>
          <table:table-cell table:style-name="ce133" table:formula="of:=10^([.V40]-[.AR34])" office:value-type="float" office:value="251188.6432" calcext:value-type="float">
            <text:p>251188.643200</text:p>
          </table:table-cell>
          <table:table-cell table:style-name="ce411" table:number-columns-repeated="6"/>
          <table:table-cell table:style-name="ce96" table:number-columns-repeated="13"/>
          <table:table-cell table:style-name="ce123" table:number-columns-repeated="4"/>
          <table:table-cell table:number-columns-repeated="8"/>
        </table:table-row>
        <table:table-row table:style-name="ro108">
          <table:table-cell table:style-name="ce248" office:value-type="float" office:value="7" calcext:value-type="float">
            <text:p>7</text:p>
          </table:table-cell>
          <table:table-cell table:style-name="ce264" office:value-type="string" calcext:value-type="string">
            <text:p>London</text:p>
          </table:table-cell>
          <table:table-cell table:style-name="ce288" office:value-type="float" office:value="70" calcext:value-type="float">
            <text:p>70</text:p>
          </table:table-cell>
          <table:table-cell table:style-name="ce288" office:value-type="float" office:value="6" calcext:value-type="float">
            <text:p>6</text:p>
          </table:table-cell>
          <table:table-cell table:style-name="ce288" office:value-type="float" office:value="15" calcext:value-type="float">
            <text:p>15</text:p>
          </table:table-cell>
          <table:table-cell table:style-name="ce288" office:value-type="float" office:value="40" calcext:value-type="float">
            <text:p>40</text:p>
          </table:table-cell>
          <table:table-cell table:style-name="ce288" office:value-type="float" office:value="38" calcext:value-type="float">
            <text:p>38</text:p>
          </table:table-cell>
          <table:table-cell table:style-name="ce288" office:value-type="float" office:value="166" calcext:value-type="float">
            <text:p>166</text:p>
          </table:table-cell>
          <table:table-cell table:style-name="ce338" table:formula="of:=([.C44]/20.05)+([.D44]/12.15)+([.E44]/23)" office:value-type="float" office:value="4.63727289398618" calcext:value-type="float">
            <text:p>4.6</text:p>
          </table:table-cell>
          <table:table-cell table:style-name="ce349" table:formula="of:=([.H44]/61)+([.F44]/48)+([.G44]/35.45)" office:value-type="float" office:value="4.62657710775586" calcext:value-type="float">
            <text:p>4.6</text:p>
          </table:table-cell>
          <table:table-cell table:style-name="ce268" table:formula="of:=(([.C44]/20)+([.D44]/12.15))*50" office:value-type="float" office:value="199.691358024691" calcext:value-type="float">
            <text:p>200</text:p>
          </table:table-cell>
          <table:table-cell table:style-name="ce366" table:formula="of:=[.H44]*(50/61)*(1+(2*10^-4))" office:value-type="float" office:value="136.092786885246" calcext:value-type="float">
            <text:p>136</text:p>
          </table:table-cell>
          <table:table-cell table:style-name="ce268" table:formula="of:=([.L44]-(([.C44]*0.7143)+([.D44]*0.5879)))" office:value-type="float" office:value="82.5643868852459" calcext:value-type="float">
            <text:p>83</text:p>
          </table:table-cell>
          <table:table-cell table:style-name="ce279" table:formula="of:=IF([.G44]&lt;=0;0;[.F44]/[.G44])" office:value-type="float" office:value="1.05263157894737" calcext:value-type="float">
            <text:p>1.1</text:p>
          </table:table-cell>
          <table:table-cell table:style-name="ce392" office:value-type="string" calcext:value-type="string" table:number-columns-spanned="5" table:number-rows-spanned="1">
            <text:p>compilation of London water company reports</text:p>
          </table:table-cell>
          <table:covered-table-cell table:number-columns-repeated="3" table:style-name="ce21"/>
          <table:covered-table-cell table:style-name="ce19"/>
          <table:table-cell table:style-name="ce408"/>
          <table:table-cell table:style-name="ce121" office:value-type="string" calcext:value-type="string">
            <text:p>dd=</text:p>
          </table:table-cell>
          <table:table-cell table:style-name="ce133" table:formula="of:=1/(1+[.V41]+([.V41]*[.V42])+([.V41]*[.V42]*[.V43]))" office:value-type="float" office:value="0.0280318671516964" calcext:value-type="float">
            <text:p>0.028032</text:p>
          </table:table-cell>
          <table:table-cell table:style-name="ce122" table:formula="of:=(N([.$I$26]))/([.$T$17]+[.$U$17])*72.31*3.785/[.$V$14]" office:value-type="float" office:value="0" calcext:value-type="float">
            <text:p>0.0</text:p>
          </table:table-cell>
          <table:table-cell table:style-name="ce122" table:formula="of:=(N([.$I$26]))/([.$T$17]+[.$U$17])*191.88*3.785/[.$V$14]" office:value-type="float" office:value="0" calcext:value-type="float">
            <text:p>0.0</text:p>
          </table:table-cell>
          <table:table-cell table:style-name="ce122" table:formula="of:=(((([.X41]+[.X42]+[.$F$29])*[.V14]*[.T17])+(([$'2. Sparge Acidification'.B13])*[.V14]*[.U17]))/(([.T17]+[.U17])*[.V14]))" office:value-type="float" office:value="0" calcext:value-type="float">
            <text:p>0.0</text:p>
          </table:table-cell>
          <table:table-cell table:style-name="ce122" table:formula="of:=(N([.$I$24]))/([.$T$17])*72.31*3.785/[.$V$14]" office:value-type="float" office:value="0" calcext:value-type="float">
            <text:p>0.0</text:p>
          </table:table-cell>
          <table:table-cell table:style-name="ce122" table:formula="of:=(N([.$I$24]))/([.$T$17])*(191.88*(2-((0.0349*[.B16]^4)-(0.5697*[.B16]^3)+(3.4089*[.B16]^2)-(8.7207*[.B16])+(8.8231))))*3.785/[.$V$14]" office:value-type="string" office:string-value="" calcext:value-type="error">
            <text:p>Err:522</text:p>
          </table:table-cell>
          <table:table-cell table:style-name="ce122" table:formula="of:=([.AA41]+[.AA42]+[.$F$29])" office:value-type="float" office:value="0" calcext:value-type="float">
            <text:p>0.0</text:p>
          </table:table-cell>
          <table:table-cell table:style-name="ce96" office:value-type="string" calcext:value-type="string">
            <text:p>so4</text:p>
          </table:table-cell>
          <table:table-cell table:style-name="ce96" table:number-columns-repeated="2"/>
          <table:table-cell table:style-name="ce121" office:value-type="string" calcext:value-type="string">
            <text:p>dd=</text:p>
          </table:table-cell>
          <table:table-cell table:style-name="ce133" table:formula="of:=1/(1+[.AG41]+([.AG41]*[.AG42])+([.AG41]*[.AG42]*[.AG43]))" office:value-type="float" office:value="0" calcext:value-type="float">
            <text:p>0.000000</text:p>
          </table:table-cell>
          <table:table-cell table:style-name="ce411" table:number-columns-repeated="6"/>
          <table:table-cell table:style-name="ce96" table:number-columns-repeated="13"/>
          <table:table-cell table:style-name="ce123" table:number-columns-repeated="4"/>
          <table:table-cell table:number-columns-repeated="8"/>
        </table:table-row>
        <table:table-row table:style-name="ro108">
          <table:table-cell table:style-name="ce248" office:value-type="float" office:value="8" calcext:value-type="float">
            <text:p>8</text:p>
          </table:table-cell>
          <table:table-cell table:style-name="ce264" office:value-type="string" calcext:value-type="string">
            <text:p>London (boiled)</text:p>
          </table:table-cell>
          <table:table-cell table:style-name="ce288" office:value-type="float" office:value="42" calcext:value-type="float">
            <text:p>42</text:p>
          </table:table-cell>
          <table:table-cell table:style-name="ce288" office:value-type="float" office:value="6" calcext:value-type="float">
            <text:p>6</text:p>
          </table:table-cell>
          <table:table-cell table:style-name="ce288" office:value-type="float" office:value="15" calcext:value-type="float">
            <text:p>15</text:p>
          </table:table-cell>
          <table:table-cell table:style-name="ce288" office:value-type="float" office:value="40" calcext:value-type="float">
            <text:p>40</text:p>
          </table:table-cell>
          <table:table-cell table:style-name="ce288" office:value-type="float" office:value="38" calcext:value-type="float">
            <text:p>38</text:p>
          </table:table-cell>
          <table:table-cell table:style-name="ce288" office:value-type="float" office:value="80" calcext:value-type="float">
            <text:p>80</text:p>
          </table:table-cell>
          <table:table-cell table:style-name="ce338" table:formula="of:=([.C45]/20.05)+([.D45]/12.15)+([.E45]/23)" office:value-type="float" office:value="3.24076416580663" calcext:value-type="float">
            <text:p>3.2</text:p>
          </table:table-cell>
          <table:table-cell table:style-name="ce349" table:formula="of:=([.H45]/61)+([.F45]/48)+([.G45]/35.45)" office:value-type="float" office:value="3.21674104218209" calcext:value-type="float">
            <text:p>3.2</text:p>
          </table:table-cell>
          <table:table-cell table:style-name="ce268" table:formula="of:=(([.C45]/20)+([.D45]/12.15))*50" office:value-type="float" office:value="129.691358024691" calcext:value-type="float">
            <text:p>130</text:p>
          </table:table-cell>
          <table:table-cell table:style-name="ce366" table:formula="of:=[.H45]*(50/61)*(1+(2*10^-4))" office:value-type="float" office:value="65.5868852459016" calcext:value-type="float">
            <text:p>66</text:p>
          </table:table-cell>
          <table:table-cell table:style-name="ce268" table:formula="of:=([.L45]-(([.C45]*0.7143)+([.D45]*0.5879)))" office:value-type="float" office:value="32.0588852459016" calcext:value-type="float">
            <text:p>32</text:p>
          </table:table-cell>
          <table:table-cell table:style-name="ce279" table:formula="of:=IF([.G45]&lt;=0;0;[.F45]/[.G45])" office:value-type="float" office:value="1.05263157894737" calcext:value-type="float">
            <text:p>1.1</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121" office:value-type="string" calcext:value-type="string">
            <text:p>f1d=</text:p>
          </table:table-cell>
          <table:table-cell table:style-name="ce133" table:formula="of:=[.V44]" office:value-type="float" office:value="0.0280318671516964" calcext:value-type="float">
            <text:p>0.028032</text:p>
          </table:table-cell>
          <table:table-cell table:style-name="ce122" table:formula="of:=((N([.$I$20])+N([.$K$20]))/([.$T$17]+[.$U$17]))*95.4*(3.785/[.$V$14])" office:value-type="float" office:value="0" calcext:value-type="float">
            <text:p>0.0</text:p>
          </table:table-cell>
          <table:table-cell table:style-name="ce122" table:formula="of:=((N([.$I$20])+N([.$K$20]))/([.$T$17]+[.$U$17]))*168.79*(3.785/[.$V$14])" office:value-type="float" office:value="0" calcext:value-type="float">
            <text:p>0.0</text:p>
          </table:table-cell>
          <table:table-cell table:style-name="ce122" table:formula="of:=(((([.X43]+[.X45]+[.X48]+[.$G$29])*[.V14]*[.T17])+(([$'2. Sparge Acidification'.B14])*[.V14]*[.U17]))/(([.T17]+[.U17])*[.V14]))" office:value-type="float" office:value="0" calcext:value-type="float">
            <text:p>0.0</text:p>
          </table:table-cell>
          <table:table-cell table:style-name="ce122" table:formula="of:=(N([.$I$20])/([.$T$17]))*95.4*(3.785/[.$V$14])" office:value-type="float" office:value="0" calcext:value-type="float">
            <text:p>0.0</text:p>
          </table:table-cell>
          <table:table-cell table:style-name="ce122" table:formula="of:=((N([.$I$20]))/([.$T$17]))*168.79*(3.785/[.$V$14])" office:value-type="float" office:value="0" calcext:value-type="float">
            <text:p>0.0</text:p>
          </table:table-cell>
          <table:table-cell table:style-name="ce122" table:formula="of:=([.AA43]+[.AA45]+[.AA48]+[.$G$29])" office:value-type="float" office:value="0" calcext:value-type="float">
            <text:p>0.0</text:p>
          </table:table-cell>
          <table:table-cell table:style-name="ce96" office:value-type="string" calcext:value-type="string">
            <text:p>cl</text:p>
          </table:table-cell>
          <table:table-cell table:style-name="ce96" table:number-columns-repeated="2"/>
          <table:table-cell table:style-name="ce121" office:value-type="string" calcext:value-type="string">
            <text:p>f1d=</text:p>
          </table:table-cell>
          <table:table-cell table:style-name="ce133" table:formula="of:=[.AG44]" office:value-type="float" office:value="0" calcext:value-type="float">
            <text:p>0.000000</text:p>
          </table:table-cell>
          <table:table-cell table:style-name="ce411" table:number-columns-repeated="6"/>
          <table:table-cell table:style-name="ce96" table:number-columns-repeated="13"/>
          <table:table-cell table:style-name="ce123" table:number-columns-repeated="4"/>
          <table:table-cell table:number-columns-repeated="8"/>
        </table:table-row>
        <table:table-row table:style-name="ro108">
          <table:table-cell table:style-name="ce248" office:value-type="float" office:value="9" calcext:value-type="float">
            <text:p>9</text:p>
          </table:table-cell>
          <table:table-cell table:style-name="ce264" office:value-type="string" calcext:value-type="string">
            <text:p>Munich</text:p>
          </table:table-cell>
          <table:table-cell table:style-name="ce288" office:value-type="float" office:value="77" calcext:value-type="float">
            <text:p>77</text:p>
          </table:table-cell>
          <table:table-cell table:style-name="ce288" office:value-type="float" office:value="17" calcext:value-type="float">
            <text:p>17</text:p>
          </table:table-cell>
          <table:table-cell table:style-name="ce288" office:value-type="float" office:value="4" calcext:value-type="float">
            <text:p>4</text:p>
          </table:table-cell>
          <table:table-cell table:style-name="ce288" office:value-type="float" office:value="18" calcext:value-type="float">
            <text:p>18</text:p>
          </table:table-cell>
          <table:table-cell table:style-name="ce288" office:value-type="float" office:value="8" calcext:value-type="float">
            <text:p>8</text:p>
          </table:table-cell>
          <table:table-cell table:style-name="ce288" office:value-type="float" office:value="295" calcext:value-type="float">
            <text:p>295</text:p>
          </table:table-cell>
          <table:table-cell table:style-name="ce338" table:formula="of:=([.C46]/20.05)+([.D46]/12.15)+([.E46]/23)" office:value-type="float" office:value="5.41348900070454" calcext:value-type="float">
            <text:p>5.4</text:p>
          </table:table-cell>
          <table:table-cell table:style-name="ce349" table:formula="of:=([.H46]/61)+([.F46]/48)+([.G46]/35.45)" office:value-type="float" office:value="5.43673553145737" calcext:value-type="float">
            <text:p>5.4</text:p>
          </table:table-cell>
          <table:table-cell table:style-name="ce268" table:formula="of:=(([.C46]/20)+([.D46]/12.15))*50" office:value-type="float" office:value="262.458847736625" calcext:value-type="float">
            <text:p>262</text:p>
          </table:table-cell>
          <table:table-cell table:style-name="ce366" table:formula="of:=[.H46]*(50/61)*(1+(2*10^-4))" office:value-type="float" office:value="241.851639344262" calcext:value-type="float">
            <text:p>242</text:p>
          </table:table-cell>
          <table:table-cell table:style-name="ce268" table:formula="of:=([.L46]-(([.C46]*0.7143)+([.D46]*0.5879)))" office:value-type="float" office:value="176.856239344262" calcext:value-type="float">
            <text:p>177</text:p>
          </table:table-cell>
          <table:table-cell table:style-name="ce279" table:formula="of:=IF([.G46]&lt;=0;0;[.F46]/[.G46])" office:value-type="float" office:value="2.25" calcext:value-type="float">
            <text:p>2.3</text:p>
          </table:table-cell>
          <table:table-cell table:style-name="ce392" office:value-type="string" calcext:value-type="string" table:number-columns-spanned="5" table:number-rows-spanned="1">
            <text:p>from Munich water company</text:p>
          </table:table-cell>
          <table:covered-table-cell table:number-columns-repeated="3" table:style-name="ce21"/>
          <table:covered-table-cell table:style-name="ce19"/>
          <table:table-cell table:style-name="ce408"/>
          <table:table-cell table:style-name="ce121" office:value-type="string" calcext:value-type="string">
            <text:p>f2d=</text:p>
          </table:table-cell>
          <table:table-cell table:style-name="ce133" table:formula="of:=[.V44]*[.V41]" office:value-type="float" office:value="0.971968132848301" calcext:value-type="float">
            <text:p>0.971968</text:p>
          </table:table-cell>
          <table:table-cell table:style-name="ce122" table:formula="of:=(N([.$I$24]))/([.$T$17]+[.$U$17])*105.8*3.785/[.$V$14]" office:value-type="float" office:value="0" calcext:value-type="float">
            <text:p>0.0</text:p>
          </table:table-cell>
          <table:table-cell table:style-name="ce122" table:formula="of:=(N([.$I$24]))/([.$T$17]+[.$U$17])*322.27*3.785/[.$V$14]" office:value-type="float" office:value="0" calcext:value-type="float">
            <text:p>0.0</text:p>
          </table:table-cell>
          <table:table-cell table:style-name="ce122" table:formula="of:=[.X44]+[.X46]+[.X47]" office:value-type="float" office:value="0" calcext:value-type="float">
            <text:p>0.0</text:p>
          </table:table-cell>
          <table:table-cell table:style-name="ce122" table:formula="of:=(N([.$I$25]))/([.$T$17])*105.8*3.785/[.$V$14]" office:value-type="float" office:value="0" calcext:value-type="float">
            <text:p>0.0</text:p>
          </table:table-cell>
          <table:table-cell table:style-name="ce122" table:formula="of:=(N([.$I$25]))/([.$T$17])*322.27*3.785/[.$V$14]" office:value-type="float" office:value="0" calcext:value-type="float">
            <text:p>0.0</text:p>
          </table:table-cell>
          <table:table-cell table:style-name="ce122" table:formula="of:=[.AA44]+[.AA46]+[.AA47]+[.$H$29]" office:value-type="string" office:string-value="" calcext:value-type="error">
            <text:p>Err:522</text:p>
          </table:table-cell>
          <table:table-cell table:style-name="ce96" office:value-type="string" calcext:value-type="string">
            <text:p>hco3</text:p>
          </table:table-cell>
          <table:table-cell table:style-name="ce96" table:number-columns-repeated="2"/>
          <table:table-cell table:style-name="ce121" office:value-type="string" calcext:value-type="string">
            <text:p>f2d=</text:p>
          </table:table-cell>
          <table:table-cell table:style-name="ce133" table:formula="of:=[.AG44]*[.AG41]" office:value-type="float" office:value="0" calcext:value-type="float">
            <text:p>0.000000</text:p>
          </table:table-cell>
          <table:table-cell table:style-name="ce411" table:number-columns-repeated="6"/>
          <table:table-cell table:style-name="ce96" table:number-columns-repeated="13"/>
          <table:table-cell table:style-name="ce123" table:number-columns-repeated="4"/>
          <table:table-cell table:number-columns-repeated="8"/>
        </table:table-row>
        <table:table-row table:style-name="ro108">
          <table:table-cell table:style-name="ce248" office:value-type="float" office:value="10" calcext:value-type="float">
            <text:p>10</text:p>
          </table:table-cell>
          <table:table-cell table:style-name="ce264" office:value-type="string" calcext:value-type="string">
            <text:p>Munich (boiled)</text:p>
          </table:table-cell>
          <table:table-cell table:style-name="ce288" office:value-type="float" office:value="12" calcext:value-type="float">
            <text:p>12</text:p>
          </table:table-cell>
          <table:table-cell table:style-name="ce288" office:value-type="float" office:value="17" calcext:value-type="float">
            <text:p>17</text:p>
          </table:table-cell>
          <table:table-cell table:style-name="ce288" office:value-type="float" office:value="4" calcext:value-type="float">
            <text:p>4</text:p>
          </table:table-cell>
          <table:table-cell table:style-name="ce288" office:value-type="float" office:value="18" calcext:value-type="float">
            <text:p>18</text:p>
          </table:table-cell>
          <table:table-cell table:style-name="ce288" office:value-type="float" office:value="8" calcext:value-type="float">
            <text:p>8</text:p>
          </table:table-cell>
          <table:table-cell table:style-name="ce288" office:value-type="float" office:value="100" calcext:value-type="float">
            <text:p>100</text:p>
          </table:table-cell>
          <table:table-cell table:style-name="ce338" table:formula="of:=([.C47]/20.05)+([.D47]/12.15)+([.E47]/23)" office:value-type="float" office:value="2.17159373885915" calcext:value-type="float">
            <text:p>2.2</text:p>
          </table:table-cell>
          <table:table-cell table:style-name="ce349" table:formula="of:=([.H47]/61)+([.F47]/48)+([.G47]/35.45)" office:value-type="float" office:value="2.24001421998196" calcext:value-type="float">
            <text:p>2.2</text:p>
          </table:table-cell>
          <table:table-cell table:style-name="ce268" table:formula="of:=(([.C47]/20)+([.D47]/12.15))*50" office:value-type="float" office:value="99.9588477366255" calcext:value-type="float">
            <text:p>100</text:p>
          </table:table-cell>
          <table:table-cell table:style-name="ce366" table:formula="of:=[.H47]*(50/61)*(1+(2*10^-4))" office:value-type="float" office:value="81.9836065573771" calcext:value-type="float">
            <text:p>82</text:p>
          </table:table-cell>
          <table:table-cell table:style-name="ce268" table:formula="of:=([.L47]-(([.C47]*0.7143)+([.D47]*0.5879)))" office:value-type="float" office:value="63.4177065573771" calcext:value-type="float">
            <text:p>63</text:p>
          </table:table-cell>
          <table:table-cell table:style-name="ce279" table:formula="of:=IF([.G47]&lt;=0;0;[.F47]/[.G47])" office:value-type="float" office:value="2.25" calcext:value-type="float">
            <text:p>2.3</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121" office:value-type="string" calcext:value-type="string">
            <text:p>f3d=</text:p>
          </table:table-cell>
          <table:table-cell table:style-name="ce133" table:formula="of:=[.V41]*[.V42]*[.V44]" office:value-type="float" office:value="2.44147356476135E-015" calcext:value-type="float">
            <text:p>0.000000</text:p>
          </table:table-cell>
          <table:table-cell table:style-name="ce122" table:formula="of:=(N([.$I$25]))/([.$T$17]+[.$U$17])*142.93*3.785/[.$V$14]" office:value-type="float" office:value="0" calcext:value-type="float">
            <text:p>0.0</text:p>
          </table:table-cell>
          <table:table-cell table:style-name="ce122" table:formula="of:=(N([.$I$25]))/([.$T$17]+[.$U$17])*434.75*3.785/[.$V$14]" office:value-type="float" office:value="0" calcext:value-type="float">
            <text:p>0.0</text:p>
          </table:table-cell>
          <table:table-cell table:style-name="ce122"/>
          <table:table-cell table:style-name="ce122" table:formula="of:=(N([.$I$26]))/([.$T$17])*142.93*3.785/[.$V$14]" office:value-type="float" office:value="0" calcext:value-type="float">
            <text:p>0.0</text:p>
          </table:table-cell>
          <table:table-cell table:style-name="ce122" table:formula="of:=(N([.$I$26]))/([.$T$17])*434.75*3.785/[.$V$14]" office:value-type="float" office:value="0" calcext:value-type="float">
            <text:p>0.0</text:p>
          </table:table-cell>
          <table:table-cell table:style-name="ce122"/>
          <table:table-cell table:style-name="ce96" table:number-columns-repeated="3"/>
          <table:table-cell table:style-name="ce121" office:value-type="string" calcext:value-type="string">
            <text:p>f3d=</text:p>
          </table:table-cell>
          <table:table-cell table:style-name="ce133" table:formula="of:=[.AG41]*[.AG42]*[.AG44]" office:value-type="float" office:value="0.000003981055857" calcext:value-type="float">
            <text:p>0.000004</text:p>
          </table:table-cell>
          <table:table-cell table:style-name="ce411" table:number-columns-repeated="6"/>
          <table:table-cell table:style-name="ce96" table:number-columns-repeated="13"/>
          <table:table-cell table:style-name="ce123" table:number-columns-repeated="4"/>
          <table:table-cell table:number-columns-repeated="8"/>
        </table:table-row>
        <table:table-row table:style-name="ro108">
          <table:table-cell table:style-name="ce248" office:value-type="float" office:value="11" calcext:value-type="float">
            <text:p>11</text:p>
          </table:table-cell>
          <table:table-cell table:style-name="ce264" office:value-type="string" calcext:value-type="string">
            <text:p>Pilsen</text:p>
          </table:table-cell>
          <table:table-cell table:style-name="ce288" office:value-type="float" office:value="7" calcext:value-type="float">
            <text:p>7</text:p>
          </table:table-cell>
          <table:table-cell table:number-columns-repeated="2" table:style-name="ce288" office:value-type="float" office:value="2" calcext:value-type="float">
            <text:p>2</text:p>
          </table:table-cell>
          <table:table-cell table:style-name="ce288" office:value-type="float" office:value="8" calcext:value-type="float">
            <text:p>8</text:p>
          </table:table-cell>
          <table:table-cell table:style-name="ce288" office:value-type="float" office:value="6" calcext:value-type="float">
            <text:p>6</text:p>
          </table:table-cell>
          <table:table-cell table:style-name="ce288" office:value-type="float" office:value="16" calcext:value-type="float">
            <text:p>16</text:p>
          </table:table-cell>
          <table:table-cell table:style-name="ce338" table:formula="of:=([.C48]/20.05)+([.D48]/12.15)+([.E48]/23)" office:value-type="float" office:value="0.60069275728196" calcext:value-type="float">
            <text:p>0.6</text:p>
          </table:table-cell>
          <table:table-cell table:style-name="ce349" table:formula="of:=([.H48]/61)+([.F48]/48)+([.G48]/35.45)" office:value-type="float" office:value="0.598214216899042" calcext:value-type="float">
            <text:p>0.6</text:p>
          </table:table-cell>
          <table:table-cell table:style-name="ce268" table:formula="of:=(([.C48]/20)+([.D48]/12.15))*50" office:value-type="float" office:value="25.7304526748971" calcext:value-type="float">
            <text:p>26</text:p>
          </table:table-cell>
          <table:table-cell table:style-name="ce366" table:formula="of:=[.H48]*(50/61)*(1+(2*10^-4))" office:value-type="float" office:value="13.1173770491803" calcext:value-type="float">
            <text:p>13</text:p>
          </table:table-cell>
          <table:table-cell table:style-name="ce268" table:formula="of:=([.L48]-(([.C48]*0.7143)+([.D48]*0.5879)))" office:value-type="float" office:value="6.94147704918033" calcext:value-type="float">
            <text:p>7</text:p>
          </table:table-cell>
          <table:table-cell table:style-name="ce279" table:formula="of:=IF([.G48]&lt;=0;0;[.F48]/[.G48])" office:value-type="float" office:value="1.33333333333333" calcext:value-type="float">
            <text:p>1.3</text:p>
          </table:table-cell>
          <table:table-cell table:style-name="ce392" office:value-type="string" calcext:value-type="string" table:number-columns-spanned="5" table:number-rows-spanned="1">
            <text:p>from Pilsen water company</text:p>
          </table:table-cell>
          <table:covered-table-cell table:number-columns-repeated="3" table:style-name="ce21"/>
          <table:covered-table-cell table:style-name="ce19"/>
          <table:table-cell table:style-name="ce408"/>
          <table:table-cell table:style-name="ce121" office:value-type="string" calcext:value-type="string">
            <text:p>f4d=</text:p>
          </table:table-cell>
          <table:table-cell table:style-name="ce133" table:formula="of:=[.V41]*[.V42]*[.V43]*[.V44]" office:value-type="float" office:value="6.13270432021337E-030" calcext:value-type="float">
            <text:p>0.000000</text:p>
          </table:table-cell>
          <table:table-cell table:style-name="ce122" table:formula="of:=(N([.$I$22])+N([.$K$22]))/([.$T$17]+[.$U$17])*31.57*3.785/[.$V$14]" office:value-type="float" office:value="0" calcext:value-type="float">
            <text:p>0.0</text:p>
          </table:table-cell>
          <table:table-cell table:style-name="ce122" table:formula="of:=(N([.$I$22])+N([.$K$22]))/([.$T$17]+[.$U$17])*92.12*3.785/[.$V$14]" office:value-type="float" office:value="0" calcext:value-type="float">
            <text:p>0.0</text:p>
          </table:table-cell>
          <table:table-cell table:style-name="ce122"/>
          <table:table-cell table:style-name="ce122" table:formula="of:=(N([.$I$22]))/([.$T$17])*31.57*3.785/[.$V$14]" office:value-type="float" office:value="0" calcext:value-type="float">
            <text:p>0.0</text:p>
          </table:table-cell>
          <table:table-cell table:style-name="ce122" table:formula="of:=(N([.$I$22]))/([.$T$17])*92.12*3.785/[.$V$14]" office:value-type="float" office:value="0" calcext:value-type="float">
            <text:p>0.0</text:p>
          </table:table-cell>
          <table:table-cell table:style-name="ce122"/>
          <table:table-cell table:style-name="ce96" table:number-columns-repeated="3"/>
          <table:table-cell table:style-name="ce121" office:value-type="string" calcext:value-type="string">
            <text:p>f4d=</text:p>
          </table:table-cell>
          <table:table-cell table:style-name="ce133" table:formula="of:=[.AG41]*[.AG42]*[.AG43]*[.AG44]" office:value-type="float" office:value="0.9999960189" calcext:value-type="float">
            <text:p>0.999996</text:p>
          </table:table-cell>
          <table:table-cell table:style-name="ce96" table:number-columns-repeated="19"/>
          <table:table-cell table:style-name="ce123" table:number-columns-repeated="4"/>
          <table:table-cell table:number-columns-repeated="8"/>
        </table:table-row>
        <table:table-row table:style-name="ro108">
          <table:table-cell table:style-name="ce248" office:value-type="float" office:value="12" calcext:value-type="float">
            <text:p>12</text:p>
          </table:table-cell>
          <table:table-cell table:style-name="ce265" office:value-type="string" calcext:value-type="string">
            <text:p>Vienna</text:p>
          </table:table-cell>
          <table:table-cell table:style-name="ce288" office:value-type="float" office:value="75" calcext:value-type="float">
            <text:p>75</text:p>
          </table:table-cell>
          <table:table-cell table:style-name="ce288" office:value-type="float" office:value="15" calcext:value-type="float">
            <text:p>15</text:p>
          </table:table-cell>
          <table:table-cell table:style-name="ce288" office:value-type="float" office:value="10" calcext:value-type="float">
            <text:p>10</text:p>
          </table:table-cell>
          <table:table-cell table:style-name="ce288" office:value-type="float" office:value="60" calcext:value-type="float">
            <text:p>60</text:p>
          </table:table-cell>
          <table:table-cell table:style-name="ce288" office:value-type="float" office:value="15" calcext:value-type="float">
            <text:p>15</text:p>
          </table:table-cell>
          <table:table-cell table:style-name="ce288" office:value-type="float" office:value="225" calcext:value-type="float">
            <text:p>225</text:p>
          </table:table-cell>
          <table:table-cell table:style-name="ce338" table:formula="of:=([.C49]/20.05)+([.D49]/12.15)+([.E49]/23)" office:value-type="float" office:value="5.40999888898259" calcext:value-type="float">
            <text:p>5.4</text:p>
          </table:table-cell>
          <table:table-cell table:style-name="ce349" table:formula="of:=([.H49]/61)+([.F49]/48)+([.G49]/35.45)" office:value-type="float" office:value="5.36165576082684" calcext:value-type="float">
            <text:p>5.4</text:p>
          </table:table-cell>
          <table:table-cell table:style-name="ce268" table:formula="of:=(([.C49]/20)+([.D49]/12.15))*50" office:value-type="float" office:value="249.228395061728" calcext:value-type="float">
            <text:p>249</text:p>
          </table:table-cell>
          <table:table-cell table:style-name="ce366" table:formula="of:=[.H49]*(50/61)*(1+(2*10^-4))" office:value-type="float" office:value="184.463114754098" calcext:value-type="float">
            <text:p>184</text:p>
          </table:table-cell>
          <table:table-cell table:style-name="ce268" table:formula="of:=([.L49]-(([.C49]*0.7143)+([.D49]*0.5879)))" office:value-type="float" office:value="122.072114754098" calcext:value-type="float">
            <text:p>122</text:p>
          </table:table-cell>
          <table:table-cell table:style-name="ce279" table:formula="of:=IF([.G49]&lt;=0;0;[.F49]/[.G49])" office:value-type="float" office:value="4" calcext:value-type="float">
            <text:p>4.0</text:p>
          </table:table-cell>
          <table:table-cell table:style-name="ce392" office:value-type="string" calcext:value-type="string" table:number-columns-spanned="5" table:number-rows-spanned="1">
            <text:p>from Vienna water company</text:p>
          </table:table-cell>
          <table:covered-table-cell table:number-columns-repeated="3" table:style-name="ce21"/>
          <table:covered-table-cell table:style-name="ce19"/>
          <table:table-cell table:style-name="ce408"/>
          <table:table-cell table:style-name="ce121" office:value-type="string" calcext:value-type="string">
            <text:p>frac=</text:p>
          </table:table-cell>
          <table:table-cell table:style-name="ce133" table:formula="of:=[.V46]+(2*[.V47])+(3*[.V48])" office:value-type="float" office:value="0.971968132848306" calcext:value-type="float">
            <text:p>0.971968</text:p>
          </table:table-cell>
          <table:table-cell table:style-name="ce96" table:number-columns-repeated="9"/>
          <table:table-cell table:style-name="ce121" office:value-type="string" calcext:value-type="string">
            <text:p>frac=</text:p>
          </table:table-cell>
          <table:table-cell table:style-name="ce133" table:formula="of:=[.AG46]+(2*[.AG47])+(3*[.AG48])" office:value-type="float" office:value="2.999996019" calcext:value-type="float">
            <text:p>2.999996</text:p>
          </table:table-cell>
          <table:table-cell table:style-name="ce96" table:number-columns-repeated="19"/>
          <table:table-cell table:style-name="ce123" table:number-columns-repeated="4"/>
          <table:table-cell table:number-columns-repeated="8"/>
        </table:table-row>
        <table:table-row table:style-name="ro108">
          <table:table-cell table:style-name="ce248" office:value-type="float" office:value="13" calcext:value-type="float">
            <text:p>13</text:p>
          </table:table-cell>
          <table:table-cell table:style-name="ce265" office:value-type="string" calcext:value-type="string">
            <text:p>Vienna (boiled)</text:p>
          </table:table-cell>
          <table:table-cell table:style-name="ce288" office:value-type="float" office:value="27" calcext:value-type="float">
            <text:p>27</text:p>
          </table:table-cell>
          <table:table-cell table:style-name="ce288" office:value-type="float" office:value="15" calcext:value-type="float">
            <text:p>15</text:p>
          </table:table-cell>
          <table:table-cell table:style-name="ce288" office:value-type="float" office:value="10" calcext:value-type="float">
            <text:p>10</text:p>
          </table:table-cell>
          <table:table-cell table:style-name="ce288" office:value-type="float" office:value="60" calcext:value-type="float">
            <text:p>60</text:p>
          </table:table-cell>
          <table:table-cell table:style-name="ce288" office:value-type="float" office:value="15" calcext:value-type="float">
            <text:p>15</text:p>
          </table:table-cell>
          <table:table-cell table:style-name="ce288" office:value-type="float" office:value="80" calcext:value-type="float">
            <text:p>80</text:p>
          </table:table-cell>
          <table:table-cell table:style-name="ce338" table:formula="of:=([.C50]/20.05)+([.D50]/12.15)+([.E50]/23)" office:value-type="float" office:value="3.01598392638907" calcext:value-type="float">
            <text:p>3.0</text:p>
          </table:table-cell>
          <table:table-cell table:style-name="ce349" table:formula="of:=([.H50]/61)+([.F50]/48)+([.G50]/35.45)" office:value-type="float" office:value="2.98460658049897" calcext:value-type="float">
            <text:p>3.0</text:p>
          </table:table-cell>
          <table:table-cell table:style-name="ce268" table:formula="of:=(([.C50]/20)+([.D50]/12.15))*50" office:value-type="float" office:value="129.228395061728" calcext:value-type="float">
            <text:p>129</text:p>
          </table:table-cell>
          <table:table-cell table:style-name="ce366" table:formula="of:=[.H50]*(50/61)*(1+(2*10^-4))" office:value-type="float" office:value="65.5868852459016" calcext:value-type="float">
            <text:p>66</text:p>
          </table:table-cell>
          <table:table-cell table:style-name="ce268" table:formula="of:=([.L50]-(([.C50]*0.7143)+([.D50]*0.5879)))" office:value-type="float" office:value="37.4822852459016" calcext:value-type="float">
            <text:p>37</text:p>
          </table:table-cell>
          <table:table-cell table:style-name="ce279" table:formula="of:=IF([.G50]&lt;=0;0;[.F50]/[.G50])" office:value-type="float" office:value="4" calcext:value-type="float">
            <text:p>4.0</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121"/>
          <table:table-cell table:style-name="ce116"/>
          <table:table-cell table:style-name="ce96" table:number-columns-repeated="11"/>
          <table:table-cell table:style-name="ce411"/>
          <table:table-cell table:style-name="ce96" table:number-columns-repeated="18"/>
          <table:table-cell table:style-name="ce123" table:number-columns-repeated="4"/>
          <table:table-cell table:number-columns-repeated="8"/>
        </table:table-row>
        <table:table-row table:style-name="ro108">
          <table:table-cell table:style-name="ce248" office:value-type="float" office:value="14" calcext:value-type="float">
            <text:p>14</text:p>
          </table:table-cell>
          <table:table-cell table:style-name="ce265" office:value-type="string" calcext:value-type="string">
            <text:p>Dusseldorf</text:p>
          </table:table-cell>
          <table:table-cell table:style-name="ce288" office:value-type="float" office:value="40" calcext:value-type="float">
            <text:p>40</text:p>
          </table:table-cell>
          <table:table-cell table:style-name="ce288" office:value-type="float" office:value="15" calcext:value-type="float">
            <text:p>15</text:p>
          </table:table-cell>
          <table:table-cell table:style-name="ce288" office:value-type="float" office:value="25" calcext:value-type="float">
            <text:p>25</text:p>
          </table:table-cell>
          <table:table-cell table:style-name="ce288" office:value-type="float" office:value="80" calcext:value-type="float">
            <text:p>80</text:p>
          </table:table-cell>
          <table:table-cell table:style-name="ce288" office:value-type="float" office:value="45" calcext:value-type="float">
            <text:p>45</text:p>
          </table:table-cell>
          <table:table-cell table:style-name="ce288" office:value-type="float" office:value="81" calcext:value-type="float">
            <text:p>81</text:p>
          </table:table-cell>
          <table:table-cell table:style-name="ce339" table:formula="of:=([.C51]/20.05)+([.D51]/12.15)+([.E51]/23)" office:value-type="float" office:value="4.31653689180163" calcext:value-type="float">
            <text:p>4.32</text:p>
          </table:table-cell>
          <table:table-cell table:style-name="ce350" table:formula="of:=([.H51]/61)+([.F51]/48)+([.G51]/35.45)" office:value-type="float" office:value="4.2639290311144" calcext:value-type="float">
            <text:p>4.26</text:p>
          </table:table-cell>
          <table:table-cell table:style-name="ce268" table:formula="of:=(([.C51]/20)+([.D51]/12.15))*50" office:value-type="float" office:value="161.728395061728" calcext:value-type="float">
            <text:p>162</text:p>
          </table:table-cell>
          <table:table-cell table:style-name="ce366" table:formula="of:=[.H51]*(50/61)*(1+(2*10^-4))" office:value-type="float" office:value="66.4067213114754" calcext:value-type="float">
            <text:p>66</text:p>
          </table:table-cell>
          <table:table-cell table:style-name="ce268" table:formula="of:=([.L51]-(([.C51]*0.7143)+([.D51]*0.5879)))" office:value-type="float" office:value="29.0162213114754" calcext:value-type="float">
            <text:p>29</text:p>
          </table:table-cell>
          <table:table-cell table:style-name="ce279" table:formula="of:=IF([.G51]&lt;=0;0;[.F51]/[.G51])" office:value-type="float" office:value="1.77777777777778" calcext:value-type="float">
            <text:p>1.8</text:p>
          </table:table-cell>
          <table:table-cell table:style-name="ce392" office:value-type="string" calcext:value-type="string" table:number-columns-spanned="5" table:number-rows-spanned="1">
            <text:p>from Dusseldorf water company</text:p>
          </table:table-cell>
          <table:covered-table-cell table:number-columns-repeated="3" table:style-name="ce21"/>
          <table:covered-table-cell table:style-name="ce19"/>
          <table:table-cell table:style-name="ce408"/>
          <table:table-cell table:style-name="ce121"/>
          <table:table-cell table:style-name="ce122"/>
          <table:table-cell table:style-name="ce96" table:number-columns-repeated="3"/>
          <table:table-cell table:style-name="ce96" office:value-type="string" calcext:value-type="string">
            <text:p>baking soda alkalinity fixed</text:p>
          </table:table-cell>
          <table:table-cell table:style-name="ce96" table:number-columns-repeated="7"/>
          <table:table-cell table:style-name="ce411"/>
          <table:table-cell table:style-name="ce96" table:number-columns-repeated="18"/>
          <table:table-cell table:style-name="ce123" table:number-columns-repeated="4"/>
          <table:table-cell table:number-columns-repeated="8"/>
        </table:table-row>
        <table:table-row table:style-name="ro108">
          <table:table-cell table:style-name="ce248" office:value-type="float" office:value="15" calcext:value-type="float">
            <text:p>15</text:p>
          </table:table-cell>
          <table:table-cell table:style-name="ce265" office:value-type="string" calcext:value-type="string">
            <text:p>Dusseldorf (boiled)</text:p>
          </table:table-cell>
          <table:table-cell table:style-name="ce288" office:value-type="float" office:value="39" calcext:value-type="float">
            <text:p>39</text:p>
          </table:table-cell>
          <table:table-cell table:style-name="ce288" office:value-type="float" office:value="15" calcext:value-type="float">
            <text:p>15</text:p>
          </table:table-cell>
          <table:table-cell table:style-name="ce288" office:value-type="float" office:value="25" calcext:value-type="float">
            <text:p>25</text:p>
          </table:table-cell>
          <table:table-cell table:style-name="ce288" office:value-type="float" office:value="80" calcext:value-type="float">
            <text:p>80</text:p>
          </table:table-cell>
          <table:table-cell table:style-name="ce288" office:value-type="float" office:value="45" calcext:value-type="float">
            <text:p>45</text:p>
          </table:table-cell>
          <table:table-cell table:style-name="ce288" office:value-type="float" office:value="80" calcext:value-type="float">
            <text:p>80</text:p>
          </table:table-cell>
          <table:table-cell table:style-name="ce339" table:formula="of:=([.C52]/20.05)+([.D52]/12.15)+([.E52]/23)" office:value-type="float" office:value="4.26666158008093" calcext:value-type="float">
            <text:p>4.27</text:p>
          </table:table-cell>
          <table:table-cell table:style-name="ce350" table:formula="of:=([.H52]/61)+([.F52]/48)+([.G52]/35.45)" office:value-type="float" office:value="4.24753558849145" calcext:value-type="float">
            <text:p>4.25</text:p>
          </table:table-cell>
          <table:table-cell table:style-name="ce268" table:formula="of:=(([.C52]/20)+([.D52]/12.15))*50" office:value-type="float" office:value="159.228395061728" calcext:value-type="float">
            <text:p>159</text:p>
          </table:table-cell>
          <table:table-cell table:style-name="ce366" table:formula="of:=[.H52]*(50/61)*(1+(2*10^-4))" office:value-type="float" office:value="65.5868852459016" calcext:value-type="float">
            <text:p>66</text:p>
          </table:table-cell>
          <table:table-cell table:style-name="ce268" table:formula="of:=([.L52]-(([.C52]*0.7143)+([.D52]*0.5879)))" office:value-type="float" office:value="28.9106852459016" calcext:value-type="float">
            <text:p>29</text:p>
          </table:table-cell>
          <table:table-cell table:style-name="ce279" table:formula="of:=IF([.G52]&lt;=0;0;[.F52]/[.G52])" office:value-type="float" office:value="1.77777777777778" calcext:value-type="float">
            <text:p>1.8</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table-cell table:style-name="ce410"/>
          <table:table-cell table:style-name="ce96" table:number-columns-repeated="11"/>
          <table:table-cell table:style-name="ce411"/>
          <table:table-cell table:style-name="ce96" table:number-columns-repeated="18"/>
          <table:table-cell table:style-name="ce123" table:number-columns-repeated="4"/>
          <table:table-cell table:number-columns-repeated="8"/>
        </table:table-row>
        <table:table-row table:style-name="ro108">
          <table:table-cell table:style-name="ce248" office:value-type="float" office:value="16" calcext:value-type="float">
            <text:p>16</text:p>
          </table:table-cell>
          <table:table-cell table:style-name="ce266" office:value-type="string" calcext:value-type="string">
            <text:p>Beerse</text:p>
          </table:table-cell>
          <table:table-cell table:style-name="ce288" office:value-type="float" office:value="73" calcext:value-type="float">
            <text:p>73</text:p>
          </table:table-cell>
          <table:table-cell table:style-name="ce288" office:value-type="float" office:value="13" calcext:value-type="float">
            <text:p>13</text:p>
          </table:table-cell>
          <table:table-cell table:style-name="ce288" office:value-type="float" office:value="52" calcext:value-type="float">
            <text:p>52</text:p>
          </table:table-cell>
          <table:table-cell table:style-name="ce288" office:value-type="float" office:value="125" calcext:value-type="float">
            <text:p>125</text:p>
          </table:table-cell>
          <table:table-cell table:style-name="ce288" office:value-type="float" office:value="80" calcext:value-type="float">
            <text:p>80</text:p>
          </table:table-cell>
          <table:table-cell table:style-name="ce288" office:value-type="float" office:value="128" calcext:value-type="float">
            <text:p>128</text:p>
          </table:table-cell>
          <table:table-cell table:style-name="ce338" table:formula="of:=([.C53]/20.05)+([.D53]/12.15)+([.E53]/23)" office:value-type="float" office:value="6.97172616856499" calcext:value-type="float">
            <text:p>7.0</text:p>
          </table:table-cell>
          <table:table-cell table:style-name="ce349" table:formula="of:=([.H53]/61)+([.F53]/48)+([.G53]/35.45)" office:value-type="float" office:value="6.9592268992732" calcext:value-type="float">
            <text:p>7.0</text:p>
          </table:table-cell>
          <table:table-cell table:style-name="ce268" table:formula="of:=(([.C53]/20)+([.D53]/12.15))*50" office:value-type="float" office:value="235.997942386831" calcext:value-type="float">
            <text:p>236</text:p>
          </table:table-cell>
          <table:table-cell table:style-name="ce366" table:formula="of:=[.H53]*(50/61)*(1+(2*10^-4))" office:value-type="float" office:value="104.939016393443" calcext:value-type="float">
            <text:p>105</text:p>
          </table:table-cell>
          <table:table-cell table:style-name="ce268" table:formula="of:=([.L53]-(([.C53]*0.7143)+([.D53]*0.5879)))" office:value-type="float" office:value="45.1524163934426" calcext:value-type="float">
            <text:p>45</text:p>
          </table:table-cell>
          <table:table-cell table:style-name="ce279" table:formula="of:=IF([.G53]&lt;=0;0;[.F53]/[.G53])" office:value-type="float" office:value="1.5625" calcext:value-type="float">
            <text:p>1.6</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13"/>
          <table:table-cell table:style-name="ce411"/>
          <table:table-cell table:style-name="ce96" table:number-columns-repeated="18"/>
          <table:table-cell table:style-name="ce123" table:number-columns-repeated="4"/>
          <table:table-cell table:number-columns-repeated="8"/>
        </table:table-row>
        <table:table-row table:style-name="ro108">
          <table:table-cell table:style-name="ce248" office:value-type="float" office:value="17" calcext:value-type="float">
            <text:p>17</text:p>
          </table:table-cell>
          <table:table-cell table:style-name="ce265" office:value-type="string" calcext:value-type="string">
            <text:p>Beerse (boiled)</text:p>
          </table:table-cell>
          <table:table-cell table:style-name="ce288" office:value-type="float" office:value="57" calcext:value-type="float">
            <text:p>57</text:p>
          </table:table-cell>
          <table:table-cell table:style-name="ce288" office:value-type="float" office:value="13" calcext:value-type="float">
            <text:p>13</text:p>
          </table:table-cell>
          <table:table-cell table:style-name="ce288" office:value-type="float" office:value="52" calcext:value-type="float">
            <text:p>52</text:p>
          </table:table-cell>
          <table:table-cell table:style-name="ce288" office:value-type="float" office:value="125" calcext:value-type="float">
            <text:p>125</text:p>
          </table:table-cell>
          <table:table-cell table:number-columns-repeated="2" table:style-name="ce288" office:value-type="float" office:value="80" calcext:value-type="float">
            <text:p>80</text:p>
          </table:table-cell>
          <table:table-cell table:style-name="ce338" table:formula="of:=([.C54]/20.05)+([.D54]/12.15)+([.E54]/23)" office:value-type="float" office:value="6.17372118103382" calcext:value-type="float">
            <text:p>6.2</text:p>
          </table:table-cell>
          <table:table-cell table:style-name="ce349" table:formula="of:=([.H54]/61)+([.F54]/48)+([.G54]/35.45)" office:value-type="float" office:value="6.17234165337156" calcext:value-type="float">
            <text:p>6.2</text:p>
          </table:table-cell>
          <table:table-cell table:style-name="ce268" table:formula="of:=(([.C54]/20)+([.D54]/12.15))*50" office:value-type="float" office:value="195.997942386831" calcext:value-type="float">
            <text:p>196</text:p>
          </table:table-cell>
          <table:table-cell table:style-name="ce366" table:formula="of:=[.H54]*(50/61)*(1+(2*10^-4))" office:value-type="float" office:value="65.5868852459016" calcext:value-type="float">
            <text:p>66</text:p>
          </table:table-cell>
          <table:table-cell table:style-name="ce268" table:formula="of:=([.L54]-(([.C54]*0.7143)+([.D54]*0.5879)))" office:value-type="float" office:value="17.2290852459016" calcext:value-type="float">
            <text:p>17</text:p>
          </table:table-cell>
          <table:table-cell table:style-name="ce279" table:formula="of:=IF([.G54]&lt;=0;0;[.F54]/[.G54])" office:value-type="float" office:value="1.5625" calcext:value-type="float">
            <text:p>1.6</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14"/>
          <table:table-cell table:style-name="ce412"/>
          <table:table-cell table:style-name="ce96" table:number-columns-repeated="17"/>
          <table:table-cell table:style-name="ce123" table:number-columns-repeated="4"/>
          <table:table-cell table:number-columns-repeated="8"/>
        </table:table-row>
        <table:table-row table:style-name="ro108">
          <table:table-cell table:style-name="ce248" office:value-type="float" office:value="18" calcext:value-type="float">
            <text:p>18</text:p>
          </table:table-cell>
          <table:table-cell table:style-name="ce266" office:value-type="string" calcext:value-type="string">
            <text:p>Brugse</text:p>
          </table:table-cell>
          <table:table-cell table:style-name="ce288" office:value-type="float" office:value="132" calcext:value-type="float">
            <text:p>132</text:p>
          </table:table-cell>
          <table:table-cell table:style-name="ce288" office:value-type="float" office:value="13" calcext:value-type="float">
            <text:p>13</text:p>
          </table:table-cell>
          <table:table-cell table:style-name="ce288" office:value-type="float" office:value="20" calcext:value-type="float">
            <text:p>20</text:p>
          </table:table-cell>
          <table:table-cell table:style-name="ce288" office:value-type="float" office:value="99" calcext:value-type="float">
            <text:p>99</text:p>
          </table:table-cell>
          <table:table-cell table:style-name="ce288" office:value-type="float" office:value="38" calcext:value-type="float">
            <text:p>38</text:p>
          </table:table-cell>
          <table:table-cell table:style-name="ce288" office:value-type="float" office:value="326" calcext:value-type="float">
            <text:p>326</text:p>
          </table:table-cell>
          <table:table-cell table:style-name="ce338" table:formula="of:=([.C55]/20.05)+([.D55]/12.15)+([.E55]/23)" office:value-type="float" office:value="8.5230652122601" calcext:value-type="float">
            <text:p>8.5</text:p>
          </table:table-cell>
          <table:table-cell table:style-name="ce349" table:formula="of:=([.H55]/61)+([.F55]/48)+([.G55]/35.45)" office:value-type="float" office:value="8.47869459409466" calcext:value-type="float">
            <text:p>8.5</text:p>
          </table:table-cell>
          <table:table-cell table:style-name="ce268" table:formula="of:=(([.C55]/20)+([.D55]/12.15))*50" office:value-type="float" office:value="383.497942386831" calcext:value-type="float">
            <text:p>383</text:p>
          </table:table-cell>
          <table:table-cell table:style-name="ce366" table:formula="of:=[.H55]*(50/61)*(1+(2*10^-4))" office:value-type="float" office:value="267.266557377049" calcext:value-type="float">
            <text:p>267</text:p>
          </table:table-cell>
          <table:table-cell table:style-name="ce268" table:formula="of:=([.L55]-(([.C55]*0.7143)+([.D55]*0.5879)))" office:value-type="float" office:value="165.336257377049" calcext:value-type="float">
            <text:p>165</text:p>
          </table:table-cell>
          <table:table-cell table:style-name="ce279" table:formula="of:=IF([.G55]&lt;=0;0;[.F55]/[.G55])" office:value-type="float" office:value="2.60526315789474" calcext:value-type="float">
            <text:p>2.6</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14"/>
          <table:table-cell table:style-name="ce411"/>
          <table:table-cell table:style-name="ce96" table:number-columns-repeated="17"/>
          <table:table-cell table:style-name="ce123" table:number-columns-repeated="4"/>
          <table:table-cell table:number-columns-repeated="8"/>
        </table:table-row>
        <table:table-row table:style-name="ro108">
          <table:table-cell table:style-name="ce248" office:value-type="float" office:value="19" calcext:value-type="float">
            <text:p>19</text:p>
          </table:table-cell>
          <table:table-cell table:style-name="ce266" office:value-type="string" calcext:value-type="string">
            <text:p>Brugse (boiled)</text:p>
          </table:table-cell>
          <table:table-cell table:style-name="ce288" office:value-type="float" office:value="51" calcext:value-type="float">
            <text:p>51</text:p>
          </table:table-cell>
          <table:table-cell table:style-name="ce288" office:value-type="float" office:value="13" calcext:value-type="float">
            <text:p>13</text:p>
          </table:table-cell>
          <table:table-cell table:style-name="ce288" office:value-type="float" office:value="20" calcext:value-type="float">
            <text:p>20</text:p>
          </table:table-cell>
          <table:table-cell table:style-name="ce288" office:value-type="float" office:value="99" calcext:value-type="float">
            <text:p>99</text:p>
          </table:table-cell>
          <table:table-cell table:style-name="ce288" office:value-type="float" office:value="38" calcext:value-type="float">
            <text:p>38</text:p>
          </table:table-cell>
          <table:table-cell table:style-name="ce288" office:value-type="float" office:value="80" calcext:value-type="float">
            <text:p>80</text:p>
          </table:table-cell>
          <table:table-cell table:style-name="ce338" table:formula="of:=([.C56]/20.05)+([.D56]/12.15)+([.E56]/23)" office:value-type="float" office:value="4.48316496288354" calcext:value-type="float">
            <text:p>4.5</text:p>
          </table:table-cell>
          <table:table-cell table:style-name="ce349" table:formula="of:=([.H56]/61)+([.F56]/48)+([.G56]/35.45)" office:value-type="float" office:value="4.44590770884876" calcext:value-type="float">
            <text:p>4.4</text:p>
          </table:table-cell>
          <table:table-cell table:style-name="ce268" table:formula="of:=(([.C56]/20)+([.D56]/12.15))*50" office:value-type="float" office:value="180.997942386831" calcext:value-type="float">
            <text:p>181</text:p>
          </table:table-cell>
          <table:table-cell table:style-name="ce366" table:formula="of:=[.H56]*(50/61)*(1+(2*10^-4))" office:value-type="float" office:value="65.5868852459016" calcext:value-type="float">
            <text:p>66</text:p>
          </table:table-cell>
          <table:table-cell table:style-name="ce268" table:formula="of:=([.L56]-(([.C56]*0.7143)+([.D56]*0.5879)))" office:value-type="float" office:value="21.5148852459016" calcext:value-type="float">
            <text:p>22</text:p>
          </table:table-cell>
          <table:table-cell table:style-name="ce279" table:formula="of:=IF([.G56]&lt;=0;0;[.F56]/[.G56])" office:value-type="float" office:value="2.60526315789474" calcext:value-type="float">
            <text:p>2.6</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14"/>
          <table:table-cell table:style-name="ce411"/>
          <table:table-cell table:style-name="ce96" table:number-columns-repeated="17"/>
          <table:table-cell table:style-name="ce123" table:number-columns-repeated="4"/>
          <table:table-cell table:number-columns-repeated="8"/>
        </table:table-row>
        <table:table-row table:style-name="ro108">
          <table:table-cell table:style-name="ce248" office:value-type="float" office:value="20" calcext:value-type="float">
            <text:p>20</text:p>
          </table:table-cell>
          <table:table-cell table:style-name="ce266" office:value-type="string" calcext:value-type="string">
            <text:p>Brussels</text:p>
          </table:table-cell>
          <table:table-cell table:style-name="ce288" office:value-type="float" office:value="100" calcext:value-type="float">
            <text:p>100</text:p>
          </table:table-cell>
          <table:table-cell table:style-name="ce288" office:value-type="float" office:value="11" calcext:value-type="float">
            <text:p>11</text:p>
          </table:table-cell>
          <table:table-cell table:style-name="ce288" office:value-type="float" office:value="18" calcext:value-type="float">
            <text:p>18</text:p>
          </table:table-cell>
          <table:table-cell table:style-name="ce288" office:value-type="float" office:value="70" calcext:value-type="float">
            <text:p>70</text:p>
          </table:table-cell>
          <table:table-cell table:style-name="ce288" office:value-type="float" office:value="41" calcext:value-type="float">
            <text:p>41</text:p>
          </table:table-cell>
          <table:table-cell table:style-name="ce288" office:value-type="float" office:value="250" calcext:value-type="float">
            <text:p>250</text:p>
          </table:table-cell>
          <table:table-cell table:style-name="ce338" table:formula="of:=([.C57]/20.05)+([.D57]/12.15)+([.E57]/23)" office:value-type="float" office:value="6.67548966196068" calcext:value-type="float">
            <text:p>6.7</text:p>
          </table:table-cell>
          <table:table-cell table:style-name="ce349" table:formula="of:=([.H57]/61)+([.F57]/48)+([.G57]/35.45)" office:value-type="float" office:value="6.71325252221631" calcext:value-type="float">
            <text:p>6.7</text:p>
          </table:table-cell>
          <table:table-cell table:style-name="ce268" table:formula="of:=(([.C57]/20)+([.D57]/12.15))*50" office:value-type="float" office:value="295.267489711934" calcext:value-type="float">
            <text:p>295</text:p>
          </table:table-cell>
          <table:table-cell table:style-name="ce366" table:formula="of:=[.H57]*(50/61)*(1+(2*10^-4))" office:value-type="float" office:value="204.959016393443" calcext:value-type="float">
            <text:p>205</text:p>
          </table:table-cell>
          <table:table-cell table:style-name="ce268" table:formula="of:=([.L57]-(([.C57]*0.7143)+([.D57]*0.5879)))" office:value-type="float" office:value="127.062116393443" calcext:value-type="float">
            <text:p>127</text:p>
          </table:table-cell>
          <table:table-cell table:style-name="ce279" table:formula="of:=IF([.G57]&lt;=0;0;[.F57]/[.G57])" office:value-type="float" office:value="1.70731707317073" calcext:value-type="float">
            <text:p>1.7</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1" calcext:value-type="float">
            <text:p>21</text:p>
          </table:table-cell>
          <table:table-cell table:style-name="ce266" office:value-type="string" calcext:value-type="string">
            <text:p>Brussels (boiled)</text:p>
          </table:table-cell>
          <table:table-cell table:style-name="ce288" office:value-type="float" office:value="44" calcext:value-type="float">
            <text:p>44</text:p>
          </table:table-cell>
          <table:table-cell table:style-name="ce288" office:value-type="float" office:value="11" calcext:value-type="float">
            <text:p>11</text:p>
          </table:table-cell>
          <table:table-cell table:style-name="ce288" office:value-type="float" office:value="18" calcext:value-type="float">
            <text:p>18</text:p>
          </table:table-cell>
          <table:table-cell table:style-name="ce288" office:value-type="float" office:value="70" calcext:value-type="float">
            <text:p>70</text:p>
          </table:table-cell>
          <table:table-cell table:style-name="ce288" office:value-type="float" office:value="41" calcext:value-type="float">
            <text:p>41</text:p>
          </table:table-cell>
          <table:table-cell table:style-name="ce288" office:value-type="float" office:value="80" calcext:value-type="float">
            <text:p>80</text:p>
          </table:table-cell>
          <table:table-cell table:style-name="ce338" table:formula="of:=([.C58]/20.05)+([.D58]/12.15)+([.E58]/23)" office:value-type="float" office:value="3.88247220560158" calcext:value-type="float">
            <text:p>3.9</text:p>
          </table:table-cell>
          <table:table-cell table:style-name="ce349" table:formula="of:=([.H58]/61)+([.F58]/48)+([.G58]/35.45)" office:value-type="float" office:value="3.92636727631467" calcext:value-type="float">
            <text:p>3.9</text:p>
          </table:table-cell>
          <table:table-cell table:style-name="ce268" table:formula="of:=(([.C58]/20)+([.D58]/12.15))*50" office:value-type="float" office:value="155.267489711934" calcext:value-type="float">
            <text:p>155</text:p>
          </table:table-cell>
          <table:table-cell table:style-name="ce366" table:formula="of:=[.H58]*(50/61)*(1+(2*10^-4))" office:value-type="float" office:value="65.5868852459016" calcext:value-type="float">
            <text:p>66</text:p>
          </table:table-cell>
          <table:table-cell table:style-name="ce268" table:formula="of:=([.L58]-(([.C58]*0.7143)+([.D58]*0.5879)))" office:value-type="float" office:value="27.6907852459016" calcext:value-type="float">
            <text:p>28</text:p>
          </table:table-cell>
          <table:table-cell table:style-name="ce279" table:formula="of:=IF([.G58]&lt;=0;0;[.F58]/[.G58])" office:value-type="float" office:value="1.70731707317073" calcext:value-type="float">
            <text:p>1.7</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2" calcext:value-type="float">
            <text:p>22</text:p>
          </table:table-cell>
          <table:table-cell table:style-name="ce266" office:value-type="string" calcext:value-type="string">
            <text:p>Hoegaarden</text:p>
          </table:table-cell>
          <table:table-cell table:style-name="ce288" office:value-type="float" office:value="90" calcext:value-type="float">
            <text:p>90</text:p>
          </table:table-cell>
          <table:table-cell table:style-name="ce288" office:value-type="float" office:value="11" calcext:value-type="float">
            <text:p>11</text:p>
          </table:table-cell>
          <table:table-cell table:style-name="ce288" office:value-type="float" office:value="16" calcext:value-type="float">
            <text:p>16</text:p>
          </table:table-cell>
          <table:table-cell table:style-name="ce288" office:value-type="float" office:value="82" calcext:value-type="float">
            <text:p>82</text:p>
          </table:table-cell>
          <table:table-cell table:style-name="ce288" office:value-type="float" office:value="53" calcext:value-type="float">
            <text:p>53</text:p>
          </table:table-cell>
          <table:table-cell table:style-name="ce288" office:value-type="float" office:value="171" calcext:value-type="float">
            <text:p>171</text:p>
          </table:table-cell>
          <table:table-cell table:style-name="ce338" table:formula="of:=([.C59]/20.05)+([.D59]/12.15)+([.E59]/23)" office:value-type="float" office:value="6.08978002301457" calcext:value-type="float">
            <text:p>6.1</text:p>
          </table:table-cell>
          <table:table-cell table:style-name="ce349" table:formula="of:=([.H59]/61)+([.F59]/48)+([.G59]/35.45)" office:value-type="float" office:value="6.00667549153352" calcext:value-type="float">
            <text:p>6.0</text:p>
          </table:table-cell>
          <table:table-cell table:style-name="ce268" table:formula="of:=(([.C59]/20)+([.D59]/12.15))*50" office:value-type="float" office:value="270.267489711934" calcext:value-type="float">
            <text:p>270</text:p>
          </table:table-cell>
          <table:table-cell table:style-name="ce366" table:formula="of:=[.H59]*(50/61)*(1+(2*10^-4))" office:value-type="float" office:value="140.191967213115" calcext:value-type="float">
            <text:p>140</text:p>
          </table:table-cell>
          <table:table-cell table:style-name="ce268" table:formula="of:=([.L59]-(([.C59]*0.7143)+([.D59]*0.5879)))" office:value-type="float" office:value="69.4380672131147" calcext:value-type="float">
            <text:p>69</text:p>
          </table:table-cell>
          <table:table-cell table:style-name="ce279" table:formula="of:=IF([.G59]&lt;=0;0;[.F59]/[.G59])" office:value-type="float" office:value="1.54716981132075" calcext:value-type="float">
            <text:p>1.5</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3" calcext:value-type="float">
            <text:p>23</text:p>
          </table:table-cell>
          <table:table-cell table:style-name="ce266" office:value-type="string" calcext:value-type="string">
            <text:p>Hoegaarden (boiled)</text:p>
          </table:table-cell>
          <table:table-cell table:style-name="ce288" office:value-type="float" office:value="60" calcext:value-type="float">
            <text:p>60</text:p>
          </table:table-cell>
          <table:table-cell table:style-name="ce288" office:value-type="float" office:value="11" calcext:value-type="float">
            <text:p>11</text:p>
          </table:table-cell>
          <table:table-cell table:style-name="ce288" office:value-type="float" office:value="16" calcext:value-type="float">
            <text:p>16</text:p>
          </table:table-cell>
          <table:table-cell table:style-name="ce288" office:value-type="float" office:value="82" calcext:value-type="float">
            <text:p>82</text:p>
          </table:table-cell>
          <table:table-cell table:style-name="ce288" office:value-type="float" office:value="53" calcext:value-type="float">
            <text:p>53</text:p>
          </table:table-cell>
          <table:table-cell table:style-name="ce288" office:value-type="float" office:value="80" calcext:value-type="float">
            <text:p>80</text:p>
          </table:table-cell>
          <table:table-cell table:style-name="ce338" table:formula="of:=([.C60]/20.05)+([.D60]/12.15)+([.E60]/23)" office:value-type="float" office:value="4.59352067139362" calcext:value-type="float">
            <text:p>4.6</text:p>
          </table:table-cell>
          <table:table-cell table:style-name="ce349" table:formula="of:=([.H60]/61)+([.F60]/48)+([.G60]/35.45)" office:value-type="float" office:value="4.514872212845" calcext:value-type="float">
            <text:p>4.5</text:p>
          </table:table-cell>
          <table:table-cell table:style-name="ce268" table:formula="of:=(([.C60]/20)+([.D60]/12.15))*50" office:value-type="float" office:value="195.267489711934" calcext:value-type="float">
            <text:p>195</text:p>
          </table:table-cell>
          <table:table-cell table:style-name="ce366" table:formula="of:=[.H60]*(50/61)*(1+(2*10^-4))" office:value-type="float" office:value="65.5868852459016" calcext:value-type="float">
            <text:p>66</text:p>
          </table:table-cell>
          <table:table-cell table:style-name="ce268" table:formula="of:=([.L60]-(([.C60]*0.7143)+([.D60]*0.5879)))" office:value-type="float" office:value="16.2619852459016" calcext:value-type="float">
            <text:p>16</text:p>
          </table:table-cell>
          <table:table-cell table:style-name="ce279" table:formula="of:=IF([.G60]&lt;=0;0;[.F60]/[.G60])" office:value-type="float" office:value="1.54716981132075" calcext:value-type="float">
            <text:p>1.5</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4" calcext:value-type="float">
            <text:p>24</text:p>
          </table:table-cell>
          <table:table-cell table:style-name="ce266" office:value-type="string" calcext:value-type="string">
            <text:p>Willebroek</text:p>
          </table:table-cell>
          <table:table-cell table:style-name="ce288" office:value-type="float" office:value="68" calcext:value-type="float">
            <text:p>68</text:p>
          </table:table-cell>
          <table:table-cell table:style-name="ce288" office:value-type="float" office:value="8" calcext:value-type="float">
            <text:p>8</text:p>
          </table:table-cell>
          <table:table-cell table:style-name="ce288" office:value-type="float" office:value="33" calcext:value-type="float">
            <text:p>33</text:p>
          </table:table-cell>
          <table:table-cell table:style-name="ce288" office:value-type="float" office:value="70" calcext:value-type="float">
            <text:p>70</text:p>
          </table:table-cell>
          <table:table-cell table:style-name="ce288" office:value-type="float" office:value="60" calcext:value-type="float">
            <text:p>60</text:p>
          </table:table-cell>
          <table:table-cell table:style-name="ce288" office:value-type="float" office:value="143" calcext:value-type="float">
            <text:p>143</text:p>
          </table:table-cell>
          <table:table-cell table:style-name="ce338" table:formula="of:=([.C61]/20.05)+([.D61]/12.15)+([.E61]/23)" office:value-type="float" office:value="5.4847400196949" calcext:value-type="float">
            <text:p>5.5</text:p>
          </table:table-cell>
          <table:table-cell table:style-name="ce349" table:formula="of:=([.H61]/61)+([.F61]/48)+([.G61]/35.45)" office:value-type="float" office:value="5.49512031106692" calcext:value-type="float">
            <text:p>5.5</text:p>
          </table:table-cell>
          <table:table-cell table:style-name="ce268" table:formula="of:=(([.C61]/20)+([.D61]/12.15))*50" office:value-type="float" office:value="202.921810699588" calcext:value-type="float">
            <text:p>203</text:p>
          </table:table-cell>
          <table:table-cell table:style-name="ce366" table:formula="of:=[.H61]*(50/61)*(1+(2*10^-4))" office:value-type="float" office:value="117.236557377049" calcext:value-type="float">
            <text:p>117</text:p>
          </table:table-cell>
          <table:table-cell table:style-name="ce268" table:formula="of:=([.L61]-(([.C61]*0.7143)+([.D61]*0.5879)))" office:value-type="float" office:value="63.9609573770492" calcext:value-type="float">
            <text:p>64</text:p>
          </table:table-cell>
          <table:table-cell table:style-name="ce279" table:formula="of:=IF([.G61]&lt;=0;0;[.F61]/[.G61])" office:value-type="float" office:value="1.16666666666667" calcext:value-type="float">
            <text:p>1.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5" calcext:value-type="float">
            <text:p>25</text:p>
          </table:table-cell>
          <table:table-cell table:style-name="ce266" office:value-type="string" calcext:value-type="string">
            <text:p>Willebroek (boiled)</text:p>
          </table:table-cell>
          <table:table-cell table:style-name="ce288" office:value-type="float" office:value="48" calcext:value-type="float">
            <text:p>48</text:p>
          </table:table-cell>
          <table:table-cell table:style-name="ce288" office:value-type="float" office:value="8" calcext:value-type="float">
            <text:p>8</text:p>
          </table:table-cell>
          <table:table-cell table:style-name="ce288" office:value-type="float" office:value="33" calcext:value-type="float">
            <text:p>33</text:p>
          </table:table-cell>
          <table:table-cell table:style-name="ce288" office:value-type="float" office:value="70" calcext:value-type="float">
            <text:p>70</text:p>
          </table:table-cell>
          <table:table-cell table:style-name="ce288" office:value-type="float" office:value="60" calcext:value-type="float">
            <text:p>60</text:p>
          </table:table-cell>
          <table:table-cell table:style-name="ce288" office:value-type="float" office:value="80" calcext:value-type="float">
            <text:p>80</text:p>
          </table:table-cell>
          <table:table-cell table:style-name="ce338" table:formula="of:=([.C62]/20.05)+([.D62]/12.15)+([.E62]/23)" office:value-type="float" office:value="4.48723378528094" calcext:value-type="float">
            <text:p>4.5</text:p>
          </table:table-cell>
          <table:table-cell table:style-name="ce349" table:formula="of:=([.H62]/61)+([.F62]/48)+([.G62]/35.45)" office:value-type="float" office:value="4.46233342582102" calcext:value-type="float">
            <text:p>4.5</text:p>
          </table:table-cell>
          <table:table-cell table:style-name="ce268" table:formula="of:=(([.C62]/20)+([.D62]/12.15))*50" office:value-type="float" office:value="152.921810699589" calcext:value-type="float">
            <text:p>153</text:p>
          </table:table-cell>
          <table:table-cell table:style-name="ce366" table:formula="of:=[.H62]*(50/61)*(1+(2*10^-4))" office:value-type="float" office:value="65.5868852459016" calcext:value-type="float">
            <text:p>66</text:p>
          </table:table-cell>
          <table:table-cell table:style-name="ce268" table:formula="of:=([.L62]-(([.C62]*0.7143)+([.D62]*0.5879)))" office:value-type="float" office:value="26.5972852459016" calcext:value-type="float">
            <text:p>27</text:p>
          </table:table-cell>
          <table:table-cell table:style-name="ce279" table:formula="of:=IF([.G62]&lt;=0;0;[.F62]/[.G62])" office:value-type="float" office:value="1.16666666666667" calcext:value-type="float">
            <text:p>1.2</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6" calcext:value-type="float">
            <text:p>26</text:p>
          </table:table-cell>
          <table:table-cell table:style-name="ce266" office:value-type="string" calcext:value-type="string">
            <text:p>Antwerpen/Anvers</text:p>
          </table:table-cell>
          <table:table-cell table:style-name="ce288" office:value-type="float" office:value="65" calcext:value-type="float">
            <text:p>65</text:p>
          </table:table-cell>
          <table:table-cell table:style-name="ce288" office:value-type="float" office:value="7" calcext:value-type="float">
            <text:p>7</text:p>
          </table:table-cell>
          <table:table-cell table:style-name="ce288" office:value-type="float" office:value="16" calcext:value-type="float">
            <text:p>16</text:p>
          </table:table-cell>
          <table:table-cell table:style-name="ce288" office:value-type="float" office:value="48" calcext:value-type="float">
            <text:p>48</text:p>
          </table:table-cell>
          <table:table-cell table:style-name="ce288" office:value-type="float" office:value="30" calcext:value-type="float">
            <text:p>30</text:p>
          </table:table-cell>
          <table:table-cell table:style-name="ce288" office:value-type="float" office:value="159" calcext:value-type="float">
            <text:p>159</text:p>
          </table:table-cell>
          <table:table-cell table:style-name="ce338" table:formula="of:=([.C63]/20.05)+([.D63]/12.15)+([.E63]/23)" office:value-type="float" office:value="4.51367912300123" calcext:value-type="float">
            <text:p>4.5</text:p>
          </table:table-cell>
          <table:table-cell table:style-name="ce349" table:formula="of:=([.H63]/61)+([.F63]/48)+([.G63]/35.45)" office:value-type="float" office:value="4.45281971837499" calcext:value-type="float">
            <text:p>4.5</text:p>
          </table:table-cell>
          <table:table-cell table:style-name="ce268" table:formula="of:=(([.C63]/20)+([.D63]/12.15))*50" office:value-type="float" office:value="191.30658436214" calcext:value-type="float">
            <text:p>191</text:p>
          </table:table-cell>
          <table:table-cell table:style-name="ce366" table:formula="of:=[.H63]*(50/61)*(1+(2*10^-4))" office:value-type="float" office:value="130.35393442623" calcext:value-type="float">
            <text:p>130</text:p>
          </table:table-cell>
          <table:table-cell table:style-name="ce268" table:formula="of:=([.L63]-(([.C63]*0.7143)+([.D63]*0.5879)))" office:value-type="float" office:value="79.8091344262295" calcext:value-type="float">
            <text:p>80</text:p>
          </table:table-cell>
          <table:table-cell table:style-name="ce279" table:formula="of:=IF([.G63]&lt;=0;0;[.F63]/[.G63])" office:value-type="float" office:value="1.6" calcext:value-type="float">
            <text:p>1.6</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7" calcext:value-type="float">
            <text:p>27</text:p>
          </table:table-cell>
          <table:table-cell table:style-name="ce266" office:value-type="string" calcext:value-type="string">
            <text:p>Antwerpen/Anvers (boiled)</text:p>
          </table:table-cell>
          <table:table-cell table:style-name="ce288" office:value-type="float" office:value="39" calcext:value-type="float">
            <text:p>39</text:p>
          </table:table-cell>
          <table:table-cell table:style-name="ce288" office:value-type="float" office:value="7" calcext:value-type="float">
            <text:p>7</text:p>
          </table:table-cell>
          <table:table-cell table:style-name="ce288" office:value-type="float" office:value="16" calcext:value-type="float">
            <text:p>16</text:p>
          </table:table-cell>
          <table:table-cell table:style-name="ce288" office:value-type="float" office:value="48" calcext:value-type="float">
            <text:p>48</text:p>
          </table:table-cell>
          <table:table-cell table:style-name="ce288" office:value-type="float" office:value="30" calcext:value-type="float">
            <text:p>30</text:p>
          </table:table-cell>
          <table:table-cell table:style-name="ce288" office:value-type="float" office:value="80" calcext:value-type="float">
            <text:p>80</text:p>
          </table:table-cell>
          <table:table-cell table:style-name="ce338" table:formula="of:=([.C64]/20.05)+([.D64]/12.15)+([.E64]/23)" office:value-type="float" office:value="3.21692101826307" calcext:value-type="float">
            <text:p>3.2</text:p>
          </table:table-cell>
          <table:table-cell table:style-name="ce349" table:formula="of:=([.H64]/61)+([.F64]/48)+([.G64]/35.45)" office:value-type="float" office:value="3.15773775116188" calcext:value-type="float">
            <text:p>3.2</text:p>
          </table:table-cell>
          <table:table-cell table:style-name="ce268" table:formula="of:=(([.C64]/20)+([.D64]/12.15))*50" office:value-type="float" office:value="126.30658436214" calcext:value-type="float">
            <text:p>126</text:p>
          </table:table-cell>
          <table:table-cell table:style-name="ce366" table:formula="of:=[.H64]*(50/61)*(1+(2*10^-4))" office:value-type="float" office:value="65.5868852459016" calcext:value-type="float">
            <text:p>66</text:p>
          </table:table-cell>
          <table:table-cell table:style-name="ce268" table:formula="of:=([.L64]-(([.C64]*0.7143)+([.D64]*0.5879)))" office:value-type="float" office:value="33.6138852459016" calcext:value-type="float">
            <text:p>34</text:p>
          </table:table-cell>
          <table:table-cell table:style-name="ce279" table:formula="of:=IF([.G64]&lt;=0;0;[.F64]/[.G64])" office:value-type="float" office:value="1.6" calcext:value-type="float">
            <text:p>1.6</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8" calcext:value-type="float">
            <text:p>28</text:p>
          </table:table-cell>
          <table:table-cell table:style-name="ce266" office:value-type="string" calcext:value-type="string">
            <text:p>Brabant</text:p>
          </table:table-cell>
          <table:table-cell table:style-name="ce288" office:value-type="float" office:value="111" calcext:value-type="float">
            <text:p>111</text:p>
          </table:table-cell>
          <table:table-cell table:style-name="ce288" office:value-type="float" office:value="12" calcext:value-type="float">
            <text:p>12</text:p>
          </table:table-cell>
          <table:table-cell table:style-name="ce288" office:value-type="float" office:value="14" calcext:value-type="float">
            <text:p>14</text:p>
          </table:table-cell>
          <table:table-cell table:style-name="ce288" office:value-type="float" office:value="74" calcext:value-type="float">
            <text:p>74</text:p>
          </table:table-cell>
          <table:table-cell table:style-name="ce288" office:value-type="float" office:value="40" calcext:value-type="float">
            <text:p>40</text:p>
          </table:table-cell>
          <table:table-cell table:style-name="ce288" office:value-type="float" office:value="270" calcext:value-type="float">
            <text:p>270</text:p>
          </table:table-cell>
          <table:table-cell table:style-name="ce338" table:formula="of:=([.C65]/20.05)+([.D65]/12.15)+([.E65]/23)" office:value-type="float" office:value="7.13250957415907" calcext:value-type="float">
            <text:p>7.1</text:p>
          </table:table-cell>
          <table:table-cell table:style-name="ce349" table:formula="of:=([.H65]/61)+([.F65]/48)+([.G65]/35.45)" office:value-type="float" office:value="7.0962459632978" calcext:value-type="float">
            <text:p>7.1</text:p>
          </table:table-cell>
          <table:table-cell table:style-name="ce268" table:formula="of:=(([.C65]/20)+([.D65]/12.15))*50" office:value-type="float" office:value="326.882716049383" calcext:value-type="float">
            <text:p>327</text:p>
          </table:table-cell>
          <table:table-cell table:style-name="ce366" table:formula="of:=[.H65]*(50/61)*(1+(2*10^-4))" office:value-type="float" office:value="221.355737704918" calcext:value-type="float">
            <text:p>221</text:p>
          </table:table-cell>
          <table:table-cell table:style-name="ce268" table:formula="of:=([.L65]-(([.C65]*0.7143)+([.D65]*0.5879)))" office:value-type="float" office:value="135.013637704918" calcext:value-type="float">
            <text:p>135</text:p>
          </table:table-cell>
          <table:table-cell table:style-name="ce279" table:formula="of:=IF([.G65]&lt;=0;0;[.F65]/[.G65])" office:value-type="float" office:value="1.85" calcext:value-type="float">
            <text:p>1.9</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29" calcext:value-type="float">
            <text:p>29</text:p>
          </table:table-cell>
          <table:table-cell table:style-name="ce266" office:value-type="string" calcext:value-type="string">
            <text:p>Brabant (boiled)</text:p>
          </table:table-cell>
          <table:table-cell table:style-name="ce288" office:value-type="float" office:value="49" calcext:value-type="float">
            <text:p>49</text:p>
          </table:table-cell>
          <table:table-cell table:style-name="ce288" office:value-type="float" office:value="12" calcext:value-type="float">
            <text:p>12</text:p>
          </table:table-cell>
          <table:table-cell table:style-name="ce288" office:value-type="float" office:value="14" calcext:value-type="float">
            <text:p>14</text:p>
          </table:table-cell>
          <table:table-cell table:style-name="ce288" office:value-type="float" office:value="74" calcext:value-type="float">
            <text:p>74</text:p>
          </table:table-cell>
          <table:table-cell table:style-name="ce288" office:value-type="float" office:value="40" calcext:value-type="float">
            <text:p>40</text:p>
          </table:table-cell>
          <table:table-cell table:style-name="ce288" office:value-type="float" office:value="80" calcext:value-type="float">
            <text:p>80</text:p>
          </table:table-cell>
          <table:table-cell table:style-name="ce338" table:formula="of:=([.C66]/20.05)+([.D66]/12.15)+([.E66]/23)" office:value-type="float" office:value="4.04024024747578" calcext:value-type="float">
            <text:p>4.0</text:p>
          </table:table-cell>
          <table:table-cell table:style-name="ce349" table:formula="of:=([.H66]/61)+([.F66]/48)+([.G66]/35.45)" office:value-type="float" office:value="3.98149186493715" calcext:value-type="float">
            <text:p>4.0</text:p>
          </table:table-cell>
          <table:table-cell table:style-name="ce268" table:formula="of:=(([.C66]/20)+([.D66]/12.15))*50" office:value-type="float" office:value="171.882716049383" calcext:value-type="float">
            <text:p>172</text:p>
          </table:table-cell>
          <table:table-cell table:style-name="ce366" table:formula="of:=[.H66]*(50/61)*(1+(2*10^-4))" office:value-type="float" office:value="65.5868852459016" calcext:value-type="float">
            <text:p>66</text:p>
          </table:table-cell>
          <table:table-cell table:style-name="ce268" table:formula="of:=([.L66]-(([.C66]*0.7143)+([.D66]*0.5879)))" office:value-type="float" office:value="23.5313852459016" calcext:value-type="float">
            <text:p>24</text:p>
          </table:table-cell>
          <table:table-cell table:style-name="ce279" table:formula="of:=IF([.G66]&lt;=0;0;[.F66]/[.G66])" office:value-type="float" office:value="1.85" calcext:value-type="float">
            <text:p>1.9</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0" calcext:value-type="float">
            <text:p>30</text:p>
          </table:table-cell>
          <table:table-cell table:style-name="ce266" office:value-type="string" calcext:value-type="string">
            <text:p>Henegouwen/Hainaut</text:p>
          </table:table-cell>
          <table:table-cell table:style-name="ce288" office:value-type="float" office:value="113" calcext:value-type="float">
            <text:p>113</text:p>
          </table:table-cell>
          <table:table-cell table:style-name="ce288" office:value-type="float" office:value="17" calcext:value-type="float">
            <text:p>17</text:p>
          </table:table-cell>
          <table:table-cell table:style-name="ce288" office:value-type="float" office:value="15" calcext:value-type="float">
            <text:p>15</text:p>
          </table:table-cell>
          <table:table-cell table:style-name="ce288" office:value-type="float" office:value="65" calcext:value-type="float">
            <text:p>65</text:p>
          </table:table-cell>
          <table:table-cell table:style-name="ce288" office:value-type="float" office:value="41" calcext:value-type="float">
            <text:p>41</text:p>
          </table:table-cell>
          <table:table-cell table:style-name="ce288" office:value-type="float" office:value="315" calcext:value-type="float">
            <text:p>315</text:p>
          </table:table-cell>
          <table:table-cell table:style-name="ce338" table:formula="of:=([.C67]/20.05)+([.D67]/12.15)+([.E67]/23)" office:value-type="float" office:value="7.68726109221489" calcext:value-type="float">
            <text:p>7.7</text:p>
          </table:table-cell>
          <table:table-cell table:style-name="ce349" table:formula="of:=([.H67]/61)+([.F67]/48)+([.G67]/35.45)" office:value-type="float" office:value="7.67465962604145" calcext:value-type="float">
            <text:p>7.7</text:p>
          </table:table-cell>
          <table:table-cell table:style-name="ce268" table:formula="of:=(([.C67]/20)+([.D67]/12.15))*50" office:value-type="float" office:value="352.458847736626" calcext:value-type="float">
            <text:p>352</text:p>
          </table:table-cell>
          <table:table-cell table:style-name="ce366" table:formula="of:=[.H67]*(50/61)*(1+(2*10^-4))" office:value-type="float" office:value="258.248360655738" calcext:value-type="float">
            <text:p>258</text:p>
          </table:table-cell>
          <table:table-cell table:style-name="ce268" table:formula="of:=([.L67]-(([.C67]*0.7143)+([.D67]*0.5879)))" office:value-type="float" office:value="167.538160655738" calcext:value-type="float">
            <text:p>168</text:p>
          </table:table-cell>
          <table:table-cell table:style-name="ce279" table:formula="of:=IF([.G67]&lt;=0;0;[.F67]/[.G67])" office:value-type="float" office:value="1.58536585365854" calcext:value-type="float">
            <text:p>1.6</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1" calcext:value-type="float">
            <text:p>31</text:p>
          </table:table-cell>
          <table:table-cell table:style-name="ce266" office:value-type="string" calcext:value-type="string">
            <text:p>Henegouwen/Hainaut (boiled)</text:p>
          </table:table-cell>
          <table:table-cell table:style-name="ce288" office:value-type="float" office:value="36" calcext:value-type="float">
            <text:p>36</text:p>
          </table:table-cell>
          <table:table-cell table:style-name="ce288" office:value-type="float" office:value="17" calcext:value-type="float">
            <text:p>17</text:p>
          </table:table-cell>
          <table:table-cell table:style-name="ce288" office:value-type="float" office:value="15" calcext:value-type="float">
            <text:p>15</text:p>
          </table:table-cell>
          <table:table-cell table:style-name="ce288" office:value-type="float" office:value="65" calcext:value-type="float">
            <text:p>65</text:p>
          </table:table-cell>
          <table:table-cell table:style-name="ce288" office:value-type="float" office:value="41" calcext:value-type="float">
            <text:p>41</text:p>
          </table:table-cell>
          <table:table-cell table:style-name="ce288" office:value-type="float" office:value="80" calcext:value-type="float">
            <text:p>80</text:p>
          </table:table-cell>
          <table:table-cell table:style-name="ce338" table:formula="of:=([.C68]/20.05)+([.D68]/12.15)+([.E68]/23)" office:value-type="float" office:value="3.84686208972113" calcext:value-type="float">
            <text:p>3.8</text:p>
          </table:table-cell>
          <table:table-cell table:style-name="ce349" table:formula="of:=([.H68]/61)+([.F68]/48)+([.G68]/35.45)" office:value-type="float" office:value="3.82220060964801" calcext:value-type="float">
            <text:p>3.8</text:p>
          </table:table-cell>
          <table:table-cell table:style-name="ce268" table:formula="of:=(([.C68]/20)+([.D68]/12.15))*50" office:value-type="float" office:value="159.958847736626" calcext:value-type="float">
            <text:p>160</text:p>
          </table:table-cell>
          <table:table-cell table:style-name="ce366" table:formula="of:=[.H68]*(50/61)*(1+(2*10^-4))" office:value-type="float" office:value="65.5868852459016" calcext:value-type="float">
            <text:p>66</text:p>
          </table:table-cell>
          <table:table-cell table:style-name="ce268" table:formula="of:=([.L68]-(([.C68]*0.7143)+([.D68]*0.5879)))" office:value-type="float" office:value="29.8777852459016" calcext:value-type="float">
            <text:p>30</text:p>
          </table:table-cell>
          <table:table-cell table:style-name="ce279" table:formula="of:=IF([.G68]&lt;=0;0;[.F68]/[.G68])" office:value-type="float" office:value="1.58536585365854" calcext:value-type="float">
            <text:p>1.6</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2" calcext:value-type="float">
            <text:p>32</text:p>
          </table:table-cell>
          <table:table-cell table:style-name="ce266" office:value-type="string" calcext:value-type="string">
            <text:p>Achouffe</text:p>
          </table:table-cell>
          <table:table-cell table:style-name="ce288" office:value-type="float" office:value="29" calcext:value-type="float">
            <text:p>29</text:p>
          </table:table-cell>
          <table:table-cell table:style-name="ce288" office:value-type="float" office:value="4" calcext:value-type="float">
            <text:p>4</text:p>
          </table:table-cell>
          <table:table-cell table:number-columns-repeated="2" table:style-name="ce288" office:value-type="float" office:value="12" calcext:value-type="float">
            <text:p>12</text:p>
          </table:table-cell>
          <table:table-cell table:style-name="ce288" office:value-type="float" office:value="35" calcext:value-type="float">
            <text:p>35</text:p>
          </table:table-cell>
          <table:table-cell table:style-name="ce288" office:value-type="float" office:value="70" calcext:value-type="float">
            <text:p>70</text:p>
          </table:table-cell>
          <table:table-cell table:style-name="ce338" table:formula="of:=([.C69]/20.05)+([.D69]/12.15)+([.E69]/23)" office:value-type="float" office:value="2.29734127733092" calcext:value-type="float">
            <text:p>2.3</text:p>
          </table:table-cell>
          <table:table-cell table:style-name="ce349" table:formula="of:=([.H69]/61)+([.F69]/48)+([.G69]/35.45)" office:value-type="float" office:value="2.38484704848667" calcext:value-type="float">
            <text:p>2.4</text:p>
          </table:table-cell>
          <table:table-cell table:style-name="ce268" table:formula="of:=(([.C69]/20)+([.D69]/12.15))*50" office:value-type="float" office:value="88.9609053497943" calcext:value-type="float">
            <text:p>89</text:p>
          </table:table-cell>
          <table:table-cell table:style-name="ce366" table:formula="of:=[.H69]*(50/61)*(1+(2*10^-4))" office:value-type="float" office:value="57.3885245901639" calcext:value-type="float">
            <text:p>57</text:p>
          </table:table-cell>
          <table:table-cell table:style-name="ce268" table:formula="of:=([.L69]-(([.C69]*0.7143)+([.D69]*0.5879)))" office:value-type="float" office:value="34.3222245901639" calcext:value-type="float">
            <text:p>34</text:p>
          </table:table-cell>
          <table:table-cell table:style-name="ce279" table:formula="of:=IF([.G69]&lt;=0;0;[.F69]/[.G69])" office:value-type="float" office:value="0.342857142857143" calcext:value-type="float">
            <text:p>0.3</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3" calcext:value-type="float">
            <text:p>33</text:p>
          </table:table-cell>
          <table:table-cell table:style-name="ce266" office:value-type="string" calcext:value-type="string">
            <text:p>Orval</text:p>
          </table:table-cell>
          <table:table-cell table:style-name="ce288" office:value-type="float" office:value="96" calcext:value-type="float">
            <text:p>96</text:p>
          </table:table-cell>
          <table:table-cell table:style-name="ce288" office:value-type="float" office:value="4" calcext:value-type="float">
            <text:p>4</text:p>
          </table:table-cell>
          <table:table-cell table:style-name="ce288" office:value-type="float" office:value="5" calcext:value-type="float">
            <text:p>5</text:p>
          </table:table-cell>
          <table:table-cell table:style-name="ce288" office:value-type="float" office:value="25" calcext:value-type="float">
            <text:p>25</text:p>
          </table:table-cell>
          <table:table-cell table:style-name="ce288" office:value-type="float" office:value="13" calcext:value-type="float">
            <text:p>13</text:p>
          </table:table-cell>
          <table:table-cell table:style-name="ce288" office:value-type="float" office:value="270" calcext:value-type="float">
            <text:p>270</text:p>
          </table:table-cell>
          <table:table-cell table:style-name="ce338" table:formula="of:=([.C70]/20.05)+([.D70]/12.15)+([.E70]/23)" office:value-type="float" office:value="5.33463933653074" calcext:value-type="float">
            <text:p>5.3</text:p>
          </table:table-cell>
          <table:table-cell table:style-name="ce349" table:formula="of:=([.H70]/61)+([.F70]/48)+([.G70]/35.45)" office:value-type="float" office:value="5.31377652277124" calcext:value-type="float">
            <text:p>5.3</text:p>
          </table:table-cell>
          <table:table-cell table:style-name="ce268" table:formula="of:=(([.C70]/20)+([.D70]/12.15))*50" office:value-type="float" office:value="256.460905349794" calcext:value-type="float">
            <text:p>256</text:p>
          </table:table-cell>
          <table:table-cell table:style-name="ce366" table:formula="of:=[.H70]*(50/61)*(1+(2*10^-4))" office:value-type="float" office:value="221.355737704918" calcext:value-type="float">
            <text:p>221</text:p>
          </table:table-cell>
          <table:table-cell table:style-name="ce268" table:formula="of:=([.L70]-(([.C70]*0.7143)+([.D70]*0.5879)))" office:value-type="float" office:value="150.431337704918" calcext:value-type="float">
            <text:p>150</text:p>
          </table:table-cell>
          <table:table-cell table:style-name="ce279" table:formula="of:=IF([.G70]&lt;=0;0;[.F70]/[.G70])" office:value-type="float" office:value="1.92307692307692" calcext:value-type="float">
            <text:p>1.9</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4" calcext:value-type="float">
            <text:p>34</text:p>
          </table:table-cell>
          <table:table-cell table:style-name="ce266" office:value-type="string" calcext:value-type="string">
            <text:p>Orval (boiled)</text:p>
          </table:table-cell>
          <table:table-cell table:style-name="ce288" office:value-type="float" office:value="34" calcext:value-type="float">
            <text:p>34</text:p>
          </table:table-cell>
          <table:table-cell table:style-name="ce288" office:value-type="float" office:value="4" calcext:value-type="float">
            <text:p>4</text:p>
          </table:table-cell>
          <table:table-cell table:style-name="ce288" office:value-type="float" office:value="5" calcext:value-type="float">
            <text:p>5</text:p>
          </table:table-cell>
          <table:table-cell table:style-name="ce288" office:value-type="float" office:value="25" calcext:value-type="float">
            <text:p>25</text:p>
          </table:table-cell>
          <table:table-cell table:style-name="ce288" office:value-type="float" office:value="13" calcext:value-type="float">
            <text:p>13</text:p>
          </table:table-cell>
          <table:table-cell table:style-name="ce288" office:value-type="float" office:value="80" calcext:value-type="float">
            <text:p>80</text:p>
          </table:table-cell>
          <table:table-cell table:style-name="ce338" table:formula="of:=([.C71]/20.05)+([.D71]/12.15)+([.E71]/23)" office:value-type="float" office:value="2.24237000984745" calcext:value-type="float">
            <text:p>2.2</text:p>
          </table:table-cell>
          <table:table-cell table:style-name="ce349" table:formula="of:=([.H71]/61)+([.F71]/48)+([.G71]/35.45)" office:value-type="float" office:value="2.19902242441058" calcext:value-type="float">
            <text:p>2.2</text:p>
          </table:table-cell>
          <table:table-cell table:style-name="ce268" table:formula="of:=(([.C71]/20)+([.D71]/12.15))*50" office:value-type="float" office:value="101.460905349794" calcext:value-type="float">
            <text:p>101</text:p>
          </table:table-cell>
          <table:table-cell table:style-name="ce366" table:formula="of:=[.H71]*(50/61)*(1+(2*10^-4))" office:value-type="float" office:value="65.5868852459016" calcext:value-type="float">
            <text:p>66</text:p>
          </table:table-cell>
          <table:table-cell table:style-name="ce268" table:formula="of:=([.L71]-(([.C71]*0.7143)+([.D71]*0.5879)))" office:value-type="float" office:value="38.9490852459016" calcext:value-type="float">
            <text:p>39</text:p>
          </table:table-cell>
          <table:table-cell table:style-name="ce279" table:formula="of:=IF([.G71]&lt;=0;0;[.F71]/[.G71])" office:value-type="float" office:value="1.92307692307692" calcext:value-type="float">
            <text:p>1.9</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5" calcext:value-type="float">
            <text:p>35</text:p>
          </table:table-cell>
          <table:table-cell table:style-name="ce266" office:value-type="string" calcext:value-type="string">
            <text:p>Rochefort</text:p>
          </table:table-cell>
          <table:table-cell table:style-name="ce288" office:value-type="float" office:value="82" calcext:value-type="float">
            <text:p>82</text:p>
          </table:table-cell>
          <table:table-cell table:style-name="ce288" office:value-type="float" office:value="10" calcext:value-type="float">
            <text:p>10</text:p>
          </table:table-cell>
          <table:table-cell table:style-name="ce288" office:value-type="float" office:value="6" calcext:value-type="float">
            <text:p>6</text:p>
          </table:table-cell>
          <table:table-cell table:style-name="ce288" office:value-type="float" office:value="32" calcext:value-type="float">
            <text:p>32</text:p>
          </table:table-cell>
          <table:table-cell table:style-name="ce288" office:value-type="float" office:value="17" calcext:value-type="float">
            <text:p>17</text:p>
          </table:table-cell>
          <table:table-cell table:style-name="ce288" office:value-type="float" office:value="245" calcext:value-type="float">
            <text:p>245</text:p>
          </table:table-cell>
          <table:table-cell table:style-name="ce338" table:formula="of:=([.C72]/20.05)+([.D72]/12.15)+([.E72]/23)" office:value-type="float" office:value="5.17369039380436" calcext:value-type="float">
            <text:p>5.2</text:p>
          </table:table-cell>
          <table:table-cell table:style-name="ce349" table:formula="of:=([.H72]/61)+([.F72]/48)+([.G72]/35.45)" office:value-type="float" office:value="5.16260876937424" calcext:value-type="float">
            <text:p>5.2</text:p>
          </table:table-cell>
          <table:table-cell table:style-name="ce268" table:formula="of:=(([.C72]/20)+([.D72]/12.15))*50" office:value-type="float" office:value="246.152263374486" calcext:value-type="float">
            <text:p>246</text:p>
          </table:table-cell>
          <table:table-cell table:style-name="ce366" table:formula="of:=[.H72]*(50/61)*(1+(2*10^-4))" office:value-type="float" office:value="200.859836065574" calcext:value-type="float">
            <text:p>201</text:p>
          </table:table-cell>
          <table:table-cell table:style-name="ce268" table:formula="of:=([.L72]-(([.C72]*0.7143)+([.D72]*0.5879)))" office:value-type="float" office:value="136.408236065574" calcext:value-type="float">
            <text:p>136</text:p>
          </table:table-cell>
          <table:table-cell table:style-name="ce279" table:formula="of:=IF([.G72]&lt;=0;0;[.F72]/[.G72])" office:value-type="float" office:value="1.88235294117647" calcext:value-type="float">
            <text:p>1.9</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6" calcext:value-type="float">
            <text:p>36</text:p>
          </table:table-cell>
          <table:table-cell table:style-name="ce266" office:value-type="string" calcext:value-type="string">
            <text:p>Rochefort (boiled)</text:p>
          </table:table-cell>
          <table:table-cell table:style-name="ce288" office:value-type="float" office:value="28" calcext:value-type="float">
            <text:p>28</text:p>
          </table:table-cell>
          <table:table-cell table:style-name="ce288" office:value-type="float" office:value="10" calcext:value-type="float">
            <text:p>10</text:p>
          </table:table-cell>
          <table:table-cell table:style-name="ce288" office:value-type="float" office:value="6" calcext:value-type="float">
            <text:p>6</text:p>
          </table:table-cell>
          <table:table-cell table:style-name="ce288" office:value-type="float" office:value="32" calcext:value-type="float">
            <text:p>32</text:p>
          </table:table-cell>
          <table:table-cell table:style-name="ce288" office:value-type="float" office:value="17" calcext:value-type="float">
            <text:p>17</text:p>
          </table:table-cell>
          <table:table-cell table:style-name="ce288" office:value-type="float" office:value="80" calcext:value-type="float">
            <text:p>80</text:p>
          </table:table-cell>
          <table:table-cell table:style-name="ce338" table:formula="of:=([.C73]/20.05)+([.D73]/12.15)+([.E73]/23)" office:value-type="float" office:value="2.48042356088665" calcext:value-type="float">
            <text:p>2.5</text:p>
          </table:table-cell>
          <table:table-cell table:style-name="ce349" table:formula="of:=([.H73]/61)+([.F73]/48)+([.G73]/35.45)" office:value-type="float" office:value="2.45769073658736" calcext:value-type="float">
            <text:p>2.5</text:p>
          </table:table-cell>
          <table:table-cell table:style-name="ce268" table:formula="of:=(([.C73]/20)+([.D73]/12.15))*50" office:value-type="float" office:value="111.152263374486" calcext:value-type="float">
            <text:p>111</text:p>
          </table:table-cell>
          <table:table-cell table:style-name="ce366" table:formula="of:=[.H73]*(50/61)*(1+(2*10^-4))" office:value-type="float" office:value="65.5868852459016" calcext:value-type="float">
            <text:p>66</text:p>
          </table:table-cell>
          <table:table-cell table:style-name="ce268" table:formula="of:=([.L73]-(([.C73]*0.7143)+([.D73]*0.5879)))" office:value-type="float" office:value="39.7074852459016" calcext:value-type="float">
            <text:p>40</text:p>
          </table:table-cell>
          <table:table-cell table:style-name="ce279" table:formula="of:=IF([.G73]&lt;=0;0;[.F73]/[.G73])" office:value-type="float" office:value="1.88235294117647" calcext:value-type="float">
            <text:p>1.9</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7" calcext:value-type="float">
            <text:p>37</text:p>
          </table:table-cell>
          <table:table-cell table:style-name="ce266" office:value-type="string" calcext:value-type="string">
            <text:p>Chimay</text:p>
          </table:table-cell>
          <table:table-cell table:style-name="ce288" office:value-type="float" office:value="70" calcext:value-type="float">
            <text:p>70</text:p>
          </table:table-cell>
          <table:table-cell table:number-columns-repeated="2" table:style-name="ce288" office:value-type="float" office:value="7" calcext:value-type="float">
            <text:p>7</text:p>
          </table:table-cell>
          <table:table-cell table:number-columns-repeated="2" table:style-name="ce288" office:value-type="float" office:value="21" calcext:value-type="float">
            <text:p>21</text:p>
          </table:table-cell>
          <table:table-cell table:style-name="ce288" office:value-type="float" office:value="205" calcext:value-type="float">
            <text:p>205</text:p>
          </table:table-cell>
          <table:table-cell table:style-name="ce338" table:formula="of:=([.C74]/20.05)+([.D74]/12.15)+([.E74]/23)" office:value-type="float" office:value="4.37175133377863" calcext:value-type="float">
            <text:p>4.4</text:p>
          </table:table-cell>
          <table:table-cell table:style-name="ce349" table:formula="of:=([.H74]/61)+([.F74]/48)+([.G74]/35.45)" office:value-type="float" office:value="4.39053937663299" calcext:value-type="float">
            <text:p>4.4</text:p>
          </table:table-cell>
          <table:table-cell table:style-name="ce268" table:formula="of:=(([.C74]/20)+([.D74]/12.15))*50" office:value-type="float" office:value="203.80658436214" calcext:value-type="float">
            <text:p>204</text:p>
          </table:table-cell>
          <table:table-cell table:style-name="ce366" table:formula="of:=[.H74]*(50/61)*(1+(2*10^-4))" office:value-type="float" office:value="168.066393442623" calcext:value-type="float">
            <text:p>168</text:p>
          </table:table-cell>
          <table:table-cell table:style-name="ce268" table:formula="of:=([.L74]-(([.C74]*0.7143)+([.D74]*0.5879)))" office:value-type="float" office:value="113.950093442623" calcext:value-type="float">
            <text:p>114</text:p>
          </table:table-cell>
          <table:table-cell table:style-name="ce279" table:formula="of:=IF([.G74]&lt;=0;0;[.F74]/[.G74])" office:value-type="float" office:value="1" calcext:value-type="float">
            <text:p>1.0</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8" calcext:value-type="float">
            <text:p>38</text:p>
          </table:table-cell>
          <table:table-cell table:style-name="ce266" office:value-type="string" calcext:value-type="string">
            <text:p>Chimay (boiled)</text:p>
          </table:table-cell>
          <table:table-cell table:style-name="ce288" office:value-type="float" office:value="29" calcext:value-type="float">
            <text:p>29</text:p>
          </table:table-cell>
          <table:table-cell table:number-columns-repeated="2" table:style-name="ce288" office:value-type="float" office:value="7" calcext:value-type="float">
            <text:p>7</text:p>
          </table:table-cell>
          <table:table-cell table:number-columns-repeated="2" table:style-name="ce288" office:value-type="float" office:value="21" calcext:value-type="float">
            <text:p>21</text:p>
          </table:table-cell>
          <table:table-cell table:style-name="ce288" office:value-type="float" office:value="80" calcext:value-type="float">
            <text:p>80</text:p>
          </table:table-cell>
          <table:table-cell table:style-name="ce338" table:formula="of:=([.C75]/20.05)+([.D75]/12.15)+([.E75]/23)" office:value-type="float" office:value="2.32686355323" calcext:value-type="float">
            <text:p>2.3</text:p>
          </table:table-cell>
          <table:table-cell table:style-name="ce349" table:formula="of:=([.H75]/61)+([.F75]/48)+([.G75]/35.45)" office:value-type="float" office:value="2.34135904876413" calcext:value-type="float">
            <text:p>2.3</text:p>
          </table:table-cell>
          <table:table-cell table:style-name="ce268" table:formula="of:=(([.C75]/20)+([.D75]/12.15))*50" office:value-type="float" office:value="101.30658436214" calcext:value-type="float">
            <text:p>101</text:p>
          </table:table-cell>
          <table:table-cell table:style-name="ce366" table:formula="of:=[.H75]*(50/61)*(1+(2*10^-4))" office:value-type="float" office:value="65.5868852459016" calcext:value-type="float">
            <text:p>66</text:p>
          </table:table-cell>
          <table:table-cell table:style-name="ce268" table:formula="of:=([.L75]-(([.C75]*0.7143)+([.D75]*0.5879)))" office:value-type="float" office:value="40.7568852459016" calcext:value-type="float">
            <text:p>41</text:p>
          </table:table-cell>
          <table:table-cell table:style-name="ce279" table:formula="of:=IF([.G75]&lt;=0;0;[.F75]/[.G75])" office:value-type="float" office:value="1" calcext:value-type="float">
            <text:p>1.0</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39" calcext:value-type="float">
            <text:p>39</text:p>
          </table:table-cell>
          <table:table-cell table:style-name="ce266" office:value-type="string" calcext:value-type="string">
            <text:p>Luik/Liege</text:p>
          </table:table-cell>
          <table:table-cell table:style-name="ce288" office:value-type="float" office:value="60" calcext:value-type="float">
            <text:p>60</text:p>
          </table:table-cell>
          <table:table-cell table:style-name="ce288" office:value-type="float" office:value="15" calcext:value-type="float">
            <text:p>15</text:p>
          </table:table-cell>
          <table:table-cell table:style-name="ce288" office:value-type="float" office:value="11" calcext:value-type="float">
            <text:p>11</text:p>
          </table:table-cell>
          <table:table-cell table:style-name="ce288" office:value-type="float" office:value="28" calcext:value-type="float">
            <text:p>28</text:p>
          </table:table-cell>
          <table:table-cell table:style-name="ce288" office:value-type="float" office:value="24" calcext:value-type="float">
            <text:p>24</text:p>
          </table:table-cell>
          <table:table-cell table:style-name="ce288" office:value-type="float" office:value="210" calcext:value-type="float">
            <text:p>210</text:p>
          </table:table-cell>
          <table:table-cell table:style-name="ce338" table:formula="of:=([.C76]/20.05)+([.D76]/12.15)+([.E76]/23)" office:value-type="float" office:value="4.70534747404168" calcext:value-type="float">
            <text:p>4.7</text:p>
          </table:table-cell>
          <table:table-cell table:style-name="ce349" table:formula="of:=([.H76]/61)+([.F76]/48)+([.G76]/35.45)" office:value-type="float" office:value="4.70296615721365" calcext:value-type="float">
            <text:p>4.7</text:p>
          </table:table-cell>
          <table:table-cell table:style-name="ce268" table:formula="of:=(([.C76]/20)+([.D76]/12.15))*50" office:value-type="float" office:value="211.728395061728" calcext:value-type="float">
            <text:p>212</text:p>
          </table:table-cell>
          <table:table-cell table:style-name="ce366" table:formula="of:=[.H76]*(50/61)*(1+(2*10^-4))" office:value-type="float" office:value="172.165573770492" calcext:value-type="float">
            <text:p>172</text:p>
          </table:table-cell>
          <table:table-cell table:style-name="ce268" table:formula="of:=([.L76]-(([.C76]*0.7143)+([.D76]*0.5879)))" office:value-type="float" office:value="120.489073770492" calcext:value-type="float">
            <text:p>120</text:p>
          </table:table-cell>
          <table:table-cell table:style-name="ce279" table:formula="of:=IF([.G76]&lt;=0;0;[.F76]/[.G76])" office:value-type="float" office:value="1.16666666666667" calcext:value-type="float">
            <text:p>1.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0" calcext:value-type="float">
            <text:p>40</text:p>
          </table:table-cell>
          <table:table-cell table:style-name="ce266" office:value-type="string" calcext:value-type="string">
            <text:p>Luik/Liege (boiled)</text:p>
          </table:table-cell>
          <table:table-cell table:style-name="ce288" office:value-type="float" office:value="18" calcext:value-type="float">
            <text:p>18</text:p>
          </table:table-cell>
          <table:table-cell table:style-name="ce288" office:value-type="float" office:value="15" calcext:value-type="float">
            <text:p>15</text:p>
          </table:table-cell>
          <table:table-cell table:style-name="ce288" office:value-type="float" office:value="11" calcext:value-type="float">
            <text:p>11</text:p>
          </table:table-cell>
          <table:table-cell table:style-name="ce288" office:value-type="float" office:value="28" calcext:value-type="float">
            <text:p>28</text:p>
          </table:table-cell>
          <table:table-cell table:style-name="ce288" office:value-type="float" office:value="24" calcext:value-type="float">
            <text:p>24</text:p>
          </table:table-cell>
          <table:table-cell table:style-name="ce288" office:value-type="float" office:value="80" calcext:value-type="float">
            <text:p>80</text:p>
          </table:table-cell>
          <table:table-cell table:style-name="ce338" table:formula="of:=([.C77]/20.05)+([.D77]/12.15)+([.E77]/23)" office:value-type="float" office:value="2.61058438177235" calcext:value-type="float">
            <text:p>2.6</text:p>
          </table:table-cell>
          <table:table-cell table:style-name="ce349" table:formula="of:=([.H77]/61)+([.F77]/48)+([.G77]/35.45)" office:value-type="float" office:value="2.57181861623005" calcext:value-type="float">
            <text:p>2.6</text:p>
          </table:table-cell>
          <table:table-cell table:style-name="ce268" table:formula="of:=(([.C77]/20)+([.D77]/12.15))*50" office:value-type="float" office:value="106.728395061728" calcext:value-type="float">
            <text:p>107</text:p>
          </table:table-cell>
          <table:table-cell table:style-name="ce366" table:formula="of:=[.H77]*(50/61)*(1+(2*10^-4))" office:value-type="float" office:value="65.5868852459016" calcext:value-type="float">
            <text:p>66</text:p>
          </table:table-cell>
          <table:table-cell table:style-name="ce268" table:formula="of:=([.L77]-(([.C77]*0.7143)+([.D77]*0.5879)))" office:value-type="float" office:value="43.9109852459016" calcext:value-type="float">
            <text:p>44</text:p>
          </table:table-cell>
          <table:table-cell table:style-name="ce279" table:formula="of:=IF([.G77]&lt;=0;0;[.F77]/[.G77])" office:value-type="float" office:value="1.16666666666667" calcext:value-type="float">
            <text:p>1.2</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1" calcext:value-type="float">
            <text:p>41</text:p>
          </table:table-cell>
          <table:table-cell table:style-name="ce266" office:value-type="string" calcext:value-type="string">
            <text:p>East Flanders</text:p>
          </table:table-cell>
          <table:table-cell table:style-name="ce288" office:value-type="float" office:value="134" calcext:value-type="float">
            <text:p>134</text:p>
          </table:table-cell>
          <table:table-cell table:style-name="ce288" office:value-type="float" office:value="22" calcext:value-type="float">
            <text:p>22</text:p>
          </table:table-cell>
          <table:table-cell table:style-name="ce288" office:value-type="float" office:value="52" calcext:value-type="float">
            <text:p>52</text:p>
          </table:table-cell>
          <table:table-cell table:style-name="ce288" office:value-type="float" office:value="76" calcext:value-type="float">
            <text:p>76</text:p>
          </table:table-cell>
          <table:table-cell table:style-name="ce288" office:value-type="float" office:value="47" calcext:value-type="float">
            <text:p>47</text:p>
          </table:table-cell>
          <table:table-cell table:style-name="ce288" office:value-type="float" office:value="475" calcext:value-type="float">
            <text:p>475</text:p>
          </table:table-cell>
          <table:table-cell table:style-name="ce338" table:formula="of:=([.C78]/20.05)+([.D78]/12.15)+([.E78]/23)" office:value-type="float" office:value="10.7548609242683" calcext:value-type="float">
            <text:p>10.8</text:p>
          </table:table-cell>
          <table:table-cell table:style-name="ce349" table:formula="of:=([.H78]/61)+([.F78]/48)+([.G78]/35.45)" office:value-type="float" office:value="10.6960295806454" calcext:value-type="float">
            <text:p>10.7</text:p>
          </table:table-cell>
          <table:table-cell table:style-name="ce268" table:formula="of:=(([.C78]/20)+([.D78]/12.15))*50" office:value-type="float" office:value="425.534979423868" calcext:value-type="float">
            <text:p>426</text:p>
          </table:table-cell>
          <table:table-cell table:style-name="ce366" table:formula="of:=[.H78]*(50/61)*(1+(2*10^-4))" office:value-type="float" office:value="389.422131147541" calcext:value-type="float">
            <text:p>389</text:p>
          </table:table-cell>
          <table:table-cell table:style-name="ce268" table:formula="of:=([.L78]-(([.C78]*0.7143)+([.D78]*0.5879)))" office:value-type="float" office:value="280.772131147541" calcext:value-type="float">
            <text:p>281</text:p>
          </table:table-cell>
          <table:table-cell table:style-name="ce279" table:formula="of:=IF([.G78]&lt;=0;0;[.F78]/[.G78])" office:value-type="float" office:value="1.61702127659574" calcext:value-type="float">
            <text:p>1.6</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2" calcext:value-type="float">
            <text:p>42</text:p>
          </table:table-cell>
          <table:table-cell table:style-name="ce266" office:value-type="string" calcext:value-type="string">
            <text:p>East Flanders (boiled)</text:p>
          </table:table-cell>
          <table:table-cell table:style-name="ce288" office:value-type="float" office:value="4" calcext:value-type="float">
            <text:p>4</text:p>
          </table:table-cell>
          <table:table-cell table:style-name="ce288" office:value-type="float" office:value="22" calcext:value-type="float">
            <text:p>22</text:p>
          </table:table-cell>
          <table:table-cell table:style-name="ce288" office:value-type="float" office:value="52" calcext:value-type="float">
            <text:p>52</text:p>
          </table:table-cell>
          <table:table-cell table:style-name="ce288" office:value-type="float" office:value="76" calcext:value-type="float">
            <text:p>76</text:p>
          </table:table-cell>
          <table:table-cell table:style-name="ce288" office:value-type="float" office:value="47" calcext:value-type="float">
            <text:p>47</text:p>
          </table:table-cell>
          <table:table-cell table:style-name="ce288" office:value-type="float" office:value="80" calcext:value-type="float">
            <text:p>80</text:p>
          </table:table-cell>
          <table:table-cell table:style-name="ce338" table:formula="of:=([.C79]/20.05)+([.D79]/12.15)+([.E79]/23)" office:value-type="float" office:value="4.27107040057755" calcext:value-type="float">
            <text:p>4.3</text:p>
          </table:table-cell>
          <table:table-cell table:style-name="ce349" table:formula="of:=([.H79]/61)+([.F79]/48)+([.G79]/35.45)" office:value-type="float" office:value="4.22061974457984" calcext:value-type="float">
            <text:p>4.2</text:p>
          </table:table-cell>
          <table:table-cell table:style-name="ce268" table:formula="of:=(([.C79]/20)+([.D79]/12.15))*50" office:value-type="float" office:value="100.534979423868" calcext:value-type="float">
            <text:p>101</text:p>
          </table:table-cell>
          <table:table-cell table:style-name="ce366" table:formula="of:=[.H79]*(50/61)*(1+(2*10^-4))" office:value-type="float" office:value="65.5868852459016" calcext:value-type="float">
            <text:p>66</text:p>
          </table:table-cell>
          <table:table-cell table:style-name="ce268" table:formula="of:=([.L79]-(([.C79]*0.7143)+([.D79]*0.5879)))" office:value-type="float" office:value="49.7958852459017" calcext:value-type="float">
            <text:p>50</text:p>
          </table:table-cell>
          <table:table-cell table:style-name="ce279" table:formula="of:=IF([.G79]&lt;=0;0;[.F79]/[.G79])" office:value-type="float" office:value="1.61702127659574" calcext:value-type="float">
            <text:p>1.6</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3" calcext:value-type="float">
            <text:p>43</text:p>
          </table:table-cell>
          <table:table-cell table:style-name="ce266" office:value-type="string" calcext:value-type="string">
            <text:p>West Flanders</text:p>
          </table:table-cell>
          <table:table-cell table:style-name="ce288" office:value-type="float" office:value="114" calcext:value-type="float">
            <text:p>114</text:p>
          </table:table-cell>
          <table:table-cell table:style-name="ce288" office:value-type="float" office:value="10" calcext:value-type="float">
            <text:p>10</text:p>
          </table:table-cell>
          <table:table-cell table:style-name="ce288" office:value-type="float" office:value="125" calcext:value-type="float">
            <text:p>125</text:p>
          </table:table-cell>
          <table:table-cell table:style-name="ce288" office:value-type="float" office:value="145" calcext:value-type="float">
            <text:p>145</text:p>
          </table:table-cell>
          <table:table-cell table:style-name="ce288" office:value-type="float" office:value="139" calcext:value-type="float">
            <text:p>139</text:p>
          </table:table-cell>
          <table:table-cell table:style-name="ce288" office:value-type="float" office:value="305" calcext:value-type="float">
            <text:p>305</text:p>
          </table:table-cell>
          <table:table-cell table:style-name="ce338" table:formula="of:=([.C80]/20.05)+([.D80]/12.15)+([.E80]/23)" office:value-type="float" office:value="11.943613412345" calcext:value-type="float">
            <text:p>11.9</text:p>
          </table:table-cell>
          <table:table-cell table:style-name="ce349" table:formula="of:=([.H80]/61)+([.F80]/48)+([.G80]/35.45)" office:value-type="float" office:value="11.9418488481429" calcext:value-type="float">
            <text:p>11.9</text:p>
          </table:table-cell>
          <table:table-cell table:style-name="ce268" table:formula="of:=(([.C80]/20)+([.D80]/12.15))*50" office:value-type="float" office:value="326.152263374486" calcext:value-type="float">
            <text:p>326</text:p>
          </table:table-cell>
          <table:table-cell table:style-name="ce366" table:formula="of:=[.H80]*(50/61)*(1+(2*10^-4))" office:value-type="float" office:value="250.05" calcext:value-type="float">
            <text:p>250</text:p>
          </table:table-cell>
          <table:table-cell table:style-name="ce268" table:formula="of:=([.L80]-(([.C80]*0.7143)+([.D80]*0.5879)))" office:value-type="float" office:value="162.7408" calcext:value-type="float">
            <text:p>163</text:p>
          </table:table-cell>
          <table:table-cell table:style-name="ce279" table:formula="of:=IF([.G80]&lt;=0;0;[.F80]/[.G80])" office:value-type="float" office:value="1.0431654676259" calcext:value-type="float">
            <text:p>1.0</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4" calcext:value-type="float">
            <text:p>44</text:p>
          </table:table-cell>
          <table:table-cell table:style-name="ce266" office:value-type="string" calcext:value-type="string">
            <text:p>West Flanders (boiled)</text:p>
          </table:table-cell>
          <table:table-cell table:style-name="ce288" office:value-type="float" office:value="40" calcext:value-type="float">
            <text:p>40</text:p>
          </table:table-cell>
          <table:table-cell table:style-name="ce288" office:value-type="float" office:value="10" calcext:value-type="float">
            <text:p>10</text:p>
          </table:table-cell>
          <table:table-cell table:style-name="ce288" office:value-type="float" office:value="125" calcext:value-type="float">
            <text:p>125</text:p>
          </table:table-cell>
          <table:table-cell table:style-name="ce288" office:value-type="float" office:value="145" calcext:value-type="float">
            <text:p>145</text:p>
          </table:table-cell>
          <table:table-cell table:style-name="ce288" office:value-type="float" office:value="139" calcext:value-type="float">
            <text:p>139</text:p>
          </table:table-cell>
          <table:table-cell table:style-name="ce288" office:value-type="float" office:value="80" calcext:value-type="float">
            <text:p>80</text:p>
          </table:table-cell>
          <table:table-cell table:style-name="ce338" table:formula="of:=([.C81]/20.05)+([.D81]/12.15)+([.E81]/23)" office:value-type="float" office:value="8.25284034501329" calcext:value-type="float">
            <text:p>8.3</text:p>
          </table:table-cell>
          <table:table-cell table:style-name="ce349" table:formula="of:=([.H81]/61)+([.F81]/48)+([.G81]/35.45)" office:value-type="float" office:value="8.25332425797899" calcext:value-type="float">
            <text:p>8.3</text:p>
          </table:table-cell>
          <table:table-cell table:style-name="ce268" table:formula="of:=(([.C81]/20)+([.D81]/12.15))*50" office:value-type="float" office:value="141.152263374486" calcext:value-type="float">
            <text:p>141</text:p>
          </table:table-cell>
          <table:table-cell table:style-name="ce366" table:formula="of:=[.H81]*(50/61)*(1+(2*10^-4))" office:value-type="float" office:value="65.5868852459016" calcext:value-type="float">
            <text:p>66</text:p>
          </table:table-cell>
          <table:table-cell table:style-name="ce268" table:formula="of:=([.L81]-(([.C81]*0.7143)+([.D81]*0.5879)))" office:value-type="float" office:value="31.1358852459016" calcext:value-type="float">
            <text:p>31</text:p>
          </table:table-cell>
          <table:table-cell table:style-name="ce279" table:formula="of:=IF([.G81]&lt;=0;0;[.F81]/[.G81])" office:value-type="float" office:value="1.0431654676259" calcext:value-type="float">
            <text:p>1.0</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5" calcext:value-type="float">
            <text:p>45</text:p>
          </table:table-cell>
          <table:table-cell table:style-name="ce266" office:value-type="string" calcext:value-type="string">
            <text:p>Ardennes</text:p>
          </table:table-cell>
          <table:table-cell table:style-name="ce288" office:value-type="float" office:value="60" calcext:value-type="float">
            <text:p>60</text:p>
          </table:table-cell>
          <table:table-cell table:style-name="ce288" office:value-type="float" office:value="13" calcext:value-type="float">
            <text:p>13</text:p>
          </table:table-cell>
          <table:table-cell table:style-name="ce288" office:value-type="float" office:value="11" calcext:value-type="float">
            <text:p>11</text:p>
          </table:table-cell>
          <table:table-cell table:style-name="ce288" office:value-type="float" office:value="25" calcext:value-type="float">
            <text:p>25</text:p>
          </table:table-cell>
          <table:table-cell table:style-name="ce288" office:value-type="float" office:value="24" calcext:value-type="float">
            <text:p>24</text:p>
          </table:table-cell>
          <table:table-cell table:style-name="ce288" office:value-type="float" office:value="200" calcext:value-type="float">
            <text:p>200</text:p>
          </table:table-cell>
          <table:table-cell table:style-name="ce338" table:formula="of:=([.C82]/20.05)+([.D82]/12.15)+([.E82]/23)" office:value-type="float" office:value="4.54073842054374" calcext:value-type="float">
            <text:p>4.5</text:p>
          </table:table-cell>
          <table:table-cell table:style-name="ce349" table:formula="of:=([.H82]/61)+([.F82]/48)+([.G82]/35.45)" office:value-type="float" office:value="4.47653173098415" calcext:value-type="float">
            <text:p>4.5</text:p>
          </table:table-cell>
          <table:table-cell table:style-name="ce268" table:formula="of:=(([.C82]/20)+([.D82]/12.15))*50" office:value-type="float" office:value="203.497942386831" calcext:value-type="float">
            <text:p>203</text:p>
          </table:table-cell>
          <table:table-cell table:style-name="ce366" table:formula="of:=[.H82]*(50/61)*(1+(2*10^-4))" office:value-type="float" office:value="163.967213114754" calcext:value-type="float">
            <text:p>164</text:p>
          </table:table-cell>
          <table:table-cell table:style-name="ce268" table:formula="of:=([.L82]-(([.C82]*0.7143)+([.D82]*0.5879)))" office:value-type="float" office:value="113.466513114754" calcext:value-type="float">
            <text:p>113</text:p>
          </table:table-cell>
          <table:table-cell table:style-name="ce279" table:formula="of:=IF([.G82]&lt;=0;0;[.F82]/[.G82])" office:value-type="float" office:value="1.04166666666667" calcext:value-type="float">
            <text:p>1.0</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6" calcext:value-type="float">
            <text:p>46</text:p>
          </table:table-cell>
          <table:table-cell table:style-name="ce266" office:value-type="string" calcext:value-type="string">
            <text:p>Ardennes (boiled)</text:p>
          </table:table-cell>
          <table:table-cell table:style-name="ce288" office:value-type="float" office:value="20" calcext:value-type="float">
            <text:p>20</text:p>
          </table:table-cell>
          <table:table-cell table:style-name="ce288" office:value-type="float" office:value="13" calcext:value-type="float">
            <text:p>13</text:p>
          </table:table-cell>
          <table:table-cell table:style-name="ce288" office:value-type="float" office:value="11" calcext:value-type="float">
            <text:p>11</text:p>
          </table:table-cell>
          <table:table-cell table:style-name="ce288" office:value-type="float" office:value="25" calcext:value-type="float">
            <text:p>25</text:p>
          </table:table-cell>
          <table:table-cell table:style-name="ce288" office:value-type="float" office:value="24" calcext:value-type="float">
            <text:p>24</text:p>
          </table:table-cell>
          <table:table-cell table:style-name="ce288" office:value-type="float" office:value="80" calcext:value-type="float">
            <text:p>80</text:p>
          </table:table-cell>
          <table:table-cell table:style-name="ce338" table:formula="of:=([.C83]/20.05)+([.D83]/12.15)+([.E83]/23)" office:value-type="float" office:value="2.54572595171581" calcext:value-type="float">
            <text:p>2.5</text:p>
          </table:table-cell>
          <table:table-cell table:style-name="ce349" table:formula="of:=([.H83]/61)+([.F83]/48)+([.G83]/35.45)" office:value-type="float" office:value="2.50931861623005" calcext:value-type="float">
            <text:p>2.5</text:p>
          </table:table-cell>
          <table:table-cell table:style-name="ce268" table:formula="of:=(([.C83]/20)+([.D83]/12.15))*50" office:value-type="float" office:value="103.497942386831" calcext:value-type="float">
            <text:p>103</text:p>
          </table:table-cell>
          <table:table-cell table:style-name="ce366" table:formula="of:=[.H83]*(50/61)*(1+(2*10^-4))" office:value-type="float" office:value="65.5868852459016" calcext:value-type="float">
            <text:p>66</text:p>
          </table:table-cell>
          <table:table-cell table:style-name="ce268" table:formula="of:=([.L83]-(([.C83]*0.7143)+([.D83]*0.5879)))" office:value-type="float" office:value="43.6581852459016" calcext:value-type="float">
            <text:p>44</text:p>
          </table:table-cell>
          <table:table-cell table:style-name="ce279" table:formula="of:=IF([.G83]&lt;=0;0;[.F83]/[.G83])" office:value-type="float" office:value="1.04166666666667" calcext:value-type="float">
            <text:p>1.0</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7" calcext:value-type="float">
            <text:p>47</text:p>
          </table:table-cell>
          <table:table-cell table:style-name="ce266" office:value-type="string" calcext:value-type="string">
            <text:p>Pale Ale Profile</text:p>
          </table:table-cell>
          <table:table-cell table:style-name="ce288" office:value-type="float" office:value="140" calcext:value-type="float">
            <text:p>140</text:p>
          </table:table-cell>
          <table:table-cell table:style-name="ce288" office:value-type="float" office:value="18" calcext:value-type="float">
            <text:p>18</text:p>
          </table:table-cell>
          <table:table-cell table:style-name="ce288" office:value-type="float" office:value="25" calcext:value-type="float">
            <text:p>25</text:p>
          </table:table-cell>
          <table:table-cell table:style-name="ce288" office:value-type="float" office:value="300" calcext:value-type="float">
            <text:p>300</text:p>
          </table:table-cell>
          <table:table-cell table:style-name="ce288" office:value-type="float" office:value="55" calcext:value-type="float">
            <text:p>55</text:p>
          </table:table-cell>
          <table:table-cell table:style-name="ce288" office:value-type="float" office:value="110" calcext:value-type="float">
            <text:p>110</text:p>
          </table:table-cell>
          <table:table-cell table:style-name="ce338" table:formula="of:=([.C84]/20.05)+([.D84]/12.15)+([.E84]/23)" office:value-type="float" office:value="9.55098164411837" calcext:value-type="float">
            <text:p>9.6</text:p>
          </table:table-cell>
          <table:table-cell table:style-name="ce349" table:formula="of:=([.H84]/61)+([.F84]/48)+([.G84]/35.45)" office:value-type="float" office:value="9.60475964762191" calcext:value-type="float">
            <text:p>9.6</text:p>
          </table:table-cell>
          <table:table-cell table:style-name="ce268" table:formula="of:=(([.C84]/20)+([.D84]/12.15))*50" office:value-type="float" office:value="424.074074074074" calcext:value-type="float">
            <text:p>424</text:p>
          </table:table-cell>
          <table:table-cell table:style-name="ce366" table:formula="of:=[.H84]*(50/61)*(1+(2*10^-4))" office:value-type="float" office:value="90.1819672131148" calcext:value-type="float">
            <text:p>90</text:p>
          </table:table-cell>
          <table:table-cell table:style-name="ce268" table:formula="of:=([.L84]-(([.C84]*0.7143)+([.D84]*0.5879)))" office:value-type="float" office:value="-20.4022327868852" calcext:value-type="float">
            <text:p>-20</text:p>
          </table:table-cell>
          <table:table-cell table:style-name="ce279" table:formula="of:=IF([.G84]&lt;=0;0;[.F84]/[.G84])" office:value-type="float" office:value="5.45454545454545" calcext:value-type="float">
            <text:p>5.5</text:p>
          </table:table-cell>
          <table:table-cell table:style-name="ce392" office:value-type="string" calcext:value-type="string" table:number-columns-spanned="5" table:number-rows-spanned="1">
            <text:p>for hoppy beers</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8" calcext:value-type="float">
            <text:p>48</text:p>
          </table:table-cell>
          <table:table-cell table:style-name="ce266" office:value-type="string" calcext:value-type="string">
            <text:p>Mild Ale Profile</text:p>
          </table:table-cell>
          <table:table-cell table:style-name="ce288" office:value-type="float" office:value="50" calcext:value-type="float">
            <text:p>50</text:p>
          </table:table-cell>
          <table:table-cell table:style-name="ce288" office:value-type="float" office:value="0" calcext:value-type="float">
            <text:p>0</text:p>
          </table:table-cell>
          <table:table-cell table:style-name="ce288" office:value-type="float" office:value="20" calcext:value-type="float">
            <text:p>20</text:p>
          </table:table-cell>
          <table:table-cell table:style-name="ce288" office:value-type="float" office:value="40" calcext:value-type="float">
            <text:p>40</text:p>
          </table:table-cell>
          <table:table-cell table:style-name="ce288" office:value-type="float" office:value="65" calcext:value-type="float">
            <text:p>65</text:p>
          </table:table-cell>
          <table:table-cell table:style-name="ce288" office:value-type="float" office:value="45" calcext:value-type="float">
            <text:p>45</text:p>
          </table:table-cell>
          <table:table-cell table:style-name="ce338" table:formula="of:=([.C85]/20.05)+([.D85]/12.15)+([.E85]/23)" office:value-type="float" office:value="3.36333080342622" calcext:value-type="float">
            <text:p>3.4</text:p>
          </table:table-cell>
          <table:table-cell table:style-name="ce349" table:formula="of:=([.H85]/61)+([.F85]/48)+([.G85]/35.45)" office:value-type="float" office:value="3.40460665757204" calcext:value-type="float">
            <text:p>3.4</text:p>
          </table:table-cell>
          <table:table-cell table:style-name="ce268" table:formula="of:=(([.C85]/20)+([.D85]/12.15))*50" office:value-type="float" office:value="125" calcext:value-type="float">
            <text:p>125</text:p>
          </table:table-cell>
          <table:table-cell table:style-name="ce366" table:formula="of:=[.H85]*(50/61)*(1+(2*10^-4))" office:value-type="float" office:value="36.8926229508197" calcext:value-type="float">
            <text:p>37</text:p>
          </table:table-cell>
          <table:table-cell table:style-name="ce268" table:formula="of:=([.L85]-(([.C85]*0.7143)+([.D85]*0.5879)))" office:value-type="float" office:value="1.17762295081967" calcext:value-type="float">
            <text:p>1</text:p>
          </table:table-cell>
          <table:table-cell table:style-name="ce279" table:formula="of:=IF([.G85]&lt;=0;0;[.F85]/[.G85])" office:value-type="float" office:value="0.615384615384615" calcext:value-type="float">
            <text:p>0.6</text:p>
          </table:table-cell>
          <table:table-cell table:style-name="ce392" office:value-type="string" calcext:value-type="string" table:number-columns-spanned="5" table:number-rows-spanned="1">
            <text:p>for malty English ales</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49" calcext:value-type="float">
            <text:p>49</text:p>
          </table:table-cell>
          <table:table-cell table:style-name="ce266" office:value-type="string" calcext:value-type="string">
            <text:p>American Lager</text:p>
          </table:table-cell>
          <table:table-cell table:style-name="ce288" office:value-type="float" office:value="13" calcext:value-type="float">
            <text:p>13</text:p>
          </table:table-cell>
          <table:table-cell table:style-name="ce288" office:value-type="float" office:value="6" calcext:value-type="float">
            <text:p>6</text:p>
          </table:table-cell>
          <table:table-cell table:style-name="ce288" office:value-type="float" office:value="8" calcext:value-type="float">
            <text:p>8</text:p>
          </table:table-cell>
          <table:table-cell table:style-name="ce288" office:value-type="float" office:value="37" calcext:value-type="float">
            <text:p>37</text:p>
          </table:table-cell>
          <table:table-cell table:style-name="ce288" office:value-type="float" office:value="13" calcext:value-type="float">
            <text:p>13</text:p>
          </table:table-cell>
          <table:table-cell table:style-name="ce288" office:value-type="float" office:value="20" calcext:value-type="float">
            <text:p>20</text:p>
          </table:table-cell>
          <table:table-cell table:style-name="ce338" table:formula="of:=([.C86]/20.05)+([.D86]/12.15)+([.E86]/23)" office:value-type="float" office:value="1.49003229981943" calcext:value-type="float">
            <text:p>1.5</text:p>
          </table:table-cell>
          <table:table-cell table:style-name="ce349" table:formula="of:=([.H86]/61)+([.F86]/48)+([.G86]/35.45)" office:value-type="float" office:value="1.46541586703353" calcext:value-type="float">
            <text:p>1.5</text:p>
          </table:table-cell>
          <table:table-cell table:style-name="ce268" table:formula="of:=(([.C86]/20)+([.D86]/12.15))*50" office:value-type="float" office:value="57.1913580246914" calcext:value-type="float">
            <text:p>57</text:p>
          </table:table-cell>
          <table:table-cell table:style-name="ce366" table:formula="of:=[.H86]*(50/61)*(1+(2*10^-4))" office:value-type="float" office:value="16.3967213114754" calcext:value-type="float">
            <text:p>16</text:p>
          </table:table-cell>
          <table:table-cell table:style-name="ce268" table:formula="of:=([.L86]-(([.C86]*0.7143)+([.D86]*0.5879)))" office:value-type="float" office:value="3.58342131147541" calcext:value-type="float">
            <text:p>4</text:p>
          </table:table-cell>
          <table:table-cell table:style-name="ce279" table:formula="of:=IF([.G86]&lt;=0;0;[.F86]/[.G86])" office:value-type="float" office:value="2.84615384615385" calcext:value-type="float">
            <text:p>2.8</text:p>
          </table:table-cell>
          <table:table-cell table:style-name="ce392" office:value-type="string" calcext:value-type="string" table:number-columns-spanned="5" table:number-rows-spanned="1">
            <text:p>from an American megabrewery</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0" calcext:value-type="float">
            <text:p>50</text:p>
          </table:table-cell>
          <table:table-cell table:style-name="ce266" office:value-type="string" calcext:value-type="string">
            <text:p>Yellow Full</text:p>
          </table:table-cell>
          <table:table-cell table:style-name="ce288" office:value-type="float" office:value="50" calcext:value-type="float">
            <text:p>50</text:p>
          </table:table-cell>
          <table:table-cell table:number-columns-repeated="2" table:style-name="ce288" office:value-type="float" office:value="5" calcext:value-type="float">
            <text:p>5</text:p>
          </table:table-cell>
          <table:table-cell table:style-name="ce288" office:value-type="float" office:value="55" calcext:value-type="float">
            <text:p>55</text:p>
          </table:table-cell>
          <table:table-cell table:style-name="ce288" office:value-type="float" office:value="70" calcext:value-type="float">
            <text:p>70</text:p>
          </table:table-cell>
          <table:table-cell table:style-name="ce288" office:value-type="float" office:value="0" calcext:value-type="float">
            <text:p>0</text:p>
          </table:table-cell>
          <table:table-cell table:style-name="ce338" table:formula="of:=([.C87]/20.05)+([.D87]/12.15)+([.E87]/23)" office:value-type="float" office:value="3.12267952412759" calcext:value-type="float">
            <text:p>3.1</text:p>
          </table:table-cell>
          <table:table-cell table:style-name="ce349" table:formula="of:=([.H87]/61)+([.F87]/48)+([.G87]/35.45)" office:value-type="float" office:value="3.12044546309356" calcext:value-type="float">
            <text:p>3.1</text:p>
          </table:table-cell>
          <table:table-cell table:style-name="ce268" table:formula="of:=(([.C87]/20)+([.D87]/12.15))*50" office:value-type="float" office:value="145.576131687243" calcext:value-type="float">
            <text:p>146</text:p>
          </table:table-cell>
          <table:table-cell table:style-name="ce366" table:formula="of:=[.H87]*(50/61)*(1+(2*10^-4))" office:value-type="float" office:value="0" calcext:value-type="float">
            <text:p>0</text:p>
          </table:table-cell>
          <table:table-cell table:style-name="ce268" table:formula="of:=([.L87]-(([.C87]*0.7143)+([.D87]*0.5879)))" office:value-type="float" office:value="-38.6545" calcext:value-type="float">
            <text:p>-39</text:p>
          </table:table-cell>
          <table:table-cell table:style-name="ce279" table:formula="of:=IF([.G87]&lt;=0;0;[.F87]/[.G87])" office:value-type="float" office:value="0.785714285714286" calcext:value-type="float">
            <text:p>0.8</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1" calcext:value-type="float">
            <text:p>51</text:p>
          </table:table-cell>
          <table:table-cell table:style-name="ce266" office:value-type="string" calcext:value-type="string">
            <text:p>Yellow Balanced</text:p>
          </table:table-cell>
          <table:table-cell table:style-name="ce288" office:value-type="float" office:value="50" calcext:value-type="float">
            <text:p>50</text:p>
          </table:table-cell>
          <table:table-cell table:style-name="ce288" office:value-type="float" office:value="7" calcext:value-type="float">
            <text:p>7</text:p>
          </table:table-cell>
          <table:table-cell table:style-name="ce288" office:value-type="float" office:value="5" calcext:value-type="float">
            <text:p>5</text:p>
          </table:table-cell>
          <table:table-cell table:style-name="ce288" office:value-type="float" office:value="75" calcext:value-type="float">
            <text:p>75</text:p>
          </table:table-cell>
          <table:table-cell table:style-name="ce288" office:value-type="float" office:value="60" calcext:value-type="float">
            <text:p>60</text:p>
          </table:table-cell>
          <table:table-cell table:style-name="ce288" office:value-type="float" office:value="0" calcext:value-type="float">
            <text:p>0</text:p>
          </table:table-cell>
          <table:table-cell table:style-name="ce338" table:formula="of:=([.C88]/20.05)+([.D88]/12.15)+([.E88]/23)" office:value-type="float" office:value="3.28728857762554" calcext:value-type="float">
            <text:p>3.3</text:p>
          </table:table-cell>
          <table:table-cell table:style-name="ce349" table:formula="of:=([.H88]/61)+([.F88]/48)+([.G88]/35.45)" office:value-type="float" office:value="3.25502468265162" calcext:value-type="float">
            <text:p>3.3</text:p>
          </table:table-cell>
          <table:table-cell table:style-name="ce268" table:formula="of:=(([.C88]/20)+([.D88]/12.15))*50" office:value-type="float" office:value="153.80658436214" calcext:value-type="float">
            <text:p>154</text:p>
          </table:table-cell>
          <table:table-cell table:style-name="ce366" table:formula="of:=[.H88]*(50/61)*(1+(2*10^-4))" office:value-type="float" office:value="0" calcext:value-type="float">
            <text:p>0</text:p>
          </table:table-cell>
          <table:table-cell table:style-name="ce268" table:formula="of:=([.L88]-(([.C88]*0.7143)+([.D88]*0.5879)))" office:value-type="float" office:value="-39.8303" calcext:value-type="float">
            <text:p>-40</text:p>
          </table:table-cell>
          <table:table-cell table:style-name="ce279" table:formula="of:=IF([.G88]&lt;=0;0;[.F88]/[.G88])" office:value-type="float" office:value="1.25" calcext:value-type="float">
            <text:p>1.3</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2" calcext:value-type="float">
            <text:p>52</text:p>
          </table:table-cell>
          <table:table-cell table:style-name="ce266" office:value-type="string" calcext:value-type="string">
            <text:p>Yellow Dry</text:p>
          </table:table-cell>
          <table:table-cell table:style-name="ce288" office:value-type="float" office:value="50" calcext:value-type="float">
            <text:p>50</text:p>
          </table:table-cell>
          <table:table-cell table:style-name="ce288" office:value-type="float" office:value="10" calcext:value-type="float">
            <text:p>10</text:p>
          </table:table-cell>
          <table:table-cell table:style-name="ce288" office:value-type="float" office:value="5" calcext:value-type="float">
            <text:p>5</text:p>
          </table:table-cell>
          <table:table-cell table:style-name="ce288" office:value-type="float" office:value="105" calcext:value-type="float">
            <text:p>105</text:p>
          </table:table-cell>
          <table:table-cell table:style-name="ce288" office:value-type="float" office:value="45" calcext:value-type="float">
            <text:p>45</text:p>
          </table:table-cell>
          <table:table-cell table:style-name="ce288" office:value-type="float" office:value="0" calcext:value-type="float">
            <text:p>0</text:p>
          </table:table-cell>
          <table:table-cell table:style-name="ce338" table:formula="of:=([.C89]/20.05)+([.D89]/12.15)+([.E89]/23)" office:value-type="float" office:value="3.53420215787245" calcext:value-type="float">
            <text:p>3.5</text:p>
          </table:table-cell>
          <table:table-cell table:style-name="ce349" table:formula="of:=([.H89]/61)+([.F89]/48)+([.G89]/35.45)" office:value-type="float" office:value="3.45689351198872" calcext:value-type="float">
            <text:p>3.5</text:p>
          </table:table-cell>
          <table:table-cell table:style-name="ce268" table:formula="of:=(([.C89]/20)+([.D89]/12.15))*50" office:value-type="float" office:value="166.152263374486" calcext:value-type="float">
            <text:p>166</text:p>
          </table:table-cell>
          <table:table-cell table:style-name="ce366" table:formula="of:=[.H89]*(50/61)*(1+(2*10^-4))" office:value-type="float" office:value="0" calcext:value-type="float">
            <text:p>0</text:p>
          </table:table-cell>
          <table:table-cell table:style-name="ce268" table:formula="of:=([.L89]-(([.C89]*0.7143)+([.D89]*0.5879)))" office:value-type="float" office:value="-41.594" calcext:value-type="float">
            <text:p>-42</text:p>
          </table:table-cell>
          <table:table-cell table:style-name="ce279" table:formula="of:=IF([.G89]&lt;=0;0;[.F89]/[.G89])" office:value-type="float" office:value="2.33333333333333" calcext:value-type="float">
            <text:p>2.3</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3" calcext:value-type="float">
            <text:p>53</text:p>
          </table:table-cell>
          <table:table-cell table:style-name="ce266" office:value-type="string" calcext:value-type="string">
            <text:p>Amber Full</text:p>
          </table:table-cell>
          <table:table-cell table:style-name="ce288" office:value-type="float" office:value="50" calcext:value-type="float">
            <text:p>50</text:p>
          </table:table-cell>
          <table:table-cell table:style-name="ce288" office:value-type="float" office:value="5" calcext:value-type="float">
            <text:p>5</text:p>
          </table:table-cell>
          <table:table-cell table:style-name="ce288" office:value-type="float" office:value="15" calcext:value-type="float">
            <text:p>15</text:p>
          </table:table-cell>
          <table:table-cell table:style-name="ce288" office:value-type="float" office:value="55" calcext:value-type="float">
            <text:p>55</text:p>
          </table:table-cell>
          <table:table-cell table:style-name="ce288" office:value-type="float" office:value="65" calcext:value-type="float">
            <text:p>65</text:p>
          </table:table-cell>
          <table:table-cell table:style-name="ce288" office:value-type="float" office:value="35" calcext:value-type="float">
            <text:p>35</text:p>
          </table:table-cell>
          <table:table-cell table:style-name="ce338" table:formula="of:=([.C90]/20.05)+([.D90]/12.15)+([.E90]/23)" office:value-type="float" office:value="3.55746213282325" calcext:value-type="float">
            <text:p>3.6</text:p>
          </table:table-cell>
          <table:table-cell table:style-name="ce349" table:formula="of:=([.H90]/61)+([.F90]/48)+([.G90]/35.45)" office:value-type="float" office:value="3.55317223134254" calcext:value-type="float">
            <text:p>3.6</text:p>
          </table:table-cell>
          <table:table-cell table:style-name="ce268" table:formula="of:=(([.C90]/20)+([.D90]/12.15))*50" office:value-type="float" office:value="145.576131687243" calcext:value-type="float">
            <text:p>146</text:p>
          </table:table-cell>
          <table:table-cell table:style-name="ce366" table:formula="of:=[.H90]*(50/61)*(1+(2*10^-4))" office:value-type="float" office:value="28.694262295082" calcext:value-type="float">
            <text:p>29</text:p>
          </table:table-cell>
          <table:table-cell table:style-name="ce268" table:formula="of:=([.L90]-(([.C90]*0.7143)+([.D90]*0.5879)))" office:value-type="float" office:value="-9.96023770491804" calcext:value-type="float">
            <text:p>-10</text:p>
          </table:table-cell>
          <table:table-cell table:style-name="ce279" table:formula="of:=IF([.G90]&lt;=0;0;[.F90]/[.G90])" office:value-type="float" office:value="0.846153846153846" calcext:value-type="float">
            <text:p>0.8</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4" calcext:value-type="float">
            <text:p>54</text:p>
          </table:table-cell>
          <table:table-cell table:style-name="ce266" office:value-type="string" calcext:value-type="string">
            <text:p>Amber Balanced</text:p>
          </table:table-cell>
          <table:table-cell table:style-name="ce288" office:value-type="float" office:value="50" calcext:value-type="float">
            <text:p>50</text:p>
          </table:table-cell>
          <table:table-cell table:style-name="ce288" office:value-type="float" office:value="10" calcext:value-type="float">
            <text:p>10</text:p>
          </table:table-cell>
          <table:table-cell table:style-name="ce288" office:value-type="float" office:value="15" calcext:value-type="float">
            <text:p>15</text:p>
          </table:table-cell>
          <table:table-cell table:style-name="ce288" office:value-type="float" office:value="75" calcext:value-type="float">
            <text:p>75</text:p>
          </table:table-cell>
          <table:table-cell table:style-name="ce288" office:value-type="float" office:value="63" calcext:value-type="float">
            <text:p>63</text:p>
          </table:table-cell>
          <table:table-cell table:style-name="ce288" office:value-type="float" office:value="40" calcext:value-type="float">
            <text:p>40</text:p>
          </table:table-cell>
          <table:table-cell table:style-name="ce338" table:formula="of:=([.C91]/20.05)+([.D91]/12.15)+([.E91]/23)" office:value-type="float" office:value="3.9689847665681" calcext:value-type="float">
            <text:p>4.0</text:p>
          </table:table-cell>
          <table:table-cell table:style-name="ce349" table:formula="of:=([.H91]/61)+([.F91]/48)+([.G91]/35.45)" office:value-type="float" office:value="3.99538862170224" calcext:value-type="float">
            <text:p>4.0</text:p>
          </table:table-cell>
          <table:table-cell table:style-name="ce268" table:formula="of:=(([.C91]/20)+([.D91]/12.15))*50" office:value-type="float" office:value="166.152263374486" calcext:value-type="float">
            <text:p>166</text:p>
          </table:table-cell>
          <table:table-cell table:style-name="ce366" table:formula="of:=[.H91]*(50/61)*(1+(2*10^-4))" office:value-type="float" office:value="32.7934426229508" calcext:value-type="float">
            <text:p>33</text:p>
          </table:table-cell>
          <table:table-cell table:style-name="ce268" table:formula="of:=([.L91]-(([.C91]*0.7143)+([.D91]*0.5879)))" office:value-type="float" office:value="-8.80055737704918" calcext:value-type="float">
            <text:p>-9</text:p>
          </table:table-cell>
          <table:table-cell table:style-name="ce279" table:formula="of:=IF([.G91]&lt;=0;0;[.F91]/[.G91])" office:value-type="float" office:value="1.19047619047619" calcext:value-type="float">
            <text:p>1.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5" calcext:value-type="float">
            <text:p>55</text:p>
          </table:table-cell>
          <table:table-cell table:style-name="ce266" office:value-type="string" calcext:value-type="string">
            <text:p>Amber Dry</text:p>
          </table:table-cell>
          <table:table-cell table:style-name="ce288" office:value-type="float" office:value="50" calcext:value-type="float">
            <text:p>50</text:p>
          </table:table-cell>
          <table:table-cell table:number-columns-repeated="2" table:style-name="ce288" office:value-type="float" office:value="15" calcext:value-type="float">
            <text:p>15</text:p>
          </table:table-cell>
          <table:table-cell table:style-name="ce288" office:value-type="float" office:value="110" calcext:value-type="float">
            <text:p>110</text:p>
          </table:table-cell>
          <table:table-cell table:style-name="ce288" office:value-type="float" office:value="50" calcext:value-type="float">
            <text:p>50</text:p>
          </table:table-cell>
          <table:table-cell table:style-name="ce288" office:value-type="float" office:value="45" calcext:value-type="float">
            <text:p>45</text:p>
          </table:table-cell>
          <table:table-cell table:style-name="ce338" table:formula="of:=([.C92]/20.05)+([.D92]/12.15)+([.E92]/23)" office:value-type="float" office:value="4.38050740031296" calcext:value-type="float">
            <text:p>4.4</text:p>
          </table:table-cell>
          <table:table-cell table:style-name="ce349" table:formula="of:=([.H92]/61)+([.F92]/48)+([.G92]/35.45)" office:value-type="float" office:value="4.43980882024247" calcext:value-type="float">
            <text:p>4.4</text:p>
          </table:table-cell>
          <table:table-cell table:style-name="ce268" table:formula="of:=(([.C92]/20)+([.D92]/12.15))*50" office:value-type="float" office:value="186.728395061728" calcext:value-type="float">
            <text:p>187</text:p>
          </table:table-cell>
          <table:table-cell table:style-name="ce366" table:formula="of:=[.H92]*(50/61)*(1+(2*10^-4))" office:value-type="float" office:value="36.8926229508197" calcext:value-type="float">
            <text:p>37</text:p>
          </table:table-cell>
          <table:table-cell table:style-name="ce268" table:formula="of:=([.L92]-(([.C92]*0.7143)+([.D92]*0.5879)))" office:value-type="float" office:value="-7.64087704918033" calcext:value-type="float">
            <text:p>-8</text:p>
          </table:table-cell>
          <table:table-cell table:style-name="ce279" table:formula="of:=IF([.G92]&lt;=0;0;[.F92]/[.G92])" office:value-type="float" office:value="2.2" calcext:value-type="float">
            <text:p>2.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6" calcext:value-type="float">
            <text:p>56</text:p>
          </table:table-cell>
          <table:table-cell table:style-name="ce266" office:value-type="string" calcext:value-type="string">
            <text:p>Brown Full</text:p>
          </table:table-cell>
          <table:table-cell table:style-name="ce288" office:value-type="float" office:value="50" calcext:value-type="float">
            <text:p>50</text:p>
          </table:table-cell>
          <table:table-cell table:style-name="ce288" office:value-type="float" office:value="5" calcext:value-type="float">
            <text:p>5</text:p>
          </table:table-cell>
          <table:table-cell table:style-name="ce288" office:value-type="float" office:value="27" calcext:value-type="float">
            <text:p>27</text:p>
          </table:table-cell>
          <table:table-cell table:style-name="ce288" office:value-type="float" office:value="50" calcext:value-type="float">
            <text:p>50</text:p>
          </table:table-cell>
          <table:table-cell table:style-name="ce288" office:value-type="float" office:value="60" calcext:value-type="float">
            <text:p>60</text:p>
          </table:table-cell>
          <table:table-cell table:style-name="ce288" office:value-type="float" office:value="85" calcext:value-type="float">
            <text:p>85</text:p>
          </table:table-cell>
          <table:table-cell table:style-name="ce338" table:formula="of:=([.C93]/20.05)+([.D93]/12.15)+([.E93]/23)" office:value-type="float" office:value="4.07920126325803" calcext:value-type="float">
            <text:p>4.1</text:p>
          </table:table-cell>
          <table:table-cell table:style-name="ce349" table:formula="of:=([.H93]/61)+([.F93]/48)+([.G93]/35.45)" office:value-type="float" office:value="4.12763397226911" calcext:value-type="float">
            <text:p>4.1</text:p>
          </table:table-cell>
          <table:table-cell table:style-name="ce268" table:formula="of:=(([.C93]/20)+([.D93]/12.15))*50" office:value-type="float" office:value="145.576131687243" calcext:value-type="float">
            <text:p>146</text:p>
          </table:table-cell>
          <table:table-cell table:style-name="ce366" table:formula="of:=[.H93]*(50/61)*(1+(2*10^-4))" office:value-type="float" office:value="69.6860655737705" calcext:value-type="float">
            <text:p>70</text:p>
          </table:table-cell>
          <table:table-cell table:style-name="ce268" table:formula="of:=([.L93]-(([.C93]*0.7143)+([.D93]*0.5879)))" office:value-type="float" office:value="31.0315655737705" calcext:value-type="float">
            <text:p>31</text:p>
          </table:table-cell>
          <table:table-cell table:style-name="ce279" table:formula="of:=IF([.G93]&lt;=0;0;[.F93]/[.G93])" office:value-type="float" office:value="0.833333333333333" calcext:value-type="float">
            <text:p>0.8</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7" calcext:value-type="float">
            <text:p>57</text:p>
          </table:table-cell>
          <table:table-cell table:style-name="ce266" office:value-type="string" calcext:value-type="string">
            <text:p>Brown Balanced</text:p>
          </table:table-cell>
          <table:table-cell table:style-name="ce288" office:value-type="float" office:value="50" calcext:value-type="float">
            <text:p>50</text:p>
          </table:table-cell>
          <table:table-cell table:style-name="ce288" office:value-type="float" office:value="10" calcext:value-type="float">
            <text:p>10</text:p>
          </table:table-cell>
          <table:table-cell table:style-name="ce288" office:value-type="float" office:value="27" calcext:value-type="float">
            <text:p>27</text:p>
          </table:table-cell>
          <table:table-cell table:style-name="ce288" office:value-type="float" office:value="70" calcext:value-type="float">
            <text:p>70</text:p>
          </table:table-cell>
          <table:table-cell table:style-name="ce288" office:value-type="float" office:value="55" calcext:value-type="float">
            <text:p>55</text:p>
          </table:table-cell>
          <table:table-cell table:style-name="ce288" office:value-type="float" office:value="90" calcext:value-type="float">
            <text:p>90</text:p>
          </table:table-cell>
          <table:table-cell table:style-name="ce338" table:formula="of:=([.C94]/20.05)+([.D94]/12.15)+([.E94]/23)" office:value-type="float" office:value="4.49072389700289" calcext:value-type="float">
            <text:p>4.5</text:p>
          </table:table-cell>
          <table:table-cell table:style-name="ce349" table:formula="of:=([.H94]/61)+([.F94]/48)+([.G94]/35.45)" office:value-type="float" office:value="4.48522412849623" calcext:value-type="float">
            <text:p>4.5</text:p>
          </table:table-cell>
          <table:table-cell table:style-name="ce268" table:formula="of:=(([.C94]/20)+([.D94]/12.15))*50" office:value-type="float" office:value="166.152263374486" calcext:value-type="float">
            <text:p>166</text:p>
          </table:table-cell>
          <table:table-cell table:style-name="ce366" table:formula="of:=[.H94]*(50/61)*(1+(2*10^-4))" office:value-type="float" office:value="73.7852459016393" calcext:value-type="float">
            <text:p>74</text:p>
          </table:table-cell>
          <table:table-cell table:style-name="ce268" table:formula="of:=([.L94]-(([.C94]*0.7143)+([.D94]*0.5879)))" office:value-type="float" office:value="32.1912459016393" calcext:value-type="float">
            <text:p>32</text:p>
          </table:table-cell>
          <table:table-cell table:style-name="ce279" table:formula="of:=IF([.G94]&lt;=0;0;[.F94]/[.G94])" office:value-type="float" office:value="1.27272727272727" calcext:value-type="float">
            <text:p>1.3</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8" calcext:value-type="float">
            <text:p>58</text:p>
          </table:table-cell>
          <table:table-cell table:style-name="ce266" office:value-type="string" calcext:value-type="string">
            <text:p>Brown Dry</text:p>
          </table:table-cell>
          <table:table-cell table:style-name="ce288" office:value-type="float" office:value="50" calcext:value-type="float">
            <text:p>50</text:p>
          </table:table-cell>
          <table:table-cell table:style-name="ce288" office:value-type="float" office:value="15" calcext:value-type="float">
            <text:p>15</text:p>
          </table:table-cell>
          <table:table-cell table:style-name="ce288" office:value-type="float" office:value="27" calcext:value-type="float">
            <text:p>27</text:p>
          </table:table-cell>
          <table:table-cell table:style-name="ce288" office:value-type="float" office:value="99" calcext:value-type="float">
            <text:p>99</text:p>
          </table:table-cell>
          <table:table-cell table:style-name="ce288" office:value-type="float" office:value="45" calcext:value-type="float">
            <text:p>45</text:p>
          </table:table-cell>
          <table:table-cell table:style-name="ce288" office:value-type="float" office:value="95" calcext:value-type="float">
            <text:p>95</text:p>
          </table:table-cell>
          <table:table-cell table:style-name="ce338" table:formula="of:=([.C95]/20.05)+([.D95]/12.15)+([.E95]/23)" office:value-type="float" office:value="4.90224653074774" calcext:value-type="float">
            <text:p>4.9</text:p>
          </table:table-cell>
          <table:table-cell table:style-name="ce349" table:formula="of:=([.H95]/61)+([.F95]/48)+([.G95]/35.45)" office:value-type="float" office:value="4.88927056116904" calcext:value-type="float">
            <text:p>4.9</text:p>
          </table:table-cell>
          <table:table-cell table:style-name="ce268" table:formula="of:=(([.C95]/20)+([.D95]/12.15))*50" office:value-type="float" office:value="186.728395061728" calcext:value-type="float">
            <text:p>187</text:p>
          </table:table-cell>
          <table:table-cell table:style-name="ce366" table:formula="of:=[.H95]*(50/61)*(1+(2*10^-4))" office:value-type="float" office:value="77.8844262295082" calcext:value-type="float">
            <text:p>78</text:p>
          </table:table-cell>
          <table:table-cell table:style-name="ce268" table:formula="of:=([.L95]-(([.C95]*0.7143)+([.D95]*0.5879)))" office:value-type="float" office:value="33.3509262295082" calcext:value-type="float">
            <text:p>33</text:p>
          </table:table-cell>
          <table:table-cell table:style-name="ce279" table:formula="of:=IF([.G95]&lt;=0;0;[.F95]/[.G95])" office:value-type="float" office:value="2.2" calcext:value-type="float">
            <text:p>2.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59" calcext:value-type="float">
            <text:p>59</text:p>
          </table:table-cell>
          <table:table-cell table:style-name="ce266" office:value-type="string" calcext:value-type="string">
            <text:p>Black Full</text:p>
          </table:table-cell>
          <table:table-cell table:style-name="ce288" office:value-type="float" office:value="50" calcext:value-type="float">
            <text:p>50</text:p>
          </table:table-cell>
          <table:table-cell table:style-name="ce288" office:value-type="float" office:value="5" calcext:value-type="float">
            <text:p>5</text:p>
          </table:table-cell>
          <table:table-cell table:style-name="ce288" office:value-type="float" office:value="33" calcext:value-type="float">
            <text:p>33</text:p>
          </table:table-cell>
          <table:table-cell table:style-name="ce288" office:value-type="float" office:value="35" calcext:value-type="float">
            <text:p>35</text:p>
          </table:table-cell>
          <table:table-cell table:style-name="ce288" office:value-type="float" office:value="45" calcext:value-type="float">
            <text:p>45</text:p>
          </table:table-cell>
          <table:table-cell table:style-name="ce288" office:value-type="float" office:value="140" calcext:value-type="float">
            <text:p>140</text:p>
          </table:table-cell>
          <table:table-cell table:style-name="ce338" table:formula="of:=([.C96]/20.05)+([.D96]/12.15)+([.E96]/23)" office:value-type="float" office:value="4.34007082847542" calcext:value-type="float">
            <text:p>4.3</text:p>
          </table:table-cell>
          <table:table-cell table:style-name="ce349" table:formula="of:=([.H96]/61)+([.F96]/48)+([.G96]/35.45)" office:value-type="float" office:value="4.2936421458685" calcext:value-type="float">
            <text:p>4.3</text:p>
          </table:table-cell>
          <table:table-cell table:style-name="ce268" table:formula="of:=(([.C96]/20)+([.D96]/12.15))*50" office:value-type="float" office:value="145.576131687243" calcext:value-type="float">
            <text:p>146</text:p>
          </table:table-cell>
          <table:table-cell table:style-name="ce366" table:formula="of:=[.H96]*(50/61)*(1+(2*10^-4))" office:value-type="float" office:value="114.777049180328" calcext:value-type="float">
            <text:p>115</text:p>
          </table:table-cell>
          <table:table-cell table:style-name="ce268" table:formula="of:=([.L96]-(([.C96]*0.7143)+([.D96]*0.5879)))" office:value-type="float" office:value="76.1225491803279" calcext:value-type="float">
            <text:p>76</text:p>
          </table:table-cell>
          <table:table-cell table:style-name="ce279" table:formula="of:=IF([.G96]&lt;=0;0;[.F96]/[.G96])" office:value-type="float" office:value="0.777777777777778" calcext:value-type="float">
            <text:p>0.8</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0" calcext:value-type="float">
            <text:p>60</text:p>
          </table:table-cell>
          <table:table-cell table:style-name="ce266" office:value-type="string" calcext:value-type="string">
            <text:p>Black Balanced</text:p>
          </table:table-cell>
          <table:table-cell table:style-name="ce288" office:value-type="float" office:value="50" calcext:value-type="float">
            <text:p>50</text:p>
          </table:table-cell>
          <table:table-cell table:style-name="ce288" office:value-type="float" office:value="10" calcext:value-type="float">
            <text:p>10</text:p>
          </table:table-cell>
          <table:table-cell table:style-name="ce288" office:value-type="float" office:value="33" calcext:value-type="float">
            <text:p>33</text:p>
          </table:table-cell>
          <table:table-cell table:style-name="ce288" office:value-type="float" office:value="57" calcext:value-type="float">
            <text:p>57</text:p>
          </table:table-cell>
          <table:table-cell table:style-name="ce288" office:value-type="float" office:value="44" calcext:value-type="float">
            <text:p>44</text:p>
          </table:table-cell>
          <table:table-cell table:style-name="ce288" office:value-type="float" office:value="142" calcext:value-type="float">
            <text:p>142</text:p>
          </table:table-cell>
          <table:table-cell table:style-name="ce338" table:formula="of:=([.C97]/20.05)+([.D97]/12.15)+([.E97]/23)" office:value-type="float" office:value="4.75159346222028" calcext:value-type="float">
            <text:p>4.8</text:p>
          </table:table-cell>
          <table:table-cell table:style-name="ce349" table:formula="of:=([.H97]/61)+([.F97]/48)+([.G97]/35.45)" office:value-type="float" office:value="4.75655361973687" calcext:value-type="float">
            <text:p>4.8</text:p>
          </table:table-cell>
          <table:table-cell table:style-name="ce268" table:formula="of:=(([.C97]/20)+([.D97]/12.15))*50" office:value-type="float" office:value="166.152263374486" calcext:value-type="float">
            <text:p>166</text:p>
          </table:table-cell>
          <table:table-cell table:style-name="ce366" table:formula="of:=[.H97]*(50/61)*(1+(2*10^-4))" office:value-type="float" office:value="116.416721311475" calcext:value-type="float">
            <text:p>116</text:p>
          </table:table-cell>
          <table:table-cell table:style-name="ce268" table:formula="of:=([.L97]-(([.C97]*0.7143)+([.D97]*0.5879)))" office:value-type="float" office:value="74.8227213114754" calcext:value-type="float">
            <text:p>75</text:p>
          </table:table-cell>
          <table:table-cell table:style-name="ce279" table:formula="of:=IF([.G97]&lt;=0;0;[.F97]/[.G97])" office:value-type="float" office:value="1.29545454545455" calcext:value-type="float">
            <text:p>1.3</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1" calcext:value-type="float">
            <text:p>61</text:p>
          </table:table-cell>
          <table:table-cell table:style-name="ce266" office:value-type="string" calcext:value-type="string">
            <text:p>Black Dry</text:p>
          </table:table-cell>
          <table:table-cell table:style-name="ce288" office:value-type="float" office:value="50" calcext:value-type="float">
            <text:p>50</text:p>
          </table:table-cell>
          <table:table-cell table:style-name="ce288" office:value-type="float" office:value="15" calcext:value-type="float">
            <text:p>15</text:p>
          </table:table-cell>
          <table:table-cell table:style-name="ce288" office:value-type="float" office:value="33" calcext:value-type="float">
            <text:p>33</text:p>
          </table:table-cell>
          <table:table-cell table:style-name="ce288" office:value-type="float" office:value="84" calcext:value-type="float">
            <text:p>84</text:p>
          </table:table-cell>
          <table:table-cell table:style-name="ce288" office:value-type="float" office:value="39" calcext:value-type="float">
            <text:p>39</text:p>
          </table:table-cell>
          <table:table-cell table:style-name="ce288" office:value-type="float" office:value="145" calcext:value-type="float">
            <text:p>145</text:p>
          </table:table-cell>
          <table:table-cell table:style-name="ce338" table:formula="of:=([.C98]/20.05)+([.D98]/12.15)+([.E98]/23)" office:value-type="float" office:value="5.16311609596513" calcext:value-type="float">
            <text:p>5.2</text:p>
          </table:table-cell>
          <table:table-cell table:style-name="ce349" table:formula="of:=([.H98]/61)+([.F98]/48)+([.G98]/35.45)" office:value-type="float" office:value="5.22719022405142" calcext:value-type="float">
            <text:p>5.2</text:p>
          </table:table-cell>
          <table:table-cell table:style-name="ce268" table:formula="of:=(([.C98]/20)+([.D98]/12.15))*50" office:value-type="float" office:value="186.728395061728" calcext:value-type="float">
            <text:p>187</text:p>
          </table:table-cell>
          <table:table-cell table:style-name="ce366" table:formula="of:=[.H98]*(50/61)*(1+(2*10^-4))" office:value-type="float" office:value="118.876229508197" calcext:value-type="float">
            <text:p>119</text:p>
          </table:table-cell>
          <table:table-cell table:style-name="ce268" table:formula="of:=([.L98]-(([.C98]*0.7143)+([.D98]*0.5879)))" office:value-type="float" office:value="74.3427295081967" calcext:value-type="float">
            <text:p>74</text:p>
          </table:table-cell>
          <table:table-cell table:style-name="ce279" table:formula="of:=IF([.G98]&lt;=0;0;[.F98]/[.G98])" office:value-type="float" office:value="2.15384615384615" calcext:value-type="float">
            <text:p>2.2</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2" calcext:value-type="float">
            <text:p>62</text:p>
          </table:table-cell>
          <table:table-cell table:style-name="ce266" office:value-type="string" calcext:value-type="string">
            <text:p>PseudoBohPils</text:p>
          </table:table-cell>
          <table:table-cell table:style-name="ce288" office:value-type="float" office:value="20" calcext:value-type="float">
            <text:p>20</text:p>
          </table:table-cell>
          <table:table-cell table:style-name="ce288" office:value-type="float" office:value="0" calcext:value-type="float">
            <text:p>0</text:p>
          </table:table-cell>
          <table:table-cell table:style-name="ce288" office:value-type="float" office:value="8" calcext:value-type="float">
            <text:p>8</text:p>
          </table:table-cell>
          <table:table-cell table:style-name="ce288" office:value-type="float" office:value="15" calcext:value-type="float">
            <text:p>15</text:p>
          </table:table-cell>
          <table:table-cell table:style-name="ce288" office:value-type="float" office:value="35" calcext:value-type="float">
            <text:p>35</text:p>
          </table:table-cell>
          <table:table-cell table:style-name="ce288" office:value-type="float" office:value="0" calcext:value-type="float">
            <text:p>0</text:p>
          </table:table-cell>
          <table:table-cell table:style-name="ce338" table:formula="of:=([.C99]/20.05)+([.D99]/12.15)+([.E99]/23)" office:value-type="float" office:value="1.34533232137049" calcext:value-type="float">
            <text:p>1.3</text:p>
          </table:table-cell>
          <table:table-cell table:style-name="ce349" table:formula="of:=([.H99]/61)+([.F99]/48)+([.G99]/35.45)" office:value-type="float" office:value="1.29980606488011" calcext:value-type="float">
            <text:p>1.3</text:p>
          </table:table-cell>
          <table:table-cell table:style-name="ce268" table:formula="of:=(([.C99]/20)+([.D99]/12.15))*50" office:value-type="float" office:value="50" calcext:value-type="float">
            <text:p>50</text:p>
          </table:table-cell>
          <table:table-cell table:style-name="ce366" table:formula="of:=[.H99]*(50/61)*(1+(2*10^-4))" office:value-type="float" office:value="0" calcext:value-type="float">
            <text:p>0</text:p>
          </table:table-cell>
          <table:table-cell table:style-name="ce268" table:formula="of:=([.L99]-(([.C99]*0.7143)+([.D99]*0.5879)))" office:value-type="float" office:value="-14.286" calcext:value-type="float">
            <text:p>-14</text:p>
          </table:table-cell>
          <table:table-cell table:style-name="ce279" table:formula="of:=IF([.G99]&lt;=0;0;[.F99]/[.G99])" office:value-type="float" office:value="0.428571428571429" calcext:value-type="float">
            <text:p>0.4</text:p>
          </table:table-cell>
          <table:table-cell table:style-name="ce392" office:value-type="string" calcext:value-type="string" table:number-columns-spanned="5" table:number-rows-spanned="1">
            <text:p>keeps Ca, Cl, and SO4 low</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3" calcext:value-type="float">
            <text:p>63</text:p>
          </table:table-cell>
          <table:table-cell table:style-name="ce266" office:value-type="string" calcext:value-type="string">
            <text:p>Jever (boiled)</text:p>
          </table:table-cell>
          <table:table-cell table:style-name="ce288" office:value-type="float" office:value="46" calcext:value-type="float">
            <text:p>46</text:p>
          </table:table-cell>
          <table:table-cell table:style-name="ce288" office:value-type="float" office:value="5" calcext:value-type="float">
            <text:p>5</text:p>
          </table:table-cell>
          <table:table-cell table:style-name="ce288" office:value-type="float" office:value="15" calcext:value-type="float">
            <text:p>15</text:p>
          </table:table-cell>
          <table:table-cell table:style-name="ce288" office:value-type="float" office:value="75" calcext:value-type="float">
            <text:p>75</text:p>
          </table:table-cell>
          <table:table-cell table:style-name="ce288" office:value-type="float" office:value="30" calcext:value-type="float">
            <text:p>30</text:p>
          </table:table-cell>
          <table:table-cell table:style-name="ce288" office:value-type="float" office:value="60" calcext:value-type="float">
            <text:p>60</text:p>
          </table:table-cell>
          <table:table-cell table:style-name="ce338" table:formula="of:=([.C100]/20.05)+([.D100]/12.15)+([.E100]/23)" office:value-type="float" office:value="3.35796088594045" calcext:value-type="float">
            <text:p>3.4</text:p>
          </table:table-cell>
          <table:table-cell table:style-name="ce349" table:formula="of:=([.H100]/61)+([.F100]/48)+([.G100]/35.45)" office:value-type="float" office:value="3.39236889870286" calcext:value-type="float">
            <text:p>3.4</text:p>
          </table:table-cell>
          <table:table-cell table:style-name="ce268" table:formula="of:=(([.C100]/20)+([.D100]/12.15))*50" office:value-type="float" office:value="135.576131687243" calcext:value-type="float">
            <text:p>136</text:p>
          </table:table-cell>
          <table:table-cell table:style-name="ce366" table:formula="of:=[.H100]*(50/61)*(1+(2*10^-4))" office:value-type="float" office:value="49.1901639344262" calcext:value-type="float">
            <text:p>49</text:p>
          </table:table-cell>
          <table:table-cell table:style-name="ce268" table:formula="of:=([.L100]-(([.C100]*0.7143)+([.D100]*0.5879)))" office:value-type="float" office:value="13.3928639344262" calcext:value-type="float">
            <text:p>13</text:p>
          </table:table-cell>
          <table:table-cell table:style-name="ce279" table:formula="of:=IF([.G100]&lt;=0;0;[.F100]/[.G100])" office:value-type="float" office:value="2.5" calcext:value-type="float">
            <text:p>2.5</text:p>
          </table:table-cell>
          <table:table-cell table:style-name="ce392" office:value-type="string" calcext:value-type="string" table:number-columns-spanned="5" table:number-rows-spanned="1">
            <text:p>from Jever, Germany water company, after boil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4" calcext:value-type="float">
            <text:p>64</text:p>
          </table:table-cell>
          <table:table-cell table:style-name="ce266" office:value-type="string" calcext:value-type="string">
            <text:p>Wicklow Mtn</text:p>
          </table:table-cell>
          <table:table-cell table:style-name="ce288" office:value-type="float" office:value="18" calcext:value-type="float">
            <text:p>18</text:p>
          </table:table-cell>
          <table:table-cell table:style-name="ce288" office:value-type="float" office:value="2" calcext:value-type="float">
            <text:p>2</text:p>
          </table:table-cell>
          <table:table-cell table:style-name="ce288" office:value-type="float" office:value="13" calcext:value-type="float">
            <text:p>13</text:p>
          </table:table-cell>
          <table:table-cell table:style-name="ce288" office:value-type="float" office:value="22" calcext:value-type="float">
            <text:p>22</text:p>
          </table:table-cell>
          <table:table-cell table:style-name="ce288" office:value-type="float" office:value="20" calcext:value-type="float">
            <text:p>20</text:p>
          </table:table-cell>
          <table:table-cell table:style-name="ce288" office:value-type="float" office:value="35" calcext:value-type="float">
            <text:p>35</text:p>
          </table:table-cell>
          <table:table-cell table:style-name="ce338" table:formula="of:=([.C101]/20.05)+([.D101]/12.15)+([.E101]/23)" office:value-type="float" office:value="1.62758205577486" calcext:value-type="float">
            <text:p>1.6</text:p>
          </table:table-cell>
          <table:table-cell table:style-name="ce349" table:formula="of:=([.H101]/61)+([.F101]/48)+([.G101]/35.45)" office:value-type="float" office:value="1.59627871935382" calcext:value-type="float">
            <text:p>1.6</text:p>
          </table:table-cell>
          <table:table-cell table:style-name="ce268" table:formula="of:=(([.C101]/20)+([.D101]/12.15))*50" office:value-type="float" office:value="53.2304526748971" calcext:value-type="float">
            <text:p>53</text:p>
          </table:table-cell>
          <table:table-cell table:style-name="ce366" table:formula="of:=[.H101]*(50/61)*(1+(2*10^-4))" office:value-type="float" office:value="28.694262295082" calcext:value-type="float">
            <text:p>29</text:p>
          </table:table-cell>
          <table:table-cell table:style-name="ce268" table:formula="of:=([.L101]-(([.C101]*0.7143)+([.D101]*0.5879)))" office:value-type="float" office:value="14.661062295082" calcext:value-type="float">
            <text:p>15</text:p>
          </table:table-cell>
          <table:table-cell table:style-name="ce279" table:formula="of:=IF([.G101]&lt;=0;0;[.F101]/[.G101])" office:value-type="float" office:value="1.1" calcext:value-type="float">
            <text:p>1.1</text:p>
          </table:table-cell>
          <table:table-cell table:style-name="ce392" office:value-type="string" calcext:value-type="string" table:number-columns-spanned="5" table:number-rows-spanned="1">
            <text:p>Dublin water source used by Guinness</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5" calcext:value-type="float">
            <text:p>65</text:p>
          </table:table-cell>
          <table:table-cell table:style-name="ce266" office:value-type="string" calcext:value-type="string">
            <text:p>User Custom</text:p>
          </table:table-cell>
          <table:table-cell table:number-columns-repeated="6" table:style-name="ce288" office:value-type="float" office:value="0" calcext:value-type="float">
            <text:p>0</text:p>
          </table:table-cell>
          <table:table-cell table:style-name="ce338" table:formula="of:=([.C102]/20.05)+([.D102]/12.15)+([.E102]/23)" office:value-type="float" office:value="0" calcext:value-type="float">
            <text:p>0.0</text:p>
          </table:table-cell>
          <table:table-cell table:style-name="ce349" table:formula="of:=([.H102]/61)+([.F102]/48)+([.G102]/35.45)" office:value-type="float" office:value="0" calcext:value-type="float">
            <text:p>0.0</text:p>
          </table:table-cell>
          <table:table-cell table:style-name="ce268" table:formula="of:=(([.C102]/20)+([.D102]/12.15))*50" office:value-type="float" office:value="0" calcext:value-type="float">
            <text:p>0</text:p>
          </table:table-cell>
          <table:table-cell table:style-name="ce366" table:formula="of:=[.H102]*(50/61)*(1+(2*10^-4))" office:value-type="float" office:value="0" calcext:value-type="float">
            <text:p>0</text:p>
          </table:table-cell>
          <table:table-cell table:style-name="ce268" table:formula="of:=([.L102]-(([.C102]*0.7143)+([.D102]*0.5879)))" office:value-type="float" office:value="0" calcext:value-type="float">
            <text:p>0</text:p>
          </table:table-cell>
          <table:table-cell table:style-name="ce279" table:formula="of:=IF([.G102]&lt;=0;0;[.F102]/[.G102])" office:value-type="float" office:value="0" calcext:value-type="float">
            <text:p>0.0</text:p>
          </table:table-cell>
          <table:table-cell table:style-name="ce392"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08">
          <table:table-cell table:style-name="ce248" office:value-type="float" office:value="66" calcext:value-type="float">
            <text:p>66</text:p>
          </table:table-cell>
          <table:table-cell table:style-name="ce266" office:value-type="string" calcext:value-type="string">
            <text:p>Burton (boiled)</text:p>
          </table:table-cell>
          <table:table-cell table:style-name="ce288" office:value-type="float" office:value="255" calcext:value-type="float">
            <text:p>255</text:p>
          </table:table-cell>
          <table:table-cell table:style-name="ce288" office:value-type="float" office:value="40" calcext:value-type="float">
            <text:p>40</text:p>
          </table:table-cell>
          <table:table-cell table:style-name="ce288" office:value-type="float" office:value="25" calcext:value-type="float">
            <text:p>25</text:p>
          </table:table-cell>
          <table:table-cell table:style-name="ce288" office:value-type="float" office:value="610" calcext:value-type="float">
            <text:p>610</text:p>
          </table:table-cell>
          <table:table-cell table:style-name="ce288" office:value-type="float" office:value="35" calcext:value-type="float">
            <text:p>35</text:p>
          </table:table-cell>
          <table:table-cell table:style-name="ce288" office:value-type="float" office:value="210" calcext:value-type="float">
            <text:p>210</text:p>
          </table:table-cell>
          <table:table-cell table:style-name="ce338" table:formula="of:=([.C103]/20.05)+([.D103]/12.15)+([.E103]/23)" office:value-type="float" office:value="17.097342080476" calcext:value-type="float">
            <text:p>17.1</text:p>
          </table:table-cell>
          <table:table-cell table:style-name="ce349" table:formula="of:=([.H103]/61)+([.F103]/48)+([.G103]/35.45)" office:value-type="float" office:value="17.1382623490331" calcext:value-type="float">
            <text:p>17.1</text:p>
          </table:table-cell>
          <table:table-cell table:style-name="ce268" table:formula="of:=(([.C103]/20)+([.D103]/12.15))*50" office:value-type="float" office:value="802.109053497942" calcext:value-type="float">
            <text:p>802</text:p>
          </table:table-cell>
          <table:table-cell table:style-name="ce366" table:formula="of:=[.H103]*(50/61)*(1+(2*10^-4))" office:value-type="float" office:value="172.165573770492" calcext:value-type="float">
            <text:p>172</text:p>
          </table:table-cell>
          <table:table-cell table:style-name="ce268" table:formula="of:=([.L103]-(([.C103]*0.7143)+([.D103]*0.5879)))" office:value-type="float" office:value="-33.4969262295082" calcext:value-type="float">
            <text:p>-33</text:p>
          </table:table-cell>
          <table:table-cell table:style-name="ce279" table:formula="of:=IF([.G103]&lt;=0;0;[.F103]/[.G103])" office:value-type="float" office:value="17.4285714285714" calcext:value-type="float">
            <text:p>17.4</text:p>
          </table:table-cell>
          <table:table-cell table:style-name="ce392" office:value-type="string" calcext:value-type="string" table:number-columns-spanned="5" table:number-rows-spanned="1">
            <text:p>resulting profile after boiling and decanting</text:p>
          </table:table-cell>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16">
          <table:table-cell table:style-name="ce248"/>
          <table:table-cell table:style-name="ce248" office:value-type="string" calcext:value-type="string">
            <text:p>When inputing Custom water profiles, make sure the cation and anion columns are green indicating that they are balanced. <text:s/>Adjust the various ion concentrations to achieve balance.</text:p>
          </table:table-cell>
          <table:table-cell table:style-name="ce248" table:number-columns-repeated="12"/>
          <table:table-cell table:style-name="ce393"/>
          <table:table-cell table:style-name="ce123" table:number-columns-repeated="4"/>
          <table:table-cell table:style-name="ce408"/>
          <table:table-cell table:style-name="ce96" table:number-columns-repeated="32"/>
          <table:table-cell table:style-name="ce123" table:number-columns-repeated="4"/>
          <table:table-cell table:number-columns-repeated="8"/>
        </table:table-row>
        <table:table-row table:style-name="ro116">
          <table:table-cell table:style-name="ce248" table:number-columns-repeated="14"/>
          <table:table-cell table:style-name="ce393"/>
          <table:table-cell table:style-name="ce123" table:number-columns-repeated="4"/>
          <table:table-cell table:style-name="ce408"/>
          <table:table-cell table:style-name="ce96" table:number-columns-repeated="32"/>
          <table:table-cell table:style-name="ce123" table:number-columns-repeated="4"/>
          <table:table-cell table:number-columns-repeated="8"/>
        </table:table-row>
        <table:table-row table:style-name="ro116">
          <table:table-cell table:style-name="ce248"/>
          <table:table-cell table:style-name="ce248" office:value-type="string" calcext:value-type="string">
            <text:p>Dilution Water Profiles</text:p>
          </table:table-cell>
          <table:table-cell table:style-name="ce248" table:number-columns-repeated="12"/>
          <table:table-cell table:style-name="ce393"/>
          <table:table-cell table:style-name="ce123" table:number-columns-repeated="4"/>
          <table:table-cell table:style-name="ce408"/>
          <table:table-cell table:style-name="ce96" table:number-columns-repeated="32"/>
          <table:table-cell table:style-name="ce123" table:number-columns-repeated="4"/>
          <table:table-cell table:number-columns-repeated="8"/>
        </table:table-row>
        <table:table-row table:style-name="ro116">
          <table:table-cell table:style-name="ce248"/>
          <table:table-cell table:style-name="ce767" office:value-type="string" calcext:value-type="string">
            <text:p>Water Profile</text:p>
          </table:table-cell>
          <table:table-cell table:style-name="ce767" office:value-type="string" calcext:value-type="string">
            <text:p>Calcium <text:s text:c="5"/>(ppm)</text:p>
          </table:table-cell>
          <table:table-cell table:style-name="ce767" office:value-type="string" calcext:value-type="string">
            <text:p>Magnesium (ppm)</text:p>
          </table:table-cell>
          <table:table-cell table:style-name="ce767" office:value-type="string" calcext:value-type="string">
            <text:p>Sodium <text:s text:c="7"/>(ppm)</text:p>
          </table:table-cell>
          <table:table-cell table:style-name="ce767" office:value-type="string" calcext:value-type="string">
            <text:p>Sulfate <text:s text:c="7"/>(ppm)</text:p>
          </table:table-cell>
          <table:table-cell table:style-name="ce767" office:value-type="string" calcext:value-type="string">
            <text:p>Chloride <text:s text:c="5"/>(ppm)</text:p>
          </table:table-cell>
          <table:table-cell table:style-name="ce767" office:value-type="string" calcext:value-type="string">
            <text:p>Bicarbonate (ppm)</text:p>
          </table:table-cell>
          <table:table-cell table:style-name="ce767" office:value-type="string" calcext:value-type="string">
            <text:p>Cations (meq/L)</text:p>
          </table:table-cell>
          <table:table-cell table:style-name="ce767" office:value-type="string" calcext:value-type="string">
            <text:p>Anions (meq/L)</text:p>
          </table:table-cell>
          <table:table-cell table:style-name="ce359" office:value-type="string" calcext:value-type="string">
            <text:p>Total Hardness</text:p>
          </table:table-cell>
          <table:table-cell table:style-name="ce767" office:value-type="string" calcext:value-type="string">
            <text:p>Alkalinity</text:p>
          </table:table-cell>
          <table:table-cell table:style-name="ce767" office:value-type="string" calcext:value-type="string">
            <text:p>RA</text:p>
          </table:table-cell>
          <table:table-cell table:style-name="ce771" office:value-type="string" calcext:value-type="string">
            <text:p><text:span text:style-name="T387">SO</text:span><text:span text:style-name="T396">4</text:span><text:span text:style-name="T397">/Cl Ratio</text:span></text:p>
          </table:table-cell>
          <table:table-cell table:style-name="ce394"/>
          <table:table-cell table:style-name="ce123"/>
          <table:table-cell table:style-name="ce96"/>
          <table:table-cell table:style-name="ce123" table:number-columns-repeated="2"/>
          <table:table-cell table:style-name="ce408"/>
          <table:table-cell table:style-name="ce96" table:number-columns-repeated="32"/>
          <table:table-cell table:style-name="ce123" table:number-columns-repeated="4"/>
          <table:table-cell table:number-columns-repeated="8"/>
        </table:table-row>
        <table:table-row table:style-name="ro110">
          <table:table-cell table:style-name="ce248" office:value-type="float" office:value="1" calcext:value-type="float">
            <text:p>1</text:p>
          </table:table-cell>
          <table:table-cell table:style-name="ce266" office:value-type="string" calcext:value-type="string">
            <text:p>Distilled Water</text:p>
          </table:table-cell>
          <table:table-cell table:number-columns-repeated="6" table:style-name="ce266" office:value-type="float" office:value="0" calcext:value-type="float">
            <text:p>0</text:p>
          </table:table-cell>
          <table:table-cell table:style-name="ce338" table:formula="of:=([.C108]/20.05)+([.D108]/12.15)+([.E108]/23)" office:value-type="float" office:value="0" calcext:value-type="float">
            <text:p>0.0</text:p>
          </table:table-cell>
          <table:table-cell table:style-name="ce349" table:formula="of:=([.H108]/61)+([.F108]/48)+([.G108]/35.45)" office:value-type="float" office:value="0" calcext:value-type="float">
            <text:p>0.0</text:p>
          </table:table-cell>
          <table:table-cell table:style-name="ce268" table:formula="of:=(([.C108]/20)+([.D108]/12.15))*50" office:value-type="float" office:value="0" calcext:value-type="float">
            <text:p>0</text:p>
          </table:table-cell>
          <table:table-cell table:style-name="ce366" table:formula="of:=[.H108]*(50/61)*(1+(2*10^-4))" office:value-type="float" office:value="0" calcext:value-type="float">
            <text:p>0</text:p>
          </table:table-cell>
          <table:table-cell table:style-name="ce268" table:formula="of:=([.L108]-(([.C108]*0.7143)+([.D108]*0.5879)))" office:value-type="float" office:value="0" calcext:value-type="float">
            <text:p>0</text:p>
          </table:table-cell>
          <table:table-cell table:style-name="ce279" table:formula="of:=IF([.F108]&lt;=0;0;[.F108]/[.G108])" office:value-type="float" office:value="0" calcext:value-type="float">
            <text:p>0.0</text:p>
          </table:table-cell>
          <table:table-cell table:style-name="ce395" table:number-columns-spanned="5" table:number-rows-spanned="1"/>
          <table:covered-table-cell table:number-columns-repeated="3" table:style-name="ce21"/>
          <table:covered-table-cell table:style-name="ce19"/>
          <table:table-cell table:style-name="ce408"/>
          <table:table-cell table:style-name="ce96" table:number-columns-repeated="32"/>
          <table:table-cell table:style-name="ce123" table:number-columns-repeated="4"/>
          <table:table-cell table:number-columns-repeated="8"/>
        </table:table-row>
        <table:table-row table:style-name="ro110">
          <table:table-cell table:style-name="ce248" office:value-type="float" office:value="2" calcext:value-type="float">
            <text:p>2</text:p>
          </table:table-cell>
          <table:table-cell table:style-name="ce266" office:value-type="string" calcext:value-type="string">
            <text:p>RO Water</text:p>
          </table:table-cell>
          <table:table-cell table:style-name="ce266" office:value-type="float" office:value="1" calcext:value-type="float">
            <text:p>1</text:p>
          </table:table-cell>
          <table:table-cell table:style-name="ce266" office:value-type="float" office:value="0" calcext:value-type="float">
            <text:p>0</text:p>
          </table:table-cell>
          <table:table-cell table:style-name="ce266" office:value-type="float" office:value="8" calcext:value-type="float">
            <text:p>8</text:p>
          </table:table-cell>
          <table:table-cell table:style-name="ce266" office:value-type="float" office:value="1" calcext:value-type="float">
            <text:p>1</text:p>
          </table:table-cell>
          <table:table-cell table:style-name="ce266" office:value-type="float" office:value="4" calcext:value-type="float">
            <text:p>4</text:p>
          </table:table-cell>
          <table:table-cell table:style-name="ce266" office:value-type="float" office:value="16" calcext:value-type="float">
            <text:p>16</text:p>
          </table:table-cell>
          <table:table-cell table:style-name="ce338" table:formula="of:=([.C109]/20.05)+([.D109]/12.15)+([.E109]/23)" office:value-type="float" office:value="0.39770139867722" calcext:value-type="float">
            <text:p>0.4</text:p>
          </table:table-cell>
          <table:table-cell table:style-name="ce349" table:formula="of:=([.H109]/61)+([.F109]/48)+([.G109]/35.45)" office:value-type="float" office:value="0.395963394143988" calcext:value-type="float">
            <text:p>0.4</text:p>
          </table:table-cell>
          <table:table-cell table:style-name="ce268" table:formula="of:=(([.C109]/20)+([.D109]/12.15))*50" office:value-type="float" office:value="2.5" calcext:value-type="float">
            <text:p>3</text:p>
          </table:table-cell>
          <table:table-cell table:style-name="ce366" table:formula="of:=[.H109]*(50/61)*(1+(2*10^-4))" office:value-type="float" office:value="13.1173770491803" calcext:value-type="float">
            <text:p>13</text:p>
          </table:table-cell>
          <table:table-cell table:style-name="ce268" table:formula="of:=([.L109]-(([.C109]*0.7143)+([.D109]*0.5879)))" office:value-type="float" office:value="12.4030770491803" calcext:value-type="float">
            <text:p>12</text:p>
          </table:table-cell>
          <table:table-cell table:style-name="ce279" table:formula="of:=IF([.F109]&lt;=0;0;[.F109]/[.G109])" office:value-type="float" office:value="0.25" calcext:value-type="float">
            <text:p>0.3</text:p>
          </table:table-cell>
          <table:table-cell table:style-name="ce395" table:number-columns-spanned="5" table:number-rows-spanned="1"/>
          <table:covered-table-cell table:number-columns-repeated="3" table:style-name="ce21"/>
          <table:covered-table-cell table:style-name="ce19"/>
          <table:table-cell table:style-name="ce96" table:number-columns-repeated="33"/>
          <table:table-cell table:style-name="ce123" table:number-columns-repeated="4"/>
          <table:table-cell table:number-columns-repeated="8"/>
        </table:table-row>
        <table:table-row table:style-name="ro116" table:number-rows-repeated="2">
          <table:table-cell table:style-name="ce248" table:number-columns-repeated="14"/>
          <table:table-cell table:style-name="ce123" table:number-columns-repeated="5"/>
          <table:table-cell table:style-name="ce96" table:number-columns-repeated="33"/>
          <table:table-cell table:style-name="ce123" table:number-columns-repeated="4"/>
          <table:table-cell table:number-columns-repeated="8"/>
        </table:table-row>
        <table:table-row table:style-name="ro102">
          <table:table-cell table:style-name="ce248" table:number-columns-repeated="14"/>
          <table:table-cell table:style-name="ce123" table:number-columns-repeated="5"/>
          <table:table-cell table:style-name="ce96"/>
          <table:table-cell table:style-name="ce121"/>
          <table:table-cell table:style-name="ce133"/>
          <table:table-cell table:style-name="ce96" table:number-columns-repeated="30"/>
          <table:table-cell table:style-name="ce123" table:number-columns-repeated="4"/>
          <table:table-cell table:number-columns-repeated="8"/>
        </table:table-row>
        <table:table-row table:style-name="ro102">
          <table:table-cell table:style-name="ce248" table:number-columns-repeated="14"/>
          <table:table-cell table:style-name="ce123" table:number-columns-repeated="5"/>
          <table:table-cell table:style-name="ce96" table:number-columns-repeated="33"/>
          <table:table-cell table:style-name="ce123" table:number-columns-repeated="4"/>
          <table:table-cell table:number-columns-repeated="8"/>
        </table:table-row>
        <table:table-row table:style-name="ro116" table:number-rows-repeated="887">
          <table:table-cell table:style-name="ce248" table:number-columns-repeated="17"/>
          <table:table-cell table:style-name="ce123" table:number-columns-repeated="2"/>
          <table:table-cell table:style-name="ce96" table:number-columns-repeated="33"/>
          <table:table-cell table:style-name="ce123" table:number-columns-repeated="4"/>
          <table:table-cell table:number-columns-repeated="8"/>
        </table:table-row>
        <table:table-row table:style-name="ro103" table:number-rows-repeated="1047575">
          <table:table-cell table:number-columns-repeated="64"/>
        </table:table-row>
        <table:table-row table:style-name="ro103">
          <table:table-cell table:number-columns-repeated="64"/>
        </table:table-row>
        <calcext:conditional-formats>
          <calcext:conditional-format calcext:target-range-address="'4. Water Adjustment'.I38:'4. Water Adjustment'.I103 '4. Water Adjustment'.I108:'4. Water Adjustment'.I109">
            <calcext:condition calcext:apply-style-name="ConditionalStyle_4" calcext:value="formula-is(ABS([.I38]-[.J38])&lt;0.1)" calcext:base-cell-address="'4. Water Adjustment'.I38"/>
          </calcext:conditional-format>
          <calcext:conditional-format calcext:target-range-address="'4. Water Adjustment'.J38:'4. Water Adjustment'.J103 '4. Water Adjustment'.J108:'4. Water Adjustment'.J109">
            <calcext:condition calcext:apply-style-name="ConditionalStyle_4" calcext:value="formula-is(ABS([.I38]-[.J38])&lt;0.1)" calcext:base-cell-address="'4. Water Adjustment'.J38"/>
          </calcext:conditional-format>
          <calcext:conditional-format calcext:target-range-address="'4. Water Adjustment'.B16:'4. Water Adjustment'.B16">
            <calcext:condition calcext:apply-style-name="ConditionalStyle_6" calcext:value="formula-is([.B16]&lt;5.15)" calcext:base-cell-address="'4. Water Adjustment'.B16"/>
          </calcext:conditional-format>
          <calcext:conditional-format calcext:target-range-address="'4. Water Adjustment'.B16:'4. Water Adjustment'.B16">
            <calcext:condition calcext:apply-style-name="ConditionalStyle_6" calcext:value="formula-is([.B16]&gt;5.75)" calcext:base-cell-address="'4. Water Adjustment'.B16"/>
          </calcext:conditional-format>
          <calcext:conditional-format calcext:target-range-address="'4. Water Adjustment'.B16:'4. Water Adjustment'.B16">
            <calcext:condition calcext:apply-style-name="ConditionalStyle_1" calcext:value="formula-is([.B16]&gt;5.55)" calcext:base-cell-address="'4. Water Adjustment'.B16"/>
          </calcext:conditional-format>
          <calcext:conditional-format calcext:target-range-address="'4. Water Adjustment'.B16:'4. Water Adjustment'.B16">
            <calcext:condition calcext:apply-style-name="ConditionalStyle_1" calcext:value="formula-is([.B16]&lt;5.25)" calcext:base-cell-address="'4. Water Adjustment'.B16"/>
          </calcext:conditional-format>
        </calcext:conditional-formats>
      </table:table>
      <table:table table:name="5. Adjustment Summary" table:style-name="ta6">
        <table:table-column table:style-name="co25" table:default-cell-style-name="Default"/>
        <table:table-column table:style-name="co2" table:default-cell-style-name="Default"/>
        <table:table-column table:style-name="co26" table:default-cell-style-name="Default"/>
        <table:table-column table:style-name="co27" table:number-columns-repeated="6" table:default-cell-style-name="Default"/>
        <table:table-column table:style-name="co28" table:default-cell-style-name="Default"/>
        <table:table-column table:style-name="co28" table:visibility="collapse" table:number-columns-repeated="16" table:default-cell-style-name="Default"/>
        <table:table-column table:style-name="co28" table:default-cell-style-name="Default"/>
        <table:table-column table:style-name="co24" table:number-columns-repeated="10" table:default-cell-style-name="Default"/>
        <table:table-column table:style-name="co1" table:number-columns-repeated="27" table:default-cell-style-name="Default"/>
        <table:table-row table:style-name="ro64">
          <table:table-cell table:style-name="ce416" office:value-type="string" calcext:value-type="string" table:number-columns-spanned="3" table:number-rows-spanned="1">
            <text:p>Bru'n Water </text:p>
          </table:table-cell>
          <table:covered-table-cell table:number-columns-repeated="2" table:style-name="ce22"/>
          <table:table-cell table:style-name="ce457" office:value-type="string" calcext:value-type="string" table:number-columns-spanned="6" table:number-rows-spanned="1">
            <text:p><text:a xlink:href="https://sites.google.com/site/brunwater/home/files" xlink:type="simple">Link to Bru'n Water website for updates and to donate</text:a></text:p>
          </table:table-cell>
          <table:covered-table-cell table:number-columns-repeated="5"/>
          <table:table-cell table:style-name="ce31" table:number-columns-repeated="28"/>
          <table:table-cell table:number-columns-repeated="27"/>
        </table:table-row>
        <table:table-row table:style-name="ro102">
          <table:table-cell table:style-name="ce417" table:number-columns-spanned="2" table:number-rows-spanned="1"/>
          <table:covered-table-cell/>
          <table:table-cell table:style-name="ce446" table:number-columns-spanned="7" table:number-rows-spanned="1"/>
          <table:covered-table-cell table:number-columns-repeated="6"/>
          <table:table-cell table:style-name="ce31" table:number-columns-repeated="28"/>
          <table:table-cell table:number-columns-repeated="27"/>
        </table:table-row>
        <table:table-row table:style-name="ro13">
          <table:table-cell table:style-name="ce418" office:value-type="string" calcext:value-type="string" table:number-columns-spanned="4" table:number-rows-spanned="1">
            <office:annotation draw:style-name="gr65" draw:text-style-name="P2" svg:width="9.294cm" svg:height="3.439cm" svg:x="3.617cm" svg:y="2.937cm" draw:caption-point-x="6.256cm" draw:caption-point-y="-1.314cm">
              <dc:date>2021-02-12T00:00:00</dc:date>
              <text:p text:style-name="P1"><text:span text:style-name="T1">======</text:span></text:p>
              <text:p text:style-name="P1"><text:span text:style-name="T1">ID#AAAAH1AC7pk</text:span></text:p>
              <text:p text:style-name="P1"><text:span text:style-name="T1">martin.brungard <text:s text:c="3"/>(2021-02-12 10:36:59)</text:span></text:p>
              <text:p text:style-name="P1"><text:span text:style-name="T1">This sheet compiles all the water adjustment information onto a single sheet for easy reference and printing.</text:span></text:p>
            </office:annotation>
            <text:p>Water Adjustment Summary</text:p>
          </table:table-cell>
          <table:covered-table-cell table:number-columns-repeated="3" table:style-name="ce940"/>
          <table:table-cell table:style-name="ce476" office:value-type="string" calcext:value-type="string" table:number-columns-spanned="5" table:number-rows-spanned="1">
            <text:p><text:s/>Hover cursor over cells w/ red corner marks to display helpful information</text:p>
          </table:table-cell>
          <table:covered-table-cell table:number-columns-repeated="4"/>
          <table:table-cell table:style-name="ce31" table:number-columns-repeated="28"/>
          <table:table-cell table:number-columns-repeated="27"/>
        </table:table-row>
        <table:table-row table:style-name="ro64">
          <table:table-cell table:style-name="ce419" table:formula="of:=[$'4. Water Adjustment'.$A$5]" office:value-type="string" office:string-value="Yellow Dry" calcext:value-type="string">
            <text:p>Yellow Dry</text:p>
          </table:table-cell>
          <table:table-cell table:style-name="ce437"/>
          <table:table-cell table:style-name="ce447"/>
          <table:table-cell table:style-name="ce458" office:value-type="string" calcext:value-type="string">
            <text:p>Calcium (ppm)</text:p>
          </table:table-cell>
          <table:table-cell table:style-name="ce458" office:value-type="string" calcext:value-type="string">
            <text:p>Magnesium (ppm)</text:p>
          </table:table-cell>
          <table:table-cell table:style-name="ce458" office:value-type="string" calcext:value-type="string">
            <text:p>Sodium (ppm)</text:p>
          </table:table-cell>
          <table:table-cell table:style-name="ce458" office:value-type="string" calcext:value-type="string">
            <text:p>Sulfate (ppm)</text:p>
          </table:table-cell>
          <table:table-cell table:style-name="ce458" office:value-type="string" calcext:value-type="string">
            <text:p>Chloride (ppm)</text:p>
          </table:table-cell>
          <table:table-cell table:style-name="ce498" office:value-type="string" calcext:value-type="string">
            <text:p>Bicarbonate (ppm)</text:p>
          </table:table-cell>
          <table:table-cell table:style-name="ce31" table:number-columns-repeated="28"/>
          <table:table-cell table:number-columns-repeated="27"/>
        </table:table-row>
        <table:table-row table:style-name="ro117">
          <table:table-cell table:style-name="ce420" office:value-type="string" calcext:value-type="string" table:number-columns-spanned="3" table:number-rows-spanned="1">
            <office:annotation draw:style-name="gr66" draw:text-style-name="P2" svg:width="9.294cm" svg:height="2.777cm" svg:x="3.617cm" svg:y="4.71cm" draw:caption-point-x="3.624cm" draw:caption-point-y="-0.864cm">
              <dc:date>2021-02-12T00:00:00</dc:date>
              <text:p text:style-name="P1"><text:span text:style-name="T1">======</text:span></text:p>
              <text:p text:style-name="P1"><text:span text:style-name="T1">ID#AAAAH1AC7pc</text:span></text:p>
              <text:p text:style-name="P1"><text:span text:style-name="T1">martin.brungard <text:s text:c="3"/>(2021-02-12 10:36:59)</text:span></text:p>
              <text:p text:style-name="P1"><text:span text:style-name="T1">This is the profile of the tap water. This information is taken from the water profile entered on the Water Report Input sheet.</text:span></text:p>
            </office:annotation>
            <text:p>Existing Water Profile</text:p>
          </table:table-cell>
          <table:covered-table-cell table:style-name="ce21"/>
          <table:covered-table-cell table:style-name="ce19"/>
          <table:table-cell table:style-name="ce459" table:formula="of:=[$'4. Water Adjustment'.C6]" office:value-type="float" office:value="0" calcext:value-type="float">
            <text:p>0</text:p>
          </table:table-cell>
          <table:table-cell table:style-name="ce459" table:formula="of:=[$'4. Water Adjustment'.D6]" office:value-type="float" office:value="0" calcext:value-type="float">
            <text:p>0</text:p>
          </table:table-cell>
          <table:table-cell table:style-name="ce459" table:formula="of:=[$'4. Water Adjustment'.E6]" office:value-type="float" office:value="0" calcext:value-type="float">
            <text:p>0</text:p>
          </table:table-cell>
          <table:table-cell table:style-name="ce459" table:formula="of:=[$'4. Water Adjustment'.F6]" office:value-type="float" office:value="0" calcext:value-type="float">
            <text:p>0</text:p>
          </table:table-cell>
          <table:table-cell table:style-name="ce459" table:formula="of:=[$'4. Water Adjustment'.G6]" office:value-type="float" office:value="0" calcext:value-type="float">
            <text:p>0</text:p>
          </table:table-cell>
          <table:table-cell table:style-name="ce499" table:formula="of:=[$'4. Water Adjustment'.H6]" office:value-type="float" office:value="0" calcext:value-type="float">
            <text:p>0</text:p>
          </table:table-cell>
          <table:table-cell table:style-name="ce31" table:number-columns-repeated="28"/>
          <table:table-cell table:number-columns-repeated="27"/>
        </table:table-row>
        <table:table-row table:style-name="ro117">
          <table:table-cell table:style-name="ce420" office:value-type="string" calcext:value-type="string" table:number-columns-spanned="3" table:number-rows-spanned="1">
            <office:annotation draw:style-name="gr67" draw:text-style-name="P2" svg:width="9.294cm" svg:height="2.725cm" svg:x="3.617cm" svg:y="5.318cm" draw:caption-point-x="3.624cm" draw:caption-point-y="-0.863cm">
              <dc:date>2021-02-12T00:00:00</dc:date>
              <text:p text:style-name="P1"><text:span text:style-name="T1">======</text:span></text:p>
              <text:p text:style-name="P1"><text:span text:style-name="T1">ID#AAAAH1AC7qQ</text:span></text:p>
              <text:p text:style-name="P1"><text:span text:style-name="T1">martin.brungard <text:s text:c="3"/>(2021-02-12 10:36:59)</text:span></text:p>
              <text:p text:style-name="P1"><text:span text:style-name="T1">This is the water profile in the mash tun. This information is taken from the water profile developed on the Water Adjustment sheet.</text:span></text:p>
            </office:annotation>
            <text:p>Mashing Water Profile</text:p>
          </table:table-cell>
          <table:covered-table-cell table:style-name="ce21"/>
          <table:covered-table-cell table:style-name="ce19"/>
          <table:table-cell table:style-name="ce459" table:formula="of:=[$'4. Water Adjustment'.C13]" office:value-type="float" office:value="0" calcext:value-type="float">
            <text:p>0</text:p>
          </table:table-cell>
          <table:table-cell table:style-name="ce459" table:formula="of:=[$'4. Water Adjustment'.D13]" office:value-type="float" office:value="0" calcext:value-type="float">
            <text:p>0</text:p>
          </table:table-cell>
          <table:table-cell table:style-name="ce459" table:formula="of:=[$'4. Water Adjustment'.E13]" office:value-type="float" office:value="0" calcext:value-type="float">
            <text:p>0</text:p>
          </table:table-cell>
          <table:table-cell table:style-name="ce459" table:formula="of:=[$'4. Water Adjustment'.F13]" office:value-type="float" office:value="0" calcext:value-type="float">
            <text:p>0</text:p>
          </table:table-cell>
          <table:table-cell table:style-name="ce459" table:formula="of:=[$'4. Water Adjustment'.G13]" office:value-type="float" office:value="0" calcext:value-type="float">
            <text:p>0</text:p>
          </table:table-cell>
          <table:table-cell table:style-name="ce499" table:formula="of:=[$'4. Water Adjustment'.H13]" office:value-type="string" office:string-value="" calcext:value-type="error">
            <text:p>Err:522</text:p>
          </table:table-cell>
          <table:table-cell table:style-name="ce31" table:number-columns-repeated="28"/>
          <table:table-cell table:number-columns-repeated="27"/>
        </table:table-row>
        <table:table-row table:style-name="ro117">
          <table:table-cell table:style-name="ce421" office:value-type="string" calcext:value-type="string" table:number-columns-spanned="3" table:number-rows-spanned="1">
            <office:annotation draw:style-name="gr67" draw:text-style-name="P2" svg:width="9.294cm" svg:height="2.725cm" svg:x="3.617cm" svg:y="5.927cm" draw:caption-point-x="3.624cm" draw:caption-point-y="-0.864cm">
              <dc:date>2021-02-12T00:00:00</dc:date>
              <text:p text:style-name="P1"><text:span text:style-name="T1">======</text:span></text:p>
              <text:p text:style-name="P1"><text:span text:style-name="T1">ID#AAAAH1AC7ng</text:span></text:p>
              <text:p text:style-name="P1"><text:span text:style-name="T1">martin.brungard <text:s text:c="3"/>(2021-02-12 10:36:59)</text:span></text:p>
              <text:p text:style-name="P1"><text:span text:style-name="T1">These ion ranges are provided for quick comparison with the Mashing or Finished Water Profiles.</text:span></text:p>
            </office:annotation>
            <text:p>Recommended Ranges</text:p>
          </table:table-cell>
          <table:covered-table-cell table:style-name="ce438"/>
          <table:covered-table-cell table:style-name="ce441"/>
          <table:table-cell table:style-name="ce460" office:value-type="string" calcext:value-type="string">
            <text:p>40 to 150</text:p>
          </table:table-cell>
          <table:table-cell table:style-name="ce477" office:value-type="string" calcext:value-type="string">
            <text:p>0 to 30</text:p>
          </table:table-cell>
          <table:table-cell table:style-name="ce460" office:value-type="string" calcext:value-type="string">
            <text:p>0 to 150</text:p>
          </table:table-cell>
          <table:table-cell table:style-name="ce460" office:value-type="string" calcext:value-type="string">
            <text:p>0 to 350</text:p>
          </table:table-cell>
          <table:table-cell table:style-name="ce460" office:value-type="string" calcext:value-type="string">
            <text:p>0 to 100</text:p>
          </table:table-cell>
          <table:table-cell table:style-name="ce500" office:value-type="string" calcext:value-type="string">
            <text:p>as needed</text:p>
          </table:table-cell>
          <table:table-cell table:style-name="ce53" table:number-columns-repeated="19"/>
          <table:table-cell table:style-name="ce31" table:number-columns-repeated="9"/>
          <table:table-cell table:number-columns-repeated="27"/>
        </table:table-row>
        <table:table-row table:style-name="ro117">
          <table:table-cell table:style-name="ce79" table:number-columns-repeated="3"/>
          <table:table-cell table:style-name="ce461"/>
          <table:table-cell table:style-name="ce156"/>
          <table:table-cell table:style-name="ce461" table:number-columns-repeated="4"/>
          <table:table-cell table:style-name="ce53" table:number-columns-repeated="19"/>
          <table:table-cell table:style-name="ce31" table:number-columns-repeated="9"/>
          <table:table-cell table:number-columns-repeated="27"/>
        </table:table-row>
        <table:table-row table:style-name="ro105">
          <table:table-cell table:style-name="ce422" office:value-type="string" calcext:value-type="string" table:number-columns-spanned="3" table:number-rows-spanned="1">
            <text:p>Mash Parameters</text:p>
          </table:table-cell>
          <table:covered-table-cell table:number-columns-repeated="2" table:style-name="ce439"/>
          <table:table-cell table:style-name="ce462" table:number-columns-repeated="5"/>
          <table:table-cell table:style-name="ce501"/>
          <table:table-cell table:style-name="ce53" table:number-columns-repeated="19"/>
          <table:table-cell table:style-name="ce31" table:number-columns-repeated="9"/>
          <table:table-cell table:number-columns-repeated="27"/>
        </table:table-row>
        <table:table-row table:style-name="ro105">
          <table:table-cell table:style-name="ce423" table:formula="of:=[.N22]" office:value-type="string" office:string-value="Batch Volume (gallons)" calcext:value-type="string" table:number-columns-spanned="2" table:number-rows-spanned="1">
            <text:p>Batch Volume (gallons)</text:p>
          </table:table-cell>
          <table:covered-table-cell table:style-name="ce440"/>
          <table:table-cell table:style-name="ce448" table:formula="of:=[$'4. Water Adjustment'.V17]" office:value-type="float" office:value="5" calcext:value-type="float">
            <office:annotation draw:style-name="gr30" draw:text-style-name="P2" svg:width="10.527cm" svg:height="2.752cm" svg:x="7.648cm" svg:y="7.646cm" draw:caption-point-x="-0.407cm" draw:caption-point-y="-0.81cm">
              <dc:date>2021-02-12T00:00:00</dc:date>
              <text:p text:style-name="P1"><text:span text:style-name="T1">======</text:span></text:p>
              <text:p text:style-name="P1"><text:span text:style-name="T1">ID#AAAAH1AC7nY</text:span></text:p>
              <text:p text:style-name="P1"><text:span text:style-name="T1">martin.brungard <text:s text:c="3"/>(2021-02-12 10:36:59)</text:span></text:p>
              <text:p text:style-name="P1"><text:span text:style-name="T1">This information is entered on the Mash Acidification sheet.</text:span></text:p>
            </office:annotation>
            <text:p>5.0</text:p>
          </table:table-cell>
          <table:table-cell table:style-name="ce463" office:value-type="string" calcext:value-type="string" table:number-columns-spanned="2" table:number-rows-spanned="1">
            <text:p><text:span text:style-name="T411">Hardness (ppm as CaCO</text:span><text:span text:style-name="T412">3</text:span><text:span text:style-name="T413">)</text:span></text:p>
          </table:table-cell>
          <table:covered-table-cell table:style-name="ce440"/>
          <table:table-cell table:style-name="ce481" table:formula="of:=(([$'4. Water Adjustment'.C13]/20)+([$'4. Water Adjustment'.D13]/12.15))*50" office:value-type="float" office:value="0" calcext:value-type="float">
            <office:annotation draw:style-name="gr30" draw:text-style-name="P2" svg:width="10.164cm" svg:height="2.752cm" svg:x="15.543cm" svg:y="7.646cm" draw:caption-point-x="-0.407cm" draw:caption-point-y="-0.81cm">
              <dc:date>2021-02-12T00:00:00</dc:date>
              <text:p text:style-name="P1"><text:span text:style-name="T1">======</text:span></text:p>
              <text:p text:style-name="P1"><text:span text:style-name="T1">ID#AAAAH1AC7pg</text:span></text:p>
              <text:p text:style-name="P1"><text:span text:style-name="T1">martin.brungard <text:s text:c="3"/>(2021-02-12 10:36:59)</text:span></text:p>
              <text:p text:style-name="P1"><text:span text:style-name="T1">The Hardness value is for informational use only. It is not a targeted value.</text:span></text:p>
            </office:annotation>
            <text:p>0</text:p>
          </table:table-cell>
          <table:table-cell table:style-name="ce486" table:number-columns-spanned="2" table:number-rows-spanned="1"/>
          <table:covered-table-cell table:style-name="ce442"/>
          <table:table-cell table:style-name="ce502"/>
          <table:table-cell table:style-name="ce53" table:number-columns-repeated="19"/>
          <table:table-cell table:style-name="ce83" table:number-columns-repeated="2"/>
          <table:table-cell table:style-name="ce31" table:number-columns-repeated="7"/>
          <table:table-cell table:number-columns-repeated="27"/>
        </table:table-row>
        <table:table-row table:style-name="ro105">
          <table:table-cell table:style-name="ce424" office:value-type="string" calcext:value-type="string" table:number-columns-spanned="2" table:number-rows-spanned="1">
            <text:p>Estimated Mash pH</text:p>
          </table:table-cell>
          <table:covered-table-cell table:style-name="ce441"/>
          <table:table-cell table:style-name="ce449" table:formula="of:=[$'3. Grain Bill Input'.F24]" office:value-type="float" office:value="5" calcext:value-type="float">
            <text:p>5.00</text:p>
          </table:table-cell>
          <table:table-cell table:style-name="ce464" office:value-type="string" calcext:value-type="string" table:number-columns-spanned="2" table:number-rows-spanned="1">
            <text:p><text:span text:style-name="T411">Alkalinity (ppm as CaCO</text:span><text:span text:style-name="T412">3</text:span><text:span text:style-name="T413">)</text:span></text:p>
          </table:table-cell>
          <table:covered-table-cell table:style-name="ce441"/>
          <table:table-cell table:style-name="ce482" table:formula="of:=[$'4. Water Adjustment'.V16]" office:value-type="string" office:string-value="" calcext:value-type="error">
            <office:annotation draw:style-name="gr24" draw:text-style-name="P2" svg:width="10.164cm" svg:height="2.751cm" svg:x="15.543cm" svg:y="8.202cm" draw:caption-point-x="-0.407cm" draw:caption-point-y="-0.811cm">
              <dc:date>2021-02-12T00:00:00</dc:date>
              <text:p text:style-name="P1"><text:span text:style-name="T1">======</text:span></text:p>
              <text:p text:style-name="P1"><text:span text:style-name="T1">ID#AAAAH1AC7kk</text:span></text:p>
              <text:p text:style-name="P1"><text:span text:style-name="T1">martin.brungard <text:s text:c="3"/>(2021-02-12 10:36:59)</text:span></text:p>
              <text:p text:style-name="P1"><text:span text:style-name="T1">The Alkalinity value is for informational use only. It is not a targeted value.</text:span></text:p>
            </office:annotation>
            <text:p>Err:522</text:p>
          </table:table-cell>
          <table:table-cell table:style-name="ce487" table:number-columns-spanned="2" table:number-rows-spanned="1"/>
          <table:covered-table-cell table:style-name="ce940"/>
          <table:table-cell table:style-name="ce503"/>
          <table:table-cell table:style-name="ce511"/>
          <table:table-cell table:style-name="ce53" table:number-columns-repeated="18"/>
          <table:table-cell table:style-name="ce83" table:number-columns-repeated="2"/>
          <table:table-cell table:style-name="ce31" table:number-columns-repeated="7"/>
          <table:table-cell table:number-columns-repeated="27"/>
        </table:table-row>
        <table:table-row table:style-name="ro117">
          <table:table-cell table:style-name="ce31" table:number-columns-repeated="9"/>
          <table:table-cell table:style-name="ce53" table:number-columns-repeated="19"/>
          <table:table-cell table:style-name="ce83" table:number-columns-repeated="2"/>
          <table:table-cell table:style-name="ce31" table:number-columns-repeated="7"/>
          <table:table-cell table:number-columns-repeated="27"/>
        </table:table-row>
        <table:table-row table:style-name="ro110">
          <table:table-cell table:style-name="ce425" office:value-type="string" calcext:value-type="string" table:number-columns-spanned="3" table:number-rows-spanned="3">
            <office:annotation draw:style-name="gr68" draw:text-style-name="P2" svg:width="9.294cm" svg:height="2.672cm" svg:x="3.617cm" svg:y="9.393cm" draw:caption-point-x="3.624cm" draw:caption-point-y="-0.837cm">
              <dc:date>2021-02-12T00:00:00</dc:date>
              <text:p text:style-name="P1"><text:span text:style-name="T1">======</text:span></text:p>
              <text:p text:style-name="P1"><text:span text:style-name="T1">ID#AAAAH1AC7nk</text:span></text:p>
              <text:p text:style-name="P1"><text:span text:style-name="T1">martin.brungard <text:s text:c="3"/>(2021-02-12 10:36:59)</text:span></text:p>
              <text:p text:style-name="P1"><text:span text:style-name="T1">Water Additions are entered on the Water Adjustment Sheet and the Sparge Acidification sheet.</text:span></text:p>
            </office:annotation>
            <text:p>Additions</text:p>
          </table:table-cell>
          <table:covered-table-cell table:style-name="ce442"/>
          <table:covered-table-cell table:style-name="ce450"/>
          <table:table-cell table:style-name="ce465" table:formula="of:=[.O22]" office:value-type="string" office:string-value="Total Mash Water Vol (gal)" calcext:value-type="string" table:number-columns-spanned="2" table:number-rows-spanned="1">
            <text:p>Total Mash Water Vol (gal)</text:p>
          </table:table-cell>
          <table:covered-table-cell table:style-name="ce440"/>
          <table:table-cell table:style-name="ce973" table:formula="of:=[$'4. Water Adjustment'.T17]" office:value-type="float" office:value="3.75" calcext:value-type="float">
            <office:annotation draw:style-name="gr69" draw:text-style-name="P2" svg:width="10.164cm" svg:height="3.227cm" svg:x="15.543cm" svg:y="9.393cm" draw:caption-point-x="-0.407cm" draw:caption-point-y="-0.837cm">
              <dc:date>2021-02-12T00:00:00</dc:date>
              <text:p text:style-name="P1"><text:span text:style-name="T1">======</text:span></text:p>
              <text:p text:style-name="P1"><text:span text:style-name="T1">ID#AAAAH1AC7lQ</text:span></text:p>
              <text:p text:style-name="P1"><text:span text:style-name="T1">martin.brungard <text:s text:c="3"/>(2021-02-12 10:36:59)</text:span></text:p>
              <text:p text:style-name="P1"><text:span text:style-name="T1">This is the total water amount used for mashing. <text:s/></text:span></text:p>
              <text:p text:style-name="P1"><text:span text:style-name="T1">This information is entered on the Water Adjustment sheet.</text:span></text:p>
            </office:annotation>
            <text:p>3.8</text:p>
          </table:table-cell>
          <table:table-cell table:style-name="ce465" table:formula="of:=[.P22]" office:value-type="string" office:string-value="Total Sparge Water Vol (gal)" calcext:value-type="string" table:number-columns-spanned="2" table:number-rows-spanned="1">
            <text:p>Total Sparge Water Vol (gal)</text:p>
          </table:table-cell>
          <table:covered-table-cell table:style-name="ce440"/>
          <table:table-cell table:style-name="ce995" table:formula="of:=[$'4. Water Adjustment'.U17]" office:value-type="float" office:value="4" calcext:value-type="float">
            <office:annotation draw:style-name="gr25" draw:text-style-name="P2" svg:width="2.269cm" svg:height="7.311cm" svg:x="23.438cm" svg:y="7.074cm" draw:caption-point-x="-0.407cm" draw:caption-point-y="1.482cm">
              <dc:date>2021-02-12T00:00:00</dc:date>
              <text:p text:style-name="P1"><text:span text:style-name="T1">======</text:span></text:p>
              <text:p text:style-name="P1"><text:span text:style-name="T1">ID#AAAAH1AC7nI</text:span></text:p>
              <text:p text:style-name="P1"><text:span text:style-name="T1">martin.brungard <text:s text:c="3"/>(2021-02-12 10:36:59)</text:span></text:p>
              <text:p text:style-name="P1"><text:span text:style-name="T1">This is the total volume of water used for sparging. <text:s/>This information is entered on the Water Adjustment sheet.</text:span></text:p>
            </office:annotation>
            <text:p>4.0</text:p>
          </table:table-cell>
          <table:table-cell table:style-name="ce80" office:value-type="string" calcext:value-type="string">
            <text:p>Total Volume = Tap Volume + Dilution Volume</text:p>
          </table:table-cell>
          <table:table-cell table:style-name="ce53" table:number-columns-repeated="18"/>
          <table:table-cell table:style-name="ce83" table:number-columns-repeated="2"/>
          <table:table-cell table:style-name="ce31" table:number-columns-repeated="7"/>
          <table:table-cell table:number-columns-repeated="27"/>
        </table:table-row>
        <table:table-row table:style-name="ro110">
          <table:covered-table-cell table:style-name="ce426"/>
          <table:covered-table-cell/>
          <table:covered-table-cell table:style-name="ce28"/>
          <table:table-cell table:style-name="ce466" table:formula="of:=[.Q22]" office:value-type="string" office:string-value="Mash Dilution Vol (gal)" calcext:value-type="string" table:number-columns-spanned="2" table:number-rows-spanned="1">
            <text:p>Mash Dilution Vol (gal)</text:p>
          </table:table-cell>
          <table:covered-table-cell table:style-name="ce19"/>
          <table:table-cell table:style-name="ce483" table:formula="of:=[$'4. Water Adjustment'.B9]/100*[.F13]" office:value-type="float" office:value="0" calcext:value-type="float">
            <office:annotation draw:style-name="gr70" draw:text-style-name="P2" svg:width="10.164cm" svg:height="2.645cm" svg:x="15.543cm" svg:y="9.975cm" draw:caption-point-x="-0.407cm" draw:caption-point-y="-0.837cm">
              <dc:date>2021-02-12T00:00:00</dc:date>
              <text:p text:style-name="P1"><text:span text:style-name="T1">======</text:span></text:p>
              <text:p text:style-name="P1"><text:span text:style-name="T1">ID#AAAAH1AC7ow</text:span></text:p>
              <text:p text:style-name="P1"><text:span text:style-name="T1">martin.brungard <text:s text:c="3"/>(2021-02-12 10:36:59)</text:span></text:p>
              <text:p text:style-name="P1"><text:span text:style-name="T1">This is the amount of dilution water added to create the Total Mash Water Volume. <text:s/>The Dilution Volume is adjusted by the Dilution Percentage input on the Water Adjustment sheet.</text:span></text:p>
            </office:annotation>
            <text:p>0.0</text:p>
          </table:table-cell>
          <table:table-cell table:style-name="ce488" table:number-columns-spanned="2" table:number-rows-spanned="1"/>
          <table:covered-table-cell table:style-name="ce21"/>
          <table:table-cell table:style-name="ce504"/>
          <table:table-cell table:style-name="ce53" table:number-columns-repeated="19"/>
          <table:table-cell table:style-name="ce83" table:number-columns-repeated="2"/>
          <table:table-cell table:style-name="ce31" table:number-columns-repeated="7"/>
          <table:table-cell table:number-columns-repeated="27"/>
        </table:table-row>
        <table:table-row table:style-name="ro110">
          <table:covered-table-cell table:style-name="ce427"/>
          <table:covered-table-cell table:style-name="ce940"/>
          <table:covered-table-cell table:style-name="ce955"/>
          <table:table-cell table:style-name="ce467" office:value-type="string" calcext:value-type="string" table:number-columns-spanned="3" table:number-rows-spanned="1">
            <text:p>Mash Water Additions</text:p>
          </table:table-cell>
          <table:covered-table-cell table:style-name="ce438"/>
          <table:covered-table-cell table:style-name="ce441"/>
          <table:table-cell table:style-name="ce489" office:value-type="string" calcext:value-type="string" table:number-columns-spanned="3" table:number-rows-spanned="1">
            <text:p>Sparge Water Additions</text:p>
          </table:table-cell>
          <table:covered-table-cell table:style-name="ce438"/>
          <table:covered-table-cell table:style-name="ce505"/>
          <table:table-cell table:style-name="ce53" table:number-columns-repeated="19"/>
          <table:table-cell table:style-name="ce83" table:number-columns-repeated="2"/>
          <table:table-cell table:style-name="ce31" table:number-columns-repeated="7"/>
          <table:table-cell table:number-columns-repeated="27"/>
        </table:table-row>
        <table:table-row table:style-name="ro105">
          <table:table-cell table:style-name="ce428" office:value-type="string" calcext:value-type="string" table:number-columns-spanned="3" table:number-rows-spanned="1">
            <text:p>Minerals </text:p>
          </table:table-cell>
          <table:covered-table-cell table:style-name="ce439"/>
          <table:covered-table-cell table:style-name="ce452"/>
          <table:table-cell table:style-name="ce468" office:value-type="string" calcext:value-type="string" table:number-columns-spanned="3" table:number-rows-spanned="1">
            <text:p>(grams)</text:p>
          </table:table-cell>
          <table:covered-table-cell table:style-name="ce439"/>
          <table:covered-table-cell table:style-name="ce452"/>
          <table:table-cell table:style-name="ce490" office:value-type="string" calcext:value-type="string" table:number-columns-spanned="3" table:number-rows-spanned="1">
            <text:p>(grams)</text:p>
          </table:table-cell>
          <table:covered-table-cell table:style-name="ce439"/>
          <table:covered-table-cell table:style-name="ce506"/>
          <table:table-cell table:style-name="ce53" table:number-columns-repeated="19"/>
          <table:table-cell table:style-name="ce83" table:number-columns-repeated="2"/>
          <table:table-cell table:style-name="ce31" table:number-columns-repeated="7"/>
          <table:table-cell table:number-columns-repeated="27"/>
        </table:table-row>
        <table:table-row table:style-name="ro105">
          <table:table-cell table:style-name="ce429" office:value-type="string" calcext:value-type="string" table:number-columns-spanned="3" table:number-rows-spanned="1">
            <text:p><text:span text:style-name="T405">Gypsum (CaSO</text:span><text:span text:style-name="T406">4</text:span><text:span text:style-name="T407"> x 2H</text:span><text:span text:style-name="T406">2</text:span><text:span text:style-name="T407">O) </text:span></text:p>
          </table:table-cell>
          <table:covered-table-cell table:style-name="ce20"/>
          <table:covered-table-cell table:style-name="ce29"/>
          <table:table-cell table:style-name="ce973" table:formula="of:=[$'4. Water Adjustment'.I19]" office:value-type="float" office:value="0" calcext:value-type="float" table:number-columns-spanned="3" table:number-rows-spanned="1">
            <text:p>0.0</text:p>
          </table:table-cell>
          <table:covered-table-cell table:style-name="ce340"/>
          <table:covered-table-cell table:style-name="ce440"/>
          <table:table-cell table:style-name="ce995" table:formula="of:=[$'4. Water Adjustment'.K19]" office:value-type="float" office:value="0" calcext:value-type="float" table:number-columns-spanned="3" table:number-rows-spanned="1">
            <text:p>0.0</text:p>
          </table:table-cell>
          <table:covered-table-cell table:style-name="ce340"/>
          <table:covered-table-cell table:style-name="ce363"/>
          <table:table-cell table:style-name="ce53" table:number-columns-repeated="2"/>
          <table:table-cell table:style-name="ce96" office:value-type="float" office:value="1" calcext:value-type="float">
            <text:p>1</text:p>
          </table:table-cell>
          <table:table-cell table:style-name="ce96" office:value-type="string" calcext:value-type="string">
            <text:p>Gallons</text:p>
          </table:table-cell>
          <table:table-cell table:style-name="ce96" office:value-type="string" calcext:value-type="string">
            <text:p>Batch Volume (gallons)</text:p>
          </table:table-cell>
          <table:table-cell table:style-name="ce96" office:value-type="string" calcext:value-type="string">
            <text:p>Total Mash Water Vol (gal)</text:p>
          </table:table-cell>
          <table:table-cell table:style-name="ce96" office:value-type="string" calcext:value-type="string">
            <text:p>Total Sparge Water Vol (gal)</text:p>
          </table:table-cell>
          <table:table-cell table:style-name="ce96" office:value-type="string" calcext:value-type="string">
            <text:p>Mash Dilution Vol (gal)</text:p>
          </table:table-cell>
          <table:table-cell table:style-name="ce96" office:value-type="string" calcext:value-type="string">
            <text:p>Sparge Dilution Vol (gal)</text:p>
          </table:table-cell>
          <table:table-cell table:style-name="ce96"/>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0" office:value-type="string" calcext:value-type="string" table:number-columns-spanned="2" table:number-rows-spanned="1">
            <text:p><text:span text:style-name="T408">Calcium Chloride (CaCl</text:span><text:span text:style-name="T409">2</text:span><text:span text:style-name="T410">)</text:span></text:p>
          </table:table-cell>
          <table:covered-table-cell table:style-name="ce21"/>
          <table:table-cell table:style-name="ce453"/>
          <table:table-cell table:style-name="ce470" table:formula="of:=[$'4. Water Adjustment'.I20]" office:value-type="float" office:value="0" calcext:value-type="float" table:number-columns-spanned="3" table:number-rows-spanned="1">
            <text:p>0.0</text:p>
          </table:table-cell>
          <table:covered-table-cell table:style-name="ce21"/>
          <table:covered-table-cell table:style-name="ce19"/>
          <table:table-cell table:style-name="ce492" table:formula="of:=[$'4. Water Adjustment'.K20]" office:value-type="float" office:value="0" calcext:value-type="float" table:number-columns-spanned="3" table:number-rows-spanned="1">
            <text:p>0.0</text:p>
          </table:table-cell>
          <table:covered-table-cell table:style-name="ce21"/>
          <table:covered-table-cell table:style-name="ce307"/>
          <table:table-cell table:style-name="ce53" table:number-columns-repeated="2"/>
          <table:table-cell table:style-name="ce96" table:number-columns-repeated="8"/>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1" office:value-type="string" calcext:value-type="string" table:number-columns-spanned="3" table:number-rows-spanned="1">
            <text:p><text:span text:style-name="T405">Epsom Salt (MgSO</text:span><text:span text:style-name="T406">4 </text:span><text:span text:style-name="T407">x 7H</text:span><text:span text:style-name="T406">2</text:span><text:span text:style-name="T407">O)</text:span></text:p>
          </table:table-cell>
          <table:covered-table-cell table:style-name="ce21"/>
          <table:covered-table-cell table:style-name="ce19"/>
          <table:table-cell table:style-name="ce470" table:formula="of:=[$'4. Water Adjustment'.I21]" office:value-type="float" office:value="0" calcext:value-type="float" table:number-columns-spanned="3" table:number-rows-spanned="1">
            <text:p>0.0</text:p>
          </table:table-cell>
          <table:covered-table-cell table:style-name="ce21"/>
          <table:covered-table-cell table:style-name="ce19"/>
          <table:table-cell table:style-name="ce492" table:formula="of:=[$'4. Water Adjustment'.K21]" office:value-type="float" office:value="0" calcext:value-type="float" table:number-columns-spanned="3" table:number-rows-spanned="1">
            <text:p>0.0</text:p>
          </table:table-cell>
          <table:covered-table-cell table:style-name="ce21"/>
          <table:covered-table-cell table:style-name="ce307"/>
          <table:table-cell table:style-name="ce53" table:number-columns-repeated="2"/>
          <table:table-cell table:style-name="ce96" office:value-type="float" office:value="2" calcext:value-type="float">
            <text:p>2</text:p>
          </table:table-cell>
          <table:table-cell table:style-name="ce96" office:value-type="string" calcext:value-type="string">
            <text:p>Liters</text:p>
          </table:table-cell>
          <table:table-cell table:style-name="ce96" office:value-type="string" calcext:value-type="string">
            <text:p>Batch Volume (liters)</text:p>
          </table:table-cell>
          <table:table-cell table:style-name="ce96" office:value-type="string" calcext:value-type="string">
            <text:p>Total Mash Water Vol (L)</text:p>
          </table:table-cell>
          <table:table-cell table:style-name="ce96" office:value-type="string" calcext:value-type="string">
            <text:p>Total Sparge Water Vol (L)</text:p>
          </table:table-cell>
          <table:table-cell table:style-name="ce96" office:value-type="string" calcext:value-type="string">
            <text:p>Mash Dilution Vol (L)</text:p>
          </table:table-cell>
          <table:table-cell table:style-name="ce96" office:value-type="string" calcext:value-type="string">
            <text:p>Sparge Dilution Vol (L)</text:p>
          </table:table-cell>
          <table:table-cell table:style-name="ce96"/>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1" office:value-type="string" calcext:value-type="string" table:number-columns-spanned="3" table:number-rows-spanned="1">
            <text:p><text:span text:style-name="T408">Magnesium Chloride (MgCl</text:span><text:span text:style-name="T409">2</text:span><text:span text:style-name="T410">)</text:span></text:p>
          </table:table-cell>
          <table:covered-table-cell table:style-name="ce21"/>
          <table:covered-table-cell table:style-name="ce19"/>
          <table:table-cell table:style-name="ce470" table:formula="of:=[$'4. Water Adjustment'.I22]" office:value-type="float" office:value="0" calcext:value-type="float" table:number-columns-spanned="3" table:number-rows-spanned="1">
            <text:p>0.0</text:p>
          </table:table-cell>
          <table:covered-table-cell table:style-name="ce21"/>
          <table:covered-table-cell table:style-name="ce19"/>
          <table:table-cell table:style-name="ce492" table:formula="of:=[$'4. Water Adjustment'.K22]" office:value-type="float" office:value="0" calcext:value-type="float" table:number-columns-spanned="3" table:number-rows-spanned="1">
            <text:p>0.0</text:p>
          </table:table-cell>
          <table:covered-table-cell table:style-name="ce21"/>
          <table:covered-table-cell table:style-name="ce307"/>
          <table:table-cell table:style-name="ce53" table:number-columns-repeated="2"/>
          <table:table-cell table:style-name="ce96" table:number-columns-repeated="8"/>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1" office:value-type="string" calcext:value-type="string" table:number-columns-spanned="3" table:number-rows-spanned="1">
            <text:p>Canning Salt (NaCl)</text:p>
          </table:table-cell>
          <table:covered-table-cell table:style-name="ce21"/>
          <table:covered-table-cell table:style-name="ce19"/>
          <table:table-cell table:style-name="ce471"/>
          <table:table-cell table:style-name="ce478" table:formula="of:=[$'4. Water Adjustment'.I23]" office:value-type="float" office:value="0" calcext:value-type="float">
            <text:p>0.0</text:p>
          </table:table-cell>
          <table:table-cell table:style-name="ce484"/>
          <table:table-cell table:style-name="ce471"/>
          <table:table-cell table:style-name="ce478" table:formula="of:=[$'4. Water Adjustment'.K23]" office:value-type="float" office:value="0" calcext:value-type="float">
            <text:p>0.0</text:p>
          </table:table-cell>
          <table:table-cell table:style-name="ce507"/>
          <table:table-cell table:style-name="ce53" table:number-columns-repeated="2"/>
          <table:table-cell table:style-name="ce96" table:number-columns-repeated="8"/>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1" office:value-type="string" calcext:value-type="string" table:number-columns-spanned="3" table:number-rows-spanned="1">
            <text:p><text:span text:style-name="T408">Baking Soda (NaHCO</text:span><text:span text:style-name="T409">3</text:span><text:span text:style-name="T410">)</text:span></text:p>
          </table:table-cell>
          <table:covered-table-cell table:style-name="ce21"/>
          <table:covered-table-cell table:style-name="ce19"/>
          <table:table-cell table:style-name="ce470" table:formula="of:=[$'4. Water Adjustment'.I24]" office:value-type="float" office:value="0" calcext:value-type="float" table:number-columns-spanned="3" table:number-rows-spanned="1">
            <text:p>0.0</text:p>
          </table:table-cell>
          <table:covered-table-cell table:style-name="ce21"/>
          <table:covered-table-cell table:style-name="ce19"/>
          <table:table-cell table:style-name="ce492" office:value-type="string" calcext:value-type="string" table:number-columns-spanned="3" table:number-rows-spanned="1">
            <text:p>Not Recommended </text:p>
          </table:table-cell>
          <table:covered-table-cell table:style-name="ce21"/>
          <table:covered-table-cell table:style-name="ce307"/>
          <table:table-cell table:style-name="ce53" table:number-columns-repeated="2"/>
          <table:table-cell table:style-name="ce217" table:formula="of:=VLOOKUP([$'1. Water Report Input'.$H$7];Adjvaritable;1;0)" office:value-type="float" office:value="1" calcext:value-type="float">
            <text:p>1</text:p>
          </table:table-cell>
          <table:table-cell table:style-name="ce130" table:formula="of:=VLOOKUP([$'1. Water Report Input'.$H$7];Adjvaritable;2;0)" office:value-type="string" office:string-value="Gallons" calcext:value-type="string">
            <text:p>Gallons</text:p>
          </table:table-cell>
          <table:table-cell table:style-name="ce129" table:formula="of:=VLOOKUP([$'1. Water Report Input'.$H$7];Adjvaritable;3;0)" office:value-type="string" office:string-value="Batch Volume (gallons)" calcext:value-type="string">
            <text:p>Batch Volume (gallons)</text:p>
          </table:table-cell>
          <table:table-cell table:style-name="ce129" table:formula="of:=VLOOKUP([$'1. Water Report Input'.$H$7];Adjvaritable;4;0)" office:value-type="string" office:string-value="Total Mash Water Vol (gal)" calcext:value-type="string">
            <text:p>Total Mash Water Vol (gal)</text:p>
          </table:table-cell>
          <table:table-cell table:style-name="ce129" table:formula="of:=VLOOKUP([$'1. Water Report Input'.$H$7];Adjvaritable;5;0)" office:value-type="string" office:string-value="Total Sparge Water Vol (gal)" calcext:value-type="string">
            <text:p>Total Sparge Water Vol (gal)</text:p>
          </table:table-cell>
          <table:table-cell table:style-name="ce217" table:formula="of:=VLOOKUP([$'1. Water Report Input'.$H$7];Adjvaritable;6;0)" office:value-type="string" office:string-value="Mash Dilution Vol (gal)" calcext:value-type="string">
            <text:p>Mash Dilution Vol (gal)</text:p>
          </table:table-cell>
          <table:table-cell table:style-name="ce130" table:formula="of:=VLOOKUP([$'1. Water Report Input'.$H$7];Adjvaritable;7;0)" office:value-type="string" office:string-value="Sparge Dilution Vol (gal)" calcext:value-type="string">
            <text:p>Sparge Dilution Vol (gal)</text:p>
          </table:table-cell>
          <table:table-cell table:style-name="ce96"/>
          <table:table-cell table:style-name="ce123"/>
          <table:table-cell table:style-name="ce53" table:number-columns-repeated="8"/>
          <table:table-cell table:style-name="ce83" table:number-columns-repeated="2"/>
          <table:table-cell table:style-name="ce31" table:number-columns-repeated="7"/>
          <table:table-cell table:number-columns-repeated="27"/>
        </table:table-row>
        <table:table-row table:style-name="ro105">
          <table:table-cell table:style-name="ce431" office:value-type="string" calcext:value-type="string" table:number-columns-spanned="3" table:number-rows-spanned="1">
            <text:p><text:span text:style-name="T408">Chalk (CaCO</text:span><text:span text:style-name="T409">3</text:span><text:span text:style-name="T410">)</text:span></text:p>
          </table:table-cell>
          <table:covered-table-cell table:style-name="ce21"/>
          <table:covered-table-cell table:style-name="ce19"/>
          <table:table-cell table:style-name="ce470" table:formula="of:=[$'4. Water Adjustment'.I25]" office:value-type="float" office:value="0" calcext:value-type="float" table:number-columns-spanned="3" table:number-rows-spanned="1">
            <text:p>0.0</text:p>
          </table:table-cell>
          <table:covered-table-cell table:style-name="ce21"/>
          <table:covered-table-cell table:style-name="ce19"/>
          <table:table-cell table:style-name="ce492" office:value-type="string" calcext:value-type="string" table:number-columns-spanned="3" table:number-rows-spanned="1">
            <text:p>Not Recommended </text:p>
          </table:table-cell>
          <table:covered-table-cell table:style-name="ce21"/>
          <table:covered-table-cell table:style-name="ce307"/>
          <table:table-cell table:style-name="ce53" table:number-columns-repeated="2"/>
          <table:table-cell table:style-name="ce83" table:number-columns-repeated="8"/>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432" office:value-type="string" calcext:value-type="string" table:number-columns-spanned="3" table:number-rows-spanned="1">
            <text:p><text:span text:style-name="T408">Pickling Lime (Ca(OH)</text:span><text:span text:style-name="T409">2</text:span><text:span text:style-name="T410">)</text:span></text:p>
          </table:table-cell>
          <table:covered-table-cell table:style-name="ce438"/>
          <table:covered-table-cell table:style-name="ce441"/>
          <table:table-cell table:style-name="ce472" table:formula="of:=[$'4. Water Adjustment'.I26]" office:value-type="float" office:value="0" calcext:value-type="float" table:number-columns-spanned="3" table:number-rows-spanned="1">
            <text:p>0.0</text:p>
          </table:table-cell>
          <table:covered-table-cell table:style-name="ce438"/>
          <table:covered-table-cell table:style-name="ce441"/>
          <table:table-cell table:style-name="ce493" office:value-type="string" calcext:value-type="string" table:number-columns-spanned="3" table:number-rows-spanned="1">
            <text:p>Not Recommended </text:p>
          </table:table-cell>
          <table:covered-table-cell table:style-name="ce438"/>
          <table:covered-table-cell table:style-name="ce505"/>
          <table:table-cell table:style-name="ce53" table:number-columns-repeated="2"/>
          <table:table-cell table:style-name="ce83" table:number-columns-repeated="8"/>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428" office:value-type="string" calcext:value-type="string" table:number-columns-spanned="3" table:number-rows-spanned="1">
            <text:p>Acids</text:p>
          </table:table-cell>
          <table:covered-table-cell table:style-name="ce439"/>
          <table:covered-table-cell table:style-name="ce452"/>
          <table:table-cell table:style-name="ce473" table:number-columns-spanned="3" table:number-rows-spanned="1"/>
          <table:covered-table-cell table:style-name="ce940"/>
          <table:covered-table-cell table:style-name="ce955"/>
          <table:table-cell table:style-name="ce494" table:number-columns-spanned="3" table:number-rows-spanned="1"/>
          <table:covered-table-cell table:style-name="ce940"/>
          <table:covered-table-cell table:style-name="ce508"/>
          <table:table-cell table:style-name="ce53" table:number-columns-repeated="2"/>
          <table:table-cell table:style-name="ce83" table:number-columns-repeated="8"/>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433" table:formula="of:=IF([$'4. Water Adjustment'.T$35]=0;&quot; &quot;;[$'4. Water Adjustment'.U35])" office:value-type="string" office:string-value="Lactic" calcext:value-type="string">
            <text:p>Lactic</text:p>
          </table:table-cell>
          <table:table-cell table:style-name="ce443" table:formula="of:=IF([$'4. Water Adjustment'.T35]=0;&quot; &quot;;[$'4. Water Adjustment'.D29])" office:value-type="float" office:value="88" calcext:value-type="float">
            <text:p>88.00</text:p>
          </table:table-cell>
          <table:table-cell table:style-name="ce454" table:formula="of:=IF([$'4. Water Adjustment'.T35]=0;&quot; &quot;;[$'4. Water Adjustment'.U8])" office:value-type="string" office:string-value="%" calcext:value-type="string">
            <text:p>%</text:p>
          </table:table-cell>
          <table:table-cell table:style-name="ce474"/>
          <table:table-cell table:style-name="ce479" table:formula="of:=[$'4. Water Adjustment'.I29]" office:value-type="float" office:value="0" calcext:value-type="float">
            <office:annotation draw:style-name="gr71" draw:text-style-name="P2" svg:width="10.527cm" svg:height="4.1cm" svg:x="12.911cm" svg:y="16.669cm" draw:caption-point-x="-0.407cm" draw:caption-point-y="-0.811cm">
              <dc:date>2021-02-12T00:00:00</dc:date>
              <text:p text:style-name="P1"><text:span text:style-name="T1">======</text:span></text:p>
              <text:p text:style-name="P1"><text:span text:style-name="T1">ID#AAAAH1AC7og</text:span></text:p>
              <text:p text:style-name="P1"><text:span text:style-name="T1">martin.brungard <text:s text:c="3"/>(2021-02-12 10:36:59)</text:span></text:p>
              <text:p text:style-name="P1"><text:span text:style-name="T1">This acid amount is from the Water Adjustment sheet.</text:span></text:p>
            </office:annotation>
            <text:p>0.0</text:p>
          </table:table-cell>
          <table:table-cell table:style-name="ce485" table:formula="of:=IF([$'4. Water Adjustment'.H28]=&quot;total acid addition (ml)&quot;;&quot;(ml)&quot;;&quot;(grams)&quot;)" office:value-type="string" office:string-value="(ml)" calcext:value-type="string">
            <text:p>(ml)</text:p>
          </table:table-cell>
          <table:table-cell table:style-name="ce495" table:number-columns-spanned="3" table:number-rows-spanned="1"/>
          <table:covered-table-cell table:style-name="ce340"/>
          <table:covered-table-cell table:style-name="ce363"/>
          <table:table-cell table:style-name="ce53" table:number-columns-repeated="2"/>
          <table:table-cell table:style-name="ce83" table:number-columns-repeated="8"/>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434" table:formula="of:=[$'2. Sparge Acidification'.B50]" office:value-type="string" office:string-value="Phosphoric" calcext:value-type="string">
            <text:p>Phosphoric</text:p>
          </table:table-cell>
          <table:table-cell table:style-name="ce444" table:formula="of:=[$'2. Sparge Acidification'.B9]" office:value-type="float" office:value="1" calcext:value-type="float">
            <text:p>1.00</text:p>
          </table:table-cell>
          <table:table-cell table:style-name="ce455" table:formula="of:=[$'2. Sparge Acidification'.B57]" office:value-type="string" office:string-value="%" calcext:value-type="string">
            <text:p>%</text:p>
          </table:table-cell>
          <table:table-cell table:style-name="ce475" table:number-columns-spanned="3" table:number-rows-spanned="1"/>
          <table:covered-table-cell table:style-name="ce438"/>
          <table:covered-table-cell table:style-name="ce441"/>
          <table:table-cell table:style-name="ce496"/>
          <table:table-cell table:style-name="ce497" table:formula="of:=IF([$'2. Sparge Acidification'.B7]=1;[$'5. Adjustment Summary'.I13]*[$'2. Sparge Acidification'.B12];[$'2. Sparge Acidification'.B12])" office:value-type="float" office:value="1.44429180223575" calcext:value-type="float">
            <office:annotation draw:style-name="gr45" draw:text-style-name="P2" svg:width="4.901cm" svg:height="6.521cm" svg:x="20.806cm" svg:y="16.014cm" draw:caption-point-x="-0.407cm" draw:caption-point-y="0.4cm">
              <dc:date>2021-02-12T00:00:00</dc:date>
              <text:p text:style-name="P1"><text:span text:style-name="T1">======</text:span></text:p>
              <text:p text:style-name="P1"><text:span text:style-name="T1">ID#AAAAH1AC7p4</text:span></text:p>
              <text:p text:style-name="P1"><text:span text:style-name="T1">martin.brungard <text:s text:c="3"/>(2021-02-12 10:36:59)</text:span></text:p>
              <text:p text:style-name="P1"><text:span text:style-name="T1">If the Water Volume input on the Sparge Acidification sheet is 1 gallon, the acid amount from that sheet is multiplied by the sparge water volume that was input on the Water Adjustment sheet. If the water volume on the Sparge Adjustment sheet is not 1 gallon, the acid amount from the Sparge Adjustment sheet is shown here.</text:span></text:p>
            </office:annotation>
            <text:p>1.4</text:p>
          </table:table-cell>
          <table:table-cell table:style-name="ce509" table:formula="of:=IF([$'4. Water Adjustment'.J30]=&quot;total acid addition (ml)&quot;;&quot;(ml)&quot;;&quot;(grams)&quot;)" office:value-type="string" office:string-value="(ml)" calcext:value-type="string">
            <text:p>(ml)</text:p>
          </table:table-cell>
          <table:table-cell table:style-name="ce53" table:number-columns-repeated="2"/>
          <table:table-cell table:style-name="ce83" table:number-columns-repeated="3"/>
          <table:table-cell table:style-name="ce132" table:number-columns-repeated="2"/>
          <table:table-cell table:style-name="ce83"/>
          <table:table-cell table:style-name="ce83" office:value-type="string" calcext:value-type="string">
            <text:p>No</text:p>
          </table:table-cell>
          <table:table-cell table:style-name="ce83"/>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435"/>
          <table:table-cell table:style-name="ce445"/>
          <table:table-cell table:style-name="ce456"/>
          <table:table-cell table:style-name="ce379"/>
          <table:table-cell table:style-name="ce480"/>
          <table:table-cell table:style-name="ce379"/>
          <table:table-cell table:style-name="ce31"/>
          <table:table-cell table:style-name="ce379"/>
          <table:table-cell table:style-name="ce510"/>
          <table:table-cell table:style-name="ce53" table:number-columns-repeated="2"/>
          <table:table-cell table:style-name="ce83" table:number-columns-repeated="3"/>
          <table:table-cell table:style-name="ce132" table:number-columns-repeated="2"/>
          <table:table-cell table:style-name="ce83" table:number-columns-repeated="3"/>
          <table:table-cell table:style-name="ce53" table:number-columns-repeated="9"/>
          <table:table-cell table:style-name="ce83" table:number-columns-repeated="2"/>
          <table:table-cell table:style-name="ce31" table:number-columns-repeated="7"/>
          <table:table-cell table:number-columns-repeated="27"/>
        </table:table-row>
        <table:table-row table:style-name="ro35">
          <table:table-cell table:style-name="ce93" office:value-type="string" calcext:value-type="string" table:number-columns-spanned="9" table:number-rows-spanned="1">
            <text:p>Copyright © 2020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8"/>
          <table:table-cell table:style-name="ce53" table:number-columns-repeated="2"/>
          <table:table-cell table:style-name="ce83" table:number-columns-repeated="3"/>
          <table:table-cell table:style-name="ce132" table:number-columns-repeated="2"/>
          <table:table-cell table:style-name="ce83" table:number-columns-repeated="3"/>
          <table:table-cell table:style-name="ce53" table:number-columns-repeated="9"/>
          <table:table-cell table:style-name="ce83" table:number-columns-repeated="2"/>
          <table:table-cell table:style-name="ce31" table:number-columns-repeated="7"/>
          <table:table-cell table:number-columns-repeated="27"/>
        </table:table-row>
        <table:table-row table:style-name="ro105">
          <table:table-cell table:style-name="ce51" office:value-type="string" calcext:value-type="string">
            <text:p>Bru'n Water v. 1.25</text:p>
          </table:table-cell>
          <table:table-cell table:style-name="ce31" table:number-columns-repeated="8"/>
          <table:table-cell table:style-name="ce53" table:number-columns-repeated="5"/>
          <table:table-cell table:style-name="ce415" table:number-columns-repeated="2"/>
          <table:table-cell table:style-name="ce53" table:number-columns-repeated="12"/>
          <table:table-cell table:style-name="ce83" table:number-columns-repeated="2"/>
          <table:table-cell table:style-name="ce31" table:number-columns-repeated="7"/>
          <table:table-cell table:number-columns-repeated="27"/>
        </table:table-row>
        <table:table-row table:style-name="ro105">
          <table:table-cell table:style-name="ce52" office:value-type="string" calcext:value-type="string">
            <text:p>If the sheet does not show comments or red corner marks, select the REVIEW tab in the Excel program menu and click the SHOW ALL COMMENTS button twice.</text:p>
          </table:table-cell>
          <table:table-cell table:style-name="ce31" table:number-columns-repeated="8"/>
          <table:table-cell table:style-name="ce53" table:number-columns-repeated="4"/>
          <table:table-cell table:style-name="ce415" table:number-columns-repeated="3"/>
          <table:table-cell table:style-name="ce53" table:number-columns-repeated="12"/>
          <table:table-cell table:style-name="ce83" table:number-columns-repeated="2"/>
          <table:table-cell table:style-name="ce31" table:number-columns-repeated="7"/>
          <table:table-cell table:number-columns-repeated="27"/>
        </table:table-row>
        <table:table-row table:style-name="ro105">
          <table:table-cell table:style-name="ce31" table:number-columns-repeated="9"/>
          <table:table-cell table:style-name="ce53" table:number-columns-repeated="19"/>
          <table:table-cell table:style-name="ce83" table:number-columns-repeated="2"/>
          <table:table-cell table:style-name="ce31" table:number-columns-repeated="7"/>
          <table:table-cell table:number-columns-repeated="27"/>
        </table:table-row>
        <table:table-row table:style-name="ro105">
          <table:table-cell table:style-name="ce31" table:number-columns-repeated="9"/>
          <table:table-cell table:style-name="ce53" table:number-columns-repeated="5"/>
          <table:table-cell table:style-name="ce415"/>
          <table:table-cell table:style-name="ce53" table:number-columns-repeated="13"/>
          <table:table-cell table:style-name="ce83" table:number-columns-repeated="2"/>
          <table:table-cell table:style-name="ce31" table:number-columns-repeated="7"/>
          <table:table-cell table:number-columns-repeated="27"/>
        </table:table-row>
        <table:table-row table:style-name="ro86">
          <table:table-cell table:style-name="ce31" table:number-columns-repeated="9"/>
          <table:table-cell table:style-name="ce53" table:number-columns-repeated="19"/>
          <table:table-cell table:style-name="ce83" table:number-columns-repeated="2"/>
          <table:table-cell table:style-name="ce31" table:number-columns-repeated="7"/>
          <table:table-cell table:number-columns-repeated="27"/>
        </table:table-row>
        <table:table-row table:style-name="ro98">
          <table:table-cell table:style-name="ce31" table:number-columns-repeated="9"/>
          <table:table-cell table:style-name="ce53" table:number-columns-repeated="19"/>
          <table:table-cell table:style-name="ce83" table:number-columns-repeated="2"/>
          <table:table-cell table:style-name="ce31" table:number-columns-repeated="7"/>
          <table:table-cell table:number-columns-repeated="27"/>
        </table:table-row>
        <table:table-row table:style-name="ro102" table:number-rows-repeated="3">
          <table:table-cell table:style-name="ce31" table:number-columns-repeated="9"/>
          <table:table-cell table:style-name="ce53" table:number-columns-repeated="19"/>
          <table:table-cell table:style-name="ce83" table:number-columns-repeated="2"/>
          <table:table-cell table:style-name="ce31" table:number-columns-repeated="7"/>
          <table:table-cell table:number-columns-repeated="27"/>
        </table:table-row>
        <table:table-row table:style-name="ro102" table:number-rows-repeated="7">
          <table:table-cell table:style-name="ce31" table:number-columns-repeated="9"/>
          <table:table-cell table:style-name="ce53" table:number-columns-repeated="19"/>
          <table:table-cell table:style-name="ce83" table:number-columns-repeated="9"/>
          <table:table-cell table:number-columns-repeated="27"/>
        </table:table-row>
        <table:table-row table:style-name="ro102">
          <table:table-cell table:style-name="ce31" table:number-columns-repeated="9"/>
          <table:table-cell table:style-name="ce53" table:number-columns-repeated="13"/>
          <table:table-cell table:style-name="ce512"/>
          <table:table-cell table:style-name="ce53" table:number-columns-repeated="5"/>
          <table:table-cell table:style-name="ce83" table:number-columns-repeated="9"/>
          <table:table-cell table:number-columns-repeated="27"/>
        </table:table-row>
        <table:table-row table:style-name="ro102">
          <table:table-cell table:style-name="ce31" table:number-columns-repeated="9"/>
          <table:table-cell table:style-name="ce53" table:number-columns-repeated="13"/>
          <table:table-cell table:style-name="ce513"/>
          <table:table-cell table:style-name="ce53" table:number-columns-repeated="5"/>
          <table:table-cell table:style-name="ce83" table:number-columns-repeated="9"/>
          <table:table-cell table:number-columns-repeated="27"/>
        </table:table-row>
        <table:table-row table:style-name="ro102" table:number-rows-repeated="10">
          <table:table-cell table:style-name="ce31" table:number-columns-repeated="9"/>
          <table:table-cell table:style-name="ce53" table:number-columns-repeated="19"/>
          <table:table-cell table:style-name="ce83" table:number-columns-repeated="9"/>
          <table:table-cell table:number-columns-repeated="27"/>
        </table:table-row>
        <table:table-row table:style-name="ro102" table:number-rows-repeated="17">
          <table:table-cell table:style-name="ce31" table:number-columns-repeated="20"/>
          <table:table-cell table:style-name="ce83" table:number-columns-repeated="17"/>
          <table:table-cell table:number-columns-repeated="27"/>
        </table:table-row>
        <table:table-row table:style-name="ro102">
          <table:table-cell table:style-name="ce83" table:number-columns-repeated="9"/>
          <table:table-cell table:style-name="ce31" table:number-columns-repeated="11"/>
          <table:table-cell table:style-name="ce83" table:number-columns-repeated="17"/>
          <table:table-cell table:number-columns-repeated="27"/>
        </table:table-row>
        <table:table-row table:style-name="ro102" table:number-rows-repeated="4">
          <table:table-cell table:style-name="ce31" table:number-columns-repeated="20"/>
          <table:table-cell table:style-name="ce83" table:number-columns-repeated="17"/>
          <table:table-cell table:number-columns-repeated="27"/>
        </table:table-row>
        <table:table-row table:style-name="ro102">
          <table:table-cell table:style-name="ce31" table:number-columns-repeated="9"/>
          <table:table-cell table:style-name="ce83" table:number-columns-repeated="8"/>
          <table:table-cell table:style-name="ce31" table:number-columns-repeated="20"/>
          <table:table-cell table:number-columns-repeated="27"/>
        </table:table-row>
        <table:table-row table:style-name="ro102" table:number-rows-repeated="920">
          <table:table-cell table:style-name="ce31" table:number-columns-repeated="37"/>
          <table:table-cell table:number-columns-repeated="27"/>
        </table:table-row>
        <table:table-row table:style-name="ro103" table:number-rows-repeated="1047575">
          <table:table-cell table:number-columns-repeated="64"/>
        </table:table-row>
        <table:table-row table:style-name="ro103">
          <table:table-cell table:number-columns-repeated="64"/>
        </table:table-row>
        <calcext:conditional-formats>
          <calcext:conditional-format calcext:target-range-address="'5. Adjustment Summary'.C11:'5. Adjustment Summary'.C11">
            <calcext:condition calcext:apply-style-name="ConditionalStyle_6" calcext:value="formula-is([.C11]&lt;5.15)" calcext:base-cell-address="'5. Adjustment Summary'.C11"/>
          </calcext:conditional-format>
          <calcext:conditional-format calcext:target-range-address="'5. Adjustment Summary'.C11:'5. Adjustment Summary'.C11">
            <calcext:condition calcext:apply-style-name="ConditionalStyle_6" calcext:value="formula-is([.C11]&gt;5.75)" calcext:base-cell-address="'5. Adjustment Summary'.C11"/>
          </calcext:conditional-format>
          <calcext:conditional-format calcext:target-range-address="'5. Adjustment Summary'.C11:'5. Adjustment Summary'.C11">
            <calcext:condition calcext:apply-style-name="ConditionalStyle_1" calcext:value="formula-is([.C11]&gt;5.55)" calcext:base-cell-address="'5. Adjustment Summary'.C11"/>
          </calcext:conditional-format>
          <calcext:conditional-format calcext:target-range-address="'5. Adjustment Summary'.C11:'5. Adjustment Summary'.C11">
            <calcext:condition calcext:apply-style-name="ConditionalStyle_4" calcext:value="formula-is([.C11]&gt;5.25)" calcext:base-cell-address="'5. Adjustment Summary'.C11"/>
          </calcext:conditional-format>
          <calcext:conditional-format calcext:target-range-address="'5. Adjustment Summary'.C11:'5. Adjustment Summary'.C11">
            <calcext:condition calcext:apply-style-name="ConditionalStyle_1" calcext:value="formula-is([.C11]&lt;5.25)" calcext:base-cell-address="'5. Adjustment Summary'.C11"/>
          </calcext:conditional-format>
        </calcext:conditional-formats>
      </table:table>
      <table:named-expressions>
        <table:named-range table:name="aciditytable" table:base-cell-address="$'0. Instructions'.$A$1" table:cell-range-address="$'3. Grain Bill Input'.$K$5:.$N$17"/>
        <table:named-range table:name="acidtable" table:base-cell-address="$'0. Instructions'.$A$1" table:cell-range-address="$'4. Water Adjustment'.$T$26:.$AJ$34"/>
        <table:named-range table:name="acidtable2" table:base-cell-address="$'0. Instructions'.$A$1" table:cell-range-address="$'4. Water Adjustment'.$AN$25:.$BD$33"/>
        <table:named-range table:name="Acid_Required" table:base-cell-address="$'0. Instructions'.$A$1" table:cell-range-address="$'2. Sparge Acidification'.$T$47"/>
        <table:named-range table:name="Acid_Required2" table:base-cell-address="$'0. Instructions'.$A$1" table:cell-range-address="$'2. Sparge Acidification'.$T$48"/>
        <table:named-range table:name="Adjvaritable" table:base-cell-address="$'0. Instructions'.$A$1" table:cell-range-address="$'5. Adjustment Summary'.$L$17:.$R$21"/>
        <table:named-range table:name="alkalinity" table:base-cell-address="$'0. Instructions'.$A$1" table:cell-range-address="$'2. Sparge Acidification'.$B$4"/>
        <table:named-range table:name="colortable" table:base-cell-address="$'0. Instructions'.$A$1" table:cell-range-address="$'3. Grain Bill Input'.$P$28:.$R$29"/>
        <table:named-range table:name="Desired_pH" table:base-cell-address="$'0. Instructions'.$A$1" table:cell-range-address="$'2. Sparge Acidification'.$B$6"/>
        <table:named-range table:name="dilution" table:base-cell-address="$'0. Instructions'.$A$1" table:cell-range-address="$'4. Water Adjustment'.$A$108:.$H$109"/>
        <table:named-range table:name="frac" table:base-cell-address="$'0. Instructions'.$A$1" table:cell-range-address="$'2. Sparge Acidification'.$T$61"/>
        <table:named-range table:name="frac2" table:base-cell-address="$'0. Instructions'.$A$1" table:cell-range-address="$'2. Sparge Acidification'.$T$75"/>
        <table:named-range table:name="mashtable" table:base-cell-address="$'0. Instructions'.$A$1" table:cell-range-address="$'3. Grain Bill Input'.$M$28:.$O$29"/>
        <table:named-range table:name="mashvaritable" table:base-cell-address="$'0. Instructions'.$A$1" table:cell-range-address="$'3. Grain Bill Input'.$L$31:.$X$34"/>
        <table:named-range table:name="mg_required" table:base-cell-address="$'0. Instructions'.$A$1" table:cell-range-address="$'2. Sparge Acidification'.$B$12"/>
        <table:named-range table:name="mM_required" table:base-cell-address="$'0. Instructions'.$A$1" table:cell-range-address="$'2. Sparge Acidification'.$T$63"/>
        <table:named-range table:name="mm_required2" table:base-cell-address="$'0. Instructions'.$A$1" table:cell-range-address="$'2. Sparge Acidification'.$T$77"/>
        <table:named-range table:name="profiles" table:base-cell-address="$'0. Instructions'.$A$1" table:cell-range-address="$'4. Water Adjustment'.$A$38:.$H$103"/>
        <table:named-range table:name="sprgvaritable" table:base-cell-address="$'0. Instructions'.$A$1" table:cell-range-address="$'2. Sparge Acidification'.$H$53:.$J$56"/>
        <table:named-range table:name="Start_pH" table:base-cell-address="$'0. Instructions'.$A$1" table:cell-range-address="$'2. Sparge Acidification'.$B$5"/>
        <table:named-range table:name="strengthtable" table:base-cell-address="$'0. Instructions'.$A$1" table:cell-range-address="$'4. Water Adjustment'.$T$4:.$X$7"/>
        <table:named-range table:name="strtable" table:base-cell-address="$'0. Instructions'.$A$1" table:cell-range-address="$'2. Sparge Acidification'.$A$53:.$E$56"/>
        <table:named-range table:name="strtable2" table:base-cell-address="$'0. Instructions'.$A$1" table:cell-range-address="$'2. Sparge Acidification'.$A$80:.$E$83"/>
        <table:named-range table:name="table" table:base-cell-address="$'0. Instructions'.$A$1" table:cell-range-address="$'2. Sparge Acidification'.$A$41:.$R$49"/>
        <table:named-range table:name="table2" table:base-cell-address="$'0. Instructions'.$A$1" table:cell-range-address="$'2. Sparge Acidification'.$A$68:.$R$76"/>
        <table:named-range table:name="thresholdtable" table:base-cell-address="$'0. Instructions'.$A$1" table:cell-range-address="$'5. Adjustment Summary'.$O$27:.$P$31"/>
        <table:named-range table:name="watervaritable" table:base-cell-address="$'0. Instructions'.$A$1" table:cell-range-address="$'4. Water Adjustment'.$T$10:.$AD$13"/>
        <table:named-range table:name="watervaritable2" table:base-cell-address="$'0. Instructions'.$A$1" table:cell-range-address="$'4. Water Adjustment'.$AI$10:.$AR$13"/>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Narrow" svg:font-family="'Arial Narrow'"/>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number-style style:name="N114">
      <number:number number:decimal-places="1" loext:min-decimal-places="1" number:min-integer-digits="1"/>
    </number:number-style>
    <number:number-style style:name="N115">
      <number:number number:decimal-places="6" loext:min-decimal-places="6" number:min-integer-digits="1"/>
    </number:number-style>
    <number:number-style style:name="N116">
      <number:number number:decimal-places="8" loext:min-decimal-places="8" number:min-integer-digits="1"/>
    </number:number-style>
    <number:number-style style:name="N117">
      <number:number number:decimal-places="3" loext:min-decimal-places="3" number:min-integer-digits="1"/>
    </number:number-style>
    <number:number-style style:name="N118">
      <number:number number:decimal-places="5" loext:min-decimal-places="5"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000"/>
    </style:style>
    <style:style style:name="ConditionalStyle_5f_2" style:display-name="ConditionalStyle_2" style:family="table-cell" style:parent-style-name="Default">
      <style:table-cell-properties fo:background-color="#ff6600"/>
    </style:style>
    <style:style style:name="ConditionalStyle_5f_3" style:display-name="ConditionalStyle_3" style:family="table-cell" style:parent-style-name="Default">
      <style:table-cell-properties fo:background-color="#ccffff"/>
    </style:style>
    <style:style style:name="ConditionalStyle_5f_4" style:display-name="ConditionalStyle_4" style:family="table-cell" style:parent-style-name="Default">
      <style:table-cell-properties fo:background-color="#65ff65"/>
    </style:style>
    <style:style style:name="ConditionalStyle_5f_5" style:display-name="ConditionalStyle_5" style:family="table-cell" style:parent-style-name="Default">
      <style:table-cell-properties fo:background-color="transparent"/>
      <style:text-properties fo:color="#ffffff"/>
    </style:style>
    <style:style style:name="ConditionalStyle_5f_6" style:display-name="ConditionalStyle_6" style:family="table-cell" style:parent-style-name="Default">
      <style:table-cell-properties fo:background-color="#ff6565"/>
    </style:style>
    <style:style style:name="ConditionalStyle_5f_7" style:display-name="ConditionalStyle_7" style:family="table-cell" style:parent-style-name="Default">
      <style:table-cell-properties fo:background-color="#92d050"/>
    </style:style>
    <style:style style:name="ConditionalStyle_5f_8" style:display-name="ConditionalStyle_8" style:family="table-cell" style:parent-style-name="Default">
      <style:table-cell-properties fo:background-color="#cc6600"/>
    </style:style>
    <style:style style:name="ConditionalStyle_5f_9" style:display-name="ConditionalStyle_9"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0cm" fo:margin-bottom="0cm" fo:margin-left="1.778cm" fo:margin-right="1.778cm" style:print-page-order="ttb" style:first-page-number="continue" style:scale-to="100%" style:table-centering="horizontal" style:writing-mode="lr-tb" style:print="charts drawings objects zero-values"/>
      <style:header-style>
        <style:header-footer-properties fo:min-height="1.905cm" fo:margin-left="0cm" fo:margin-right="0cm" fo:margin-bottom="1.552cm"/>
      </style:header-style>
      <style:footer-style>
        <style:header-footer-properties fo:min-height="1.905cm" fo:margin-left="0cm" fo:margin-right="0cm" fo:margin-top="1.552cm"/>
      </style:footer-style>
    </style:page-layout>
    <style:page-layout style:name="Mpm4">
      <style:page-layout-properties fo:page-width="27.94cm" fo:page-height="21.59cm" style:num-format="1" style:print-orientation="landscape" fo:margin-top="1.854cm" fo:margin-bottom="0cm" fo:margin-left="1.905cm" fo:margin-right="1.905cm" style:print-page-order="ttb" style:first-page-number="continue" loext:scale-to-X="1" loext: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2.007cm" fo:margin-left="0cm" fo:margin-right="0cm" fo:margin-top="1.655cm"/>
      </style:footer-style>
    </style:page-layout>
    <style:page-layout style:name="Mpm5">
      <style:page-layout-properties fo:page-width="21.59cm" fo:page-height="27.94cm" style:num-format="1" style:print-orientation="portrait" fo:margin-top="2.54cm" fo:margin-bottom="0cm" fo:margin-left="1.905cm" fo:margin-right="1.905cm" style:print-page-order="ttb" style:first-page-number="continue" loext:scale-to-X="1" loext: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2.54cm" fo:margin-left="0cm" fo:margin-right="0cm" fo:margin-top="2.187cm"/>
      </style:footer-style>
    </style:page-layout>
    <style:page-layout style:name="Mpm6">
      <style:page-layout-properties fo:page-width="27.94cm" fo:page-height="21.59cm" style:num-format="1" style:print-orientation="landscape" fo:margin-top="1.905cm" fo:margin-bottom="0cm" fo:margin-left="1.778cm" fo:margin-right="1.778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1.905cm" fo:margin-left="0cm" fo:margin-right="0cm" fo:margin-top="1.552cm"/>
      </style:footer-style>
    </style:page-layout>
    <style:page-layout style:name="Mpm7">
      <style:page-layout-properties fo:page-width="27.94cm" fo:page-height="21.59cm" style:num-format="1" style:print-orientation="landscape" fo:margin-top="2.54cm" fo:margin-bottom="0cm" fo:margin-left="1.905cm" fo:margin-right="1.905cm" style:print-page-order="ttb" style:first-page-number="continue" loext:scale-to-X="1" loext: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2.54cm" fo:margin-left="0cm" fo:margin-right="0cm" fo:margin-top="2.187cm"/>
      </style:footer-style>
    </style:page-layout>
    <style:page-layout style:name="Mpm8">
      <style:page-layout-properties fo:page-width="21.59cm" fo:page-height="27.94cm" style:num-format="1" style:print-orientation="portrait" fo:margin-top="0.635cm" fo:margin-bottom="0cm" fo:margin-left="0.762cm" fo:margin-right="0.762cm" style:print-page-order="ttb" style:first-page-number="continue" loext:scale-to-X="1" loext: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635cm" fo:margin-left="0cm" fo:margin-right="0cm" fo:margin-top="0.282c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2">0000-00-00</text:date>, <text:time style:data-style-name="N2" text:time-value="02:38:39.522244447">00:00:00</text:time></text:p>
        </style:region-right>
      </style:header>
      <style:header-left style:display="false"/>
      <style:footer>
        <text:p>Page <text:page-number>1</text:page-number><text:s/>/ <text:page-count>99</text:page-count></text:p>
      </style:footer>
      <style:footer-left style:display="false"/>
    </style:master-page>
    <style:master-page style:name="PageStyle_5f_0._20_Instructions" style:display-name="PageStyle_0. Instructions" style:page-layout-name="Mpm3">
      <style:header>
        <text:p><text:span text:style-name="MT1">Bru'n Water</text:span></text:p>
      </style:header>
      <style:header-left style:display="false"/>
      <style:footer>
        <style:region-left>
          <text:p><text:span text:style-name="MT1">v.1.24</text:span></text:p>
        </style:region-left>
        <style:region-center>
          <text:p><text:span text:style-name="MT1">Page </text:span><text:span text:style-name="MT1"><text:page-number>1</text:page-number></text:span></text:p>
        </style:region-center>
        <style:region-right>
          <text:p><text:span text:style-name="MT1">8/17/18</text:span></text:p>
        </style:region-right>
      </style:footer>
      <style:footer-left style:display="false"/>
    </style:master-page>
    <style:master-page style:name="PageStyle_5f_1._20_Water_20_Report_20_Input" style:display-name="PageStyle_1. Water Report Input" style:page-layout-name="Mpm4">
      <style:header style:display="false"/>
      <style:header-left style:display="false"/>
      <style:footer>
        <style:region-left>
          <text:p><text:span text:style-name="MT1">Bru'n Water V.1.24</text:span></text:p>
        </style:region-left>
        <style:region-right>
          <text:p><text:span text:style-name="MT1">9/17/18</text:span></text:p>
        </style:region-right>
      </style:footer>
      <style:footer-left style:display="false"/>
    </style:master-page>
    <style:master-page style:name="PageStyle_5f_2._20_Sparge_20_Acidification" style:display-name="PageStyle_2. Sparge Acidification" style:page-layout-name="Mpm5">
      <style:header style:display="false"/>
      <style:header-left style:display="false"/>
      <style:footer>
        <style:region-left>
          <text:p><text:span text:style-name="MT1">Bru'n Water V.1.24</text:span></text:p>
        </style:region-left>
        <style:region-right>
          <text:p><text:span text:style-name="MT1">9/17/18</text:span></text:p>
        </style:region-right>
      </style:footer>
      <style:footer-left style:display="false"/>
    </style:master-page>
    <style:master-page style:name="PageStyle_5f_3._20_Grain_20_Bill_20_Input" style:display-name="PageStyle_3. Grain Bill Input" style:page-layout-name="Mpm6">
      <style:header style:display="false"/>
      <style:header-left style:display="false"/>
      <style:footer>
        <style:region-left>
          <text:p><text:span text:style-name="MT1">Bru'n Water V.1.24</text:span></text:p>
        </style:region-left>
        <style:region-right>
          <text:p><text:span text:style-name="MT1">9/17/18</text:span></text:p>
        </style:region-right>
      </style:footer>
      <style:footer-left style:display="false"/>
    </style:master-page>
    <style:master-page style:name="PageStyle_5f_4._20_Water_20_Adjustment" style:display-name="PageStyle_4. Water Adjustment" style:page-layout-name="Mpm7">
      <style:header style:display="false"/>
      <style:header-left style:display="false"/>
      <style:footer>
        <style:region-left>
          <text:p><text:span text:style-name="MT1">Bru'n Water V.1.24</text:span></text:p>
        </style:region-left>
        <style:region-right>
          <text:p><text:span text:style-name="MT1">9/17/18</text:span></text:p>
        </style:region-right>
      </style:footer>
      <style:footer-left style:display="false"/>
    </style:master-page>
    <style:master-page style:name="PageStyle_5f_5._20_Adjustment_20_Summary" style:display-name="PageStyle_5. Adjustment Summary" style:page-layout-name="Mpm8">
      <style:header style:display="false"/>
      <style:header-left style:display="false"/>
      <style:footer>
        <style:region-left>
          <text:p><text:span text:style-name="MT1">Bru'n Water <text:s/>v.1.24</text:span></text:p>
        </style:region-left>
        <style:region-right>
          <text:p><text:span text:style-name="MT1">9/17/18</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0-07-06T14:21:11</meta:creation-date>
    <meta:initial-creator>Martin Brungard</meta:initial-creator>
    <meta:generator>LibreOffice/6.4.6.2$Linux_X86_64 LibreOffice_project/40$Build-2</meta:generator>
    <dc:date>2021-02-12T02:39:42.615565098</dc:date>
    <meta:editing-duration>PT1M3S</meta:editing-duration>
    <meta:editing-cycles>1</meta:editing-cycles>
    <meta:document-statistic meta:table-count="6" meta:cell-count="2545" meta:object-count="0"/>
  </office:meta>
</office:document-meta>
</file>